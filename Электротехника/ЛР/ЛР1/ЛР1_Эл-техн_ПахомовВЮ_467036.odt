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1F4DDFF2EE1.png" manifest:media-type="image/png"/>
  <manifest:file-entry manifest:full-path="Pictures/1000000100000320000001F412E054A9.png" manifest:media-type="image/png"/>
  <manifest:file-entry manifest:full-path="Pictures/1000000100000216000001CEDA2AE113.png" manifest:media-type="image/png"/>
  <manifest:file-entry manifest:full-path="Pictures/1000000100000203000000FCDA082FB6.png" manifest:media-type="image/png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1.298cm" style:rel-column-width="736*"/>
    </style:style>
    <style:style style:name="Table1.B" style:family="table-column">
      <style:table-column-properties style:column-width="3.727cm" style:rel-column-width="2113*"/>
    </style:style>
    <style:style style:name="Table1.C" style:family="table-column">
      <style:table-column-properties style:column-width="2.512cm" style:rel-column-width="1424*"/>
    </style:style>
    <style:style style:name="Table1.D" style:family="table-column">
      <style:table-column-properties style:column-width="2.514cm" style:rel-column-width="1425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1f5076"/>
    </style:style>
    <style:style style:name="P6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8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d823a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1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4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5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0f2314" officeooo:paragraph-rsid="000f2314"/>
    </style:style>
    <style:style style:name="P17" style:family="paragraph" style:parent-style-name="Text_20_body">
      <style:paragraph-properties fo:margin-top="0cm" fo:margin-bottom="0.25cm" style:contextual-spacing="false" fo:line-height="150%" fo:text-align="left" style:justify-single-word="false"/>
      <style:text-properties officeooo:paragraph-rsid="000f2314"/>
    </style:style>
    <style:style style:name="P18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officeooo:rsid="000f2314" officeooo:paragraph-rsid="000f2314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1bb09" officeooo:paragraph-rsid="0021bb09"/>
    </style:style>
    <style:style style:name="P20" style:family="paragraph" style:parent-style-name="Table_20_Contents">
      <style:paragraph-properties fo:text-align="center" style:justify-single-word="false"/>
      <style:text-properties officeooo:rsid="001f5076" officeooo:paragraph-rsid="001f5076"/>
    </style:style>
    <style:style style:name="P21" style:family="paragraph" style:parent-style-name="Table_20_Contents">
      <style:paragraph-properties fo:text-align="center" style:justify-single-word="false"/>
      <style:text-properties officeooo:rsid="001f63ec" officeooo:paragraph-rsid="001f63ec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21a4ba" officeooo:paragraph-rsid="0021a4ba"/>
    </style:style>
    <style:style style:name="P24" style:family="paragraph" style:parent-style-name="Table_20_Contents">
      <style:paragraph-properties fo:text-align="center" style:justify-single-word="false"/>
      <style:text-properties officeooo:rsid="002a6ef1" officeooo:paragraph-rsid="002a6ef1"/>
    </style:style>
    <style:style style:name="P25" style:family="paragraph" style:parent-style-name="Table_20_Contents">
      <style:paragraph-properties fo:text-align="center" style:justify-single-word="false"/>
      <style:text-properties officeooo:rsid="001fb7e0" officeooo:paragraph-rsid="001fb7e0"/>
    </style:style>
    <style:style style:name="P26" style:family="paragraph" style:parent-style-name="Table_20_Contents">
      <style:paragraph-properties fo:text-align="center" style:justify-single-word="false"/>
      <style:text-properties officeooo:rsid="001f7ab7" officeooo:paragraph-rsid="001f7ab7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paragraph-rsid="00111865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38ea7" officeooo:paragraph-rsid="00238ea7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style:font-name="Liberation Serif" officeooo:rsid="001f5076" officeooo:paragraph-rsid="00238ea7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9bd22" officeooo:paragraph-rsid="0029bd22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4f4cd" officeooo:paragraph-rsid="0024f4cd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center" style:justify-single-word="false" fo:text-indent="1.3cm" style:auto-text-indent="false" fo:background-color="transparent"/>
      <style:text-properties officeooo:rsid="0024f4cd" officeooo:paragraph-rsid="0024f4cd"/>
    </style:style>
    <style:style style:name="P33" style:family="paragraph" style:parent-style-name="Рисунок">
      <style:paragraph-properties fo:text-align="center" style:justify-single-word="false"/>
    </style:style>
    <style:style style:name="P34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1f5076" officeooo:paragraph-rsid="001f5076" style:font-weight-asian="bold" style:font-weight-complex="bold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style:page-number="auto" fo:background-color="transparent"/>
      <style:text-properties officeooo:rsid="001c1368" officeooo:paragraph-rsid="001c1368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/>
      <style:text-properties officeooo:rsid="001c1368" officeooo:paragraph-rsid="001c136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5076"/>
    </style:style>
    <style:style style:name="T3" style:family="text">
      <style:text-properties officeooo:rsid="000ca6c1"/>
    </style:style>
    <style:style style:name="T4" style:family="text">
      <style:text-properties officeooo:rsid="0016960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bb09" style:font-weight-asian="bold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8629c"/>
    </style:style>
    <style:style style:name="T10" style:family="text">
      <style:text-properties style:text-position="0% 100%" officeooo:rsid="00238ea7"/>
    </style:style>
    <style:style style:name="T11" style:family="text">
      <style:text-properties officeooo:rsid="001f7ab7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1"/>
    </style:style>
    <style:style style:name="T14" style:family="text">
      <style:text-properties officeooo:rsid="0029bd22"/>
    </style:style>
    <style:style style:name="T15" style:family="text">
      <style:text-properties style:text-position="0% 100%" style:font-name="Liberation Serif" officeooo:rsid="001f5076"/>
    </style:style>
    <style:style style:name="T16" style:family="text">
      <style:text-properties style:text-position="sub 58%" style:font-name="Liberation Serif"/>
    </style:style>
    <style:style style:name="T17" style:family="text">
      <style:text-properties style:text-position="0% 100%" style:font-name="Liberation Serif"/>
    </style:style>
    <style:style style:name="T18" style:family="text">
      <style:text-properties style:text-position="super 58%"/>
    </style:style>
    <style:style style:name="T19" style:family="text">
      <style:text-properties style:text-position="sub 58%" officeooo:rsid="00238ea7"/>
    </style:style>
    <style:style style:name="T20" style:family="text">
      <style:text-properties officeooo:rsid="0024f4cd"/>
    </style:style>
    <style:style style:name="T21" style:family="text">
      <style:text-properties officeooo:rsid="001c136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Электротехника</text:span>»</text:p>
      <text:p text:style-name="P3"/>
      <text:p text:style-name="P3">ОТЧЕТ ПО ЛАБОРАТОРНОЙ РАБОТЕ <text:span text:style-name="T3">№</text:span>1</text:p>
      <text:p text:style-name="P5">«<text:span text:style-name="T2">Исследование характеристик источника</text:span></text:p>
      <text:p text:style-name="P5"><text:span text:style-name="T2">электрической энергии постоянного тока</text:span>»</text:p>
      <text:p text:style-name="P3"/>
      <text:p text:style-name="P6">Выполнил:</text:p>
      <text:p text:style-name="P6">Пахомов Владимир Юрьевич, студент группы N3250</text:p>
      <text:p text:style-name="P7"><draw:frame draw:style-name="fr1" draw:name="Изображение1" text:anchor-type="char" svg:x="14.242cm" svg:y="0.746cm" svg:width="3.489cm" svg:height="1.707cm" draw:z-index="0"><draw:image xlink:href="Pictures/1000000100000203000000FCDA082FB6.png" xlink:type="simple" xlink:show="embed" xlink:actuate="onLoad" draw:mime-type="image/png"/></draw:frame></text:p>
      <text:p text:style-name="P7">________________</text:p>
      <text:p text:style-name="P8">(подпись) <text:s text:c="8"/></text:p>
      <text:p text:style-name="P6"/>
      <text:p text:style-name="P6">Проверил:</text:p>
      <text:p text:style-name="P9"><text:span text:style-name="T2">Кононова Мария Евгеньевна</text:span>, преподаватель ФБИТ</text:p>
      <text:p text:style-name="P9"/>
      <text:p text:style-name="P10">_____________________</text:p>
      <text:p text:style-name="P8">(отметка о выполнении) <text:s text:c="2"/></text:p>
      <text:p text:style-name="P10"/>
      <text:p text:style-name="P10"/>
      <text:p text:style-name="P10">________________</text:p>
      <text:p text:style-name="P11">(подпись) <text:s text:c="8"/></text:p>
      <text:p text:style-name="P2"/>
      <text:p text:style-name="P2">Санкт-Петербург</text:p>
      <text:p text:style-name="P2">202<text:span text:style-name="T4">6</text:span>.</text:p>
      <text:h text:style-name="P12" text:outline-level="1"><text:bookmark-start text:name="__RefHeading___Toc80_2058273410"/>СОДЕРЖАНИЕ<text:bookmark-end text:name="__RefHeading___Toc80_2058273410"/></text:h>
      <text:p text:style-name="P13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80_2058273410" office:name="СОДЕРЖАНИЕ" text:style-name="Index_20_Link" text:visited-style-name="Index_20_Link">СОДЕРЖАНИЕ<text:tab/>2</text:a></text:p>
          <text:p text:style-name="P14"><text:a xlink:type="simple" xlink:href="#__RefHeading___Toc82_2058273410" office:name="ВВЕДЕНИЕ" text:style-name="Index_20_Link" text:visited-style-name="Index_20_Link">ВВЕДЕНИЕ<text:tab/>3</text:a></text:p>
          <text:p text:style-name="P14"><text:a xlink:type="simple" xlink:href="#__RefHeading___Toc143_2058273410" office:name="ХОД РАБОТЫ (Вариант 22)" text:style-name="Index_20_Link" text:visited-style-name="Index_20_Link">ХОД РАБОТЫ (Вариант 22)<text:tab/>3</text:a></text:p>
          <text:p text:style-name="P14"><text:a xlink:type="simple" xlink:href="#__RefHeading___Toc82_2058273410%20Copy%201" office:name="ЗАКЛЮЧЕНИЕ" text:style-name="Index_20_Link" text:visited-style-name="Index_20_Link">ЗАКЛЮЧЕНИЕ<text:tab/>6</text:a></text:p>
        </text:index-body>
      </text:table-of-content>
      <text:p text:style-name="P13"/>
      <text:h text:style-name="P15" text:outline-level="1"><text:bookmark-start text:name="__RefHeading___Toc82_2058273410"/>ВВЕДЕНИЕ<text:bookmark-end text:name="__RefHeading___Toc82_2058273410"/></text:h>
      <text:p text:style-name="P16"><text:span text:style-name="T5">Цель работы</text:span> — <text:span text:style-name="T2">и</text:span>сследование режимов работы и экспериментальное определение<text:span text:style-name="T2"> </text:span>параметров схемы замещения источника электрической энергии.</text:p>
      <text:p text:style-name="P17"/>
      <text:p text:style-name="P17"/>
      <text:h text:style-name="P18" text:outline-level="1"><text:bookmark-start text:name="__RefHeading___Toc143_2058273410"/><text:span text:style-name="T5">ХОД РАБОТЫ</text:span><text:span text:style-name="T6"> (Вариант 22)</text:span><text:bookmark-end text:name="__RefHeading___Toc143_2058273410"/></text:h>
      <text:p text:style-name="P19">Соберем схему, как указано в методическом материале: источник питания E = 10 В с вынесенным внутренним <text:s/>сопротивлением r = 2500 В и резистором Rn с нужным сопротивлением из варианта. Для измерения напряжения холостого хода разрываем цепь и получаем U<text:span text:style-name="T7">0</text:span><text:span text:style-name="T8"> = 10 В.</text:span></text:p>
      <text:p text:style-name="P19"><text:span text:style-name="T8">Значение r при к</text:span><draw:frame draw:style-name="fr1" draw:name="Image3" text:anchor-type="char" svg:x="4.33cm" svg:y="-0.393cm" svg:width="8.479cm" svg:height="7.336cm" draw:z-index="5"><draw:image xlink:href="Pictures/1000000100000216000001CEDA2AE113.png" xlink:type="simple" xlink:show="embed" xlink:actuate="onLoad" draw:mime-type="image/png"/></draw:frame><text:span text:style-name="T8">отором напряжение в нагрузке равно U</text:span><text:span text:style-name="T7">0</text:span><text:span text:style-name="T8"> / 2 равно 2500 Ом. Далее</text:span><text:span text:style-name="T9"> соединяем цепь заново,</text:span><text:span text:style-name="T8"> перебираем значения сопротивлений из варианта и записываем значения напряжения U</text:span><text:span text:style-name="T10">n</text:span><text:span text:style-name="T8"> и силы тока I</text:span><text:span text:style-name="T10">n. Получаем такую таблицу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20">k</text:p>
          </table:table-cell>
          <table:table-cell table:style-name="Table1.A1" table:number-columns-spanned="2" office:value-type="string">
            <text:p text:style-name="P20">Измерения</text:p>
          </table:table-cell>
          <table:covered-table-cell/>
          <table:table-cell table:style-name="Table1.D1" table:number-columns-spanned="4" office:value-type="string">
            <text:p text:style-name="P20">Расчёт</text:p>
            <text:p text:style-name="P20">r = 2500 [Ом], E = 10 [В], Isc = <text:span text:style-name="T11">4 </text:span>[мА]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Rn [Ом]</text:p>
          </table:table-cell>
          <table:table-cell table:style-name="Table1.A2" office:value-type="string">
            <text:p text:style-name="P20">Un [В]</text:p>
          </table:table-cell>
          <table:table-cell table:style-name="Table1.A2" office:value-type="string">
            <text:p text:style-name="P20">In [мА]</text:p>
          </table:table-cell>
          <table:table-cell table:style-name="Table1.A2" office:value-type="string">
            <text:p text:style-name="P20">Pn [Вт]</text:p>
          </table:table-cell>
          <table:table-cell table:style-name="Table1.A2" office:value-type="string">
            <text:p text:style-name="P20"><text:span text:style-name="T12">η</text:span><text:span text:style-name="T13"/></text:p>
          </table:table-cell>
          <table:table-cell table:style-name="Table1.G2" office:value-type="string">
            <text:p text:style-name="P20">r [Ом]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r = 2500</text:p>
          </table:table-cell>
          <table:table-cell table:style-name="Table1.A2" office:value-type="string">
            <text:p text:style-name="P20">U<text:span text:style-name="T7">0</text:span><text:span text:style-name="T8"> = 10</text:span>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D1" office:value-type="string">
            <text:p text:style-name="P20">-</text:p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1">22500</text:p>
          </table:table-cell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>0.4</text:p>
          </table:table-cell>
          <table:table-cell table:style-name="Table1.A2" office:value-type="string">
            <text:p text:style-name="P22">0.0036</text:p>
          </table:table-cell>
          <table:table-cell table:style-name="Table1.A2" office:value-type="string">
            <text:p text:style-name="P23">0.9</text:p>
          </table:table-cell>
          <table:table-cell table:style-name="Table1.G2" office:value-type="string">
            <text:p text:style-name="P23">2500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10000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0.8</text:p>
          </table:table-cell>
          <table:table-cell table:style-name="Table1.A2" office:value-type="string">
            <text:p text:style-name="P22">0.0064</text:p>
          </table:table-cell>
          <table:table-cell table:style-name="Table1.A2" office:value-type="string">
            <text:p text:style-name="P23">0.8</text:p>
          </table:table-cell>
          <table:table-cell table:style-name="Table1.G2" office:value-type="string">
            <text:p text:style-name="P23">2500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5833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1.2</text:p>
          </table:table-cell>
          <table:table-cell table:style-name="Table1.A2" office:value-type="string">
            <text:p text:style-name="P22">0.0084</text:p>
          </table:table-cell>
          <table:table-cell table:style-name="Table1.A2" office:value-type="string">
            <text:p text:style-name="P23">0.7</text:p>
          </table:table-cell>
          <table:table-cell table:style-name="Table1.G2" office:value-type="string">
            <text:p text:style-name="P23">2500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3750</text:p>
          </table:table-cell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1.6</text:p>
          </table:table-cell>
          <table:table-cell table:style-name="Table1.A2" office:value-type="string">
            <text:p text:style-name="P22">0.0096</text:p>
          </table:table-cell>
          <table:table-cell table:style-name="Table1.A2" office:value-type="string">
            <text:p text:style-name="P23">0.6</text:p>
          </table:table-cell>
          <table:table-cell table:style-name="Table1.G2" office:value-type="string">
            <text:p text:style-name="P23">2500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2500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2">0.01</text:p>
          </table:table-cell>
          <table:table-cell table:style-name="Table1.A2" office:value-type="string">
            <text:p text:style-name="P23">0.5</text:p>
          </table:table-cell>
          <table:table-cell table:style-name="Table1.G2" office:value-type="string">
            <text:p text:style-name="P23">2500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1667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2.4</text:p>
          </table:table-cell>
          <table:table-cell table:style-name="Table1.A2" office:value-type="string">
            <text:p text:style-name="P22">0.009<text:span text:style-name="T11">6</text:span></text:p>
          </table:table-cell>
          <table:table-cell table:style-name="Table1.A2" office:value-type="string">
            <text:p text:style-name="P23">0.4</text:p>
          </table:table-cell>
          <table:table-cell table:style-name="Table1.G2" office:value-type="string">
            <text:p text:style-name="P23">25<text:span text:style-name="T14">07</text:span></text:p>
          </table:table-cell>
        </table:table-row>
        <table:table-row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714</text:p>
          </table:table-cell>
          <table:table-cell table:style-name="Table1.A2" office:value-type="string">
            <text:p text:style-name="P21">2.22</text:p>
          </table:table-cell>
          <table:table-cell table:style-name="Table1.A2" office:value-type="string">
            <text:p text:style-name="P21">3.11</text:p>
          </table:table-cell>
          <table:table-cell table:style-name="Table1.A2" office:value-type="string">
            <text:p text:style-name="P22">0.0069</text:p>
          </table:table-cell>
          <table:table-cell table:style-name="Table1.A2" office:value-type="string">
            <text:p text:style-name="P23">0.22</text:p>
          </table:table-cell>
          <table:table-cell table:style-name="Table1.G2" office:value-type="string">
            <text:p text:style-name="P23">2<text:span text:style-name="T14">444</text:span>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>625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3.2</text:p>
          </table:table-cell>
          <table:table-cell table:style-name="Table1.A2" office:value-type="string">
            <text:p text:style-name="P22">0.0064</text:p>
          </table:table-cell>
          <table:table-cell table:style-name="Table1.A2" office:value-type="string">
            <text:p text:style-name="P23">0.2</text:p>
          </table:table-cell>
          <table:table-cell table:style-name="Table1.G2" office:value-type="string">
            <text:p text:style-name="P24">2444</text:p>
          </table:table-cell>
        </table:table-row>
        <table:table-row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>278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3.6</text:p>
          </table:table-cell>
          <table:table-cell table:style-name="Table1.A2" office:value-type="string">
            <text:p text:style-name="P22">0.003<text:span text:style-name="T11">6</text:span></text:p>
          </table:table-cell>
          <table:table-cell table:style-name="Table1.A2" office:value-type="string">
            <text:p text:style-name="P23">0.1</text:p>
          </table:table-cell>
          <table:table-cell table:style-name="Table1.G2" office:value-type="string">
            <text:p text:style-name="P24">2500</text:p>
          </table:table-cell>
        </table:table-row>
        <table:table-row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5">0</text:p>
          </table:table-cell>
          <table:table-cell table:style-name="Table1.G2" office:value-type="string">
            <text:p text:style-name="P21">-</text:p>
          </table:table-cell>
        </table:table-row>
      </table:table>
      <text:p text:style-name="P27"/>
      <text:p text:style-name="P28">Для расчета Pn<text:span text:style-name="T7">k</text:span><text:span text:style-name="T8">, r</text:span><text:span text:style-name="T7">k</text:span><text:span text:style-name="T8">, </text:span><text:span text:style-name="T15">η</text:span><text:span text:style-name="T16">k</text:span><text:span text:style-name="T17">, Isc</text:span> используем формулы:</text:p>
      <text:p text:style-name="P28">Pn = Un<text:span text:style-name="T18">2</text:span><text:span text:style-name="T8"> / Rn</text:span></text:p>
      <text:p text:style-name="P28"><text:span text:style-name="T8">r</text:span><text:span text:style-name="T7">k</text:span><text:span text:style-name="T8"> = (Un</text:span><text:span text:style-name="T7">k</text:span><text:span text:style-name="T8"> - Un</text:span><text:span text:style-name="T7">k+1</text:span><text:span text:style-name="T8">) / (In</text:span><text:span text:style-name="T7">k+1</text:span><text:span text:style-name="T8"> - In</text:span><text:span text:style-name="T7">k</text:span><text:span text:style-name="T8">)</text:span></text:p>
      <text:p text:style-name="P29">η<text:span text:style-name="T19">k</text:span><text:span text:style-name="T10"> = Rn</text:span><text:span text:style-name="T19">k</text:span><text:span text:style-name="T10">/(r</text:span><text:span text:style-name="T19">k</text:span><text:span text:style-name="T10"> + Rn</text:span><text:span text:style-name="T19">k</text:span><text:span text:style-name="T10">)</text:span></text:p>
      <text:p text:style-name="P28"><text:span text:style-name="T8">Isc = U</text:span><text:span text:style-name="T7">0</text:span><text:span text:style-name="T8"> / r</text:span></text:p>
      <text:p text:style-name="P28">Пример рассчета величин для строки таблицы k = 2:</text:p>
      <text:p text:style-name="P28">P = 9<text:span text:style-name="T18">2</text:span><text:span text:style-name="T8"> В / 22500 Ом = 81 / 22500 = 0.0036 Вт</text:span></text:p>
      <text:p text:style-name="P28">r = (9 В - 8 В) / (0.8 мА - 0.4 мА) = 1 / 0.4 = 2.5 кОм = 2500 Ом</text:p>
      <text:p text:style-name="P28">η = 22500 Ом / (22500 Ом+ 2500 Ом) = 22500 / 24500 = 0.9<text:span text:style-name="T20"> (90%)</text:span></text:p>
      <text:p text:style-name="P30"><text:s/><draw:frame draw:style-name="fr2" draw:name="Object1" text:anchor-type="as-char" svg:y="-1.452cm" svg:width="14.656cm" svg:height="1.834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31">Рассчётная внешняя характеристика:</text:p>
      <text:p text:style-name="P31">U<text:span text:style-name="T7">n</text:span><text:span text:style-name="T8"> = E - I</text:span><text:span text:style-name="T7">n </text:span><text:span text:style-name="T8">r = 10 - 2500 I</text:span><text:span text:style-name="T7">n</text:span></text:p>
      <text:p text:style-name="P32"><draw:frame draw:style-name="fr3" draw:name="Frame1" text:anchor-type="char" svg:width="17.59cm" draw:z-index="1"><draw:text-box fo:min-height="10.993cm"><text:p text:style-name="P33"><draw:frame draw:style-name="fr4" draw:name="Image1" text:anchor-type="paragraph" svg:width="17.59cm" style:rel-width="100%" svg:height="10.993cm" style:rel-height="scale" draw:z-index="2"><draw:image xlink:href="Pictures/1000000100000320000001F412E054A9.png" xlink:type="simple" xlink:show="embed" xlink:actuate="onLoad" draw:mime-type="image/png"/></draw:frame>Рисунок <text:sequence text:ref-name="refРисунок0" text:name="Рисунок" text:formula="ooow:Рисунок+1" style:num-format="1">1</text:sequence>: График зависимости Un(In):</text:p></draw:text-box></draw:frame><draw:frame draw:style-name="fr5" draw:name="Frame2" text:anchor-type="char" svg:x="0cm" svg:y="12.411cm" svg:width="17.59cm" draw:z-index="3"><draw:text-box fo:min-height="10.993cm"><text:p text:style-name="P33"><draw:frame draw:style-name="fr4" draw:name="Image2" text:anchor-type="paragraph" svg:width="17.59cm" style:rel-width="100%" svg:height="10.993cm" style:rel-height="scale" draw:z-index="4"><draw:image xlink:href="Pictures/1000000100000320000001F4DDFF2EE1.png" xlink:type="simple" xlink:show="embed" xlink:actuate="onLoad" draw:mime-type="image/png"/></draw:frame>Рисунок <text:sequence text:ref-name="refРисунок1" text:name="Рисунок" text:formula="ooow:Рисунок+1" style:num-format="1">2</text:sequence>: График зависимости Pn(In) и η(In)</text:p></draw:text-box></draw:frame><text:soft-page-break/></text:p>
      <text:h text:style-name="P34" text:outline-level="1"><text:bookmark-start text:name="__RefHeading___Toc82_2058273410 Copy 1"/><text:span text:style-name="T21">З</text:span>АКЛЮЧЕНИЕ<text:bookmark-end text:name="__RefHeading___Toc82_2058273410 Copy 1"/></text:h>
      <text:p text:style-name="P35">В ходе работы в среде LTspice был исследован источник постоянного тока с параметрами<text:span text:style-name="T20"> </text:span>E<text:span text:style-name="T20"> </text:span>=<text:span text:style-name="T20"> </text:span>10<text:span text:style-name="T20"> </text:span>В и<text:span text:style-name="T20"> </text:span>r<text:span text:style-name="T20"> </text:span>=<text:span text:style-name="T20"> </text:span>2500<text:span text:style-name="T20"> </text:span>Ом.<text:span text:style-name="T20"> В ходе работы был п</text:span>одтвержден линейно убывающий характер зависимости<text:span text:style-name="T20"> </text:span>Un(In). При росте тока от 0 до 4 мА напряжение падает с 10 В до 0 В.</text:p>
      <text:p text:style-name="P36"><text:span text:style-name="T20">Было у</text:span>становлено, что максимальная мощность в нагрузке достигается при равенстве сопротивлений<text:span text:style-name="T20"> </text:span>Rn<text:span text:style-name="T20"> </text:span>=<text:span text:style-name="T20"> </text:span>r<text:span text:style-name="T20"> </text:span>=<text:span text:style-name="T20"> </text:span>2500<text:span text:style-name="T20"> </text:span>Ом.<text:span text:style-name="T20"> </text:span>Экспериментально доказано, что в режиме максимальной мощности КПД источника составляет 50%. С ростом тока нагрузки эффективность источника линейно снижается.</text:p>
      <text:p text:style-name="P36"><text:span text:style-name="T20">По и</text:span>тог<text:span text:style-name="T20">у р</text:span>езультаты моделирования полностью совпали с теоретическими расчетами, что подтверждает корректность использования LTspice для анализа электрических цепе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3-01T23:19:48.763390965</dc:date>
    <meta:editing-duration>PT3H9M7S</meta:editing-duration>
    <meta:editing-cycles>23</meta:editing-cycles>
    <meta:generator>LibreOffice/26.2.1.2$Linux_X86_64 LibreOffice_project/620$Build-2</meta:generator>
    <meta:print-date>2026-03-01T21:37:39.555163814</meta:print-date>
    <meta:printed-by>PDF files</meta:printed-by>
    <meta:document-statistic meta:table-count="1" meta:image-count="4" meta:object-count="1" meta:page-count="6" meta:paragraph-count="138" meta:word-count="498" meta:character-count="2829" meta:non-whitespace-character-count="2444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sqrt>
          <mfrac>
            <mrow>
              <munderover>
                <mo stretchy="false">∑</mo>
                <mrow>
                  <mi>k</mi>
                  <mo stretchy="false">=</mo>
                  <mn>2</mn>
                </mrow>
                <mn>9</mn>
              </munderover>
              <msubsup>
                <mi>r</mi>
                <mi>k</mi>
                <mn>2</mn>
              </msubsup>
            </mrow>
            <mn>8</mn>
          </mfrac>
        </msqrt>
        <mo stretchy="false">=</mo>
        <mfrac>
          <msqrt>
            <mrow>
              <mo fence="true" form="prefix" stretchy="false">(</mo>
              <mrow>
                <mrow>
                  <msup>
                    <mn>2500</mn>
                    <mn>2</mn>
                  </msup>
                  <mo stretchy="false">+</mo>
                  <msup>
                    <mn>2500</mn>
                    <mn>2</mn>
                  </msup>
                  <mo stretchy="false">+</mo>
                  <msup>
                    <mn>2500</mn>
                    <mn>2</mn>
                  </msup>
                  <mo stretchy="false">+</mo>
                  <msup>
                    <mn>2500</mn>
                    <mn>2</mn>
                  </msup>
                  <mo stretchy="false">+</mo>
                  <msup>
                    <mn>2500</mn>
                    <mn>2</mn>
                  </msup>
                  <mo stretchy="false">+</mo>
                  <msup>
                    <mn>2507</mn>
                    <mn>2</mn>
                  </msup>
                  <mo stretchy="false">+</mo>
                  <msup>
                    <mn>2444</mn>
                    <mn>2</mn>
                  </msup>
                  <mo stretchy="false">+</mo>
                  <msup>
                    <mn>2444</mn>
                    <mn>2</mn>
                  </msup>
                </mrow>
              </mrow>
              <mo fence="true" form="postfix" stretchy="false">)</mo>
            </mrow>
          </msqrt>
          <mn>9</mn>
        </mfrac>
        <mo stretchy="false">≈</mo>
        <mn>2487</mn>
      </mrow>
      <mi mathvariant="italic">Ом</mi>
    </mrow>
    <annotation encoding="StarMath 5.0">r = sqrt {sum from k=2 to 9 r^2_k over 8} = sqrt(2500^2 + 2500^2 + 2500^2 + 2500^2 + 2500^2 + 2507^2 + 2444^2 + 2444^2) over 9 approx 2487 Ом</annotation>
  </semantics>
</math>
</file>