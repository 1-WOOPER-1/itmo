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CDA082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37308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fo:font-size="10pt" officeooo:paragraph-rsid="000ca6c1" style:font-size-asian="10pt" style:font-size-complex="10pt"/>
    </style:style>
    <style:style style:name="P12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4" style:family="paragraph" style:parent-style-name="Contents_20_1">
      <style:paragraph-properties fo:line-height="150%">
        <style:tab-stops>
          <style:tab-stop style:position="17.58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50%">
        <style:tab-stops>
          <style:tab-stop style:position="17.089cm" style:type="right" style:leader-style="dotted" style:leader-text="."/>
        </style:tab-stops>
      </style:paragraph-properties>
    </style:style>
    <style:style style:name="P16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left" style:justify-single-word="false" fo:text-indent="1.3cm" style:auto-text-indent="false" style:page-number="auto" fo:background-color="transparent"/>
      <style:text-properties officeooo:rsid="000f2314" officeooo:paragraph-rsid="000f2314"/>
    </style:style>
    <style:style style:name="P18" style:family="paragraph" style:parent-style-name="Text_20_body">
      <style:paragraph-properties fo:margin-top="0cm" fo:margin-bottom="0.25cm" style:contextual-spacing="false" fo:line-height="150%" fo:text-align="left" style:justify-single-word="false"/>
      <style:text-properties officeooo:paragraph-rsid="000f2314"/>
    </style:style>
    <style:style style:name="P19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0f2314" officeooo:paragraph-rsid="000f2314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111865" officeooo:paragraph-rsid="00111865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Liberation Mono" fo:font-size="10pt" fo:language="zxx" fo:country="none" officeooo:rsid="00111865" officeooo:paragraph-rsid="00111865" fo:background-color="#eeeee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3aa9bd" officeooo:paragraph-rsid="003aa9bd"/>
    </style:style>
    <style:style style:name="P23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3aa9bd" officeooo:paragraph-rsid="003aa9bd" style:font-weight-asian="bold" style:font-weight-complex="bold"/>
    </style:style>
    <style:style style:name="P25" style:family="paragraph" style:parent-style-name="Text_20_body" style:list-styl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fo:font-weight="bold" officeooo:rsid="003aa9bd" officeooo:paragraph-rsid="003aa9bd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aa9bd" officeooo:paragraph-rsid="003aa9bd"/>
    </style:style>
    <style:style style:name="P27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28" style:family="paragraph" style:parent-style-name="Text_20_body" style:list-style-name=""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reak-before="page"/>
      <style:text-properties fo:font-weight="bold" officeooo:rsid="003aa9bd" officeooo:paragraph-rsid="003aa9bd" style:font-weight-asian="bold" style:font-weight-complex="bold"/>
    </style:style>
    <style:style style:name="P29" style:family="paragraph" style:parent-style-name="Text_20_body" style:list-style-name=""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/>
      <style:text-properties fo:font-weight="bold" officeooo:rsid="003aa9bd" officeooo:paragraph-rsid="003aa9bd" style:font-weight-asian="bold" style:font-weight-complex="bold"/>
    </style:style>
    <style:style style:name="P30" style:family="paragraph" style:parent-style-name="Code">
      <style:text-properties fo:font-size="9pt" style:font-size-asian="9pt" style:font-size-complex="9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af184" officeooo:paragraph-rsid="003af184"/>
    </style:style>
    <style:style style:name="P32" style:family="paragraph" style:parent-style-name="Text_20_body" style:list-style-name=""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/>
      <style:text-properties fo:font-weight="bold" officeooo:rsid="0047780b" officeooo:paragraph-rsid="003aa9bd" style:font-weight-asian="bold" style:font-weight-complex="bol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c05f7" officeooo:paragraph-rsid="003c05f7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aa9bd" officeooo:paragraph-rsid="003c05f7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cd452" officeooo:paragraph-rsid="003cd45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e8495" officeooo:paragraph-rsid="003e8495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3fb82a" officeooo:paragraph-rsid="003fb82a"/>
    </style:style>
    <style:style style:name="P38" style:family="paragraph" style:parent-style-name="Output">
      <style:text-properties fo:font-size="8pt" style:font-size-asian="8pt" style:font-size-complex="8pt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42cf71" officeooo:paragraph-rsid="0042cf71"/>
    </style:style>
    <style:style style:name="P40" style:family="paragraph" style:parent-style-name="Code">
      <style:paragraph-properties ch2_options="{'Style': 'vs', 'Language': 'SQL', 'UseCharStyles': 0, 'LineNumberRatio': 100, 'LineNumberStart': 1, 'MasterCharStyle': '', 'ShowLineNumbers': 0, 'ColourizeBackground': 0, 'LineNumberSeparator': '  |    ', 'LineNumberPaddingSymbol': '', 'StoreOptionsWithSnippet': 1}"/>
      <style:text-properties fo:color="#0000ff" loext:opacity="100%" fo:language="zxx" fo:country="none" fo:font-style="normal" style:text-underline-style="none" fo:font-weight="normal" fo:background-color="transparent"/>
    </style:style>
    <style:style style:name="P4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1b0b15" officeooo:paragraph-rsid="001b0b15" style:font-weight-asian="bold" style:font-weight-complex="bold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43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14bf3e"/>
    </style:style>
    <style:style style:name="P44" style:family="paragraph" style:parent-style-name="Text_20_body" style:list-style-name="L1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fo:background-color="transparent"/>
      <style:text-properties officeooo:rsid="0014bf3e" officeooo:paragraph-rsid="0045974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7308"/>
    </style:style>
    <style:style style:name="T3" style:family="text">
      <style:text-properties officeooo:rsid="000ca6c1"/>
    </style:style>
    <style:style style:name="T4" style:family="text">
      <style:text-properties officeooo:rsid="003824c8"/>
    </style:style>
    <style:style style:name="T5" style:family="text">
      <style:text-properties officeooo:rsid="001450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236fbb" style:font-weight-asian="normal" style:font-weight-complex="normal"/>
    </style:style>
    <style:style style:name="T8" style:family="text">
      <style:text-properties fo:font-weight="normal" officeooo:rsid="0038dade" style:font-weight-asian="normal" style:font-weight-complex="normal"/>
    </style:style>
    <style:style style:name="T9" style:family="text">
      <style:text-properties officeooo:rsid="0038dade"/>
    </style:style>
    <style:style style:name="T10" style:family="text">
      <style:text-properties officeooo:rsid="001dc2e6"/>
    </style:style>
    <style:style style:name="T11" style:family="text">
      <style:text-properties officeooo:rsid="001ed64b"/>
    </style:style>
    <style:style style:name="T12" style:family="text">
      <style:text-properties fo:color="#0000ff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a31515" loext:opacity="100%"/>
    </style:style>
    <style:style style:name="T15" style:family="text">
      <style:text-properties fo:color="#000000" loext:opacity="100%" fo:font-style="normal" style:text-underline-style="none" fo:font-weight="normal"/>
    </style:style>
    <style:style style:name="T16" style:family="text">
      <style:text-properties officeooo:rsid="003cd452"/>
    </style:style>
    <style:style style:name="T17" style:family="text">
      <style:text-properties officeooo:rsid="0040ccbb"/>
    </style:style>
    <style:style style:name="T18" style:family="text">
      <style:text-properties officeooo:rsid="004597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Информационная безопасность баз данных</text:span>»</text:p>
      <text:p text:style-name="P3"/>
      <text:p text:style-name="P3"/>
      <text:p text:style-name="P3">ОТЧЕТ ПО ЛАБОРАТОРНОЙ РАБОТЕ <text:span text:style-name="T3">№</text:span><text:span text:style-name="T4">4</text:span></text:p>
      <text:p text:style-name="P5">«<text:span text:style-name="T4">Разграничение доступа</text:span>»</text:p>
      <text:p text:style-name="P3"/>
      <text:p text:style-name="P6">Выполнил:</text:p>
      <text:p text:style-name="P6">Пахомов Владимир Юрьевич, студент группы N3250</text:p>
      <text:p text:style-name="P7"><draw:frame draw:style-name="fr1" draw:name="Изображение1" text:anchor-type="char" svg:x="14.242cm" svg:y="0.746cm" svg:width="3.489cm" svg:height="1.707cm" draw:z-index="0"><draw:image xlink:href="Pictures/1000000100000203000000FCDA082FB6.png" xlink:type="simple" xlink:show="embed" xlink:actuate="onLoad" draw:mime-type="image/png"/></draw:frame></text:p>
      <text:p text:style-name="P7">________________</text:p>
      <text:p text:style-name="P8">(подпись) <text:s text:c="8"/></text:p>
      <text:p text:style-name="P6"/>
      <text:p text:style-name="P6">Проверил:</text:p>
      <text:p text:style-name="P9">Ярцева Наталия Андреевна, преподаватель ФБИТ</text:p>
      <text:p text:style-name="P9"/>
      <text:p text:style-name="P10">_____________________</text:p>
      <text:p text:style-name="P8">(отметка о выполнении) <text:s text:c="2"/></text:p>
      <text:p text:style-name="P10"/>
      <text:p text:style-name="P10"/>
      <text:p text:style-name="P10">________________</text:p>
      <text:p text:style-name="P11">(подпись) <text:s text:c="8"/></text:p>
      <text:p text:style-name="P2"/>
      <text:p text:style-name="P2">Санкт-Петербург</text:p>
      <text:p text:style-name="P2">202<text:span text:style-name="T5">6</text:span>г.</text:p>
      <text:h text:style-name="P12" text:outline-level="1"><text:bookmark-start text:name="__RefHeading___Toc80_2058273410"/>СОДЕРЖАНИЕ<text:bookmark-end text:name="__RefHeading___Toc80_2058273410"/></text:h>
      <text:p text:style-name="P13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80_2058273410" office:name="СОДЕРЖАНИЕ" text:style-name="Index_20_Link" text:visited-style-name="Index_20_Link">СОДЕРЖАНИЕ<text:tab/>2</text:a></text:p>
          <text:p text:style-name="P14"><text:a xlink:type="simple" xlink:href="#__RefHeading___Toc82_2058273410" office:name="ВВЕДЕНИЕ" text:style-name="Index_20_Link" text:visited-style-name="Index_20_Link">ВВЕДЕНИЕ<text:tab/>3</text:a></text:p>
          <text:p text:style-name="P14"><text:a xlink:type="simple" xlink:href="#__RefHeading___Toc143_2058273410" office:name="ХОД РАБОТЫ" text:style-name="Index_20_Link" text:visited-style-name="Index_20_Link">ХОД РАБОТЫ<text:tab/>3</text:a></text:p>
          <text:p text:style-name="P15"><text:a xlink:type="simple" xlink:href="#__RefHeading___Toc9329_799435573" office:name="Задание 1" text:style-name="Index_20_Link" text:visited-style-name="Index_20_Link">Задание 1<text:tab/>3</text:a></text:p>
          <text:p text:style-name="P15"><text:a xlink:type="simple" xlink:href="#__RefHeading___Toc9331_799435573" office:name="Задание 2" text:style-name="Index_20_Link" text:visited-style-name="Index_20_Link">Задание 2<text:tab/>4</text:a></text:p>
          <text:p text:style-name="P15"><text:a xlink:type="simple" xlink:href="#__RefHeading___Toc9333_799435573" office:name="Задание 3" text:style-name="Index_20_Link" text:visited-style-name="Index_20_Link">Задание 3<text:tab/>4</text:a></text:p>
          <text:p text:style-name="P15"><text:a xlink:type="simple" xlink:href="#__RefHeading___Toc9335_799435573" office:name="Задание 4" text:style-name="Index_20_Link" text:visited-style-name="Index_20_Link">Задание 4<text:tab/>5</text:a></text:p>
          <text:p text:style-name="P15"><text:a xlink:type="simple" xlink:href="#__RefHeading___Toc9337_799435573" office:name="Задание 5" text:style-name="Index_20_Link" text:visited-style-name="Index_20_Link">Задание 5<text:tab/>5</text:a></text:p>
          <text:p text:style-name="P15"><text:a xlink:type="simple" xlink:href="#__RefHeading___Toc9368_799435573" office:name="Задание 6" text:style-name="Index_20_Link" text:visited-style-name="Index_20_Link">Задание 6<text:tab/>6</text:a></text:p>
          <text:p text:style-name="P15"><text:a xlink:type="simple" xlink:href="#__RefHeading___Toc9370_799435573" office:name="Задание 7" text:style-name="Index_20_Link" text:visited-style-name="Index_20_Link">Задание 7<text:tab/>6</text:a></text:p>
          <text:p text:style-name="P15"><text:a xlink:type="simple" xlink:href="#__RefHeading___Toc9372_799435573" office:name="Задание 8" text:style-name="Index_20_Link" text:visited-style-name="Index_20_Link">Задание 8<text:tab/>8</text:a></text:p>
          <text:p text:style-name="P14"><text:a xlink:type="simple" xlink:href="#__RefHeading___Toc143_2058273410%20Copy%201" office:name="ЗАКЛЮЧЕНИЕ" text:style-name="Index_20_Link" text:visited-style-name="Index_20_Link">ЗАКЛЮЧЕНИЕ<text:tab/>9</text:a></text:p>
        </text:index-body>
      </text:table-of-content>
      <text:p text:style-name="P13"/>
      <text:h text:style-name="P16" text:outline-level="1"><text:bookmark-start text:name="__RefHeading___Toc82_2058273410"/>ВВЕДЕНИЕ<text:bookmark-end text:name="__RefHeading___Toc82_2058273410"/></text:h>
      <text:p text:style-name="P17"><text:span text:style-name="T6">Цель работы</text:span> — <text:span text:style-name="T7">освоить методы разграничения прав доступа и аудита действий</text:span><text:span text:style-name="T8"> </text:span><text:span text:style-name="T7">пользователей в PostgreSQL.</text:span></text:p>
      <text:p text:style-name="P18"/>
      <text:p text:style-name="P18"/>
      <text:h text:style-name="P19" text:outline-level="1"><text:bookmark-start text:name="__RefHeading___Toc143_2058273410"/>ХОД РАБОТЫ<text:bookmark-end text:name="__RefHeading___Toc143_2058273410"/></text:h>
      <text:p text:style-name="P20">В данной лабораторной работе для взаимодействия с базой данных PostgreSQL будем использовать утилиту psql на ОС Linux. Для создания и подключения к локальной базе данных создадим файл lab<text:span text:style-name="T9">4</text:span>.sql и впишем в него все команды для создания базы данных <text:span text:style-name="T10">и отправки команд</text:span><text:span text:style-name="T11"> из</text:span> методическо<text:span text:style-name="T11">го </text:span>материал<text:span text:style-name="T11">а</text:span>. Для подключения к базе данных используем команду:</text:p>
      <text:p text:style-name="P21">psql -U postgres -f lab<text:span text:style-name="T9">4</text:span>.sql</text:p>
      <text:p text:style-name="P22">Для начала создадим четыре пользователя:</text:p>
      <text:p text:style-name="P23"><text:span text:style-name="T12">CREATE</text:span><text:span text:style-name="T13"> </text:span><text:span text:style-name="T12">USER</text:span><text:span text:style-name="T13"> user1 </text:span><text:span text:style-name="T12">WITH</text:span><text:span text:style-name="T13"> PASSWORD </text:span><text:span text:style-name="T14">'passwd1'</text:span><text:span text:style-name="T13">;</text:span></text:p>
      <text:p text:style-name="P23"><text:span text:style-name="T12">CREATE</text:span><text:span text:style-name="T13"> </text:span><text:span text:style-name="T12">USER</text:span><text:span text:style-name="T13"> user2 </text:span><text:span text:style-name="T12">WITH</text:span><text:span text:style-name="T13"> PASSWORD </text:span><text:span text:style-name="T14">'passwd2'</text:span><text:span text:style-name="T13">;</text:span></text:p>
      <text:p text:style-name="P23"><text:span text:style-name="T12">CREATE</text:span><text:span text:style-name="T13"> </text:span><text:span text:style-name="T12">USER</text:span><text:span text:style-name="T13"> user3 </text:span><text:span text:style-name="T12">WITH</text:span><text:span text:style-name="T13"> PASSWORD </text:span><text:span text:style-name="T14">'passwd3'</text:span><text:span text:style-name="T13">;</text:span></text:p>
      <text:p text:style-name="P23"><text:span text:style-name="T12">CREATE</text:span><text:span text:style-name="T13"> </text:span><text:span text:style-name="T12">USER</text:span><text:span text:style-name="T13"> user4 </text:span><text:span text:style-name="T12">WITH</text:span><text:span text:style-name="T13"> PASSWORD </text:span><text:span text:style-name="T14">'passwd4'</text:span><text:span text:style-name="T13">;</text:span></text:p>
      <text:p text:style-name="P24"/>
      <text:h text:style-name="P25" text:outline-level="2"><text:bookmark-start text:name="__RefHeading___Toc9329_799435573"/>Задание 1<text:bookmark-end text:name="__RefHeading___Toc9329_799435573"/></text:h>
      <text:p text:style-name="P26">Создадим две простые таблицы для дальнейшей работы с правами доступа:</text:p>
      <text:p text:style-name="P23"><text:span text:style-name="T12">CREATE</text:span><text:span text:style-name="T13"> </text:span><text:span text:style-name="T12">TABLE</text:span><text:span text:style-name="T13"> departments (</text:span></text:p>
      <text:p text:style-name="P23"><text:span text:style-name="T13"><text:s text:c="4"/>dept_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dept_name TEXT </text:span><text:span text:style-name="T12">NOT</text:span><text:span text:style-name="T13"> </text:span><text:span text:style-name="T12">NULL</text:span></text:p>
      <text:p text:style-name="P27">);<text:span text:style-name="T15"/></text:p>
      <text:p text:style-name="P27"/>
      <text:p text:style-name="P23"><text:span text:style-name="T12">CREATE</text:span><text:span text:style-name="T13"> </text:span><text:span text:style-name="T12">TABLE</text:span><text:span text:style-name="T13"> employees (</text:span></text:p>
      <text:p text:style-name="P23"><text:span text:style-name="T13"><text:s text:c="4"/>emp_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name TEXT </text:span><text:span text:style-name="T12">NOT</text:span><text:span text:style-name="T13"> </text:span><text:span text:style-name="T12">NULL</text:span><text:span text:style-name="T13">,</text:span></text:p>
      <text:p text:style-name="P23"><text:span text:style-name="T13"><text:s text:c="4"/>salary NUMERIC,</text:span><text:span text:style-name="T15"/></text:p>
      <text:p text:style-name="P23"><text:span text:style-name="T13"><text:s text:c="4"/>dept_id INTEGER </text:span><text:span text:style-name="T12">REFERENCES</text:span><text:span text:style-name="T13"> departments(dept_id),</text:span></text:p>
      <text:p text:style-name="P23"><text:span text:style-name="T13"><text:s text:c="4"/>created_by TEXT </text:span><text:span text:style-name="T12">DEFAULT</text:span><text:span text:style-name="T13"> </text:span><text:span text:style-name="T12">current_user</text:span></text:p>
      <text:p text:style-name="P27">);</text:p>
      <text:p text:style-name="P26"/>
      <text:h text:style-name="P28" text:outline-level="2"><text:bookmark-start text:name="__RefHeading___Toc9331_799435573"/>Задание 2<text:bookmark-end text:name="__RefHeading___Toc9331_799435573"/></text:h>
      <text:p text:style-name="P26">Выдаём нужные права созданным ранее пользователям:</text:p>
      <text:p text:style-name="P23"><text:span text:style-name="T12">GRANT</text:span><text:span text:style-name="T13"> </text:span><text:span text:style-name="T12">ALL</text:span><text:span text:style-name="T13"> </text:span><text:span text:style-name="T12">PRIVILEGES</text:span><text:span text:style-name="T13"> </text:span><text:span text:style-name="T12">ON</text:span><text:span text:style-name="T13"> </text:span><text:span text:style-name="T12">TABLE</text:span><text:span text:style-name="T13"> departments </text:span><text:span text:style-name="T12">TO</text:span><text:span text:style-name="T13"> user1;</text:span></text:p>
      <text:p text:style-name="P23"><text:span text:style-name="T12">GRANT</text:span><text:span text:style-name="T13"> </text:span><text:span text:style-name="T12">ALL</text:span><text:span text:style-name="T13"> </text:span><text:span text:style-name="T12">PRIVILEGES</text:span><text:span text:style-name="T13"> </text:span><text:span text:style-name="T12">ON</text:span><text:span text:style-name="T13"> </text:span><text:span text:style-name="T12">TABLE</text:span><text:span text:style-name="T13"> employees </text:span><text:span text:style-name="T12">TO</text:span><text:span text:style-name="T13"> user1;</text:span></text:p>
      <text:p text:style-name="P27"/>
      <text:p text:style-name="P23"><text:span text:style-name="T12">GRANT</text:span><text:span text:style-name="T13"> </text:span><text:span text:style-name="T12">INSERT</text:span><text:span text:style-name="T13">, </text:span><text:span text:style-name="T12">SELECT</text:span><text:span text:style-name="T13">, </text:span><text:span text:style-name="T12">UPDATE</text:span><text:span text:style-name="T13"> </text:span><text:span text:style-name="T12">ON</text:span><text:span text:style-name="T13"> </text:span><text:span text:style-name="T12">TABLE</text:span><text:span text:style-name="T13"> departments </text:span><text:span text:style-name="T12">TO</text:span><text:span text:style-name="T13"> user2;</text:span></text:p>
      <text:p text:style-name="P23"><text:span text:style-name="T12">GRANT</text:span><text:span text:style-name="T13"> </text:span><text:span text:style-name="T12">INSERT</text:span><text:span text:style-name="T13">, </text:span><text:span text:style-name="T12">SELECT</text:span><text:span text:style-name="T13">, </text:span><text:span text:style-name="T12">UPDATE</text:span><text:span text:style-name="T13"> </text:span><text:span text:style-name="T12">ON</text:span><text:span text:style-name="T13"> </text:span><text:span text:style-name="T12">TABLE</text:span><text:span text:style-name="T13"> employees </text:span><text:span text:style-name="T12">TO</text:span><text:span text:style-name="T13"> user2;</text:span></text:p>
      <text:p text:style-name="P27"/>
      <text:p text:style-name="P23"><text:span text:style-name="T12">GRANT</text:span><text:span text:style-name="T13"> </text:span><text:span text:style-name="T12">DELETE</text:span><text:span text:style-name="T13"> </text:span><text:span text:style-name="T12">ON</text:span><text:span text:style-name="T13"> </text:span><text:span text:style-name="T12">TABLE</text:span><text:span text:style-name="T13"> departments </text:span><text:span text:style-name="T12">TO</text:span><text:span text:style-name="T13"> user3 </text:span><text:span text:style-name="T12">WITH</text:span><text:span text:style-name="T13"> </text:span><text:span text:style-name="T12">GRANT</text:span><text:span text:style-name="T13"> </text:span><text:span text:style-name="T12">OPTION</text:span><text:span text:style-name="T13">;</text:span></text:p>
      <text:p text:style-name="P23"><text:span text:style-name="T12">GRANT</text:span><text:span text:style-name="T13"> </text:span><text:span text:style-name="T12">DELETE</text:span><text:span text:style-name="T13"> </text:span><text:span text:style-name="T12">ON</text:span><text:span text:style-name="T13"> </text:span><text:span text:style-name="T12">TABLE</text:span><text:span text:style-name="T13"> employees </text:span><text:span text:style-name="T12">TO</text:span><text:span text:style-name="T13"> user3 </text:span><text:span text:style-name="T12">WITH</text:span><text:span text:style-name="T13"> </text:span><text:span text:style-name="T12">GRANT</text:span><text:span text:style-name="T13"> </text:span><text:span text:style-name="T12">OPTION</text:span><text:span text:style-name="T13">;</text:span></text:p>
      <text:p text:style-name="P29"/>
      <text:h text:style-name="P29" text:outline-level="2"><text:bookmark-start text:name="__RefHeading___Toc9333_799435573"/>Задание 3<text:bookmark-end text:name="__RefHeading___Toc9333_799435573"/></text:h>
      <text:p text:style-name="P26">С помощью пользователя user3 выдадим пользователю user4 право на удаление данных из таблиц:</text:p>
      <text:p text:style-name="P23"><text:span text:style-name="T12">SET</text:span><text:span text:style-name="T13"> </text:span><text:span text:style-name="T12">ROLE</text:span><text:span text:style-name="T13"> user3;</text:span></text:p>
      <text:p text:style-name="P23"><text:span text:style-name="T12">GRANT</text:span><text:span text:style-name="T13"> </text:span><text:span text:style-name="T12">DELETE</text:span><text:span text:style-name="T13"> </text:span><text:span text:style-name="T12">ON</text:span><text:span text:style-name="T13"> </text:span><text:span text:style-name="T12">TABLE</text:span><text:span text:style-name="T13"> departments </text:span><text:span text:style-name="T12">TO</text:span><text:span text:style-name="T13"> user4;</text:span></text:p>
      <text:p text:style-name="P23"><text:span text:style-name="T12">GRANT</text:span><text:span text:style-name="T13"> </text:span><text:span text:style-name="T12">DELETE</text:span><text:span text:style-name="T13"> </text:span><text:span text:style-name="T12">ON</text:span><text:span text:style-name="T13"> </text:span><text:span text:style-name="T12">TABLE</text:span><text:span text:style-name="T13"> employees </text:span><text:span text:style-name="T12">TO</text:span><text:span text:style-name="T13"> user4;</text:span></text:p>
      <text:p text:style-name="P23"><text:span text:style-name="T12">RESET</text:span><text:span text:style-name="T13"> </text:span><text:span text:style-name="T12">ROLE</text:span><text:span text:style-name="T13">;</text:span></text:p>
      <text:p text:style-name="Code"/>
      <text:p text:style-name="P26">Проверим все выданные права:</text:p>
      <text:p text:style-name="P30"><text:s text:c="35"/>Access privileges</text:p>
      <text:p text:style-name="P30"><text:s/>Schema | <text:s text:c="2"/>Name <text:s text:c="3"/>| Type <text:s/>| <text:s text:c="4"/>Access privileges <text:s text:c="5"/>| Column privileges | Policies </text:p>
      <text:p text:style-name="P30">--------+-----------+-------+----------------------------+-------------------+----------</text:p>
      <text:p text:style-name="P30"><text:s/>public | employees | table | postgres=arwdDxtm/postgres+| <text:s text:c="18"/>| </text:p>
      <text:p text:style-name="P30"><text:s text:c="8"/>| <text:s text:c="10"/>| <text:s text:c="6"/>| user1=arwdDxtm/postgres <text:s text:c="2"/>+| <text:s text:c="18"/>| </text:p>
      <text:p text:style-name="P30"><text:s text:c="8"/>| <text:s text:c="10"/>| <text:s text:c="6"/>| user2=arw/postgres <text:s text:c="7"/>+| <text:s text:c="18"/>| </text:p>
      <text:p text:style-name="P30"><text:s text:c="8"/>| <text:s text:c="10"/>| <text:s text:c="6"/>| user3=d*/postgres <text:s text:c="8"/>+| <text:s text:c="18"/>| </text:p>
      <text:p text:style-name="P30"><text:s text:c="8"/>| <text:s text:c="10"/>| <text:s text:c="6"/>| user4=d/user3 <text:s text:c="13"/>| <text:s text:c="18"/>| </text:p>
      <text:p text:style-name="P30">(1 row)</text:p>
      <text:p text:style-name="P30"/>
      <text:p text:style-name="P30"><text:s text:c="36"/>Access privileges</text:p>
      <text:p text:style-name="P30"><text:s/>Schema | <text:s text:c="3"/>Name <text:s text:c="4"/>| Type <text:s/>| <text:s text:c="4"/>Access privileges <text:s text:c="5"/>| Column privileges | Policies </text:p>
      <text:p text:style-name="P30">--------+-------------+-------+----------------------------+-------------------+----------</text:p>
      <text:p text:style-name="P30"><text:s/>public | departments | table | postgres=arwdDxtm/postgres+| <text:s text:c="18"/>| </text:p>
      <text:p text:style-name="P30"><text:s text:c="8"/>| <text:s text:c="12"/>| <text:s text:c="6"/>| user1=arwdDxtm/postgres <text:s text:c="2"/>+| <text:s text:c="18"/>| </text:p>
      <text:p text:style-name="P30"><text:s text:c="8"/>| <text:s text:c="12"/>| <text:s text:c="6"/>| user2=arw/postgres <text:s text:c="7"/>+| <text:s text:c="18"/>| </text:p>
      <text:p text:style-name="P30"><text:s text:c="8"/>| <text:s text:c="12"/>| <text:s text:c="6"/>| user3=d*/postgres <text:s text:c="8"/>+| <text:s text:c="18"/>| </text:p>
      <text:p text:style-name="P30"><text:s text:c="8"/>| <text:s text:c="12"/>| <text:s text:c="6"/>| user4=d/user3 <text:s text:c="13"/>| <text:s text:c="18"/>| </text:p>
      <text:p text:style-name="P26"/>
      <text:h text:style-name="P28" text:outline-level="2"><text:bookmark-start text:name="__RefHeading___Toc9335_799435573"/>Задание 4<text:bookmark-end text:name="__RefHeading___Toc9335_799435573"/></text:h>
      <text:p text:style-name="P26">Отзовём все ранее выданные права у всех пользователей:</text:p>
      <text:p text:style-name="P23"><text:span text:style-name="T12">REVOKE</text:span><text:span text:style-name="T13"> </text:span><text:span text:style-name="T12">ALL</text:span><text:span text:style-name="T13"> </text:span><text:span text:style-name="T12">PRIVILEGES</text:span><text:span text:style-name="T13"> </text:span><text:span text:style-name="T12">ON</text:span><text:span text:style-name="T13"> </text:span><text:span text:style-name="T12">TABLE</text:span><text:span text:style-name="T13"> departments, employees </text:span><text:span text:style-name="T12">FROM</text:span><text:span text:style-name="T13"> user1;</text:span></text:p>
      <text:p text:style-name="P23"><text:span text:style-name="T12">REVOKE</text:span><text:span text:style-name="T13"> </text:span><text:span text:style-name="T12">INSERT</text:span><text:span text:style-name="T13">, </text:span><text:span text:style-name="T12">SELECT</text:span><text:span text:style-name="T13">, </text:span><text:span text:style-name="T12">UPDATE</text:span><text:span text:style-name="T13"> </text:span><text:span text:style-name="T12">ON</text:span><text:span text:style-name="T13"> </text:span><text:span text:style-name="T12">TABLE</text:span><text:span text:style-name="T13"> departments, employees </text:span><text:span text:style-name="T12">FROM</text:span><text:span text:style-name="T13"> user2;</text:span></text:p>
      <text:p text:style-name="P23"><text:span text:style-name="T12">REVOKE</text:span><text:span text:style-name="T13"> </text:span><text:span text:style-name="T12">DELETE</text:span><text:span text:style-name="T13"> </text:span><text:span text:style-name="T12">ON</text:span><text:span text:style-name="T13"> </text:span><text:span text:style-name="T12">TABLE</text:span><text:span text:style-name="T13"> employees, departments </text:span><text:span text:style-name="T12">FROM</text:span><text:span text:style-name="T13"> user3 </text:span><text:span text:style-name="T12">CASCADE</text:span><text:span text:style-name="T13">;</text:span></text:p>
      <text:p text:style-name="P26"/>
      <text:p text:style-name="P31">Проверка:</text:p>
      <text:p text:style-name="Output"><text:s text:c="35"/>Access privileges</text:p>
      <text:p text:style-name="Output"><text:s/>Schema | <text:s text:c="2"/>Name <text:s text:c="3"/>| Type <text:s/>| <text:s text:c="4"/>Access privileges <text:s text:c="5"/>| Column privileges | Policies </text:p>
      <text:p text:style-name="Output">--------+-----------+-------+----------------------------+-------------------+----------</text:p>
      <text:p text:style-name="Output"><text:s/>public | employees | table | postgres=arwdDxtm/postgres | <text:s text:c="18"/>| </text:p>
      <text:p text:style-name="Output">(1 row)</text:p>
      <text:p text:style-name="Output"/>
      <text:p text:style-name="Output"><text:s text:c="36"/>Access privileges</text:p>
      <text:p text:style-name="Output"><text:s/>Schema | <text:s text:c="3"/>Name <text:s text:c="4"/>| Type <text:s/>| <text:s text:c="4"/>Access privileges <text:s text:c="5"/>| Column privileges | Policies </text:p>
      <text:p text:style-name="Output">--------+-------------+-------+----------------------------+-------------------+----------</text:p>
      <text:p text:style-name="Output"><text:s/>public | departments | table | postgres=arwdDxtm/postgres | <text:s text:c="18"/>| </text:p>
      <text:p text:style-name="Output">(1 row)</text:p>
      <text:p text:style-name="P32"/>
      <text:h text:style-name="P29" text:outline-level="2"><text:bookmark-start text:name="__RefHeading___Toc9337_799435573"/>Задание 5<text:bookmark-end text:name="__RefHeading___Toc9337_799435573"/></text:h>
      <text:p text:style-name="P33">Создадим две схемы для двух пользователей <text:span text:style-name="T16">и от лица каждого пользователя создадим по одной таблице в схемах:</text:span></text:p>
      <text:p text:style-name="P23"><text:span text:style-name="T12">CREATE</text:span><text:span text:style-name="T13"> </text:span><text:span text:style-name="T12">SCHEMA</text:span><text:span text:style-name="T13"> subschema_user1 </text:span><text:span text:style-name="T12">AUTHORIZATION</text:span><text:span text:style-name="T13"> user1;</text:span></text:p>
      <text:p text:style-name="P23"><text:span text:style-name="T12">CREATE</text:span><text:span text:style-name="T13"> </text:span><text:span text:style-name="T12">SCHEMA</text:span><text:span text:style-name="T13"> subschema_user2 </text:span><text:span text:style-name="T12">AUTHORIZATION</text:span><text:span text:style-name="T13"> user2;</text:span></text:p>
      <text:p text:style-name="P27"/>
      <text:p text:style-name="P23"><text:span text:style-name="T12">SET</text:span><text:span text:style-name="T13"> </text:span><text:span text:style-name="T12">ROLE</text:span><text:span text:style-name="T13"> user1;</text:span></text:p>
      <text:p text:style-name="P23"><text:span text:style-name="T12">CREATE</text:span><text:span text:style-name="T13"> </text:span><text:span text:style-name="T12">TABLE</text:span><text:span text:style-name="T13"> subschema_user1.work_tasks (</text:span></text:p>
      <text:p text:style-name="P23"><text:span text:style-name="T13"><text:s text:c="4"/>task_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description TEXT,</text:span><text:span text:style-name="T15"/></text:p>
      <text:p text:style-name="P23"><text:span text:style-name="T13"><text:s text:c="4"/>deadline DATE</text:span><text:span text:style-name="T15"/></text:p>
      <text:p text:style-name="P27">);<text:span text:style-name="T15"/></text:p>
      <text:p text:style-name="P23"><text:span text:style-name="T12">RESET</text:span><text:span text:style-name="T13"> </text:span><text:span text:style-name="T12">ROLE</text:span><text:span text:style-name="T13">;</text:span></text:p>
      <text:p text:style-name="P27"/>
      <text:p text:style-name="P23"><text:span text:style-name="T12">SET</text:span><text:span text:style-name="T13"> </text:span><text:span text:style-name="T12">ROLE</text:span><text:span text:style-name="T13"> user2;</text:span></text:p>
      <text:p text:style-name="P23"><text:span text:style-name="T12">CREATE</text:span><text:span text:style-name="T13"> </text:span><text:span text:style-name="T12">TABLE</text:span><text:span text:style-name="T13"> subschema_user2.sales_reports (</text:span></text:p>
      <text:p text:style-name="P23"><text:span text:style-name="T13"><text:s text:c="4"/>report_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amount NUMERIC,</text:span><text:span text:style-name="T15"/></text:p>
      <text:p text:style-name="P23"><text:span text:style-name="T13"><text:s text:c="4"/>region TEXT</text:span><text:span text:style-name="T15"/></text:p>
      <text:p text:style-name="P27">);<text:span text:style-name="T15"/></text:p>
      <text:p text:style-name="P23"><text:span text:style-name="T12">RESET</text:span><text:span text:style-name="T13"> </text:span><text:span text:style-name="T12">ROLE</text:span><text:span text:style-name="T13">;</text:span></text:p>
      <text:p text:style-name="P34"/>
      <text:p text:style-name="P35">Теперь чтобы убедиться в выданных правах, попробуем будучи пользователем user1 получить доступ к своей таблице и к чужой:</text:p>
      <text:p text:style-name="P23"><text:span text:style-name="T12">SET</text:span><text:span text:style-name="T13"> </text:span><text:span text:style-name="T12">ROLE</text:span><text:span text:style-name="T13"> user1;</text:span></text:p>
      <text:p text:style-name="P23"><text:span text:style-name="T12">SELECT</text:span><text:span text:style-name="T13"> * </text:span><text:span text:style-name="T12">FROM</text:span><text:span text:style-name="T13"> subschema_user1.work_tasks;</text:span></text:p>
      <text:p text:style-name="P23"><text:span text:style-name="T12">RESET</text:span><text:span text:style-name="T13"> </text:span><text:span text:style-name="T12">ROLE</text:span><text:span text:style-name="T13">;</text:span></text:p>
      <text:p text:style-name="P27"><text:soft-page-break/></text:p>
      <text:p text:style-name="Output"><text:s/>task_id | description | deadline </text:p>
      <text:p text:style-name="Output">---------+-------------+----------</text:p>
      <text:p text:style-name="Output">(0 rows)</text:p>
      <text:p text:style-name="P26"/>
      <text:p text:style-name="P23"><text:span text:style-name="T12">SET</text:span><text:span text:style-name="T13"> </text:span><text:span text:style-name="T12">ROLE</text:span><text:span text:style-name="T13"> user1;</text:span></text:p>
      <text:p text:style-name="P23"><text:span text:style-name="T12">SELECT</text:span><text:span text:style-name="T13"> * </text:span><text:span text:style-name="T12">FROM</text:span><text:span text:style-name="T13"> subschema_user2.sales_reports;</text:span></text:p>
      <text:p text:style-name="P23"><text:span text:style-name="T12">RESET</text:span><text:span text:style-name="T13"> </text:span><text:span text:style-name="T12">ROLE</text:span><text:span text:style-name="T13">;</text:span></text:p>
      <text:p text:style-name="Code"/>
      <text:p text:style-name="Output">psql:lab4.sql:84: ERROR: <text:s/>permission denied for schema subschema_user2</text:p>
      <text:p text:style-name="Output">LINE 1: SELECT * FROM subschema_user2.sales_reports;</text:p>
      <text:p text:style-name="P26"/>
      <text:p text:style-name="P35">Как мы видим при попытке прочитать чужую таблицу мы получаем ошибку.</text:p>
      <text:p text:style-name="P35"/>
      <text:h text:style-name="P29" text:outline-level="2"><text:bookmark-start text:name="__RefHeading___Toc9368_799435573"/>Задание 6<text:bookmark-end text:name="__RefHeading___Toc9368_799435573"/></text:h>
      <text:p text:style-name="P36">Создадим представление и предоставим доступ на чтение только пользователю user2:</text:p>
      <text:p text:style-name="Code"><text:span text:style-name="T12">CREATE</text:span><text:span text:style-name="T13"> </text:span><text:span text:style-name="T12">VIEW</text:span><text:span text:style-name="T13"> employees_info </text:span><text:span text:style-name="T12">AS</text:span></text:p>
      <text:p text:style-name="Code"><text:span text:style-name="T12">SELECT</text:span><text:span text:style-name="T13"> e.name, d.dept_name</text:span></text:p>
      <text:p text:style-name="Code"><text:span text:style-name="T12">FROM</text:span><text:span text:style-name="T13"> employees </text:span><text:span text:style-name="T12">AS</text:span><text:span text:style-name="T13"> e</text:span></text:p>
      <text:p text:style-name="Code"><text:span text:style-name="T12">JOIN</text:span><text:span text:style-name="T13"> departments </text:span><text:span text:style-name="T12">AS</text:span><text:span text:style-name="T13"> d </text:span><text:span text:style-name="T12">ON</text:span><text:span text:style-name="T13"> e.dept_id = d.dept_id;</text:span></text:p>
      <text:p text:style-name="Code"/>
      <text:p text:style-name="Code"><text:span text:style-name="T12">GRANT</text:span><text:span text:style-name="T13"> </text:span><text:span text:style-name="T12">SELECT</text:span><text:span text:style-name="T13"> </text:span><text:span text:style-name="T12">ON</text:span><text:span text:style-name="T13"> employees_info </text:span><text:span text:style-name="T12">TO</text:span><text:span text:style-name="T13"> user2;</text:span></text:p>
      <text:p text:style-name="P35"/>
      <text:p text:style-name="P36">По итогу доступ к представлению выглядит следующим образом:</text:p>
      <text:p text:style-name="Output"><text:s text:c="37"/>Access privileges</text:p>
      <text:p text:style-name="Output"><text:s/>Schema | <text:s text:c="5"/>Name <text:s text:c="5"/>| Type | <text:s text:c="4"/>Access privileges <text:s text:c="5"/>| Column privileges | Policies </text:p>
      <text:p text:style-name="Output">--------+----------------+------+----------------------------+-------------------+----------</text:p>
      <text:p text:style-name="Output"><text:s/>public | employees_info | view | postgres=arwdDxtm/postgres+| <text:s text:c="18"/>| </text:p>
      <text:p text:style-name="Output"><text:s text:c="8"/>| <text:s text:c="15"/>| <text:s text:c="5"/>| user2=r/postgres <text:s text:c="10"/>| <text:s text:c="18"/>| </text:p>
      <text:p text:style-name="Output">(1 row)</text:p>
      <text:p text:style-name="P36"/>
      <text:h text:style-name="P29" text:outline-level="2"><text:bookmark-start text:name="__RefHeading___Toc9370_799435573"/>Задание 7<text:bookmark-end text:name="__RefHeading___Toc9370_799435573"/></text:h>
      <text:p text:style-name="P37">Перед тем как создавать политику безопасности на уровне строк добавим пару записей от пользователей в таблицу employees:</text:p>
      <text:p text:style-name="Code"><text:span text:style-name="T12">GRANT</text:span><text:span text:style-name="T13"> </text:span><text:span text:style-name="T12">SELECT</text:span><text:span text:style-name="T13">, </text:span><text:span text:style-name="T12">INSERT</text:span><text:span text:style-name="T13"> </text:span><text:span text:style-name="T12">ON</text:span><text:span text:style-name="T13"> employees </text:span><text:span text:style-name="T12">TO</text:span><text:span text:style-name="T13"> user1, user2;</text:span></text:p>
      <text:p text:style-name="Code"><text:span text:style-name="T12">GRANT</text:span><text:span text:style-name="T13"> </text:span><text:span text:style-name="T12">USAGE</text:span><text:span text:style-name="T13">, </text:span><text:span text:style-name="T12">SELECT</text:span><text:span text:style-name="T13"> </text:span><text:span text:style-name="T12">ON</text:span><text:span text:style-name="T13"> SEQUENCE employees_emp_id_seq </text:span><text:span text:style-name="T12">TO</text:span><text:span text:style-name="T13"> user1, user2;</text:span></text:p>
      <text:p text:style-name="Code"><text:span text:style-name="T12">SET</text:span><text:span text:style-name="T13"> </text:span><text:span text:style-name="T12">ROLE</text:span><text:span text:style-name="T13"> user1;</text:span></text:p>
      <text:p text:style-name="Code"><text:span text:style-name="T12">INSERT</text:span><text:span text:style-name="T13"> </text:span><text:span text:style-name="T12">INTO</text:span><text:span text:style-name="T13"> employees (name, salary, dept_id, created_by)</text:span></text:p>
      <text:p text:style-name="Code"><text:span text:style-name="T12">VALUES</text:span><text:span text:style-name="T13"> (</text:span><text:span text:style-name="T14">'Pakhomov'</text:span><text:span text:style-name="T13">, 100000, 1, </text:span><text:span text:style-name="T14">'user1'</text:span><text:span text:style-name="T13">);</text:span></text:p>
      <text:p text:style-name="Code"><text:span text:style-name="T12">RESET</text:span><text:span text:style-name="T13"> </text:span><text:span text:style-name="T12">ROLE</text:span><text:span text:style-name="T13">;</text:span></text:p>
      <text:p text:style-name="Code"><text:span text:style-name="T12">SET</text:span><text:span text:style-name="T13"> </text:span><text:span text:style-name="T12">ROLE</text:span><text:span text:style-name="T13"> user2;</text:span></text:p>
      <text:p text:style-name="Code"><text:span text:style-name="T12">INSERT</text:span><text:span text:style-name="T13"> </text:span><text:span text:style-name="T12">INTO</text:span><text:span text:style-name="T13"> employees (name, salary, dept_id, created_by)</text:span></text:p>
      <text:p text:style-name="Code"><text:span text:style-name="T12">VALUES</text:span><text:span text:style-name="T13"> (</text:span><text:span text:style-name="T14">'Brown'</text:span><text:span text:style-name="T13">, 90000, 2, </text:span><text:span text:style-name="T14">'user2'</text:span><text:span text:style-name="T13">);</text:span></text:p>
      <text:p text:style-name="Code"><text:span text:style-name="T12">RESET</text:span><text:span text:style-name="T13"> </text:span><text:span text:style-name="T12">ROLE</text:span><text:span text:style-name="T13">;</text:span></text:p>
      <text:p text:style-name="P37"><text:soft-page-break/>Далее создадим политику ROL:</text:p>
      <text:p text:style-name="P23"><text:span text:style-name="T12">ALTER</text:span><text:span text:style-name="T13"> </text:span><text:span text:style-name="T12">TABLE</text:span><text:span text:style-name="T13"> employees ENABLE </text:span><text:span text:style-name="T12">ROW</text:span><text:span text:style-name="T13"> </text:span><text:span text:style-name="T12">LEVEL</text:span><text:span text:style-name="T13"> </text:span><text:span text:style-name="T12">SECURITY</text:span><text:span text:style-name="T13">;</text:span></text:p>
      <text:p text:style-name="P27"/>
      <text:p text:style-name="P23"><text:span text:style-name="T12">CREATE</text:span><text:span text:style-name="T13"> POLICY user_row_policy</text:span></text:p>
      <text:p text:style-name="P23"><text:span text:style-name="T12">ON</text:span><text:span text:style-name="T13"> employees</text:span></text:p>
      <text:p text:style-name="P23"><text:span text:style-name="T12">FOR</text:span><text:span text:style-name="T13"> </text:span><text:span text:style-name="T12">SELECT</text:span></text:p>
      <text:p text:style-name="P23"><text:span text:style-name="T12">TO</text:span><text:span text:style-name="T13"> </text:span><text:span text:style-name="T12">public</text:span></text:p>
      <text:p text:style-name="P23"><text:span text:style-name="T12">USING</text:span><text:span text:style-name="T13"> (created_by = </text:span><text:span text:style-name="T12">current_user</text:span><text:span text:style-name="T13">);</text:span></text:p>
      <text:p text:style-name="P35"/>
      <text:p text:style-name="P37">Теперь при попытке чтения строк из таблицы employees пользователи будут видеть только те строки, которые имеют поле created_by, совпадающее с именем пользователя:</text:p>
      <text:p text:style-name="Output"><text:s/>emp_id | <text:s text:c="2"/>name <text:s text:c="3"/>| salary | dept_id | created_by </text:p>
      <text:p text:style-name="Output">--------+-----------+--------+---------+------------</text:p>
      <text:p text:style-name="Output"><text:s text:c="6"/>1 | Ivanov <text:s text:c="3"/>| <text:s/>50000 | <text:s text:c="6"/>1 | postgres</text:p>
      <text:p text:style-name="Output"><text:s text:c="6"/>2 | Petrov <text:s text:c="3"/>| <text:s/>60000 | <text:s text:c="6"/>1 | postgres</text:p>
      <text:p text:style-name="Output"><text:s text:c="6"/>3 | Sidorov <text:s text:c="2"/>| <text:s/>45000 | <text:s text:c="6"/>2 | postgres</text:p>
      <text:p text:style-name="Output"><text:s text:c="6"/>4 | Kuznetsov | <text:s/>55000 | <text:s text:c="6"/>3 | postgres</text:p>
      <text:p text:style-name="Output"><text:s text:c="6"/>5 | Pakhomov <text:s/>| 100000 | <text:s text:c="6"/>1 | user1</text:p>
      <text:p text:style-name="Output"><text:s text:c="6"/>6 | Brown <text:s text:c="4"/>| <text:s/>90000 | <text:s text:c="6"/>2 | user2</text:p>
      <text:p text:style-name="Output">(6 rows)</text:p>
      <text:p text:style-name="Output"/>
      <text:p text:style-name="Output">SET<text:span text:style-name="T17"> user1</text:span></text:p>
      <text:p text:style-name="Output"><text:s/>emp_id | <text:s text:c="2"/>name <text:s text:c="2"/>| salary | dept_id | created_by </text:p>
      <text:p text:style-name="Output">--------+----------+--------+---------+------------</text:p>
      <text:p text:style-name="Output"><text:s text:c="6"/>5 | Pakhomov | 100000 | <text:s text:c="6"/>1 | user1</text:p>
      <text:p text:style-name="Output">(1 row)</text:p>
      <text:p text:style-name="Output"/>
      <text:p text:style-name="Output">RESET</text:p>
      <text:p text:style-name="Output">SET<text:span text:style-name="T17"> user2</text:span></text:p>
      <text:p text:style-name="Output"><text:s/>emp_id | name <text:s/>| salary | dept_id | created_by </text:p>
      <text:p text:style-name="Output">--------+-------+--------+---------+------------</text:p>
      <text:p text:style-name="Output"><text:s text:c="6"/>6 | Brown | <text:s/>90000 | <text:s text:c="6"/>2 | user2</text:p>
      <text:p text:style-name="Output">(1 row)</text:p>
      <text:p text:style-name="Output"/>
      <text:p text:style-name="Output">RESET</text:p>
      <text:p text:style-name="P38"><text:s text:c="48"/>Access privileges</text:p>
      <text:p text:style-name="P38"><text:s/>Schema | <text:s text:c="2"/>Name <text:s text:c="3"/>| Type <text:s/>| <text:s text:c="4"/>Access privileges <text:s text:c="5"/>| Column privileges | <text:s text:c="13"/>Policies <text:s text:c="13"/></text:p>
      <text:p text:style-name="P38">--------+-----------+-------+----------------------------+-------------------+------------------------------------</text:p>
      <text:p text:style-name="P38"><text:s/>public | employees | table | postgres=arwdDxtm/postgres+| <text:s text:c="18"/>| user_row_policy (r): <text:s text:c="13"/>+</text:p>
      <text:p text:style-name="P38"><text:s text:c="8"/>| <text:s text:c="10"/>| <text:s text:c="6"/>| user1=ar/postgres <text:s text:c="8"/>+| <text:s text:c="18"/>| <text:s text:c="2"/>(u): (created_by = CURRENT_USER)</text:p>
      <text:p text:style-name="P38"><text:s text:c="8"/>| <text:s text:c="10"/>| <text:s text:c="6"/>| user2=ar/postgres <text:s text:c="9"/>| <text:s text:c="18"/>| </text:p>
      <text:p text:style-name="P38">(1 row)</text:p>
      <text:p text:style-name="P35"/>
      <text:h text:style-name="P28" text:outline-level="2"><text:bookmark-start text:name="__RefHeading___Toc9372_799435573"/>Задание 8<text:bookmark-end text:name="__RefHeading___Toc9372_799435573"/></text:h>
      <text:p text:style-name="P39">Для начала создадим таблицу с логами и выдадим права пользователям на взаимодействие (SELECT, INSERT, UPDATE, DELETE) с таблицей employees:</text:p>
      <text:p text:style-name="P23"><text:span text:style-name="T12">CREATE</text:span><text:span text:style-name="T13"> </text:span><text:span text:style-name="T12">TABLE</text:span><text:span text:style-name="T13"> logs (</text:span></text:p>
      <text:p text:style-name="P23"><text:span text:style-name="T13"><text:s text:c="4"/>log_id SERIAL </text:span><text:span text:style-name="T12">PRIMARY</text:span><text:span text:style-name="T13"> </text:span><text:span text:style-name="T12">KEY</text:span><text:span text:style-name="T13">,</text:span></text:p>
      <text:p text:style-name="P23"><text:span text:style-name="T13"><text:s text:c="4"/></text:span><text:span text:style-name="T12">table_name</text:span><text:span text:style-name="T13"> TEXT,</text:span></text:p>
      <text:p text:style-name="P23"><text:span text:style-name="T13"><text:s text:c="4"/></text:span><text:span text:style-name="T12">operation</text:span><text:span text:style-name="T13"> TEXT,</text:span></text:p>
      <text:p text:style-name="P23"><text:span text:style-name="T13"><text:s text:c="4"/>user_name TEXT,</text:span><text:span text:style-name="T15"/></text:p>
      <text:p text:style-name="P23"><text:span text:style-name="T13"><text:s text:c="4"/>old_data JSONB,</text:span><text:span text:style-name="T15"/></text:p>
      <text:p text:style-name="P23"><text:span text:style-name="T13"><text:s text:c="4"/>new_data JSONB,</text:span><text:span text:style-name="T15"/></text:p>
      <text:p text:style-name="P23"><text:span text:style-name="T13"><text:s text:c="4"/>changed_at </text:span><text:span text:style-name="T12">TIMESTAMP</text:span><text:span text:style-name="T13"> </text:span><text:span text:style-name="T12">DEFAULT</text:span><text:span text:style-name="T13"> now()</text:span></text:p>
      <text:p text:style-name="P27">);<text:span text:style-name="T15"/></text:p>
      <text:p text:style-name="P27"/>
      <text:p text:style-name="P23"><text:span text:style-name="T12">GRANT</text:span><text:span text:style-name="T13"> </text:span><text:span text:style-name="T12">SELECT</text:span><text:span text:style-name="T13">, </text:span><text:span text:style-name="T12">INSERT</text:span><text:span text:style-name="T13">, </text:span><text:span text:style-name="T12">UPDATE</text:span><text:span text:style-name="T13">, </text:span><text:span text:style-name="T12">DELETE</text:span><text:span text:style-name="T13"> </text:span><text:span text:style-name="T12">ON</text:span><text:span text:style-name="T13"> employees </text:span><text:span text:style-name="T12">TO</text:span><text:span text:style-name="T13"> user1, user2;</text:span></text:p>
      <text:p text:style-name="P23"><text:span text:style-name="T12">GRANT</text:span><text:span text:style-name="T13"> </text:span><text:span text:style-name="T12">USAGE</text:span><text:span text:style-name="T13">, </text:span><text:span text:style-name="T12">SELECT</text:span><text:span text:style-name="T13"> </text:span><text:span text:style-name="T12">ON</text:span><text:span text:style-name="T13"> SEQUENCE employees_emp_id_seq </text:span><text:span text:style-name="T12">TO</text:span><text:span text:style-name="T13"> user1, user2;</text:span></text:p>
      <text:p text:style-name="P35"/>
      <text:p text:style-name="P39">Далее создадим триггер и функцию к нему. Триггер будет реагировать на изменения в таблице employees и записывать лог в таблицу logs. При этом пользователи не будут иметь доступ к таблице логов, запись в неё будет происходить от лица админа postgres:</text:p>
      <text:p text:style-name="P23"><text:span text:style-name="T12">CREATE</text:span><text:span text:style-name="T13"> </text:span><text:span text:style-name="T12">OR</text:span><text:span text:style-name="T13"> </text:span><text:span text:style-name="T12">REPLACE</text:span><text:span text:style-name="T13"> </text:span><text:span text:style-name="T12">FUNCTION</text:span><text:span text:style-name="T13"> logs_trigger() </text:span><text:span text:style-name="T12">RETURNS</text:span><text:span text:style-name="T13"> </text:span><text:span text:style-name="T12">trigger</text:span><text:span text:style-name="T13"> </text:span><text:span text:style-name="T12">AS</text:span><text:span text:style-name="T13"> $$</text:span></text:p>
      <text:p text:style-name="P40">BEGIN<text:span text:style-name="T15"/></text:p>
      <text:p text:style-name="P23"><text:span text:style-name="T13"><text:s text:c="4"/></text:span><text:span text:style-name="T12">IF</text:span><text:span text:style-name="T13"> (TG_OP = </text:span><text:span text:style-name="T14">'INSERT'</text:span><text:span text:style-name="T13">) </text:span><text:span text:style-name="T12">THEN</text:span></text:p>
      <text:p text:style-name="P23"><text:span text:style-name="T13"><text:s text:c="8"/></text:span><text:span text:style-name="T12">INSERT</text:span><text:span text:style-name="T13"> </text:span><text:span text:style-name="T12">INTO</text:span><text:span text:style-name="T13"> logs (</text:span><text:span text:style-name="T12">table_name</text:span><text:span text:style-name="T13">, </text:span><text:span text:style-name="T12">operation</text:span><text:span text:style-name="T13">, user_name, new_data)</text:span></text:p>
      <text:p text:style-name="P23"><text:span text:style-name="T13"><text:s text:c="8"/></text:span><text:span text:style-name="T12">VALUES</text:span><text:span text:style-name="T13"> (TG_TABLE_NAME, TG_OP, </text:span><text:span text:style-name="T12">current_user</text:span><text:span text:style-name="T13">, row_to_json(</text:span><text:span text:style-name="T12">NEW</text:span><text:span text:style-name="T13">)::jsonb);</text:span></text:p>
      <text:p text:style-name="P23"><text:span text:style-name="T13"><text:s text:c="4"/></text:span><text:span text:style-name="T12">ELSIF</text:span><text:span text:style-name="T13"> (TG_OP = </text:span><text:span text:style-name="T14">'UPDATE'</text:span><text:span text:style-name="T13">) </text:span><text:span text:style-name="T12">THEN</text:span></text:p>
      <text:p text:style-name="P23"><text:span text:style-name="T13"><text:s text:c="8"/></text:span><text:span text:style-name="T12">INSERT</text:span><text:span text:style-name="T13"> </text:span><text:span text:style-name="T12">INTO</text:span><text:span text:style-name="T13"> logs (</text:span><text:span text:style-name="T12">table_name</text:span><text:span text:style-name="T13">, </text:span><text:span text:style-name="T12">operation</text:span><text:span text:style-name="T13">, user_name, old_data, new_data)</text:span></text:p>
      <text:p text:style-name="P23"><text:span text:style-name="T13"><text:s text:c="8"/></text:span><text:span text:style-name="T12">VALUES</text:span><text:span text:style-name="T13"> (TG_TABLE_NAME, TG_OP, </text:span><text:span text:style-name="T12">current_user</text:span><text:span text:style-name="T13">, row_to_json(</text:span><text:span text:style-name="T12">OLD</text:span><text:span text:style-name="T13">)::jsonb, row_to_json(</text:span><text:span text:style-name="T12">NEW</text:span><text:span text:style-name="T13">)::jsonb);</text:span></text:p>
      <text:p text:style-name="P23"><text:span text:style-name="T13"><text:s text:c="4"/></text:span><text:span text:style-name="T12">ELSIF</text:span><text:span text:style-name="T13"> (TG_OP = </text:span><text:span text:style-name="T14">'DELETE'</text:span><text:span text:style-name="T13">) </text:span><text:span text:style-name="T12">THEN</text:span></text:p>
      <text:p text:style-name="P23"><text:span text:style-name="T13"><text:s text:c="8"/></text:span><text:span text:style-name="T12">INSERT</text:span><text:span text:style-name="T13"> </text:span><text:span text:style-name="T12">INTO</text:span><text:span text:style-name="T13"> logs (</text:span><text:span text:style-name="T12">table_name</text:span><text:span text:style-name="T13">, </text:span><text:span text:style-name="T12">operation</text:span><text:span text:style-name="T13">, user_name, old_data)</text:span></text:p>
      <text:p text:style-name="P23"><text:span text:style-name="T13"><text:s text:c="8"/></text:span><text:span text:style-name="T12">VALUES</text:span><text:span text:style-name="T13"> (TG_TABLE_NAME, TG_OP, </text:span><text:span text:style-name="T12">current_user</text:span><text:span text:style-name="T13">, row_to_json(</text:span><text:span text:style-name="T12">OLD</text:span><text:span text:style-name="T13">)::jsonb);</text:span></text:p>
      <text:p text:style-name="P23"><text:span text:style-name="T13"><text:s text:c="4"/></text:span><text:span text:style-name="T12">END</text:span><text:span text:style-name="T13"> </text:span><text:span text:style-name="T12">IF</text:span><text:span text:style-name="T13">;</text:span></text:p>
      <text:p text:style-name="P23"><text:span text:style-name="T13"><text:s text:c="4"/></text:span><text:span text:style-name="T12">RETURN</text:span><text:span text:style-name="T13"> </text:span><text:span text:style-name="T12">NULL</text:span><text:span text:style-name="T13">;</text:span></text:p>
      <text:p text:style-name="P23"><text:span text:style-name="T12">END</text:span><text:span text:style-name="T13">;</text:span></text:p>
      <text:p text:style-name="P23"><text:span text:style-name="T13">$$ </text:span><text:span text:style-name="T12">LANGUAGE</text:span><text:span text:style-name="T13"> plpgsql</text:span></text:p>
      <text:p text:style-name="P23"><text:span text:style-name="T12">SECURITY</text:span><text:span text:style-name="T13"> </text:span><text:span text:style-name="T12">DEFINER</text:span><text:span text:style-name="T13">;</text:span></text:p>
      <text:p text:style-name="P27"/>
      <text:p text:style-name="P23"><text:span text:style-name="T12">CREATE</text:span><text:span text:style-name="T13"> </text:span><text:span text:style-name="T12">TRIGGER</text:span><text:span text:style-name="T13"> trigger_employees_logs</text:span></text:p>
      <text:p text:style-name="P23"><text:span text:style-name="T12">AFTER</text:span><text:span text:style-name="T13"> </text:span><text:span text:style-name="T12">INSERT</text:span><text:span text:style-name="T13"> </text:span><text:span text:style-name="T12">OR</text:span><text:span text:style-name="T13"> </text:span><text:span text:style-name="T12">UPDATE</text:span><text:span text:style-name="T13"> </text:span><text:span text:style-name="T12">OR</text:span><text:span text:style-name="T13"> </text:span><text:span text:style-name="T12">DELETE</text:span><text:span text:style-name="T13"> </text:span><text:span text:style-name="T12">ON</text:span><text:span text:style-name="T13"> employees</text:span></text:p>
      <text:p text:style-name="P23"><text:span text:style-name="T12">FOR</text:span><text:span text:style-name="T13"> </text:span><text:span text:style-name="T12">EACH</text:span><text:span text:style-name="T13"> </text:span><text:span text:style-name="T12">ROW</text:span><text:span text:style-name="T13"> </text:span><text:span text:style-name="T12">EXECUTE</text:span><text:span text:style-name="T13"> </text:span><text:span text:style-name="T12">FUNCTION</text:span><text:span text:style-name="T13"> logs_trigger();</text:span></text:p>
      <text:p text:style-name="P35"/>
      <text:p text:style-name="P35"/>
      <text:p text:style-name="P35"/>
      <text:h text:style-name="P41" text:outline-level="1"><text:bookmark-start text:name="__RefHeading___Toc143_2058273410 Copy 1"/>ЗАКЛЮЧЕНИЕ<text:bookmark-end text:name="__RefHeading___Toc143_2058273410 Copy 1"/></text:h>
      <text:p text:style-name="P42">В ходе выполнения лабораторной работы были изучены и практически реализованы основные механизмы обеспечения безопасности и контроля доступа в СУБД PostgreSQL.</text:p>
      <text:p text:style-name="P42">В процессе работы были освоены следующие ключевые технологии:</text:p>
      <text:list text:style-name="L1">
        <text:list-item>
          <text:p text:style-name="P43"><text:span text:style-name="T18">И</text:span>спользование команд <text:span text:style-name="T18">GRANT и REVOKE</text:span> для выдачи прав, а также реализация цепочки делегирования полномочий<text:span text:style-name="T18">;</text:span></text:p>
        </text:list-item>
        <text:list-item>
          <text:p text:style-name="P43"><text:span text:style-name="T18">С</text:span>оздание персональных подсхем с авторизацией владельца, что позволяет разграничить рабочие пространства пользователей внутри одной базы данных<text:span text:style-name="T18">;</text:span></text:p>
        </text:list-item>
        <text:list-item>
          <text:p text:style-name="P44">На уровне столбцов<text:span text:style-name="T18"> был реализован доступ через представление, на уровне строк - при помощи политики RLS;</text:span></text:p>
        </text:list-item>
        <text:list-item>
          <text:p text:style-name="P44"><text:span text:style-name="T18">Р</text:span>азработ<text:span text:style-name="T18">ан</text:span> автоматизированн<text:span text:style-name="T18">ый </text:span>механизм логирования изменений на основе триггеров и триггерных функций. Это позволило обеспечить фиксацию всех операций с сохранением истории изменений<text:span text:style-name="T18">.</text:span></text:p>
        </text:list-item>
      </text:list>
      <text:p text:style-name="P42">Изученные инструменты позволяют создать гибкую и над<text:span text:style-name="T18">ё</text:span>жную систему защиты данных, обеспечивающую не только разграничение прав, но и полную прозрачность действий пользователей, что критически важно для защиты коммерческой и конфиденциальной информации в современных СУБД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/>
      <style:text-properties style:font-name="Liberation Mono" fo:font-family="'Liberation Mono'" style:font-family-generic="modern" style:font-pitch="fixed" fo:font-size="10pt" fo:language="zxx" fo:country="none" officeooo:rsid="003aa9bd" style:font-size-asian="10pt" style:language-asian="zxx" style:country-asian="none" style:font-size-complex="10pt" style:language-complex="zxx" style:country-complex="none"/>
    </style:style>
    <style:style style:name="Output" style:family="paragraph" style:parent-style-name="Code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08T14:47:35.600819763</dc:date>
    <meta:editing-duration>P1DT1H39M54S</meta:editing-duration>
    <meta:editing-cycles>52</meta:editing-cycles>
    <meta:generator>LibreOffice/26.2.1.2$Linux_X86_64 LibreOffice_project/620$Build-2</meta:generator>
    <meta:document-statistic meta:table-count="0" meta:image-count="1" meta:object-count="0" meta:page-count="9" meta:paragraph-count="239" meta:word-count="1386" meta:character-count="11071" meta:non-whitespace-character-count="8600"/>
  </office:meta>
</office:document-meta>
</file>