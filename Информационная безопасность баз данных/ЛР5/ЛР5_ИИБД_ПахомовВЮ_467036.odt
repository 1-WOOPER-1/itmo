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FCDA082F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">
      <style:paragraph-properties fo:margin-top="0cm" fo:margin-bottom="0cm" style:contextual-spacing="false" fo:line-height="150%" fo:text-align="center" style:justify-single-word="false" style:page-number="auto"/>
      <style:text-properties fo:font-weight="bold" officeooo:paragraph-rsid="000d823a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d823a"/>
    </style:style>
    <style:style style:name="P3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137308"/>
    </style:style>
    <style:style style:name="P6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paragraph-rsid="000ca6c1"/>
    </style:style>
    <style:style style:name="P7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d823a"/>
    </style:style>
    <style:style style:name="P8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d823a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0ca6c1" officeooo:paragraph-rsid="000ca6c1"/>
    </style:style>
    <style:style style:name="P10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ca6c1"/>
    </style:style>
    <style:style style:name="P11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ca6c1" style:font-size-asian="10pt" style:font-size-complex="10pt"/>
    </style:style>
    <style:style style:name="P12" style:family="paragraph" style:parent-style-name="Text_20_body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font-weight="bold" officeooo:rsid="000f2314" officeooo:paragraph-rsid="000f2314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50%" fo:text-align="left" style:justify-single-word="false"/>
      <style:text-properties officeooo:paragraph-rsid="000d823a"/>
    </style:style>
    <style:style style:name="P14" style:family="paragraph" style:parent-style-name="Contents_20_1">
      <style:paragraph-properties fo:line-height="150%">
        <style:tab-stops>
          <style:tab-stop style:position="17.588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 fo:line-height="150%">
        <style:tab-stops>
          <style:tab-stop style:position="17.089cm" style:type="right" style:leader-style="dotted" style:leader-text="."/>
        </style:tab-stops>
      </style:paragraph-properties>
    </style:style>
    <style:style style:name="P16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0f2314" officeooo:paragraph-rsid="000f2314" style:font-weight-asian="bold" style:font-weight-complex="bold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style:page-number="auto" fo:background-color="transparent"/>
      <style:text-properties officeooo:rsid="000f2314" officeooo:paragraph-rsid="000f2314"/>
    </style:style>
    <style:style style:name="P18" style:family="paragraph" style:parent-style-name="Text_20_body">
      <style:paragraph-properties fo:margin-top="0cm" fo:margin-bottom="0.25cm" style:contextual-spacing="false" fo:line-height="150%" fo:text-align="left" style:justify-single-word="false"/>
      <style:text-properties officeooo:paragraph-rsid="000f2314"/>
    </style:style>
    <style:style style:name="P19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fo:font-weight="bold" officeooo:rsid="000f2314" officeooo:paragraph-rsid="000f2314" style:font-weight-asian="bold" style:font-weight-complex="bold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111865" officeooo:paragraph-rsid="00111865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fo:background-color="transparent"/>
      <style:text-properties fo:color="#000000" loext:opacity="100%" style:font-name="Liberation Mono" fo:font-size="10pt" fo:language="zxx" fo:country="none" officeooo:rsid="00111865" officeooo:paragraph-rsid="00111865" fo:background-color="#eeeee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3aa9bd" officeooo:paragraph-rsid="003aa9bd"/>
    </style:style>
    <style:style style:name="P23" style:family="paragraph" style:parent-style-name="Code"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4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fo:color="#000000" loext:opacity="100%" fo:language="zxx" fo:country="none" fo:font-style="normal" style:text-underline-style="none" fo:font-weight="normal" officeooo:paragraph-rsid="0047f6d2" fo:background-color="transparent"/>
    </style:style>
    <style:style style:name="P25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fo:color="#000000" loext:opacity="100%" fo:language="zxx" fo:country="none" fo:font-style="normal" style:text-underline-style="none" fo:font-weight="normal" officeooo:rsid="0047f6d2" officeooo:paragraph-rsid="0047f6d2" fo:background-color="transparent"/>
    </style:style>
    <style:style style:name="P26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fo:color="#000000" loext:opacity="100%" fo:language="zxx" fo:country="none" fo:font-style="normal" style:text-underline-style="none" fo:font-weight="normal" officeooo:paragraph-rsid="003aa9bd" fo:background-color="transparent"/>
    </style:style>
    <style:style style:name="P27" style:family="paragraph" style:parent-style-name="Text_20_body" style:list-styl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reak-before="page" fo:background-color="transparent"/>
      <style:text-properties fo:font-weight="bold" officeooo:paragraph-rsid="003aa9bd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paragraph-rsid="003aa9bd"/>
    </style:style>
    <style:style style:name="P29" style:family="paragraph" style:parent-style-name="Code"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/>
      <style:text-properties fo:color="#000000" loext:opacity="100%" fo:language="zxx" fo:country="none" fo:font-style="normal" style:text-underline-style="none" fo:font-weight="normal" fo:background-color="transparent"/>
    </style:style>
    <style:style style:name="P30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fo:color="#000000" loext:opacity="100%" fo:language="zxx" fo:country="none" fo:font-style="normal" style:text-underline-style="none" fo:font-weight="normal" officeooo:rsid="0048bf45" officeooo:paragraph-rsid="0048bf45" fo:background-color="transparent"/>
    </style:style>
    <style:style style:name="P31" style:family="paragraph" style:parent-style-name="Text_20_body" style:list-styl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reak-before="page" fo:background-color="transparent"/>
      <style:text-properties fo:font-weight="bold" officeooo:rsid="003aa9bd" officeooo:paragraph-rsid="003aa9bd" style:font-weight-asian="bold" style:font-weight-complex="bold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4bc867" officeooo:paragraph-rsid="004bc867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4d744b" officeooo:paragraph-rsid="004d744b"/>
    </style:style>
    <style:style style:name="P34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1b0b15" officeooo:paragraph-rsid="001b0b15" style:font-weight-asian="bold" style:font-weight-complex="bold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14bf3e" officeooo:paragraph-rsid="0014bf3e"/>
    </style:style>
    <style:style style:name="P36" style:family="paragraph" style:parent-style-name="Text_20_body" style:list-style-name="L1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14bf3e" officeooo:paragraph-rsid="0014bf3e"/>
    </style:style>
    <style:style style:name="P37" style:family="paragraph" style:parent-style-name="Text_20_body" style:list-style-name="L1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14bf3e" officeooo:paragraph-rsid="005166db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14bf3e" officeooo:paragraph-rsid="005166d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37308"/>
    </style:style>
    <style:style style:name="T3" style:family="text">
      <style:text-properties officeooo:rsid="000ca6c1"/>
    </style:style>
    <style:style style:name="T4" style:family="text">
      <style:text-properties officeooo:rsid="0046916b"/>
    </style:style>
    <style:style style:name="T5" style:family="text">
      <style:text-properties officeooo:rsid="001450d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officeooo:rsid="00236fbb" style:font-weight-asian="normal" style:font-weight-complex="normal"/>
    </style:style>
    <style:style style:name="T8" style:family="text">
      <style:text-properties fo:font-weight="normal" officeooo:rsid="0048bf45" style:font-weight-asian="normal" style:font-weight-complex="normal"/>
    </style:style>
    <style:style style:name="T9" style:family="text">
      <style:text-properties officeooo:rsid="0047f6d2"/>
    </style:style>
    <style:style style:name="T10" style:family="text">
      <style:text-properties officeooo:rsid="001dc2e6"/>
    </style:style>
    <style:style style:name="T11" style:family="text">
      <style:text-properties officeooo:rsid="001ed64b"/>
    </style:style>
    <style:style style:name="T12" style:family="text">
      <style:text-properties officeooo:rsid="004e6e59"/>
    </style:style>
    <style:style style:name="T13" style:family="text">
      <style:text-properties fo:color="#0000ff" loext:opacity="100%"/>
    </style:style>
    <style:style style:name="T14" style:family="text">
      <style:text-properties fo:color="#000000" loext:opacity="100%"/>
    </style:style>
    <style:style style:name="T15" style:family="text">
      <style:text-properties officeooo:rsid="004a5b6f"/>
    </style:style>
    <style:style style:name="T16" style:family="text">
      <style:text-properties officeooo:rsid="003aa9bd" style:font-weight-asian="bold" style:font-weight-complex="bold"/>
    </style:style>
    <style:style style:name="T17" style:family="text">
      <style:text-properties officeooo:rsid="003aa9bd"/>
    </style:style>
    <style:style style:name="T18" style:family="text">
      <style:text-properties fo:color="#000000" loext:opacity="100%" fo:font-style="normal" style:text-underline-style="none" fo:font-weight="normal"/>
    </style:style>
    <style:style style:name="T19" style:family="text">
      <style:text-properties fo:color="#a31515" loext:opacity="100%"/>
    </style:style>
    <style:style style:name="T20" style:family="text">
      <style:text-properties officeooo:rsid="004d744b"/>
    </style:style>
    <style:style style:name="T21" style:family="text">
      <style:text-properties officeooo:rsid="005166db"/>
    </style:style>
    <style:style style:name="T22" style:family="text">
      <style:text-properties officeooo:rsid="0052418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<text:span text:style-name="T1">ФЕДЕРАЛЬНОЕ </text:span>ГОСУДАРСТВЕННОЕ АВТОНОМНОЕ ОБРАЗОВАТЕЛЬНОЕ</text:p>
      <text:p text:style-name="P3">УЧРЕЖДЕНИЕ ВЫСШЕГО ОБРАЗОВАНИЯ</text:p>
      <text:p text:style-name="P4">НАЦИОНАЛЬНЫЙ ИССЛЕДОВАТЕЛЬСКИЙ УНИВЕРСИТЕТ ИТМО</text:p>
      <text:p text:style-name="P4"/>
      <text:p text:style-name="P4"/>
      <text:p text:style-name="P3">Факультет безопасности информационных технологий</text:p>
      <text:p text:style-name="P3"/>
      <text:p text:style-name="P3">Дисциплина:</text:p>
      <text:p text:style-name="P3">«<text:span text:style-name="T2">Информационная безопасность баз данных</text:span>»</text:p>
      <text:p text:style-name="P3"/>
      <text:p text:style-name="P3"/>
      <text:p text:style-name="P3">ОТЧЕТ ПО ЛАБОРАТОРНОЙ РАБОТЕ <text:span text:style-name="T3">№</text:span><text:span text:style-name="T4">5</text:span></text:p>
      <text:p text:style-name="P5">«Шифрование в PostgreSQL»</text:p>
      <text:p text:style-name="P3"/>
      <text:p text:style-name="P6">Выполнил:</text:p>
      <text:p text:style-name="P6">Пахомов Владимир Юрьевич, студент группы N3250</text:p>
      <text:p text:style-name="P7"><draw:frame draw:style-name="fr1" draw:name="Изображение1" text:anchor-type="char" svg:x="14.242cm" svg:y="0.746cm" svg:width="3.489cm" svg:height="1.707cm" draw:z-index="0"><draw:image xlink:href="Pictures/1000000100000203000000FCDA082FB6.png" xlink:type="simple" xlink:show="embed" xlink:actuate="onLoad" draw:mime-type="image/png"/></draw:frame></text:p>
      <text:p text:style-name="P7">________________</text:p>
      <text:p text:style-name="P8">(подпись) <text:s text:c="8"/></text:p>
      <text:p text:style-name="P6"/>
      <text:p text:style-name="P6">Проверил:</text:p>
      <text:p text:style-name="P9">Ярцева Наталия Андреевна, преподаватель ФБИТ</text:p>
      <text:p text:style-name="P9"/>
      <text:p text:style-name="P10">_____________________</text:p>
      <text:p text:style-name="P8">(отметка о выполнении) <text:s text:c="2"/></text:p>
      <text:p text:style-name="P10"/>
      <text:p text:style-name="P10"/>
      <text:p text:style-name="P10">________________</text:p>
      <text:p text:style-name="P11">(подпись) <text:s text:c="8"/></text:p>
      <text:p text:style-name="P2"/>
      <text:p text:style-name="P2">Санкт-Петербург</text:p>
      <text:p text:style-name="P2">202<text:span text:style-name="T5">6</text:span>г.</text:p>
      <text:h text:style-name="P12" text:outline-level="1"><text:bookmark-start text:name="__RefHeading___Toc80_2058273410"/>СОДЕРЖАНИЕ<text:bookmark-end text:name="__RefHeading___Toc80_2058273410"/></text:h>
      <text:p text:style-name="P13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80_2058273410" office:name="СОДЕРЖАНИЕ" text:style-name="Index_20_Link" text:visited-style-name="Index_20_Link">СОДЕРЖАНИЕ<text:tab/>2</text:a></text:p>
          <text:p text:style-name="P14"><text:a xlink:type="simple" xlink:href="#__RefHeading___Toc82_2058273410" office:name="ВВЕДЕНИЕ" text:style-name="Index_20_Link" text:visited-style-name="Index_20_Link">ВВЕДЕНИЕ<text:tab/>3</text:a></text:p>
          <text:p text:style-name="P14"><text:a xlink:type="simple" xlink:href="#__RefHeading___Toc143_2058273410" office:name="ХОД РАБОТЫ" text:style-name="Index_20_Link" text:visited-style-name="Index_20_Link">ХОД РАБОТЫ<text:tab/>3</text:a></text:p>
          <text:p text:style-name="P15"><text:a xlink:type="simple" xlink:href="#__RefHeading___Toc1996_3870135317" office:name="Задание 1" text:style-name="Index_20_Link" text:visited-style-name="Index_20_Link">Задание 1<text:tab/>4</text:a></text:p>
          <text:p text:style-name="P15"><text:a xlink:type="simple" xlink:href="#__RefHeading___Toc1998_3870135317" office:name="Задание 2" text:style-name="Index_20_Link" text:visited-style-name="Index_20_Link">Задание 2<text:tab/>5</text:a></text:p>
          <text:p text:style-name="P14"><text:a xlink:type="simple" xlink:href="#__RefHeading___Toc143_2058273410%20Copy%201" office:name="ЗАКЛЮЧЕНИЕ" text:style-name="Index_20_Link" text:visited-style-name="Index_20_Link">ЗАКЛЮЧЕНИЕ<text:tab/>6</text:a></text:p>
        </text:index-body>
      </text:table-of-content>
      <text:p text:style-name="P13"/>
      <text:h text:style-name="P16" text:outline-level="1"><text:bookmark-start text:name="__RefHeading___Toc82_2058273410"/>ВВЕДЕНИЕ<text:bookmark-end text:name="__RefHeading___Toc82_2058273410"/></text:h>
      <text:p text:style-name="P17"><text:span text:style-name="T6">Цель работы</text:span> —<text:span text:style-name="T7"> изучить и практически применить методы хеширования паролей и</text:span><text:span text:style-name="T8"> </text:span><text:span text:style-name="T7">шифрования данных в PostgreSQL с использованием расширения </text:span><text:span text:style-name="T8">pgcrypto</text:span><text:span text:style-name="T7">.</text:span></text:p>
      <text:p text:style-name="P18"/>
      <text:p text:style-name="P18"/>
      <text:h text:style-name="P19" text:outline-level="1"><text:bookmark-start text:name="__RefHeading___Toc143_2058273410"/>ХОД РАБОТЫ<text:bookmark-end text:name="__RefHeading___Toc143_2058273410"/></text:h>
      <text:p text:style-name="P20">В данной лабораторной работе для взаимодействия с базой данных PostgreSQL будем использовать утилиту psql на ОС Linux. Для создания и подключения к локальной базе данных создадим файл lab<text:span text:style-name="T9">5</text:span>.sql и впишем в него все команды для создания базы данных <text:span text:style-name="T10">и отправки команд</text:span><text:span text:style-name="T11"> из</text:span> методическо<text:span text:style-name="T11">го </text:span>материал<text:span text:style-name="T11">а</text:span>. Для подключения к базе данных используем команду:</text:p>
      <text:p text:style-name="P21">psql -U postgres -f lab<text:span text:style-name="T9">5</text:span>.sql</text:p>
      <text:p text:style-name="P22">Для начала <text:span text:style-name="T9">подключим </text:span><text:span text:style-name="T12">расширение</text:span><text:span text:style-name="T9"> pgcrypto:</text:span></text:p>
      <text:p text:style-name="P23"><text:span text:style-name="T13">CREATE</text:span><text:span text:style-name="T14"> EXTENSION </text:span><text:span text:style-name="T13">IF</text:span><text:span text:style-name="T14"> </text:span><text:span text:style-name="T13">NOT</text:span><text:span text:style-name="T14"> </text:span><text:span text:style-name="T13">EXISTS</text:span><text:span text:style-name="T14"> pgcrypto;</text:span></text:p>
      <text:p text:style-name="P24"/>
      <text:p text:style-name="P25">Проверим<text:span text:style-name="T15">, что он</text:span><text:span text:style-name="T12">о</text:span><text:span text:style-name="T15"> подключил</text:span><text:span text:style-name="T12">о</text:span><text:span text:style-name="T15">сь</text:span>:</text:p>
      <text:p text:style-name="Output"><text:s text:c="27"/>List of installed extensions</text:p>
      <text:p text:style-name="Output"><text:s text:c="3"/>Name <text:s text:c="2"/>| Version | Default version | <text:s text:c="2"/>Schema <text:s text:c="2"/>| <text:s text:c="8"/>Description <text:s text:c="9"/></text:p>
      <text:p text:style-name="Output">----------+---------+-----------------+------------+------------------------------</text:p>
      <text:p text:style-name="Output"><text:s/>pgcrypto | 1.4 <text:s text:c="4"/>| 1.4 <text:s text:c="12"/>| public <text:s text:c="4"/>| cryptographic functions</text:p>
      <text:p text:style-name="Output"><text:s/>plpgsql <text:s/>| 1.0 <text:s text:c="4"/>| 1.0 <text:s text:c="12"/>| pg_catalog | PL/pgSQL procedural language</text:p>
      <text:p text:style-name="Output">(2 rows)</text:p>
      <text:p text:style-name="P26"/>
      <text:h text:style-name="P27" text:outline-level="2"><text:bookmark-start text:name="__RefHeading___Toc1996_3870135317"/><text:span text:style-name="T16">Задание 1</text:span><text:bookmark-end text:name="__RefHeading___Toc1996_3870135317"/></text:h>
      <text:p text:style-name="P28"><text:span text:style-name="T17">Создадим </text:span><text:span text:style-name="T9">таблицу с тремя столбцами, один из которых будет шифроваться с помощью алгоритма SHA-1 и </text:span><text:span text:style-name="T15">другой </text:span><text:span text:style-name="T9">с помощью алгоритма MD5:</text:span></text:p>
      <text:p text:style-name="P23"><text:span text:style-name="T13">CREATE</text:span><text:span text:style-name="T14"> </text:span><text:span text:style-name="T13">TABLE</text:span><text:span text:style-name="T14"> accounts (</text:span></text:p>
      <text:p text:style-name="P23"><text:span text:style-name="T14"><text:s text:c="4"/>username TEXT,</text:span><text:span text:style-name="T18"/></text:p>
      <text:p text:style-name="P23"><text:span text:style-name="T14"><text:s text:c="4"/>passwd TEXT,</text:span><text:span text:style-name="T18"/></text:p>
      <text:p text:style-name="P23"><text:span text:style-name="T14"><text:s text:c="4"/>keyphrase TEXT</text:span><text:span text:style-name="T18"/></text:p>
      <text:p text:style-name="P29">);<text:span text:style-name="T18"/></text:p>
      <text:p text:style-name="P29"/>
      <text:p text:style-name="P23"><text:span text:style-name="T13">INSERT</text:span><text:span text:style-name="T14"> </text:span><text:span text:style-name="T13">INTO</text:span><text:span text:style-name="T14"> accounts (username, passwd, keyphrase)</text:span></text:p>
      <text:p text:style-name="P23"><text:span text:style-name="T13">VALUES</text:span><text:span text:style-name="T14"> (</text:span><text:span text:style-name="T19">'user1'</text:span><text:span text:style-name="T14">, crypt(</text:span><text:span text:style-name="T19">'qwerty'</text:span><text:span text:style-name="T14">, gen_salt(</text:span><text:span text:style-name="T19">'md5'</text:span><text:span text:style-name="T14">)), encode(digest(</text:span><text:span text:style-name="T19">'homie'</text:span><text:span text:style-name="T14">, </text:span><text:span text:style-name="T19">'sha1'</text:span><text:span text:style-name="T14">), </text:span><text:span text:style-name="T19">'hex'</text:span><text:span text:style-name="T14">));</text:span></text:p>
      <text:p text:style-name="P26"/>
      <text:p text:style-name="P25">В итоге получаем такой результат:</text:p>
      <text:p text:style-name="Output"><text:s/>username | <text:s text:c="14"/>passwd <text:s text:c="14"/>| <text:s text:c="15"/>keyphrase <text:s text:c="16"/></text:p>
      <text:p text:style-name="Output">----------+------------------------------------+------------------------------------------</text:p>
      <text:p text:style-name="Output"><text:s/>user1 <text:s text:c="3"/>| $1$BCFTR1H/$IeM7HwLsdU0M2u/FHDKo0/ | f9e644dcc94ec41af1ea9ea08c44da218e07861a</text:p>
      <text:p text:style-name="Output">(1 row)</text:p>
      <text:p text:style-name="P25"/>
      <text:p text:style-name="P25">Сделаем проверку. Для этого используем те же самые функции, которые использовались для шифрования, но попробуем передать им другое значение, отличное от изначальных:</text:p>
      <text:p text:style-name="P23"><text:span text:style-name="T13">SELECT</text:span><text:span text:style-name="T14"> (passwd = crypt(</text:span><text:span text:style-name="T19">'213'</text:span><text:span text:style-name="T14">, passwd)) </text:span><text:span text:style-name="T13">as</text:span><text:span text:style-name="T14"> password,</text:span></text:p>
      <text:p text:style-name="P23"><text:span text:style-name="T14">(keyphrase = encode(digest(</text:span><text:span text:style-name="T19">'ewr'</text:span><text:span text:style-name="T14">, </text:span><text:span text:style-name="T19">'sha1'</text:span><text:span text:style-name="T14">), </text:span><text:span text:style-name="T19">'hex'</text:span><text:span text:style-name="T14">)) </text:span><text:span text:style-name="T13">as</text:span><text:span text:style-name="T14"> keyphrase</text:span></text:p>
      <text:p text:style-name="P23"><text:span text:style-name="T13">FROM</text:span><text:span text:style-name="T14"> accounts;</text:span></text:p>
      <text:p text:style-name="P29"/>
      <text:p text:style-name="P23"><text:span text:style-name="T13">SELECT</text:span><text:span text:style-name="T14"> (passwd = crypt(</text:span><text:span text:style-name="T19">'qwerty'</text:span><text:span text:style-name="T14">, passwd)) </text:span><text:span text:style-name="T13">as</text:span><text:span text:style-name="T14"> password,</text:span></text:p>
      <text:p text:style-name="P23"><text:span text:style-name="T14">(keyphrase = encode(digest(</text:span><text:span text:style-name="T19">'homie'</text:span><text:span text:style-name="T14">, </text:span><text:span text:style-name="T19">'sha1'</text:span><text:span text:style-name="T14">), </text:span><text:span text:style-name="T19">'hex'</text:span><text:span text:style-name="T14">)) </text:span><text:span text:style-name="T13">as</text:span><text:span text:style-name="T14"> keyphrase</text:span></text:p>
      <text:p text:style-name="P23"><text:span text:style-name="T13">FROM</text:span><text:span text:style-name="T14"> accounts;</text:span></text:p>
      <text:p text:style-name="P26"/>
      <text:p text:style-name="P25">Получаем:</text:p>
      <text:p text:style-name="Output"><text:s/>password | keyphrase </text:p>
      <text:p text:style-name="Output">----------+-----------</text:p>
      <text:p text:style-name="Output"><text:s/>f <text:s text:c="7"/>| f</text:p>
      <text:p text:style-name="Output">(1 row)</text:p>
      <text:p text:style-name="Output"/>
      <text:p text:style-name="Output"><text:s/>password | keyphrase </text:p>
      <text:p text:style-name="Output">----------+-----------</text:p>
      <text:p text:style-name="Output"><text:s/>t <text:s text:c="7"/>| t</text:p>
      <text:p text:style-name="Output">(1 row)</text:p>
      <text:p text:style-name="P26"/>
      <text:p text:style-name="P30">Здесь видно, что при попытке захешировать строку, отличную от строки в колонке, мы получаем разный хэш и соответственно несовпадение.</text:p>
      <text:h text:style-name="P31" text:outline-level="2"><text:bookmark-start text:name="__RefHeading___Toc1998_3870135317"/>Задание 2<text:bookmark-end text:name="__RefHeading___Toc1998_3870135317"/></text:h>
      <text:p text:style-name="P32">Создадим таблицу с колонкой, которую будем шифровать с помощью симметричного шифрования:</text:p>
      <text:p text:style-name="P23"><text:span text:style-name="T13">CREATE</text:span><text:span text:style-name="T14"> </text:span><text:span text:style-name="T13">TABLE</text:span><text:span text:style-name="T14"> byte_data (</text:span></text:p>
      <text:p text:style-name="P23"><text:span text:style-name="T14"><text:s text:c="4"/>title TEXT,</text:span><text:span text:style-name="T18"/></text:p>
      <text:p text:style-name="P23"><text:span text:style-name="T14"><text:s text:c="4"/>secret_data BYTEA</text:span><text:span text:style-name="T18"/></text:p>
      <text:p text:style-name="P29">);<text:span text:style-name="T18"/></text:p>
      <text:p text:style-name="P29"/>
      <text:p text:style-name="P23"><text:span text:style-name="T13">INSERT</text:span><text:span text:style-name="T14"> </text:span><text:span text:style-name="T13">INTO</text:span><text:span text:style-name="T14"> byte_data (title, secret_data) </text:span><text:span text:style-name="T13">VALUES</text:span></text:p>
      <text:p text:style-name="P23"><text:span text:style-name="T14">(</text:span><text:span text:style-name="T19">'Secret note'</text:span><text:span text:style-name="T14">, pgp_sym_encrypt(</text:span><text:span text:style-name="T19">'my secret data'</text:span><text:span text:style-name="T14">, </text:span><text:span text:style-name="T19">'key'</text:span><text:span text:style-name="T14">));</text:span></text:p>
      <text:p text:style-name="P32"/>
      <text:p text:style-name="P32">Теперь данные в таблиц<text:span text:style-name="T20">е</text:span> выглядят следующим образом:</text:p>
      <text:p text:style-name="Output"><text:s text:c="4"/>title <text:s text:c="3"/>| <text:s text:c="75"/>secret_data <text:s text:c="76"/></text:p>
      <text:p text:style-name="Output">-------------+--------------------------------------------------------------------------------------------------------------------------------------------------------------------</text:p>
      <text:p text:style-name="Output"><text:s/>Secret note | \xc30d040703024a9c2625faea5e8e6dd23f01a0ab761a8e2fdf337048dc4141cc84d3277a44c0bbf9f4e3634e1da61420c239062342702bf39f67f78e50102394eab2f1d354cc0b184c68614e2b450d03</text:p>
      <text:p text:style-name="Output">(1 row)</text:p>
      <text:p text:style-name="P32"/>
      <text:p text:style-name="P33">Для расшифровки используем функцию pgp_sym_decrypt. </text:p>
      <text:p text:style-name="P23"><text:span text:style-name="T13">SELECT</text:span><text:span text:style-name="T14"> title, pgp_sym_decrypt(secret_data, </text:span><text:span text:style-name="T19">'key'</text:span><text:span text:style-name="T14">) </text:span><text:span text:style-name="T13">as</text:span><text:span text:style-name="T14"> decrypted_data</text:span></text:p>
      <text:p text:style-name="P23"><text:span text:style-name="T13">FROM</text:span><text:span text:style-name="T14"> byte_data;</text:span></text:p>
      <text:p text:style-name="P29"/>
      <text:p text:style-name="P23"><text:span text:style-name="T13">SELECT</text:span><text:span text:style-name="T14"> title, pgp_sym_decrypt(secret_data, </text:span><text:span text:style-name="T19">'what'</text:span><text:span text:style-name="T14">) </text:span><text:span text:style-name="T13">as</text:span><text:span text:style-name="T14"> decrypted_data</text:span></text:p>
      <text:p text:style-name="P23"><text:span text:style-name="T13">FROM</text:span><text:span text:style-name="T14"> byte_data;</text:span></text:p>
      <text:p text:style-name="P33"/>
      <text:p text:style-name="P33">Результат:</text:p>
      <text:p text:style-name="Output"><text:s text:c="4"/>title <text:s text:c="3"/>| decrypted_data </text:p>
      <text:p text:style-name="Output">-------------+----------------</text:p>
      <text:p text:style-name="Output"><text:s/>Secret note | my secret data</text:p>
      <text:p text:style-name="Output">(1 row)</text:p>
      <text:p text:style-name="Output"/>
      <text:p text:style-name="Output">psql:lab5.sql:45: ERROR: <text:s/>Wrong key or corrupt data</text:p>
      <text:p text:style-name="P32"/>
      <text:p text:style-name="P33">Видно, что при указании правильного ключа расшифровка происходит успешно. В случае неправильного ключа возникает ошибка.</text:p>
      <text:h text:style-name="P34" text:outline-level="1"><text:bookmark-start text:name="__RefHeading___Toc143_2058273410 Copy 1"/>ЗАКЛЮЧЕНИЕ<text:bookmark-end text:name="__RefHeading___Toc143_2058273410 Copy 1"/></text:h>
      <text:p text:style-name="P35">В ходе выполнения лабораторной работы были изучены механизмы криптографической защиты данных в СУБД PostgreSQL с использованием расширения pgcrypto. На практике реализованы два основных подхода:</text:p>
      <text:list text:style-name="L1">
        <text:list-item>
          <text:p text:style-name="P36">Одностороннее хеширование паролей с применением алгоритмов SHA-1 и <text:span text:style-name="T21">MD5</text:span>, что обеспечивает безопасную аутентификацию без хранения паролей в открытом виде<text:span text:style-name="T21">;</text:span></text:p>
        </text:list-item>
        <text:list-item>
          <text:p text:style-name="P37">Симметричное шифрование данных в столбцах с типом <text:span text:style-name="T22">BYTEA</text:span>, позволяющее над<text:span text:style-name="T21">ё</text:span>жно хранить конфиденциальную информацию и восстанавливать её исходное значение при наличии ключа.</text:p>
        </text:list-item>
      </text:list>
      <text:p text:style-name="P38">Полученные навыки позволяют эффективно обеспечивать информационную безопасность на уровне базы данны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 fo:background-color="transparent"/>
      <style:text-properties style:font-name="Liberation Mono" fo:font-family="'Liberation Mono'" style:font-family-generic="modern" style:font-pitch="fixed" fo:font-size="10pt" fo:language="zxx" fo:country="none" officeooo:rsid="003aa9bd" style:font-size-asian="10pt" style:language-asian="zxx" style:country-asian="none" style:font-size-complex="10pt" style:language-complex="zxx" style:country-complex="none"/>
    </style:style>
    <style:style style:name="Output" style:family="paragraph" style:parent-style-name="Code">
      <style:text-properties fo:font-size="9pt" style:font-size-asian="9pt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4:10.970395995</meta:creation-date>
    <dc:date>2026-03-08T19:12:57.291986913</dc:date>
    <meta:editing-duration>P1DT2H7M28S</meta:editing-duration>
    <meta:editing-cycles>62</meta:editing-cycles>
    <meta:generator>LibreOffice/26.2.1.2$Linux_X86_64 LibreOffice_project/620$Build-2</meta:generator>
    <meta:document-statistic meta:table-count="0" meta:image-count="1" meta:object-count="0" meta:page-count="6" meta:paragraph-count="103" meta:word-count="555" meta:character-count="5036" meta:non-whitespace-character-count="4205"/>
  </office:meta>
</office:document-meta>
</file>