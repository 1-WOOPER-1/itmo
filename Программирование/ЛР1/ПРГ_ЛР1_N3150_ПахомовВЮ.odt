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2000003DFE84C0CF8.png" manifest:media-type="image/png"/>
  <manifest:file-entry manifest:full-path="Pictures/100000010000032000000084C687D848.png" manifest:media-type="image/png"/>
  <manifest:file-entry manifest:full-path="Pictures/1000000000000320000000588173045B.png" manifest:media-type="image/png"/>
  <manifest:file-entry manifest:full-path="Pictures/10000001000003200000005740FB8BCE.png" manifest:media-type="image/png"/>
  <manifest:file-entry manifest:full-path="Pictures/100000010000022100000100AD173D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Droid Sans Mono" svg:font-family="'Droid Sans Mono'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Жирный" style:font-family-generic="roman"/>
    <style:font-face style:name="Times New Roman4" svg:font-family="'Times New Roman'" style:font-adornments="Обычный" style:font-family-generic="roman"/>
  </office:font-face-decls>
  <office:automatic-styles>
    <style:style style:name="P1" style:family="paragraph" style:parent-style-name="Normal_20__28_Web_29_">
      <style:paragraph-properties fo:margin-top="0cm" fo:margin-bottom="0.494cm" style:contextual-spacing="false" fo:text-align="center" style:justify-single-word="false"/>
    </style:style>
    <style:style style:name="P2" style:family="paragraph" style:parent-style-name="Normal_20__28_Web_29_">
      <style:paragraph-properties fo:margin-top="0.494cm" fo:margin-bottom="0.494cm" style:contextual-spacing="false" fo:text-align="center" style:justify-single-word="false"/>
    </style:style>
    <style:style style:name="P3" style:family="paragraph" style:parent-style-name="Normal_20__28_Web_29_">
      <style:paragraph-properties fo:margin-left="3.747cm" fo:margin-top="0.494cm" fo:margin-bottom="0.494cm" style:contextual-spacing="false" fo:text-indent="2.498cm" style:auto-text-indent="false"/>
      <style:text-properties fo:background-color="transparent"/>
    </style:style>
    <style:style style:name="P4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rsid="00111975" officeooo:paragraph-rsid="00111975"/>
    </style:style>
    <style:style style:name="P5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style:font-size-asian="13.5pt" style:font-size-complex="13.5pt"/>
    </style:style>
    <style:style style:name="P6" style:family="paragraph" style:parent-style-name="Normal_20__28_Web_29_">
      <style:paragraph-properties fo:margin-top="0.494cm" fo:margin-bottom="0.494cm" style:contextual-spacing="false"/>
      <style:text-properties fo:color="#000000" loext:opacity="100%" fo:font-size="13.5pt" style:font-size-asian="13.5pt" style:font-size-complex="13.5pt"/>
    </style:style>
    <style:style style:name="P7" style:family="paragraph" style:parent-style-name="Normal_20__28_Web_29_">
      <style:paragraph-properties fo:margin-top="0.494cm" fo:margin-bottom="0.494cm" style:contextual-spacing="false" fo:text-align="end" style:justify-single-word="false"/>
    </style:style>
    <style:style style:name="P8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font-size="14pt" officeooo:rsid="00024d6c" officeooo:paragraph-rsid="00024d6c" fo:background-color="transparent" style:font-size-asian="14pt"/>
    </style:style>
    <style:style style:name="P9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font-size="14pt" style:font-size-asian="14pt"/>
    </style:style>
    <style:style style:name="P10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style:font-size-asian="14pt" style:font-size-complex="13.5pt"/>
    </style:style>
    <style:style style:name="P1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paragraph-rsid="00024d6c"/>
    </style:style>
    <style:style style:name="P12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font-weight="bold" officeooo:rsid="0004f2fb" officeooo:paragraph-rsid="0004f2fb" style:font-weight-asian="bold" style:font-weight-complex="bold"/>
    </style:style>
    <style:style style:name="P14" style:family="paragraph" style:parent-style-name="Normal_20__28_Web_29_" style:list-style-name="" style:master-page-name="">
      <style:paragraph-properties fo:margin-top="0.494cm" fo:margin-bottom="0.494cm" style:contextual-spacing="false" fo:text-align="center" style:justify-single-word="false" style:page-number="auto" fo:break-before="page"/>
      <style:text-properties fo:color="#000000" loext:opacity="100%" fo:font-size="14pt" fo:font-weight="bold" officeooo:rsid="0004f2fb" officeooo:paragraph-rsid="0004f2fb" style:font-size-asian="14pt" style:font-weight-asian="bold" style:font-size-complex="13.5pt" style:font-weight-complex="bold"/>
    </style:style>
    <style:style style:name="P15" style:family="paragraph" style:parent-style-name="Normal_20__28_Web_29_">
      <style:paragraph-properties fo:margin-top="0.494cm" fo:margin-bottom="0.494cm" style:contextual-spacing="false" fo:text-align="justify" style:justify-single-word="false"/>
      <style:text-properties fo:color="#000000" loext:opacity="100%" fo:font-size="14pt" officeooo:rsid="0004f2fb" officeooo:paragraph-rsid="0006222e" style:font-size-asian="14pt" style:font-size-complex="13.5pt"/>
    </style:style>
    <style:style style:name="P16" style:family="paragraph" style:parent-style-name="Normal_20__28_Web_29_">
      <style:paragraph-properties fo:margin-top="0.494cm" fo:margin-bottom="0.494cm" style:contextual-spacing="false" fo:text-align="justify" style:justify-single-word="false"/>
      <style:text-properties officeooo:rsid="0004f2fb" officeooo:paragraph-rsid="0006222e"/>
    </style:style>
    <style:style style:name="P17" style:family="paragraph" style:parent-style-name="Normal_20__28_Web_29_" style:list-style-name="">
      <style:paragraph-properties fo:margin-top="0.494cm" fo:margin-bottom="0.494cm" style:contextual-spacing="false" fo:text-align="center" style:justify-single-word="false"/>
      <style:text-properties fo:color="#000000" loext:opacity="100%" fo:font-size="14pt" fo:font-weight="bold" officeooo:rsid="0006222e" officeooo:paragraph-rsid="0006222e" style:font-size-asian="14pt" style:font-weight-asian="bold" style:font-size-complex="13.5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color="#3b3b3b" loext:opacity="100%" style:font-name="Consolas" fo:font-size="10pt" fo:font-weight="normal" fo:background-color="#ffffff" style:font-size-asian="10pt" style:font-size-complex="10pt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Consolas" fo:font-size="10pt" style:font-size-asian="10pt" style:font-size-complex="10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3b3b3b" loext:opacity="100%" style:font-name="Consolas" fo:font-size="10pt" fo:font-weight="normal" fo:background-color="#ffffff" style:font-size-asian="10pt" style:font-size-complex="10pt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Droid Sans Mono" fo:font-size="10pt" style:font-size-asian="10pt" style:font-size-complex="10pt"/>
    </style:style>
    <style:style style:name="P22" style:family="paragraph" style:parent-style-name="Preformatted_20_Text" style:list-style-name="">
      <style:paragraph-properties fo:text-align="center" style:justify-single-word="false" fo:break-before="page"/>
      <style:text-properties style:font-name="Times New Roman" fo:font-size="14pt" officeooo:paragraph-rsid="000708d3" style:font-size-asian="14pt" style:font-size-complex="14pt"/>
    </style:style>
    <style:style style:name="P23" style:family="paragraph" style:parent-style-name="Preformatted_20_Text">
      <style:paragraph-properties fo:text-align="justify" style:justify-single-word="false"/>
      <style:text-properties style:font-name="Times New Roman" fo:font-size="14pt" fo:font-weight="normal" officeooo:rsid="000708d3" officeooo:paragraph-rsid="000708d3" style:font-size-asian="14pt" style:font-weight-asian="normal" style:font-size-complex="14pt" style:font-weight-complex="normal"/>
    </style:style>
    <style:style style:name="P24" style:family="paragraph" style:parent-style-name="Preformatted_20_Text">
      <style:paragraph-properties fo:text-align="justify" style:justify-single-word="false"/>
      <style:text-properties fo:color="#000000" loext:opacity="100%" style:font-name="Times New Roman" fo:font-size="14pt" fo:font-weight="normal" officeooo:rsid="000708d3" officeooo:paragraph-rsid="000708d3" style:font-size-asian="14pt" style:font-weight-asian="normal" style:font-size-complex="14pt" style:font-weight-complex="normal"/>
    </style:style>
    <style:style style:name="P25" style:family="paragraph" style:parent-style-name="Preformatted_20_Text" style:list-style-name="">
      <style:paragraph-properties fo:text-align="center" style:justify-single-word="false" fo:break-before="page"/>
      <style:text-properties style:font-name="Times New Roman" fo:font-size="14pt" fo:font-weight="bold" officeooo:rsid="000a70d9" officeooo:paragraph-rsid="000a70d9" style:font-size-asian="14pt" style:font-weight-asian="bold" style:font-size-complex="14pt" style:font-weight-complex="bold"/>
    </style:style>
    <style:style style:name="P26" style:family="paragraph" style:parent-style-name="Preformatted_20_Text" style:list-style-name="">
      <style:paragraph-properties fo:text-align="start" style:justify-single-word="false"/>
      <style:text-properties style:font-name="Times New Roman" fo:font-size="14pt" fo:font-weight="normal" officeooo:rsid="000a70d9" officeooo:paragraph-rsid="000a70d9" style:font-size-asian="14pt" style:font-weight-asian="normal" style:font-size-complex="14pt" style:font-weight-complex="normal"/>
    </style:style>
    <style:style style:name="P27" style:family="paragraph" style:parent-style-name="Preformatted_20_Text" style:list-style-name="">
      <style:paragraph-properties fo:text-align="center" style:justify-single-word="false" fo:break-before="page"/>
      <style:text-properties fo:color="#000000" loext:opacity="100%" style:font-name="Times New Roman" fo:font-size="14pt" fo:font-weight="bold" officeooo:rsid="000a70d9" officeooo:paragraph-rsid="000a70d9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cm" fo:margin-bottom="0cm" style:contextual-spacing="false" style:line-height-at-least="0cm" fo:text-align="justify" style:justify-single-word="false"/>
      <style:text-properties fo:color="#3b3b3b" loext:opacity="100%" style:font-name="Consolas" fo:font-size="8.5pt" fo:font-weight="normal" officeooo:rsid="000a70d9" officeooo:paragraph-rsid="000a70d9" fo:background-color="#ffffff" style:font-size-asian="8.5pt" style:font-weight-asian="normal" style:font-size-complex="8.5pt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style:line-height-at-least="0cm" fo:text-indent="0cm" style:auto-text-indent="false"/>
      <style:text-properties fo:color="#3b3b3b" loext:opacity="100%" style:font-name="Consolas" fo:font-size="8.5pt" fo:font-weight="normal" fo:background-color="#ffffff" style:font-size-asian="8.5pt" style:font-size-complex="8.5pt"/>
    </style:style>
    <style:style style:name="P30" style:family="paragraph" style:parent-style-name="Standard">
      <style:paragraph-properties fo:margin-top="0cm" fo:margin-bottom="0cm" style:contextual-spacing="false" style:line-height-at-least="0cm"/>
      <style:text-properties style:font-name="Consolas" fo:font-size="8.5pt" style:font-size-asian="8.5pt" style:font-size-complex="8.5pt"/>
    </style:style>
    <style:style style:name="P31" style:family="paragraph" style:parent-style-name="Standard">
      <style:paragraph-properties fo:margin-left="0cm" fo:margin-right="0cm" fo:margin-top="0cm" fo:margin-bottom="0cm" style:contextual-spacing="false" style:line-height-at-least="0cm" fo:text-indent="0cm" style:auto-text-indent="false"/>
      <style:text-properties fo:color="#008000" loext:opacity="100%" style:font-name="Consolas" fo:font-size="8.5pt" fo:font-weight="normal" fo:background-color="#ffffff" style:font-size-asian="8.5pt" style:font-size-complex="8.5pt"/>
    </style:style>
    <style:style style:name="P32" style:family="paragraph" style:parent-style-name="Standard">
      <style:paragraph-properties fo:margin-left="0cm" fo:margin-right="0cm" fo:margin-top="0cm" fo:margin-bottom="0cm" style:contextual-spacing="false" style:line-height-at-least="0cm" fo:text-indent="0cm" style:auto-text-indent="false"/>
      <style:text-properties style:font-name="Consolas" fo:font-size="8.5pt" style:font-size-asian="8.5pt" style:font-size-complex="8.5pt"/>
    </style:style>
    <style:style style:name="T1" style:family="text">
      <style:text-properties fo:color="#000000" loext:opacity="100%" fo:font-size="10pt" style:font-size-asian="10pt" style:font-size-complex="13.5pt"/>
    </style:style>
    <style:style style:name="T2" style:family="text">
      <style:text-properties fo:color="#000000" loext:opacity="100%" fo:font-size="16pt" fo:font-weight="bold" style:font-size-asian="16pt" style:font-weight-asian="bold" style:font-size-complex="14pt"/>
    </style:style>
    <style:style style:name="T3" style:family="text">
      <style:text-properties fo:color="#000000" loext:opacity="100%" fo:font-size="14pt" fo:font-weight="bold" style:font-size-asian="14pt" style:font-weight-asian="bold" style:font-size-complex="13.5pt"/>
    </style:style>
    <style:style style:name="T4" style:family="text">
      <style:text-properties fo:color="#000000" loext:opacity="100%" fo:font-size="14pt" style:font-size-asian="14pt" style:font-size-complex="13.5pt"/>
    </style:style>
    <style:style style:name="T5" style:family="text">
      <style:text-properties fo:color="#000000" loext:opacity="100%" fo:font-size="14pt" officeooo:rsid="00024d6c" style:font-size-asian="14pt" style:font-size-complex="13.5pt"/>
    </style:style>
    <style:style style:name="T6" style:family="text">
      <style:text-properties fo:color="#000000" loext:opacity="100%" fo:font-size="13.5pt" fo:font-weight="bold" style:font-size-asian="13.5pt" style:font-weight-asian="bold" style:font-size-complex="13.5pt"/>
    </style:style>
    <style:style style:name="T7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loext:opacity="100%" fo:font-size="13.5pt" style:font-size-asian="13.5pt" style:font-size-complex="13.5pt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style:font-size-asian="14pt"/>
    </style:style>
    <style:style style:name="T11" style:family="text">
      <style:text-properties fo:font-size="14pt" fo:background-color="transparent" loext:char-shading-value="0" style:font-size-asian="14pt"/>
    </style:style>
    <style:style style:name="T12" style:family="text">
      <style:text-properties fo:font-size="14pt" fo:language="en" fo:country="US" officeooo:rsid="00024d6c" fo:background-color="transparent" loext:char-shading-value="0" style:font-size-asian="14pt"/>
    </style:style>
    <style:style style:name="T13" style:family="text">
      <style:text-properties fo:font-size="14pt" officeooo:rsid="00024d6c" style:font-size-asian="14pt"/>
    </style:style>
    <style:style style:name="T14" style:family="text">
      <style:text-properties fo:color="#000000" loext:opacity="100%" fo:font-size="14pt" officeooo:rsid="0006222e" style:font-size-asian="14pt" style:font-size-complex="13.5pt"/>
    </style:style>
    <style:style style:name="T15" style:family="text">
      <style:text-properties fo:color="#000000" loext:opacity="100%" fo:font-size="14pt" officeooo:rsid="00119323" style:font-size-asian="14pt" style:font-size-complex="13.5pt"/>
    </style:style>
    <style:style style:name="T16" style:family="text">
      <style:text-properties fo:color="#795e26" loext:opacity="100%" officeooo:rsid="0006222e" style:font-weight-asian="bold" style:font-weight-complex="bold"/>
    </style:style>
    <style:style style:name="T17" style:family="text">
      <style:text-properties officeooo:rsid="0006222e" style:font-weight-asian="bold" style:font-weight-complex="bold"/>
    </style:style>
    <style:style style:name="T18" style:family="text">
      <style:text-properties fo:color="#001080" loext:opacity="100%"/>
    </style:style>
    <style:style style:name="T19" style:family="text">
      <style:text-properties fo:color="#795e26" loext:opacity="100%"/>
    </style:style>
    <style:style style:name="T20" style:family="text">
      <style:text-properties fo:color="#a31515" loext:opacity="100%"/>
    </style:style>
    <style:style style:name="T21" style:family="text">
      <style:text-properties fo:color="#000000" loext:opacity="100%" fo:font-weight="bold" officeooo:rsid="0006222e" style:font-weight-asian="bold" style:font-weight-complex="bold"/>
    </style:style>
    <style:style style:name="T22" style:family="text">
      <style:text-properties fo:color="#000000" loext:opacity="100%" fo:font-weight="bold" officeooo:rsid="000708d3" style:font-weight-asian="bold" style:font-weight-complex="bold"/>
    </style:style>
    <style:style style:name="T23" style:family="text">
      <style:text-properties fo:color="#000000" loext:opacity="100%"/>
    </style:style>
    <style:style style:name="T24" style:family="text">
      <style:text-properties fo:color="#000000" loext:opacity="100%" officeooo:rsid="0006222e"/>
    </style:style>
    <style:style style:name="T25" style:family="text">
      <style:text-properties fo:color="#000000" loext:opacity="100%" officeooo:rsid="0007e150"/>
    </style:style>
    <style:style style:name="T26" style:family="text">
      <style:text-properties fo:color="#af00db" loext:opacity="100%"/>
    </style:style>
    <style:style style:name="T27" style:family="text">
      <style:text-properties fo:color="#0000ff" loext:opacity="100%"/>
    </style:style>
    <style:style style:name="T28" style:family="text">
      <style:text-properties fo:color="#267f99" loext:opacity="100%"/>
    </style:style>
    <style:style style:name="T29" style:family="text">
      <style:text-properties fo:color="#098658" loext:opacity="100%"/>
    </style:style>
    <style:style style:name="T30" style:family="text">
      <style:text-properties fo:color="#ee0000" loext:opacity="100%"/>
    </style:style>
    <style:style style:name="T31" style:family="text">
      <style:text-properties fo:color="#0000ff" loext:opacity="100%" fo:font-weight="normal" fo:background-color="#ffffff" loext:char-shading-value="0"/>
    </style:style>
    <style:style style:name="T32" style:family="text">
      <style:text-properties fo:color="#3b3b3b" loext:opacity="100%" fo:font-weight="normal" fo:background-color="#ffffff" loext:char-shading-value="0"/>
    </style:style>
    <style:style style:name="T33" style:family="text">
      <style:text-properties fo:color="#000000" loext:opacity="100%" fo:font-weight="normal" fo:background-color="#ffffff" loext:char-shading-value="0"/>
    </style:style>
    <style:style style:name="T34" style:family="text">
      <style:text-properties fo:color="#001080" loext:opacity="100%" fo:font-weight="normal" fo:background-color="#ffffff" loext:char-shading-value="0"/>
    </style:style>
    <style:style style:name="T35" style:family="text">
      <style:text-properties fo:color="#00800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.138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ГОСУДАРСТВЕННОЕ АВТОНОМНОЕ ОБРАЗОВАТЕЛЬНОЕ УЧРЕЖДЕНИЕ ВЫСШЕГО ОБРАЗОВАНИЯ</text:span></text:p>
      <text:p text:style-name="P2" loext:marker-style-name="T2"><text:span text:style-name="T2">«Национальный исследовательский университет ИТМО»</text:span></text:p>
      <text:p text:style-name="P2" loext:marker-style-name="T3"><text:span text:style-name="T3">Факультет безопасности информационных технологий</text:span></text:p>
      <text:p text:style-name="P2" loext:marker-style-name="T3"><text:span text:style-name="T3">Дисциплина: <text:tab/></text:span></text:p>
      <text:p text:style-name="P3"><text:span text:style-name="T4">«</text:span><text:span text:style-name="T5">Программирование</text:span><text:span text:style-name="T4">»</text:span></text:p>
      <text:p text:style-name="P2" loext:marker-style-name="T3"><text:span text:style-name="T3">ОТЧЕТ ПО ЛАБОРАТОРНОЙ РАБОТЕ </text:span><text:span text:style-name="T6">№1</text:span></text:p>
      <text:p text:style-name="P4" loext:marker-style-name="T7"><text:span text:style-name="T7">Поразрядные и логические операции.</text:span></text:p>
      <text:p text:style-name="P5" loext:marker-style-name="T8"/>
      <text:p text:style-name="P5" loext:marker-style-name="T8"/>
      <text:p text:style-name="P5" loext:marker-style-name="T8"/>
      <text:p text:style-name="P6" loext:marker-style-name="T8"/>
      <text:p text:style-name="P7" loext:marker-style-name="T9"><text:span text:style-name="T9">Выполнил:</text:span></text:p>
      <text:p text:style-name="P7" loext:marker-style-name="T10"><text:span text:style-name="T10">Студент группы </text:span><text:span text:style-name="T11">N31</text:span><text:bookmark text:name="_GoBack"/><text:span text:style-name="T12">50</text:span></text:p>
      <text:p text:style-name="P8">Пахомов Владимир Юрьевич</text:p>
      <text:p text:style-name="P9" loext:marker-style-name="T10"><draw:frame draw:style-name="fr1" draw:name="Изображение1" text:anchor-type="char" svg:x="13.21cm" svg:y="-0.023cm" svg:width="3.344cm" svg:height="1.572cm" draw:z-index="0"><draw:image xlink:href="Pictures/100000010000022100000100AD173DF0.png" xlink:type="simple" xlink:show="embed" xlink:actuate="onLoad" draw:mime-type="image/png"/></draw:frame></text:p>
      <text:p text:style-name="P7" loext:marker-style-name="T9"><text:span text:style-name="T9"/></text:p>
      <text:p text:style-name="P7" loext:marker-style-name="T9"><text:span text:style-name="T9"/></text:p>
      <text:p text:style-name="P7" loext:marker-style-name="T9"><text:span text:style-name="T9">Проверил:</text:span></text:p>
      <text:p text:style-name="P7" loext:marker-style-name="T10"><text:span text:style-name="T13">Гирик</text:span><text:span text:style-name="T10"> </text:span><text:span text:style-name="T13">А</text:span><text:span text:style-name="T10">.</text:span><text:span text:style-name="T13">В</text:span><text:span text:style-name="T10">.</text:span></text:p>
      <text:p text:style-name="P10"/>
      <text:p text:style-name="P10" loext:marker-style-name="T4"/>
      <text:p text:style-name="P10" loext:marker-style-name="T4"/>
      <text:p text:style-name="P2" loext:marker-style-name="T4"><text:span text:style-name="T4">Санкт-Петербург</text:span></text:p>
      <text:p text:style-name="P11"><text:span text:style-name="T4">2024г</text:span><text:bookmark text:name="_1_Введение"/><text:span text:style-name="T4">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 text:protected="true">
            <text:p text:style-name="Contents_20_Heading"><text:soft-page-break/>Оглавление</text:p>
          </text:index-title>
          <text:p text:style-name="P12"><text:a xlink:type="simple" xlink:href="#__RefHeading___Toc35_4078790415" text:style-name="Index_20_Link" text:visited-style-name="Index_20_Link">Задание. Вариант 5-9<text:tab/>3</text:a></text:p>
          <text:p text:style-name="P12"><text:a xlink:type="simple" xlink:href="#__RefHeading___Toc46_4078790415" text:style-name="Index_20_Link" text:visited-style-name="Index_20_Link">Make-файл<text:tab/>3</text:a></text:p>
          <text:p text:style-name="P12"><text:a xlink:type="simple" xlink:href="#__RefHeading___Toc48_4078790415" text:style-name="Index_20_Link" text:visited-style-name="Index_20_Link">Примеры работы программы на различных исходных данных<text:tab/>4</text:a></text:p>
          <text:p text:style-name="P12"><text:a xlink:type="simple" xlink:href="#__RefHeading___Toc50_4078790415" text:style-name="Index_20_Link" text:visited-style-name="Index_20_Link">Блок-схема алгоритма преобразования<text:tab/>5</text:a></text:p>
          <text:p text:style-name="P12"><text:a xlink:type="simple" xlink:href="#__RefHeading___Toc52_4078790415" text:style-name="Index_20_Link" text:visited-style-name="Index_20_Link">Исходный текст программы с комментариями<text:tab/>6</text:a></text:p>
        </text:index-body>
      </text:table-of-content>
      <text:p text:style-name="P13"><text:span text:style-name="T4"/></text:p>
      <text:h text:style-name="P14" text:outline-level="1"><text:bookmark-start text:name="__RefHeading___Toc35_4078790415"/>Задание. Вариант 5-9<text:bookmark-end text:name="__RefHeading___Toc35_4078790415"/></text:h>
      <text:p text:style-name="P15">Тип числа: uint16_t</text:p>
      <text:p text:style-name="P16"><text:span text:style-name="T14">Задание: </text:span><text:span text:style-name="T4">Назовем сверткой байта порядка N операцию циклического сдвига старшей тетрады на N битов вправо, а младшей тетрады на N битов влево. Выполнить свертку всех байтов на случайное число из диапазона 0..3.</text:span></text:p>
      <text:p text:style-name="P16"><text:span text:style-name="T14">Пример преобразования: </text:span><text:span text:style-name="T4">0xDEADBEEF </text:span><text:span text:style-name="T15">=</text:span><text:span text:style-name="T14">&gt;</text:span><text:span text:style-name="T4"> 0x7BA7EBBF (N = 2)</text:span></text:p>
      <text:h text:style-name="P17" text:outline-level="1"><text:bookmark-start text:name="__RefHeading___Toc46_4078790415"/>Make-файл<text:bookmark-end text:name="__RefHeading___Toc46_4078790415"/></text:h>
      <text:p text:style-name="P18"><text:span text:style-name="T16">.PHONY</text:span><text:span text:style-name="T17">: all clean debug</text:span></text:p>
      <text:p text:style-name="P19"/>
      <text:p text:style-name="P20"><text:span text:style-name="T18">APP</text:span>=prg1vypN3150</text:p>
      <text:p text:style-name="P20"><text:span text:style-name="T18">CFLAGS</text:span>=-Wall -Wextra -Werror</text:p>
      <text:p text:style-name="P19"/>
      <text:p text:style-name="P20"><text:span text:style-name="T19">all</text:span>: <text:span text:style-name="T20">$(</text:span><text:span text:style-name="T18">APP</text:span><text:span text:style-name="T20">)</text:span></text:p>
      <text:p text:style-name="P19"/>
      <text:p text:style-name="P20"><text:span text:style-name="T20">$(</text:span><text:span text:style-name="T18">APP</text:span><text:span text:style-name="T20">)</text:span>: <text:span text:style-name="T20">$(</text:span><text:span text:style-name="T18">APP</text:span><text:span text:style-name="T20">)</text:span>.c</text:p>
      <text:p text:style-name="P20"><text:tab/>gcc -o <text:span text:style-name="T20">$(</text:span><text:span text:style-name="T18">APP</text:span><text:span text:style-name="T20">)</text:span> <text:span text:style-name="T20">$(</text:span><text:span text:style-name="T18">CFLAGS</text:span><text:span text:style-name="T20">)</text:span> <text:span text:style-name="T20">$(</text:span><text:span text:style-name="T18">APP</text:span><text:span text:style-name="T20">)</text:span>.c</text:p>
      <text:p text:style-name="P19"/>
      <text:p text:style-name="P20"><text:span text:style-name="T19">debug</text:span>: <text:span text:style-name="T20">$(</text:span><text:span text:style-name="T18">APP</text:span><text:span text:style-name="T20">)</text:span>.c</text:p>
      <text:p text:style-name="P20"><text:tab/>gcc -o <text:span text:style-name="T20">$(</text:span><text:span text:style-name="T18">APP</text:span><text:span text:style-name="T20">)</text:span> <text:span text:style-name="T20">$(</text:span><text:span text:style-name="T18">CFLAGS</text:span><text:span text:style-name="T20">)</text:span> -g <text:span text:style-name="T20">$(</text:span><text:span text:style-name="T18">APP</text:span><text:span text:style-name="T20">)</text:span>.c</text:p>
      <text:p text:style-name="P19"/>
      <text:p text:style-name="P20"><text:span text:style-name="T19">clean</text:span>:</text:p>
      <text:p text:style-name="P20"><text:tab/>rm <text:span text:style-name="T20">$(</text:span><text:span text:style-name="T18">APP</text:span><text:span text:style-name="T20">)</text:span></text:p>
      <text:p text:style-name="P21"><text:span text:style-name="T21"/></text:p>
      <text:h text:style-name="P22" text:outline-level="1"><text:bookmark-start text:name="__RefHeading___Toc48_4078790415"/><text:span text:style-name="T21">П</text:span><text:span text:style-name="T22">римеры работы программы на различных исходных данных</text:span><text:bookmark-end text:name="__RefHeading___Toc48_4078790415"/></text:h>
      <text:p text:style-name="P23"><text:span text:style-name="T23">При пустых данных программа генерирует случайное число и уже над ним </text:span><draw:frame draw:style-name="fr2" draw:name="Изображение2" text:anchor-type="char" svg:x="0.09cm" svg:y="1.446cm" svg:width="16.332cm" svg:height="1.776cm" draw:z-index="1"><draw:image xlink:href="Pictures/10000001000003200000005740FB8BCE.png" xlink:type="simple" xlink:show="embed" xlink:actuate="onLoad" draw:mime-type="image/png"/></draw:frame><text:span text:style-name="T23">производит преобразование:</text:span></text:p>
      <text:p text:style-name="P24">При передаче определённого числа, программа производит преобразования уже непосредственно над этим числом:</text:p>
      <text:p text:style-name="P23"><draw:frame draw:style-name="fr3" draw:name="Изображение3" text:anchor-type="char" svg:x="0.141cm" svg:y="0.048cm" svg:width="16.327cm" svg:height="1.67cm" draw:z-index="2"><draw:image xlink:href="Pictures/1000000000000320000000588173045B.png" xlink:type="simple" xlink:show="embed" xlink:actuate="onLoad" draw:mime-type="image/png"/></draw:frame><text:span text:style-name="T24">П</text:span><text:span text:style-name="T23">ри передаче лишних аргументов, аргумента, не являющегося числом и</text:span><text:span text:style-name="T25">ли</text:span><text:span text:style-name="T23"> числа, которое не является целым, программа обрабатывает ошибку и выв</text:span><draw:frame draw:style-name="fr1" draw:name="Изображение4" text:anchor-type="char" svg:x="0.035cm" svg:y="4.008cm" svg:width="16.501cm" svg:height="2.722cm" draw:z-index="3"><draw:image xlink:href="Pictures/100000010000032000000084C687D848.png" xlink:type="simple" xlink:show="embed" xlink:actuate="onLoad" draw:mime-type="image/png"/></draw:frame><text:span text:style-name="T23">одит текст об ошибке:</text:span><draw:frame draw:style-name="fr1" draw:name="Изображение4 Копия 1" text:anchor-type="char" svg:x="-0.014cm" svg:y="4.043cm" svg:width="16.501cm" svg:height="2.722cm" draw:z-index="5"><draw:image xlink:href="Pictures/100000010000032000000084C687D848.png" xlink:type="simple" xlink:show="embed" xlink:actuate="onLoad" draw:mime-type="image/png"/></draw:frame></text:p>
      <text:h text:style-name="P25" text:outline-level="1"><text:bookmark-start text:name="__RefHeading___Toc50_4078790415"/><text:span text:style-name="T24">Б</text:span><text:span text:style-name="T23">лок-схема алгоритма преобразования</text:span><text:bookmark-end text:name="__RefHeading___Toc50_4078790415"/></text:h>
      <text:h text:style-name="P26" text:outline-level="1"><draw:frame draw:style-name="fr2" draw:name="Изображение5" text:anchor-type="char" svg:x="0.004cm" svg:y="0.376cm" svg:width="16.439cm" svg:height="18.812cm" draw:z-index="4"><draw:image xlink:href="Pictures/1000000100000362000003DFE84C0CF8.png" xlink:type="simple" xlink:show="embed" xlink:actuate="onLoad" draw:mime-type="image/png"/></draw:frame><text:span text:style-name="T23"/></text:h>
      <text:h text:style-name="P27" text:outline-level="1"><text:bookmark-start text:name="__RefHeading___Toc52_4078790415"/>Исходный текст программы с комментариями<text:bookmark-end text:name="__RefHeading___Toc52_4078790415"/></text:h>
      <text:p text:style-name="P28"><text:span text:style-name="T26">#include</text:span><text:span text:style-name="T27"> </text:span><text:span text:style-name="T20">&lt;stdlib.h&gt;</text:span></text:p>
      <text:p text:style-name="P29"><text:span text:style-name="T26">#include</text:span><text:span text:style-name="T27"> </text:span><text:span text:style-name="T20">&lt;stdio.h&gt;</text:span></text:p>
      <text:p text:style-name="P30"/>
      <text:p text:style-name="P29"><text:span text:style-name="T26">#include</text:span><text:span text:style-name="T27"> </text:span><text:span text:style-name="T20">&lt;stdint.h&gt;</text:span></text:p>
      <text:p text:style-name="P29"><text:span text:style-name="T26">#include</text:span><text:span text:style-name="T27"> </text:span><text:span text:style-name="T20">&lt;inttypes.h&gt;</text:span></text:p>
      <text:p text:style-name="P29"><text:span text:style-name="T26">#include</text:span><text:span text:style-name="T27"> </text:span><text:span text:style-name="T20">&lt;time.h&gt;</text:span></text:p>
      <text:p text:style-name="P29"><text:span text:style-name="T26">#include</text:span><text:span text:style-name="T27"> </text:span><text:span text:style-name="T20">&lt;unistd.h&gt;</text:span></text:p>
      <text:p text:style-name="P30"/>
      <text:p text:style-name="P29"><text:span text:style-name="T27">void</text:span> <text:span text:style-name="T19">print_bin</text:span>(<text:span text:style-name="T28">uint16_t</text:span> <text:span text:style-name="T18">number</text:span>);</text:p>
      <text:p text:style-name="P29"><text:span text:style-name="T28">uint16_t</text:span> <text:span text:style-name="T19">circular_shift</text:span>(<text:span text:style-name="T28">uint16_t</text:span> <text:span text:style-name="T18">number</text:span>, <text:span text:style-name="T27">int</text:span> <text:span text:style-name="T18">N</text:span>);</text:p>
      <text:p text:style-name="P30"/>
      <text:p text:style-name="P31">// Вывод двоичного числа с пробелами</text:p>
      <text:p text:style-name="P29"><text:span text:style-name="T27">void</text:span> <text:span text:style-name="T19">print_bin</text:span>(<text:span text:style-name="T28">uint16_t</text:span> <text:span text:style-name="T18">number</text:span>) {</text:p>
      <text:p text:style-name="P29"><text:span text:style-name="T26"><text:tab/>for</text:span> (<text:span text:style-name="T27">int</text:span> <text:span text:style-name="T18">i</text:span> <text:span text:style-name="T23">=</text:span> <text:span text:style-name="T27">sizeof</text:span>(<text:span text:style-name="T18">number</text:span>) <text:span text:style-name="T23">*</text:span> <text:span text:style-name="T29">8</text:span> <text:span text:style-name="T23">-</text:span> <text:span text:style-name="T29">1</text:span>; <text:span text:style-name="T18">i</text:span> <text:span text:style-name="T23">&gt;=</text:span> <text:span text:style-name="T29">0</text:span>; <text:span text:style-name="T18">i</text:span><text:span text:style-name="T23">--</text:span>) {</text:p>
      <text:p text:style-name="P29"><text:span text:style-name="T27"><text:tab/><text:tab/>int</text:span> <text:span text:style-name="T18">bit</text:span> <text:span text:style-name="T23">=</text:span> (<text:span text:style-name="T18">number</text:span> <text:span text:style-name="T23">&gt;&gt;</text:span> <text:span text:style-name="T18">i</text:span>) <text:span text:style-name="T23">&amp;</text:span> <text:span text:style-name="T29">1</text:span>;</text:p>
      <text:p text:style-name="P29"><text:span text:style-name="T19"><text:tab/><text:tab/>printf</text:span>(<text:span text:style-name="T20">"</text:span><text:span text:style-name="T18">%d</text:span><text:span text:style-name="T20">"</text:span>, <text:span text:style-name="T18">bit</text:span>);</text:p>
      <text:p text:style-name="P29"><text:span text:style-name="T26"><text:tab/><text:tab/>if</text:span> (<text:span text:style-name="T18">i</text:span> <text:span text:style-name="T23">%</text:span> <text:span text:style-name="T29">8</text:span> <text:span text:style-name="T23">==</text:span> <text:span text:style-name="T29">0</text:span> <text:span text:style-name="T23">&amp;&amp;</text:span> <text:span text:style-name="T18">i</text:span> <text:span text:style-name="T23">!=</text:span> <text:span text:style-name="T29">0</text:span>) {</text:p>
      <text:p text:style-name="P29"><text:span text:style-name="T19"><text:tab/><text:tab/><text:tab/>printf</text:span>(<text:span text:style-name="T20">" "</text:span>);</text:p>
      <text:p text:style-name="P29"><text:tab/><text:tab/>}</text:p>
      <text:p text:style-name="P29"><text:tab/>}</text:p>
      <text:p text:style-name="P29"><text:span text:style-name="T19"><text:tab/>printf</text:span>(<text:span text:style-name="T20">"</text:span><text:span text:style-name="T30">\n</text:span><text:span text:style-name="T20">"</text:span>);</text:p>
      <text:p text:style-name="P29">}</text:p>
      <text:p text:style-name="P30"/>
      <text:p text:style-name="P31">// Циклический сдвиг со свёрткой байтов</text:p>
      <text:p text:style-name="P29"><text:span text:style-name="T28">uint16_t</text:span> <text:span text:style-name="T19">circular_shift</text:span>(<text:span text:style-name="T28">uint16_t</text:span> <text:span text:style-name="T18">number</text:span>, <text:span text:style-name="T27">int</text:span> <text:span text:style-name="T18">N</text:span>) {</text:p>
      <text:p text:style-name="P29"><text:span text:style-name="T28"><text:tab/>uint16_t</text:span> <text:span text:style-name="T18">result</text:span> <text:span text:style-name="T23">=</text:span> <text:span text:style-name="T29">0</text:span>;</text:p>
      <text:p text:style-name="P29"><text:span text:style-name="T26"><text:tab/>for</text:span> (<text:span text:style-name="T27">int</text:span> <text:span text:style-name="T18">i</text:span> <text:span text:style-name="T23">=</text:span> <text:span text:style-name="T29">0</text:span>; <text:span text:style-name="T18">i</text:span> <text:span text:style-name="T23">&lt;</text:span> (<text:span text:style-name="T27">int</text:span>) <text:span text:style-name="T27">sizeof</text:span>(<text:span text:style-name="T18">number</text:span>); <text:span text:style-name="T18">i</text:span><text:span text:style-name="T23">++</text:span>) {</text:p>
      <text:p text:style-name="P29"><text:span text:style-name="T28"><text:tab/><text:tab/>uint8_t</text:span> <text:span text:style-name="T18">byte</text:span> <text:span text:style-name="T23">=</text:span> (<text:span text:style-name="T18">number</text:span> <text:span text:style-name="T23">&gt;&gt;</text:span> (<text:span text:style-name="T18">i</text:span> <text:span text:style-name="T23">*</text:span> <text:span text:style-name="T29">8</text:span>)) <text:span text:style-name="T23">&amp;</text:span> <text:span text:style-name="T29">0xFF</text:span>;</text:p>
      <text:p text:style-name="P31"><text:tab/><text:tab/>// Извлечение старшей и младшей тетрады</text:p>
      <text:p text:style-name="P29"><text:span text:style-name="T28"><text:tab/><text:tab/>uint8_t</text:span> <text:span text:style-name="T18">high_tetr</text:span> <text:span text:style-name="T23">=</text:span> <text:span text:style-name="T18">byte</text:span> <text:span text:style-name="T23">&gt;&gt;</text:span> <text:span text:style-name="T29">4</text:span>;</text:p>
      <text:p text:style-name="P29"><text:span text:style-name="T28"><text:tab/><text:tab/>uint8_t</text:span> <text:span text:style-name="T18">low_tetr</text:span> <text:span text:style-name="T23">=</text:span> <text:span text:style-name="T18">byte</text:span> <text:span text:style-name="T23">&amp;</text:span> <text:span text:style-name="T29">0xF</text:span>;</text:p>
      <text:p text:style-name="P31"><text:tab/><text:tab/>// Циклический сдвиг тетрад</text:p>
      <text:p text:style-name="P29"><text:span text:style-name="T18"><text:tab/><text:tab/>high_tetr</text:span> <text:span text:style-name="T23">=</text:span> ((<text:span text:style-name="T18">high_tetr</text:span> <text:span text:style-name="T23">&gt;&gt;</text:span> <text:span text:style-name="T18">N</text:span>) <text:span text:style-name="T23">|</text:span> (<text:span text:style-name="T18">high_tetr</text:span> <text:span text:style-name="T23">&lt;&lt;</text:span> (<text:span text:style-name="T29">4</text:span> <text:span text:style-name="T23">-</text:span> <text:span text:style-name="T18">N</text:span>))) <text:span text:style-name="T23">&amp;</text:span> <text:span text:style-name="T29">0xF</text:span>;</text:p>
      <text:p text:style-name="P29"><text:span text:style-name="T18"><text:tab/><text:tab/>low_tetr</text:span> <text:span text:style-name="T23">=</text:span> ((<text:span text:style-name="T18">low_tetr</text:span> <text:span text:style-name="T23">&lt;&lt;</text:span> <text:span text:style-name="T18">N</text:span>) <text:span text:style-name="T23">|</text:span> (<text:span text:style-name="T18">low_tetr</text:span> <text:span text:style-name="T23">&gt;&gt;</text:span> (<text:span text:style-name="T29">4</text:span> <text:span text:style-name="T23">-</text:span> <text:span text:style-name="T18">N</text:span>))) <text:span text:style-name="T23">&amp;</text:span> <text:span text:style-name="T29">0xF</text:span>;</text:p>
      <text:p text:style-name="P29"><text:span text:style-name="T28"><text:tab/><text:tab/>uint8_t</text:span> <text:span text:style-name="T18">new_byte</text:span> <text:span text:style-name="T23">=</text:span> (<text:span text:style-name="T18">high_tetr</text:span> <text:span text:style-name="T23">&lt;&lt;</text:span> <text:span text:style-name="T29">4</text:span>) <text:span text:style-name="T23">|</text:span> <text:span text:style-name="T18">low_tetr</text:span>;</text:p>
      <text:p text:style-name="P29"><text:span text:style-name="T18"><text:tab/><text:tab/>result</text:span> <text:span text:style-name="T23">|=</text:span> (<text:span text:style-name="T18">new_byte</text:span> <text:span text:style-name="T23">&lt;&lt;</text:span> (<text:span text:style-name="T18">i</text:span> <text:span text:style-name="T23">*</text:span> <text:span text:style-name="T29">8</text:span>));</text:p>
      <text:p text:style-name="P29"><text:tab/>}</text:p>
      <text:p text:style-name="P29"><text:span text:style-name="T26"><text:tab/>return</text:span> <text:span text:style-name="T18">result</text:span>;</text:p>
      <text:p text:style-name="P29">}</text:p>
      <text:p text:style-name="P30"/>
      <text:p text:style-name="P29"><text:span text:style-name="T27">int</text:span> <text:span text:style-name="T19">main</text:span>(<text:span text:style-name="T27">int</text:span> <text:span text:style-name="T18">argc</text:span>, <text:span text:style-name="T27">char</text:span> <text:span text:style-name="T23">*</text:span><text:span text:style-name="T18">argv</text:span><text:span text:style-name="T27">[]</text:span>) {</text:p>
      <text:p text:style-name="P31"><text:tab/>// Проверка запуска с переменной среды, включающей отладочный вывод.</text:p>
      <text:p text:style-name="P29"><text:span text:style-name="T27"><text:tab/>char</text:span> <text:span text:style-name="T23">*</text:span><text:span text:style-name="T18">DEBUG</text:span> <text:span text:style-name="T23">=</text:span> <text:span text:style-name="T19">getenv</text:span>(<text:span text:style-name="T20">"LAB1DEBUG"</text:span>);</text:p>
      <text:p text:style-name="P29"><text:span text:style-name="T26"><text:tab/>if</text:span> (<text:span text:style-name="T18">DEBUG</text:span>) {</text:p>
      <text:p text:style-name="P29"><text:span text:style-name="T19"><text:tab/><text:tab/>fprintf</text:span>(<text:span text:style-name="T27">stderr</text:span>, <text:span text:style-name="T20">"Включен вывод отладочных сообщений</text:span><text:span text:style-name="T30">\n</text:span><text:span text:style-name="T20">"</text:span>);</text:p>
      <text:p text:style-name="P29"><text:tab/>}</text:p>
      <text:p text:style-name="P30"/>
      <text:p text:style-name="P29"><text:span text:style-name="T19"><text:tab/>srand</text:span>(<text:span text:style-name="T19">time</text:span>(<text:span text:style-name="T27">NULL</text:span>) <text:span text:style-name="T23">+</text:span> <text:span text:style-name="T19">getpid</text:span>());</text:p>
      <text:p text:style-name="P29"><text:span text:style-name="T28"><text:tab/>uint16_t</text:span> <text:span text:style-name="T18">number</text:span>;</text:p>
      <text:p text:style-name="P29"><text:span text:style-name="T27"><text:tab/>int</text:span> <text:span text:style-name="T18">N</text:span> <text:span text:style-name="T23">=</text:span> <text:span text:style-name="T19">rand</text:span>() <text:span text:style-name="T23">%</text:span> <text:span text:style-name="T29">4</text:span>;</text:p>
      <text:p text:style-name="P32"><text:span text:style-name="T31"><text:tab/>char</text:span><text:span text:style-name="T32"> </text:span><text:span text:style-name="T33">*</text:span><text:span text:style-name="T34">endptr</text:span><text:span text:style-name="T32">;</text:span></text:p>
      <text:p text:style-name="P29"><text:span text:style-name="T26"><text:tab/>if</text:span> (<text:span text:style-name="T18">argc</text:span> <text:span text:style-name="T23">==</text:span> <text:span text:style-name="T29">1</text:span>) {<text:span text:style-name="T35"> <text:s text:c="17"/>// Если число не передано, то генерируем рандомное</text:span></text:p>
      <text:p text:style-name="P29"><text:span text:style-name="T18"><text:tab/><text:tab/>number</text:span> <text:span text:style-name="T23">=</text:span> <text:span text:style-name="T19">rand</text:span>() <text:span text:style-name="T23">&amp;</text:span> <text:span text:style-name="T27">UINT16_MAX</text:span>;</text:p>
      <text:p text:style-name="P29"><text:tab/>} <text:span text:style-name="T26">else</text:span> <text:span text:style-name="T26">if</text:span> (<text:span text:style-name="T18">argc</text:span> <text:span text:style-name="T23">==</text:span> <text:span text:style-name="T29">2</text:span>) {<text:span text:style-name="T35"> <text:s text:c="22"/>// Если число передано, то </text:span></text:p>
      <text:p text:style-name="P29"><text:span text:style-name="T18"><text:tab/><text:tab/>number</text:span> <text:span text:style-name="T23">=</text:span> <text:span text:style-name="T19">strtol</text:span>(<text:span text:style-name="T18">argv</text:span>[<text:span text:style-name="T29">1</text:span>], <text:span text:style-name="T23">&amp;</text:span><text:span text:style-name="T18">endptr</text:span>, <text:span text:style-name="T29">10</text:span>);<text:span text:style-name="T35"> // проверяем на валидность</text:span></text:p>
      <text:p text:style-name="P29"><text:span text:style-name="T26"><text:tab/><text:tab/>if</text:span> (<text:span text:style-name="T18">endptr</text:span> <text:span text:style-name="T23">==</text:span> <text:span text:style-name="T18">argv</text:span>[<text:span text:style-name="T29">1</text:span>] <text:span text:style-name="T23">||</text:span> <text:span text:style-name="T23">*</text:span><text:span text:style-name="T18">endptr</text:span> <text:span text:style-name="T23">!=</text:span> <text:span text:style-name="T20">'</text:span><text:span text:style-name="T30">\0</text:span><text:span text:style-name="T20">'</text:span>) {</text:p>
      <text:p text:style-name="P29"><text:span text:style-name="T19"><text:tab/><text:tab/><text:tab/>fprintf</text:span>(<text:span text:style-name="T27">stderr</text:span>, <text:span text:style-name="T20">"Ошибка: '</text:span><text:span text:style-name="T18">%s</text:span><text:span text:style-name="T20">' не является целым числом.</text:span><text:span text:style-name="T30">\n</text:span><text:span text:style-name="T20">"</text:span>, <text:span text:style-name="T18">argv</text:span>[<text:span text:style-name="T29">1</text:span>]);</text:p>
      <text:p text:style-name="P29"><text:span text:style-name="T26"><text:tab/><text:tab/><text:tab/>return</text:span> <text:span text:style-name="T27">EXIT_FAILURE</text:span>;</text:p>
      <text:p text:style-name="P29"><text:tab/><text:tab/>}</text:p>
      <text:p text:style-name="P30"/>
      <text:p text:style-name="P29"><text:tab/>} <text:span text:style-name="T26">else</text:span> {</text:p>
      <text:p text:style-name="P29"><text:soft-page-break/><text:span text:style-name="T19"><text:tab/><text:tab/>fprintf</text:span>(<text:span text:style-name="T27">stderr</text:span>, <text:span text:style-name="T20">"Usage: </text:span><text:span text:style-name="T18">%s</text:span><text:span text:style-name="T20"> [число]</text:span><text:span text:style-name="T30">\n</text:span><text:span text:style-name="T20">"</text:span>, <text:span text:style-name="T18">argv</text:span>[<text:span text:style-name="T29">0</text:span>]);</text:p>
      <text:p text:style-name="P29"><text:span text:style-name="T26"><text:tab/><text:tab/>return</text:span> <text:span text:style-name="T27">EXIT_FAILURE</text:span>;</text:p>
      <text:p text:style-name="P29"><text:tab/>}</text:p>
      <text:p text:style-name="P30"/>
      <text:p text:style-name="P29"><text:span text:style-name="T19"><text:tab/>printf</text:span>(<text:span text:style-name="T20">"N: </text:span><text:span text:style-name="T18">%d</text:span><text:span text:style-name="T30">\n</text:span><text:span text:style-name="T20">"</text:span>, <text:span text:style-name="T18">N</text:span>);</text:p>
      <text:p text:style-name="P29"><text:span text:style-name="T19"><text:tab/>print_bin</text:span>(<text:span text:style-name="T18">number</text:span>);</text:p>
      <text:p text:style-name="P29"><text:span text:style-name="T19"><text:tab/>print_bin</text:span>(<text:span text:style-name="T19">circular_shift</text:span>(<text:span text:style-name="T18">number</text:span>, <text:span text:style-name="T18">N</text:span>));</text:p>
      <text:p text:style-name="P30"/>
      <text:p text:style-name="P29"><text:span text:style-name="T26"><text:tab/>return</text:span> <text:span text:style-name="T27">EXIT_SUCCESS</text:span>;</text:p>
      <text:p text:style-name="P29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Droid Sans Mono" svg:font-family="'Droid Sans Mono'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Жирный" style:font-family-generic="roman"/>
    <style:font-face style:name="Times New Roman4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>
        <style:tab-stops/>
      </style:paragraph-properties>
      <style:text-properties style:font-name="Times New Roman3" fo:font-family="'Times New Roman'" style:font-style-name="Жирный" style:font-family-generic="roman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4" fo:font-family="'Times New Roman'" style:font-style-name="Обычный" style:font-family-generic="roman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y</meta:initial-creator>
    <meta:editing-cycles>14</meta:editing-cycles>
    <meta:creation-date>2021-10-17T09:09:00</meta:creation-date>
    <dc:date>2024-10-23T21:49:02.351027167</dc:date>
    <meta:editing-duration>PT2H7M4S</meta:editing-duration>
    <meta:generator>LibreOffice/24.8.1.2$Linux_X86_64 LibreOffice_project/480$Build-2</meta:generator>
    <meta:document-statistic meta:table-count="0" meta:image-count="6" meta:object-count="0" meta:page-count="7" meta:paragraph-count="103" meta:word-count="496" meta:character-count="3408" meta:non-whitespace-character-count="2899"/>
    <meta:user-defined meta:name="AppVersion">16.0000</meta:user-defined>
    <meta:user-defined meta:name="Company">SPecialiST RePack</meta:user-defined>
    <meta:template xlink:type="simple" xlink:actuate="onRequest" xlink:title="Normal" xlink:href=""/>
  </office:meta>
</office:document-meta>
</file>