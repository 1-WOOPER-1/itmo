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A000000E86460CF44.png" manifest:media-type="image/png"/>
  <manifest:file-entry manifest:full-path="Pictures/1000000100000252000000AE0357E500.png" manifest:media-type="image/png"/>
  <manifest:file-entry manifest:full-path="Pictures/10000001000002150000009B9F2D6D8A.png" manifest:media-type="image/png"/>
  <manifest:file-entry manifest:full-path="Pictures/100000010000022100000100AD173D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 fo:text-align="center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Normal_20__28_Web_29_">
      <style:paragraph-properties fo:margin-left="3.747cm" fo:margin-top="0.494cm" fo:margin-bottom="0.494cm" style:contextual-spacing="false" fo:text-indent="2.498cm" style:auto-text-indent="false"/>
      <style:text-properties fo:background-color="transparen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111975" officeooo:paragraph-rsid="00111975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end" style:justify-single-word="false"/>
    </style:style>
    <style:style style:name="P8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officeooo:rsid="00024d6c" officeooo:paragraph-rsid="00024d6c" fo:background-color="transparent" style:font-size-asian="14pt"/>
    </style:style>
    <style:style style:name="P9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font-size="14pt" style:font-size-asian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3.5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24d6c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weight="bold" officeooo:rsid="0004f2fb" officeooo:paragraph-rsid="0004f2fb" style:font-weight-asian="bold" style:font-weight-complex="bold"/>
    </style:style>
    <style:style style:name="P14" style:family="paragraph" style:parent-style-name="Normal_20__28_Web_29_" style:list-style-name="" style:master-page-name="">
      <style:paragraph-properties fo:margin-top="0.494cm" fo:margin-bottom="0.494cm" style:contextual-spacing="false" fo:text-align="center" style:justify-single-word="false" style:page-number="auto" fo:break-before="page"/>
      <style:text-properties fo:color="#000000" loext:opacity="100%" fo:font-size="14pt" fo:font-weight="bold" officeooo:rsid="0004f2fb" officeooo:paragraph-rsid="0004f2fb" style:font-size-asian="14pt" style:font-weight-asian="bold" style:font-size-complex="13.5pt" style:font-weight-complex="bold"/>
    </style:style>
    <style:style style:name="P15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officeooo:rsid="001dbe56" officeooo:paragraph-rsid="001dbe56" style:font-size-asian="14pt" style:font-size-complex="13.5pt"/>
    </style:style>
    <style:style style:name="P16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officeooo:rsid="0004f2fb" officeooo:paragraph-rsid="0006222e"/>
    </style:style>
    <style:style style:name="P17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officeooo:rsid="0004f2fb" officeooo:paragraph-rsid="001dbe56"/>
    </style:style>
    <style:style style:name="P18" style:family="paragraph" style:parent-style-name="Normal_20__28_Web_29_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rsid="0006222e" officeooo:paragraph-rsid="0006222e" style:font-size-asian="14pt" style:font-weight-asian="bold" style:font-size-complex="13.5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333333" loext:opacity="100%" style:font-name="Droid Sans Mono1" fo:font-size="13pt" fo:font-weight="normal" fo:background-color="transparent" style:font-size-asian="13pt" style:font-size-complex="13pt"/>
    </style:style>
    <style:style style:name="P20" style:family="paragraph" style:parent-style-name="Standard">
      <style:paragraph-properties fo:margin-top="0cm" fo:margin-bottom="0cm" style:contextual-spacing="false" style:line-height-at-least="0.503cm"/>
      <style:text-properties fo:font-size="13pt" fo:background-color="transparent" style:font-size-asian="13pt" style:font-size-complex="13pt"/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333333" loext:opacity="100%" style:font-name="Droid Sans Mono1" fo:font-size="13pt" fo:font-weight="normal" fo:background-color="transparent" style:font-size-asian="13pt" style:font-size-complex="13pt"/>
    </style:style>
    <style:style style:name="P22" style:family="paragraph" style:parent-style-name="Standard">
      <style:paragraph-properties style:line-height-at-least="0.503cm"/>
      <style:text-properties style:font-name="Droid Sans Mono" fo:font-size="10pt" fo:background-color="transparent" style:font-size-asian="10pt" style:font-size-complex="10pt"/>
    </style:style>
    <style:style style:name="P23" style:family="paragraph" style:parent-style-name="Preformatted_20_Text" style:list-style-name="">
      <style:paragraph-properties fo:line-height="150%" fo:text-align="center" style:justify-single-word="false" fo:break-before="page"/>
      <style:text-properties style:font-name="Times New Roman" fo:font-size="14pt" officeooo:paragraph-rsid="000708d3" style:font-size-asian="14pt" style:font-size-complex="14pt"/>
    </style:style>
    <style:style style:name="P24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weight="normal" officeooo:rsid="000708d3" officeooo:paragraph-rsid="000708d3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line-height="150%" fo:text-align="justify" style:justify-single-word="false"/>
      <style:text-properties fo:color="#000000" loext:opacity="100%" style:font-name="Times New Roman" fo:font-size="14pt" fo:font-weight="normal" officeooo:rsid="000708d3" officeooo:paragraph-rsid="00227fd9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weight="bold" officeooo:rsid="000a70d9" officeooo:paragraph-rsid="000708d3" style:font-size-asian="14pt" style:font-weight-asian="bold" style:font-size-complex="14pt" style:font-weight-complex="bold"/>
    </style:style>
    <style:style style:name="P27" style:family="paragraph" style:parent-style-name="Preformatted_20_Text" style:list-style-name="">
      <style:paragraph-properties fo:text-align="center" style:justify-single-word="false" fo:break-before="page"/>
      <style:text-properties fo:color="#000000" loext:opacity="100%" style:font-name="Times New Roman" fo:font-size="14pt" fo:font-weight="bold" officeooo:rsid="000a70d9" officeooo:paragraph-rsid="000a70d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cm" fo:text-align="justify" style:justify-single-word="false"/>
      <style:text-properties fo:color="#333333" loext:opacity="100%" style:font-name="Droid Sans Mono1" fo:font-size="8pt" fo:font-weight="normal" officeooo:paragraph-rsid="000a70d9" fo:background-color="transparent" style:font-size-asian="8pt" style:font-size-complex="8pt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333333" loext:opacity="100%" style:font-name="Droid Sans Mono1" fo:font-size="8pt" fo:font-weight="normal" fo:background-color="transparent" style:font-size-asian="8pt" style:font-size-complex="8pt"/>
    </style:style>
    <style:style style:name="P30" style:family="paragraph" style:parent-style-name="Standard">
      <style:paragraph-properties fo:margin-top="0cm" fo:margin-bottom="0cm" style:contextual-spacing="false" style:line-height-at-least="0.503cm"/>
      <style:text-properties fo:font-size="8pt" fo:background-color="transparent" style:font-size-asian="8pt" style:font-size-complex="8pt"/>
    </style:style>
    <style:style style:name="P31" style:family="paragraph" style:parent-style-name="Standard">
      <style:paragraph-properties style:line-height-at-least="0.503cm"/>
      <style:text-properties fo:font-size="8pt" fo:background-color="transparent" style:font-size-asian="8pt" style:font-size-complex="8pt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aaaaaa" loext:opacity="100%" style:font-name="Droid Sans Mono1" fo:font-size="8pt" fo:font-style="italic" fo:font-weight="normal" fo:background-color="transparent" style:font-size-asian="8pt" style:font-size-complex="8pt"/>
    </style:style>
    <style:style style:name="P33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777777" loext:opacity="100%" style:font-name="Droid Sans Mono1" fo:font-size="8pt" fo:font-weight="normal" fo:background-color="transparent" style:font-size-asian="8pt" style:font-size-complex="8pt"/>
    </style:style>
    <style:style style:name="T1" style:family="text">
      <style:text-properties fo:color="#000000" loext:opacity="100%" fo:font-size="10pt" style:font-size-asian="10pt" style:font-size-complex="13.5pt"/>
    </style:style>
    <style:style style:name="T2" style:family="text">
      <style:text-properties fo:color="#000000" loext:opacity="100%" fo:font-size="16pt" fo:font-weight="bold" style:font-size-asian="16pt" style:font-weight-asian="bold" style:font-size-complex="14pt"/>
    </style:style>
    <style:style style:name="T3" style:family="text">
      <style:text-properties fo:color="#000000" loext:opacity="100%" fo:font-size="14pt" fo:font-weight="bold" style:font-size-asian="14pt" style:font-weight-asian="bold" style:font-size-complex="13.5pt"/>
    </style:style>
    <style:style style:name="T4" style:family="text">
      <style:text-properties fo:color="#000000" loext:opacity="100%" fo:font-size="14pt" style:font-size-asian="14pt" style:font-size-complex="13.5pt"/>
    </style:style>
    <style:style style:name="T5" style:family="text">
      <style:text-properties fo:color="#000000" loext:opacity="100%" fo:font-size="14pt" officeooo:rsid="00024d6c" style:font-size-asian="14pt" style:font-size-complex="13.5pt"/>
    </style:style>
    <style:style style:name="T6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7" style:family="text">
      <style:text-properties fo:color="#000000" loext:opacity="100%" fo:font-size="13.5pt" fo:font-weight="bold" officeooo:rsid="001dbe56" style:font-size-asian="13.5pt" style:font-weight-asian="bold" style:font-size-complex="13.5pt"/>
    </style:style>
    <style:style style:name="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fo:font-size="14pt" fo:font-weight="bold" officeooo:rsid="001bfa3f" style:font-size-asian="14pt" style:font-weight-asian="bold" style:font-size-complex="14pt" style:font-weight-complex="bold"/>
    </style:style>
    <style:style style:name="T10" style:family="text">
      <style:text-properties fo:color="#000000" loext:opacity="100%" fo:font-size="13.5pt" style:font-size-asian="13.5pt" style:font-size-complex="13.5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fo:background-color="transparent" loext:char-shading-value="0" style:font-size-asian="14pt"/>
    </style:style>
    <style:style style:name="T14" style:family="text">
      <style:text-properties fo:font-size="14pt" fo:language="en" fo:country="US" officeooo:rsid="00024d6c" fo:background-color="transparent" loext:char-shading-value="0" style:font-size-asian="14pt"/>
    </style:style>
    <style:style style:name="T15" style:family="text">
      <style:text-properties fo:font-size="14pt" officeooo:rsid="00024d6c" style:font-size-asian="14pt"/>
    </style:style>
    <style:style style:name="T16" style:family="text">
      <style:text-properties officeooo:rsid="001dbe56"/>
    </style:style>
    <style:style style:name="T17" style:family="text">
      <style:text-properties fo:color="#000000" loext:opacity="100%" fo:font-size="14pt" officeooo:rsid="0006222e" style:font-size-asian="14pt" style:font-size-complex="13.5pt"/>
    </style:style>
    <style:style style:name="T18" style:family="text">
      <style:text-properties fo:color="#000000" loext:opacity="100%" fo:font-size="14pt" officeooo:rsid="001dbe56" style:font-size-asian="14pt" style:font-size-complex="13.5pt"/>
    </style:style>
    <style:style style:name="T19" style:family="text">
      <style:text-properties fo:color="#aa3731" loext:opacity="100%" fo:font-weight="bold" officeooo:rsid="0006222e" style:font-weight-asian="bold" style:font-weight-complex="bold"/>
    </style:style>
    <style:style style:name="T20" style:family="text">
      <style:text-properties fo:color="#777777" loext:opacity="100%" officeooo:rsid="0006222e" style:font-weight-asian="bold" style:font-weight-complex="bold"/>
    </style:style>
    <style:style style:name="T21" style:family="text">
      <style:text-properties officeooo:rsid="0006222e" style:font-weight-asian="bold" style:font-weight-complex="bold"/>
    </style:style>
    <style:style style:name="T22" style:family="text">
      <style:text-properties fo:color="#7a3e9d" loext:opacity="100%"/>
    </style:style>
    <style:style style:name="T23" style:family="text">
      <style:text-properties fo:color="#777777" loext:opacity="100%"/>
    </style:style>
    <style:style style:name="T24" style:family="text">
      <style:text-properties fo:color="#aa3731" loext:opacity="100%" fo:font-weight="bold"/>
    </style:style>
    <style:style style:name="T25" style:family="text">
      <style:text-properties fo:color="#000000" loext:opacity="100%" fo:font-weight="bold" officeooo:rsid="0006222e" style:font-weight-asian="bold" style:font-weight-complex="bold"/>
    </style:style>
    <style:style style:name="T26" style:family="text">
      <style:text-properties fo:color="#000000" loext:opacity="100%" fo:font-weight="bold" officeooo:rsid="000708d3" style:font-weight-asian="bold" style:font-weight-complex="bold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officeooo:rsid="00227fd9"/>
    </style:style>
    <style:style style:name="T29" style:family="text">
      <style:text-properties fo:color="#000000" loext:opacity="100%" officeooo:rsid="001e03a5"/>
    </style:style>
    <style:style style:name="T30" style:family="text">
      <style:text-properties officeooo:rsid="001e03a5"/>
    </style:style>
    <style:style style:name="T31" style:family="text">
      <style:text-properties fo:color="#000000" loext:opacity="100%" officeooo:rsid="0006222e"/>
    </style:style>
    <style:style style:name="T32" style:family="text">
      <style:text-properties fo:color="#4b69c6" loext:opacity="100%"/>
    </style:style>
    <style:style style:name="T33" style:family="text">
      <style:text-properties fo:color="#448c27" loext:opacity="100%"/>
    </style:style>
    <style:style style:name="T34" style:family="text">
      <style:text-properties fo:color="#9c5d27" loext:opacity="100%"/>
    </style:style>
    <style:style style:name="T35" style:family="text">
      <style:text-properties fo:color="#aaaaaa" loext:opacity="100%"/>
    </style:style>
    <style:style style:name="T36" style:family="text">
      <style:text-properties fo:color="#aaaaaa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P2" loext:marker-style-name="T3"><text:span text:style-name="T3">Факультет безопасности информационных технологий</text:span></text:p>
      <text:p text:style-name="P2" loext:marker-style-name="T3"><text:span text:style-name="T3">Дисциплина: <text:tab/></text:span></text:p>
      <text:p text:style-name="P3"><text:span text:style-name="T4">«</text:span><text:span text:style-name="T5">Программирование</text:span><text:span text:style-name="T4">»</text:span></text:p>
      <text:p text:style-name="P2" loext:marker-style-name="T3"><text:span text:style-name="T3">ОТЧЕТ ПО ЛАБОРАТОРНОЙ РАБОТЕ </text:span><text:span text:style-name="T6">№</text:span><text:span text:style-name="T7">2</text:span></text:p>
      <text:p text:style-name="P4" loext:marker-style-name="T8"><text:span text:style-name="T9">Указатели и динамическая память</text:span><text:span text:style-name="T8">.</text:span></text:p>
      <text:p text:style-name="P5" loext:marker-style-name="T10"/>
      <text:p text:style-name="P5" loext:marker-style-name="T10"/>
      <text:p text:style-name="P5" loext:marker-style-name="T10"/>
      <text:p text:style-name="P6" loext:marker-style-name="T10"/>
      <text:p text:style-name="P7" loext:marker-style-name="T11"><text:span text:style-name="T11">Выполнил:</text:span></text:p>
      <text:p text:style-name="P7" loext:marker-style-name="T12"><text:span text:style-name="T12">Студент группы </text:span><text:span text:style-name="T13">N31</text:span><text:bookmark text:name="_GoBack"/><text:span text:style-name="T14">50</text:span></text:p>
      <text:p text:style-name="P8">Пахомов Владимир Юрьевич</text:p>
      <text:p text:style-name="P9" loext:marker-style-name="T12"><draw:frame draw:style-name="fr1" draw:name="Изображение1" text:anchor-type="char" svg:x="13.21cm" svg:y="-0.023cm" svg:width="3.344cm" svg:height="1.572cm" draw:z-index="0"><draw:image xlink:href="Pictures/100000010000022100000100AD173DF0.png" xlink:type="simple" xlink:show="embed" xlink:actuate="onLoad" draw:mime-type="image/png"/></draw:frame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>Проверил:</text:span></text:p>
      <text:p text:style-name="P7" loext:marker-style-name="T12"><text:span text:style-name="T15">Гирик</text:span><text:span text:style-name="T12"> </text:span><text:span text:style-name="T15">А</text:span><text:span text:style-name="T12">.</text:span><text:span text:style-name="T15">В</text:span><text:span text:style-name="T12">.</text:span></text:p>
      <text:p text:style-name="P10"/>
      <text:p text:style-name="P10" loext:marker-style-name="T4"/>
      <text:p text:style-name="P10" loext:marker-style-name="T4"/>
      <text:p text:style-name="P2" loext:marker-style-name="T4"><text:span text:style-name="T4">Санкт-Петербург</text:span></text:p>
      <text:p text:style-name="P11"><text:span text:style-name="T4">2024г</text:span><text:bookmark text:name="_1_Введение"/><text:span text:style-name="T4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Contents_20_Heading"><text:soft-page-break/>Оглавление</text:p>
          </text:index-title>
          <text:p text:style-name="P12"><text:a xlink:type="simple" xlink:href="#__RefHeading___Toc35_4078790415" text:style-name="Index_20_Link" text:visited-style-name="Index_20_Link">Задание. Вариант 2-33<text:tab/>3</text:a></text:p>
          <text:p text:style-name="P12"><text:a xlink:type="simple" xlink:href="#__RefHeading___Toc46_4078790415" text:style-name="Index_20_Link" text:visited-style-name="Index_20_Link">Make-файл<text:tab/>3</text:a></text:p>
          <text:p text:style-name="P12"><text:a xlink:type="simple" xlink:href="#__RefHeading___Toc48_4078790415" text:style-name="Index_20_Link" text:visited-style-name="Index_20_Link">Примеры работы программы на различных исходных данных<text:tab/>4</text:a></text:p>
          <text:p text:style-name="P12"><text:a xlink:type="simple" xlink:href="#__RefHeading___Toc52_4078790415" text:style-name="Index_20_Link" text:visited-style-name="Index_20_Link">Исходный текст программы с комментариями<text:tab/>5</text:a></text:p>
        </text:index-body>
      </text:table-of-content>
      <text:p text:style-name="P13"><text:span text:style-name="T4"/></text:p>
      <text:h text:style-name="P14" text:outline-level="1"><text:bookmark-start text:name="__RefHeading___Toc35_4078790415"/>Задание. Вариант <text:span text:style-name="T16">2</text:span>-<text:span text:style-name="T16">33</text:span><text:bookmark-end text:name="__RefHeading___Toc35_4078790415"/></text:h>
      <text:p text:style-name="P15">Способ представления матрицы: Одномерный массив, содержащий столбцы матрицы.</text:p>
      <text:p text:style-name="P16"><text:span text:style-name="T17">Задание: </text:span><text:span text:style-name="T18">Назовём характеристикой столбца результат поразрядной операции «стрелка Пирса» между элементами столбца. Осуществить циклический сдвиг каждого столбца на количество единиц в старшем байте значения характеристики.</text:span></text:p>
      <text:p text:style-name="P17"><text:span text:style-name="T17">Тип </text:span><text:span text:style-name="T18">элементов</text:span><text:span text:style-name="T17">: uint</text:span><text:span text:style-name="T18">32</text:span><text:span text:style-name="T17">_t</text:span></text:p>
      <text:h text:style-name="P18" text:outline-level="1"><text:bookmark-start text:name="__RefHeading___Toc46_4078790415"/>Make-файл<text:bookmark-end text:name="__RefHeading___Toc46_4078790415"/></text:h>
      <text:p text:style-name="P19"><text:span text:style-name="T19">.PHONY</text:span><text:span text:style-name="T20">:</text:span><text:span text:style-name="T21"> all clean</text:span></text:p>
      <text:p text:style-name="P20"/>
      <text:p text:style-name="P21"><text:span text:style-name="T22">APP</text:span><text:span text:style-name="T23">=</text:span>prg2vypN3150</text:p>
      <text:p text:style-name="P21"><text:span text:style-name="T22">CFLAGS</text:span><text:span text:style-name="T23">=</text:span>-Wall -Wextra -Werror -g</text:p>
      <text:p text:style-name="P20"/>
      <text:p text:style-name="P21"><text:span text:style-name="T24">all</text:span><text:span text:style-name="T23">:</text:span> <text:span text:style-name="T23">$(</text:span><text:span text:style-name="T22">APP</text:span><text:span text:style-name="T23">)</text:span></text:p>
      <text:p text:style-name="P20"/>
      <text:p text:style-name="P21"><text:span text:style-name="T23">$(</text:span><text:span text:style-name="T22">APP</text:span><text:span text:style-name="T23">)</text:span>: <text:span text:style-name="T23">$(</text:span><text:span text:style-name="T22">APP</text:span><text:span text:style-name="T23">)</text:span>.c</text:p>
      <text:p text:style-name="P21"><text:tab/>gcc -o <text:span text:style-name="T23">$(</text:span><text:span text:style-name="T22">APP</text:span><text:span text:style-name="T23">)</text:span> <text:span text:style-name="T23">$(</text:span><text:span text:style-name="T22">CFLAGS</text:span><text:span text:style-name="T23">)</text:span> <text:span text:style-name="T23">$(</text:span><text:span text:style-name="T22">APP</text:span><text:span text:style-name="T23">)</text:span>.c</text:p>
      <text:p text:style-name="P20"/>
      <text:p text:style-name="P21"><text:span text:style-name="T24">clean</text:span><text:span text:style-name="T23">:</text:span></text:p>
      <text:p text:style-name="P21"><text:tab/>rm <text:span text:style-name="T23">$(</text:span><text:span text:style-name="T22">APP</text:span><text:span text:style-name="T23">)</text:span></text:p>
      <text:p text:style-name="P22"><text:span text:style-name="T25"/></text:p>
      <text:h text:style-name="P23" text:outline-level="1"><text:bookmark-start text:name="__RefHeading___Toc48_4078790415"/><text:span text:style-name="T25">П</text:span><text:span text:style-name="T26">римеры работы программы на различных исходных данных</text:span><text:bookmark-end text:name="__RefHeading___Toc48_4078790415"/></text:h>
      <text:p text:style-name="P24"><text:span text:style-name="T27">При </text:span><text:span text:style-name="T28">указании количества строк и столбцов </text:span><text:span text:style-name="T29">матрицы программа заполняет матрицу случайными числами и производит операции над ней:</text:span></text:p>
      <text:p text:style-name="P25"><draw:frame draw:style-name="fr2" draw:name="Изображение2" text:anchor-type="char" svg:x="-0.051cm" svg:y="0cm" svg:width="13.42cm" svg:height="3.9cm" draw:z-index="3"><draw:image xlink:href="Pictures/10000001000002150000009B9F2D6D8A.png" xlink:type="simple" xlink:show="embed" xlink:actuate="onLoad" draw:mime-type="image/png"/></draw:frame>При передаче <text:span text:style-name="T30">опции -m </text:span>программа <text:span text:style-name="T30">просит ввести построчно все элементы матрицы и преобразование уже производится на матрице, которую ввёл пользователь</text:span>:</text:p>
      <text:p text:style-name="P24"><draw:frame draw:style-name="fr2" draw:name="Изображение3" text:anchor-type="char" svg:x="-0.014cm" svg:y="0cm" svg:width="15.092cm" svg:height="4.422cm" draw:z-index="1"><draw:image xlink:href="Pictures/1000000100000252000000AE0357E500.png" xlink:type="simple" xlink:show="embed" xlink:actuate="onLoad" draw:mime-type="image/png"/></draw:frame><text:span text:style-name="T31">П</text:span><text:span text:style-name="T27">ри передаче лишних </text:span><text:span text:style-name="T29">аргументов, строк, не являющихся числами, при передаче отрицательных и вещественных чисел программа обрабатывает ошибку и выводит информацию о ней на экран:</text:span></text:p>
      <text:p text:style-name="P26"><text:bookmark-start text:name="__RefHeading___Toc50_4078790415"/><draw:frame draw:style-name="fr1" draw:name="Изображение4" text:anchor-type="char" svg:x="0.125cm" svg:y="0cm" svg:width="15.386cm" svg:height="5.775cm" draw:z-index="2"><draw:image xlink:href="Pictures/100000010000026A000000E86460CF44.png" xlink:type="simple" xlink:show="embed" xlink:actuate="onLoad" draw:mime-type="image/png"/></draw:frame><text:bookmark-end text:name="__RefHeading___Toc50_4078790415"/><text:span text:style-name="T27"/></text:p>
      <text:h text:style-name="P27" text:outline-level="1"><text:bookmark-start text:name="__RefHeading___Toc52_4078790415"/>Исходный текст программы с комментариями<text:bookmark-end text:name="__RefHeading___Toc52_4078790415"/></text:h>
      <text:p text:style-name="P28"><text:span text:style-name="T23">#</text:span><text:span text:style-name="T32">include</text:span> <text:span text:style-name="T23">&lt;</text:span><text:span text:style-name="T33">stdlib.h</text:span><text:span text:style-name="T23">&gt;</text:span></text:p>
      <text:p text:style-name="P29"><text:span text:style-name="T23">#</text:span><text:span text:style-name="T32">include</text:span> <text:span text:style-name="T23">&lt;</text:span><text:span text:style-name="T33">stdio.h</text:span><text:span text:style-name="T23">&gt;</text:span></text:p>
      <text:p text:style-name="P29"><text:span text:style-name="T23">#</text:span><text:span text:style-name="T32">include</text:span> <text:span text:style-name="T23">&lt;</text:span><text:span text:style-name="T33">string.h</text:span><text:span text:style-name="T23">&gt;</text:span></text:p>
      <text:p text:style-name="P30"/>
      <text:p text:style-name="P29"><text:span text:style-name="T23">#</text:span><text:span text:style-name="T32">include</text:span> <text:span text:style-name="T23">&lt;</text:span><text:span text:style-name="T33">stdint.h</text:span><text:span text:style-name="T23">&gt;</text:span></text:p>
      <text:p text:style-name="P29"><text:span text:style-name="T23">#</text:span><text:span text:style-name="T32">include</text:span> <text:span text:style-name="T23">&lt;</text:span><text:span text:style-name="T33">ctype.h</text:span><text:span text:style-name="T23">&gt;</text:span></text:p>
      <text:p text:style-name="P29"><text:span text:style-name="T23">#</text:span><text:span text:style-name="T32">include</text:span> <text:span text:style-name="T23">&lt;</text:span><text:span text:style-name="T33">time.h</text:span><text:span text:style-name="T23">&gt;</text:span></text:p>
      <text:p text:style-name="P29"><text:span text:style-name="T23">#</text:span><text:span text:style-name="T32">include</text:span> <text:span text:style-name="T23">&lt;</text:span><text:span text:style-name="T33">unistd.h</text:span><text:span text:style-name="T23">&gt;</text:span></text:p>
      <text:p text:style-name="P31"/>
      <text:p text:style-name="P32">// Функция проверки, является ли строка числом</text:p>
      <text:p text:style-name="P29"><text:span text:style-name="T22">int</text:span> <text:span text:style-name="T24">check_number</text:span><text:span text:style-name="T23">(</text:span><text:span text:style-name="T32">const</text:span> <text:span text:style-name="T22">char</text:span> <text:span text:style-name="T23">*</text:span><text:span text:style-name="T22">str</text:span><text:span text:style-name="T23">)</text:span> <text:span text:style-name="T23">{</text:span></text:p>
      <text:p text:style-name="P29"><text:span text:style-name="T22"><text:tab/>char</text:span> <text:span text:style-name="T23">*</text:span>endptr<text:span text:style-name="T23">;</text:span></text:p>
      <text:p text:style-name="P29"><text:span text:style-name="T24"><text:tab/>strtol</text:span><text:span text:style-name="T23">(</text:span>str<text:span text:style-name="T23">,</text:span> <text:span text:style-name="T23">&amp;</text:span>endptr<text:span text:style-name="T23">,</text:span> <text:span text:style-name="T34">10</text:span><text:span text:style-name="T23">);</text:span></text:p>
      <text:p text:style-name="P29"><text:span text:style-name="T32"><text:tab/>if</text:span> <text:span text:style-name="T23">(*</text:span>endptr <text:span text:style-name="T23">!=</text:span> <text:span text:style-name="T23">'\0')</text:span> <text:span text:style-name="T32">return</text:span> <text:span text:style-name="T34">0</text:span><text:span text:style-name="T23">;</text:span></text:p>
      <text:p text:style-name="P29"><text:span text:style-name="T32"><text:tab/>else</text:span> <text:span text:style-name="T32">return</text:span> <text:span text:style-name="T34">1</text:span><text:span text:style-name="T23">;</text:span></text:p>
      <text:p text:style-name="P33">}</text:p>
      <text:p text:style-name="P30"/>
      <text:p text:style-name="P32">// Вывод матрицы</text:p>
      <text:p text:style-name="P29"><text:span text:style-name="T22">void</text:span> <text:span text:style-name="T24">print_matrix</text:span><text:span text:style-name="T23">(</text:span><text:span text:style-name="T22">uint32_t</text:span> <text:span text:style-name="T23">*</text:span><text:span text:style-name="T22">matrix</text:span><text:span text:style-name="T23">,</text:span> <text:span text:style-name="T22">int</text:span> <text:span text:style-name="T22">rows</text:span><text:span text:style-name="T23">,</text:span> <text:span text:style-name="T22">int</text:span> <text:span text:style-name="T22">cols</text:span><text:span text:style-name="T23">)</text:span> <text:span text:style-name="T23">{</text:span></text:p>
      <text:p text:style-name="P29"><text:span text:style-name="T32"><text:tab/>for</text:span> <text:span text:style-name="T23">(</text:span><text:span text:style-name="T22">int</text:span> i <text:span text:style-name="T23">=</text:span> <text:span text:style-name="T34">0</text:span><text:span text:style-name="T23">;</text:span> i <text:span text:style-name="T23">&lt;</text:span> rows<text:span text:style-name="T23">;</text:span> i<text:span text:style-name="T23">++)</text:span> <text:span text:style-name="T23">{</text:span></text:p>
      <text:p text:style-name="P29"><text:span text:style-name="T32"><text:tab/><text:tab/>for</text:span> <text:span text:style-name="T23">(</text:span><text:span text:style-name="T22">int</text:span> j <text:span text:style-name="T23">=</text:span> <text:span text:style-name="T34">0</text:span><text:span text:style-name="T23">;</text:span> j <text:span text:style-name="T23">&lt;</text:span> cols<text:span text:style-name="T23">;</text:span> j<text:span text:style-name="T23">++)</text:span> <text:span text:style-name="T23">{</text:span></text:p>
      <text:p text:style-name="P29"><text:span text:style-name="T24"><text:tab/><text:tab/><text:tab/>printf</text:span><text:span text:style-name="T23">("</text:span><text:span text:style-name="T34">%d</text:span><text:span text:style-name="T33"> </text:span><text:span text:style-name="T23">",</text:span> <text:span text:style-name="T22">matrix</text:span><text:span text:style-name="T23">[</text:span>i <text:span text:style-name="T23">*</text:span> cols <text:span text:style-name="T23">+</text:span> j<text:span text:style-name="T23">]);</text:span></text:p>
      <text:p text:style-name="P33"><text:tab/><text:tab/>}</text:p>
      <text:p text:style-name="P29"><text:span text:style-name="T24"><text:tab/>printf</text:span><text:span text:style-name="T23">("\n");</text:span></text:p>
      <text:p text:style-name="P33"><text:tab/>}</text:p>
      <text:p text:style-name="P33">}</text:p>
      <text:p text:style-name="P30"/>
      <text:p text:style-name="P32">// Характеристика столбца</text:p>
      <text:p text:style-name="P29"><text:span text:style-name="T22">uint32_t</text:span> <text:span text:style-name="T24">column_characteristic</text:span><text:span text:style-name="T23">(</text:span><text:span text:style-name="T22">uint32_t</text:span> <text:span text:style-name="T23">*</text:span><text:span text:style-name="T22">matrix</text:span><text:span text:style-name="T23">,</text:span> <text:span text:style-name="T22">int</text:span> <text:span text:style-name="T22">rows</text:span><text:span text:style-name="T23">,</text:span> <text:span text:style-name="T22">int</text:span> <text:span text:style-name="T22">cols</text:span><text:span text:style-name="T23">,</text:span> <text:span text:style-name="T22">int</text:span> <text:span text:style-name="T22">col</text:span><text:span text:style-name="T23">)</text:span> <text:span text:style-name="T23">{</text:span></text:p>
      <text:p text:style-name="P29"><text:span text:style-name="T22"><text:tab/>uint32_t</text:span> result <text:span text:style-name="T23">=</text:span> <text:span text:style-name="T22">matrix</text:span><text:span text:style-name="T23">[</text:span>col<text:span text:style-name="T23">];</text:span></text:p>
      <text:p text:style-name="P29"><text:span text:style-name="T32"><text:tab/>for</text:span> <text:span text:style-name="T23">(</text:span><text:span text:style-name="T22">int</text:span> i <text:span text:style-name="T23">=</text:span> <text:span text:style-name="T34">1</text:span><text:span text:style-name="T23">;</text:span> i <text:span text:style-name="T23">&lt;</text:span> rows<text:span text:style-name="T23">;</text:span> i<text:span text:style-name="T23">++)</text:span> <text:span text:style-name="T23">{</text:span></text:p>
      <text:p text:style-name="P29"><text:tab/><text:tab/>result <text:span text:style-name="T23">=</text:span> <text:span text:style-name="T23">~(</text:span>result <text:span text:style-name="T23">|</text:span> <text:span text:style-name="T22">matrix</text:span><text:span text:style-name="T23">[</text:span>i <text:span text:style-name="T23">*</text:span> cols <text:span text:style-name="T23">+</text:span> col<text:span text:style-name="T23">]);</text:span><text:span text:style-name="T35"> </text:span><text:span text:style-name="T36">// Стрелка Пирса для всех элементов столбца</text:span></text:p>
      <text:p text:style-name="P33"><text:tab/>}</text:p>
      <text:p text:style-name="P29"><text:span text:style-name="T32"><text:tab/>return</text:span> result<text:span text:style-name="T23">;</text:span></text:p>
      <text:p text:style-name="P33">}</text:p>
      <text:p text:style-name="P30"/>
      <text:p text:style-name="P32">// Циклический сдвиг столбца</text:p>
      <text:p text:style-name="P29"><text:span text:style-name="T22">void</text:span> <text:span text:style-name="T24">cyclic_shift_column</text:span><text:span text:style-name="T23">(</text:span><text:span text:style-name="T22">uint32_t</text:span> <text:span text:style-name="T23">*</text:span><text:span text:style-name="T22">matrix</text:span><text:span text:style-name="T23">,</text:span> <text:span text:style-name="T22">int</text:span> <text:span text:style-name="T22">rows</text:span><text:span text:style-name="T23">,</text:span> <text:span text:style-name="T22">int</text:span> <text:span text:style-name="T22">cols</text:span><text:span text:style-name="T23">,</text:span> <text:span text:style-name="T22">int</text:span> <text:span text:style-name="T22">col</text:span><text:span text:style-name="T23">,</text:span> <text:span text:style-name="T22">int</text:span> <text:span text:style-name="T22">shift</text:span><text:span text:style-name="T23">)</text:span> <text:span text:style-name="T23">{</text:span></text:p>
      <text:p text:style-name="P29"><text:tab/>shift <text:span text:style-name="T23">=</text:span> shift <text:span text:style-name="T23">%</text:span> rows<text:span text:style-name="T23">;</text:span></text:p>
      <text:p text:style-name="P29"><text:span text:style-name="T22"><text:tab/>uint32_t</text:span> <text:span text:style-name="T22">temp</text:span><text:span text:style-name="T23">[</text:span>rows<text:span text:style-name="T23">];</text:span></text:p>
      <text:p text:style-name="P29"><text:span text:style-name="T32"><text:tab/>for</text:span> <text:span text:style-name="T23">(</text:span><text:span text:style-name="T22">int</text:span> i <text:span text:style-name="T23">=</text:span> <text:span text:style-name="T34">0</text:span><text:span text:style-name="T23">;</text:span> i <text:span text:style-name="T23">&lt;</text:span> rows<text:span text:style-name="T23">;</text:span> i<text:span text:style-name="T23">++)</text:span> <text:span text:style-name="T23">{</text:span></text:p>
      <text:p text:style-name="P29"><text:span text:style-name="T22"><text:tab/><text:tab/>temp</text:span><text:span text:style-name="T23">[</text:span>i<text:span text:style-name="T23">]</text:span> <text:span text:style-name="T23">=</text:span> <text:span text:style-name="T22">matrix</text:span><text:span text:style-name="T23">[</text:span>i <text:span text:style-name="T23">*</text:span> cols <text:span text:style-name="T23">+</text:span> col<text:span text:style-name="T23">];</text:span></text:p>
      <text:p text:style-name="P33"><text:tab/>}</text:p>
      <text:p text:style-name="P29"><text:span text:style-name="T32"><text:tab/>for</text:span> <text:span text:style-name="T23">(</text:span><text:span text:style-name="T22">int</text:span> i <text:span text:style-name="T23">=</text:span> <text:span text:style-name="T34">0</text:span><text:span text:style-name="T23">;</text:span> i <text:span text:style-name="T23">&lt;</text:span> rows<text:span text:style-name="T23">;</text:span> i<text:span text:style-name="T23">++)</text:span> <text:span text:style-name="T23">{</text:span></text:p>
      <text:p text:style-name="P29"><text:span text:style-name="T22"><text:tab/><text:tab/>matrix</text:span><text:span text:style-name="T23">[</text:span>i <text:span text:style-name="T23">*</text:span> cols <text:span text:style-name="T23">+</text:span> col<text:span text:style-name="T23">]</text:span> <text:span text:style-name="T23">=</text:span> <text:span text:style-name="T22">temp</text:span><text:span text:style-name="T23">[(</text:span>i <text:span text:style-name="T23">+</text:span> shift<text:span text:style-name="T23">)</text:span> <text:span text:style-name="T23">%</text:span> rows<text:span text:style-name="T23">];</text:span></text:p>
      <text:p text:style-name="P33"><text:tab/>}</text:p>
      <text:p text:style-name="P33">}</text:p>
      <text:p text:style-name="P30"/>
      <text:p text:style-name="P29"><text:span text:style-name="T22">int</text:span> <text:span text:style-name="T24">main</text:span><text:span text:style-name="T23">(</text:span><text:span text:style-name="T22">int</text:span> <text:span text:style-name="T22">argc</text:span><text:span text:style-name="T23">,</text:span> <text:span text:style-name="T22">char</text:span> <text:span text:style-name="T23">*</text:span><text:span text:style-name="T22">argv</text:span><text:span text:style-name="T32">[]</text:span><text:span text:style-name="T23">)</text:span> <text:span text:style-name="T23">{</text:span></text:p>
      <text:p text:style-name="P32"><text:soft-page-break/><text:tab/>// Проверка запуска с переменной среды, включающей отладочный вывод.</text:p>
      <text:p text:style-name="P32"><text:tab/>// Пример запуска с установкой переменной LAB2DEBUG в 1:</text:p>
      <text:p text:style-name="P32"><text:tab/>// $ LAB2DEBUG=1 ./prg2abcNXXXXX 5 5</text:p>
      <text:p text:style-name="P29"><text:span text:style-name="T22"><text:tab/>char</text:span> <text:span text:style-name="T23">*</text:span>DEBUG <text:span text:style-name="T23">=</text:span> <text:span text:style-name="T24">getenv</text:span><text:span text:style-name="T23">("</text:span><text:span text:style-name="T33">LAB2DEBUG</text:span><text:span text:style-name="T23">");</text:span></text:p>
      <text:p text:style-name="P29"><text:span text:style-name="T32"><text:tab/>if</text:span> <text:span text:style-name="T23">(</text:span>DEBUG<text:span text:style-name="T23">)</text:span> <text:span text:style-name="T23">{</text:span></text:p>
      <text:p text:style-name="P29"><text:span text:style-name="T24"><text:tab/><text:tab/>fprintf</text:span><text:span text:style-name="T23">(</text:span>stderr<text:span text:style-name="T23">,</text:span> <text:span text:style-name="T23">"</text:span><text:span text:style-name="T33">Включен вывод отладочных сообщений</text:span><text:span text:style-name="T23">\n");</text:span></text:p>
      <text:p text:style-name="P33"><text:tab/>}</text:p>
      <text:p text:style-name="P30"/>
      <text:p text:style-name="P29"><text:span text:style-name="T22"><text:tab/>int</text:span> manual_input <text:span text:style-name="T23">=</text:span> <text:span text:style-name="T34">0</text:span><text:span text:style-name="T23">;</text:span></text:p>
      <text:p text:style-name="P29"><text:span text:style-name="T22"><text:tab/>int</text:span> arg_index <text:span text:style-name="T23">=</text:span> <text:span text:style-name="T34">1</text:span><text:span text:style-name="T23">;</text:span></text:p>
      <text:p text:style-name="P29"><text:span text:style-name="T22"><text:tab/>char</text:span> <text:span text:style-name="T23">*</text:span>endptr<text:span text:style-name="T23">;</text:span></text:p>
      <text:p text:style-name="P30"/>
      <text:p text:style-name="P29"><text:span text:style-name="T32"><text:tab/>if</text:span> <text:span text:style-name="T23">((</text:span>argc <text:span text:style-name="T23">&lt;</text:span> <text:span text:style-name="T34">3</text:span><text:span text:style-name="T23">)</text:span> <text:span text:style-name="T23">||</text:span> <text:span text:style-name="T23">(</text:span>argc <text:span text:style-name="T23">&gt;</text:span> <text:span text:style-name="T34">4</text:span><text:span text:style-name="T23">))</text:span> <text:span text:style-name="T23">{</text:span></text:p>
      <text:p text:style-name="P29"><text:span text:style-name="T24"><text:tab/><text:tab/>fprintf</text:span><text:span text:style-name="T23">(</text:span>stderr<text:span text:style-name="T23">,</text:span> <text:span text:style-name="T23">"</text:span><text:span text:style-name="T33">Usage: </text:span><text:span text:style-name="T34">%s</text:span><text:span text:style-name="T33"> [-m] число_строк число_столбцов</text:span><text:span text:style-name="T23">\n",</text:span> <text:span text:style-name="T22">argv</text:span><text:span text:style-name="T23">[</text:span><text:span text:style-name="T34">0</text:span><text:span text:style-name="T23">]);</text:span></text:p>
      <text:p text:style-name="P29"><text:span text:style-name="T32"><text:tab/>return</text:span> EXIT_FAILURE<text:span text:style-name="T23">;</text:span></text:p>
      <text:p text:style-name="P33"><text:tab/>}</text:p>
      <text:p text:style-name="P29"><text:span text:style-name="T32"><text:tab/>if</text:span> <text:span text:style-name="T23">(</text:span>argc <text:span text:style-name="T23">==</text:span> <text:span text:style-name="T34">4</text:span><text:span text:style-name="T23">)</text:span> <text:span text:style-name="T23">{</text:span></text:p>
      <text:p text:style-name="P29"><text:span text:style-name="T32"><text:tab/><text:tab/>if</text:span> <text:span text:style-name="T23">(</text:span><text:span text:style-name="T24">strcmp</text:span><text:span text:style-name="T23">(</text:span><text:span text:style-name="T22">argv</text:span><text:span text:style-name="T23">[</text:span><text:span text:style-name="T34">1</text:span><text:span text:style-name="T23">],</text:span> <text:span text:style-name="T23">"</text:span><text:span text:style-name="T33">-m</text:span><text:span text:style-name="T23">")</text:span> <text:span text:style-name="T23">==</text:span> <text:span text:style-name="T34">0</text:span><text:span text:style-name="T23">)</text:span> <text:span text:style-name="T23">{</text:span></text:p>
      <text:p text:style-name="P29"><text:tab/><text:tab/><text:tab/>manual_input <text:span text:style-name="T23">=</text:span> <text:span text:style-name="T34">1</text:span><text:span text:style-name="T23">;</text:span></text:p>
      <text:p text:style-name="P29"><text:tab/><text:tab/><text:tab/>arg_index<text:span text:style-name="T23">++;</text:span></text:p>
      <text:p text:style-name="P29"><text:span text:style-name="T23"><text:tab/><text:tab/>}</text:span> <text:span text:style-name="T32">else</text:span> <text:span text:style-name="T23">{</text:span></text:p>
      <text:p text:style-name="P29"><text:span text:style-name="T24"><text:tab/><text:tab/><text:tab/>fprintf</text:span><text:span text:style-name="T23">(</text:span>stderr<text:span text:style-name="T23">,</text:span> <text:span text:style-name="T23">"</text:span><text:span text:style-name="T33">Ошибка: опция '</text:span><text:span text:style-name="T34">%s</text:span><text:span text:style-name="T33">' не поддерживается.</text:span><text:span text:style-name="T23">\n",</text:span> <text:span text:style-name="T22">argv</text:span><text:span text:style-name="T23">[</text:span><text:span text:style-name="T34">1</text:span><text:span text:style-name="T23">]);</text:span></text:p>
      <text:p text:style-name="P29"><text:span text:style-name="T32"><text:tab/><text:tab/><text:tab/>return</text:span> EXIT_FAILURE<text:span text:style-name="T23">;</text:span></text:p>
      <text:p text:style-name="P33"><text:tab/><text:tab/>}</text:p>
      <text:p text:style-name="P33"><text:tab/>}</text:p>
      <text:p text:style-name="P29"><text:span text:style-name="T32"><text:tab/>if</text:span> <text:span text:style-name="T23">(</text:span>argc <text:span text:style-name="T23">-</text:span> arg_index <text:span text:style-name="T23">&lt;</text:span> <text:span text:style-name="T34">2</text:span><text:span text:style-name="T23">)</text:span> <text:span text:style-name="T23">{</text:span></text:p>
      <text:p text:style-name="P29"><text:span text:style-name="T24"><text:tab/><text:tab/>fprintf</text:span><text:span text:style-name="T23">(</text:span>stderr<text:span text:style-name="T23">,</text:span> <text:span text:style-name="T23">"</text:span><text:span text:style-name="T33">Usage: </text:span><text:span text:style-name="T34">%s</text:span><text:span text:style-name="T33"> [-m] число_строк число_столбцов</text:span><text:span text:style-name="T23">\n",</text:span> <text:span text:style-name="T22">argv</text:span><text:span text:style-name="T23">[</text:span><text:span text:style-name="T34">0</text:span><text:span text:style-name="T23">]);</text:span></text:p>
      <text:p text:style-name="P29"><text:span text:style-name="T32"><text:tab/><text:tab/>return</text:span> EXIT_FAILURE<text:span text:style-name="T23">;</text:span></text:p>
      <text:p text:style-name="P33"><text:tab/>}</text:p>
      <text:p text:style-name="P29"><text:span text:style-name="T32"><text:tab/>if</text:span> <text:span text:style-name="T23">(!</text:span><text:span text:style-name="T24">check_number</text:span><text:span text:style-name="T23">(</text:span><text:span text:style-name="T22">argv</text:span><text:span text:style-name="T23">[</text:span>arg_index<text:span text:style-name="T23">]))</text:span> <text:span text:style-name="T23">{</text:span></text:p>
      <text:p text:style-name="P29"><text:span text:style-name="T24"><text:tab/><text:tab/>fprintf</text:span><text:span text:style-name="T23">(</text:span>stderr<text:span text:style-name="T23">,</text:span> <text:span text:style-name="T23">"</text:span><text:span text:style-name="T33">Ошибка: '</text:span><text:span text:style-name="T34">%s</text:span><text:span text:style-name="T33">' не является целым числом.</text:span><text:span text:style-name="T23">\n",</text:span> <text:span text:style-name="T22">argv</text:span><text:span text:style-name="T23">[</text:span>arg_index<text:span text:style-name="T23">]);</text:span></text:p>
      <text:p text:style-name="P29"><text:span text:style-name="T32"><text:tab/><text:tab/>return</text:span> EXIT_FAILURE<text:span text:style-name="T23">;</text:span></text:p>
      <text:p text:style-name="P33"><text:tab/>}</text:p>
      <text:p text:style-name="P29"><text:span text:style-name="T32"><text:tab/>if</text:span> <text:span text:style-name="T23">(!</text:span><text:span text:style-name="T24">check_number</text:span><text:span text:style-name="T23">(</text:span><text:span text:style-name="T22">argv</text:span><text:span text:style-name="T23">[</text:span>arg_index <text:span text:style-name="T23">+</text:span> <text:span text:style-name="T34">1</text:span><text:span text:style-name="T23">]))</text:span> <text:span text:style-name="T23">{</text:span></text:p>
      <text:p text:style-name="P29"><text:span text:style-name="T24"><text:tab/><text:tab/>fprintf</text:span><text:span text:style-name="T23">(</text:span>stderr<text:span text:style-name="T23">,</text:span> <text:span text:style-name="T23">"</text:span><text:span text:style-name="T33">Ошибка: '</text:span><text:span text:style-name="T34">%s</text:span><text:span text:style-name="T33">' не является целым числом.</text:span><text:span text:style-name="T23">\n",</text:span> <text:span text:style-name="T22">argv</text:span><text:span text:style-name="T23">[</text:span>arg_index <text:span text:style-name="T23">+</text:span> <text:span text:style-name="T34">1</text:span><text:span text:style-name="T23">]);</text:span></text:p>
      <text:p text:style-name="P29"><text:span text:style-name="T32"><text:tab/>return</text:span> EXIT_FAILURE<text:span text:style-name="T23">;</text:span></text:p>
      <text:p text:style-name="P33"><text:tab/>}</text:p>
      <text:p text:style-name="P30"/>
      <text:p text:style-name="P29"><text:span text:style-name="T22"><text:tab/>int</text:span> rows <text:span text:style-name="T23">=</text:span> <text:span text:style-name="T24">strtol</text:span><text:span text:style-name="T23">(</text:span><text:span text:style-name="T22">argv</text:span><text:span text:style-name="T23">[</text:span>arg_index<text:span text:style-name="T23">],</text:span> <text:span text:style-name="T23">&amp;</text:span>endptr<text:span text:style-name="T23">,</text:span> <text:span text:style-name="T34">10</text:span><text:span text:style-name="T23">);</text:span></text:p>
      <text:p text:style-name="P29"><text:span text:style-name="T22"><text:tab/>int</text:span> cols <text:span text:style-name="T23">=</text:span> <text:span text:style-name="T24">strtol</text:span><text:span text:style-name="T23">(</text:span><text:span text:style-name="T22">argv</text:span><text:span text:style-name="T23">[</text:span>arg_index <text:span text:style-name="T23">+</text:span> <text:span text:style-name="T34">1</text:span><text:span text:style-name="T23">],</text:span> <text:span text:style-name="T23">&amp;</text:span>endptr<text:span text:style-name="T23">,</text:span> <text:span text:style-name="T34">10</text:span><text:span text:style-name="T23">);</text:span></text:p>
      <text:p text:style-name="P31"/>
      <text:p text:style-name="P29"><text:span text:style-name="T32"><text:tab/>if</text:span> <text:span text:style-name="T23">(</text:span>rows <text:span text:style-name="T23">&lt;=</text:span> <text:span text:style-name="T34">0</text:span> <text:span text:style-name="T23">||</text:span> cols <text:span text:style-name="T23">&lt;=</text:span> <text:span text:style-name="T34">0</text:span><text:span text:style-name="T23">)</text:span> <text:span text:style-name="T23">{</text:span></text:p>
      <text:p text:style-name="P29"><text:span text:style-name="T24"><text:tab/><text:tab/>fprintf</text:span><text:span text:style-name="T23">(</text:span>stderr<text:span text:style-name="T23">,</text:span> <text:span text:style-name="T23">"</text:span><text:span text:style-name="T33">Ошибка: аргументы должны быть положительными числами.</text:span><text:span text:style-name="T23">\n");</text:span></text:p>
      <text:p text:style-name="P29"><text:span text:style-name="T32"><text:tab/>return</text:span> EXIT_FAILURE<text:span text:style-name="T23">;</text:span></text:p>
      <text:p text:style-name="P33"><text:tab/>}</text:p>
      <text:p text:style-name="P30"/>
      <text:p text:style-name="P29"><text:span text:style-name="T22"><text:tab/>uint32_t</text:span> <text:span text:style-name="T22">matrix</text:span><text:span text:style-name="T23">[</text:span>rows <text:span text:style-name="T23">*</text:span> cols<text:span text:style-name="T23">];</text:span></text:p>
      <text:p text:style-name="P29"><text:span text:style-name="T24"><text:tab/>srand</text:span><text:span text:style-name="T23">(</text:span><text:span text:style-name="T24">time</text:span><text:span text:style-name="T23">(</text:span><text:span text:style-name="T34">NULL</text:span><text:span text:style-name="T23">)</text:span> <text:span text:style-name="T23">+</text:span> <text:span text:style-name="T24">getpid</text:span><text:span text:style-name="T23">());</text:span></text:p>
      <text:p text:style-name="P30"/>
      <text:p text:style-name="P29"><text:span text:style-name="T32"><text:tab/>if</text:span> <text:span text:style-name="T23">(</text:span>manual_input<text:span text:style-name="T23">)</text:span> <text:span text:style-name="T23">{</text:span><text:span text:style-name="T35"> </text:span><text:span text:style-name="T36">// Если -m передан, то матрицу вводим вручную</text:span></text:p>
      <text:p text:style-name="P29"><text:soft-page-break/><text:span text:style-name="T24"><text:tab/><text:tab/>printf</text:span><text:span text:style-name="T23">("</text:span><text:span text:style-name="T33">Введите строки матрицы:</text:span><text:span text:style-name="T23">\n");</text:span></text:p>
      <text:p text:style-name="P29"><text:span text:style-name="T32"><text:tab/><text:tab/>for</text:span> <text:span text:style-name="T23">(</text:span><text:span text:style-name="T22">int</text:span> i <text:span text:style-name="T23">=</text:span> <text:span text:style-name="T34">0</text:span><text:span text:style-name="T23">;</text:span> i <text:span text:style-name="T23">&lt;</text:span> rows<text:span text:style-name="T23">;</text:span> i<text:span text:style-name="T23">++)</text:span> <text:span text:style-name="T23">{</text:span></text:p>
      <text:p text:style-name="P29"><text:span text:style-name="T32"><text:tab/><text:tab/><text:tab/>for</text:span> <text:span text:style-name="T23">(</text:span><text:span text:style-name="T22">int</text:span> j <text:span text:style-name="T23">=</text:span> <text:span text:style-name="T34">0</text:span><text:span text:style-name="T23">;</text:span> j <text:span text:style-name="T23">&lt;</text:span> cols<text:span text:style-name="T23">;</text:span> j<text:span text:style-name="T23">++)</text:span> <text:span text:style-name="T23">{</text:span></text:p>
      <text:p text:style-name="P29"><text:span text:style-name="T32"><text:tab/><text:tab/><text:tab/><text:tab/>if</text:span> <text:span text:style-name="T23">(!</text:span><text:span text:style-name="T24">scanf</text:span><text:span text:style-name="T23">("</text:span><text:span text:style-name="T34">%u</text:span><text:span text:style-name="T23">",</text:span> <text:span text:style-name="T23">&amp;</text:span><text:span text:style-name="T22">matrix</text:span><text:span text:style-name="T23">[</text:span>i <text:span text:style-name="T23">*</text:span> cols <text:span text:style-name="T23">+</text:span> j<text:span text:style-name="T23">]))</text:span> <text:span text:style-name="T23">{</text:span></text:p>
      <text:p text:style-name="P29"><text:span text:style-name="T24"><text:tab/><text:tab/><text:tab/><text:tab/><text:tab/>fprintf</text:span><text:span text:style-name="T23">(</text:span>stderr<text:span text:style-name="T23">,</text:span> <text:span text:style-name="T23">"</text:span><text:span text:style-name="T33">Ошибка: введенное значение не является целым положительным числом.</text:span><text:span text:style-name="T23">\n");</text:span></text:p>
      <text:p text:style-name="P29"><text:span text:style-name="T32"><text:tab/><text:tab/><text:tab/><text:tab/><text:tab/>return</text:span> EXIT_FAILURE<text:span text:style-name="T23">;</text:span></text:p>
      <text:p text:style-name="P33"><text:tab/><text:tab/><text:tab/><text:tab/>}</text:p>
      <text:p text:style-name="P33"><text:tab/><text:tab/><text:tab/>}</text:p>
      <text:p text:style-name="P33"><text:tab/><text:tab/>}</text:p>
      <text:p text:style-name="P29"><text:span text:style-name="T23"><text:tab/>}</text:span> <text:span text:style-name="T32">else</text:span> <text:span text:style-name="T23">{</text:span><text:span text:style-name="T35"> </text:span><text:span text:style-name="T36">// Если -m не передан, то генерируем случайные числа</text:span></text:p>
      <text:p text:style-name="P29"><text:span text:style-name="T32"><text:tab/><text:tab/>for</text:span> <text:span text:style-name="T23">(</text:span><text:span text:style-name="T22">int</text:span> i <text:span text:style-name="T23">=</text:span> <text:span text:style-name="T34">0</text:span><text:span text:style-name="T23">;</text:span> i <text:span text:style-name="T23">&lt;</text:span> rows<text:span text:style-name="T23">;</text:span> i<text:span text:style-name="T23">++)</text:span> <text:span text:style-name="T23">{</text:span></text:p>
      <text:p text:style-name="P29"><text:span text:style-name="T32"><text:tab/><text:tab/><text:tab/>for</text:span> <text:span text:style-name="T23">(</text:span><text:span text:style-name="T22">int</text:span> j <text:span text:style-name="T23">=</text:span> <text:span text:style-name="T34">0</text:span><text:span text:style-name="T23">;</text:span> j <text:span text:style-name="T23">&lt;</text:span> cols<text:span text:style-name="T23">;</text:span> j<text:span text:style-name="T23">++)</text:span> <text:span text:style-name="T23">{</text:span></text:p>
      <text:p text:style-name="P29"><text:span text:style-name="T22"><text:tab/><text:tab/><text:tab/><text:tab/>matrix</text:span><text:span text:style-name="T23">[</text:span>i <text:span text:style-name="T23">*</text:span> cols <text:span text:style-name="T23">+</text:span> j<text:span text:style-name="T23">]</text:span> <text:span text:style-name="T23">=</text:span> <text:span text:style-name="T24">rand</text:span><text:span text:style-name="T23">()</text:span> <text:span text:style-name="T23">%</text:span> UINT32_MAX<text:span text:style-name="T23">;</text:span><text:span text:style-name="T35"> </text:span><text:span text:style-name="T36">// Заполнение случайными числами от 0 до </text:span></text:p>
      <text:p text:style-name="P33"><text:tab/><text:tab/><text:tab/>}</text:p>
      <text:p text:style-name="P33"><text:tab/><text:tab/>}</text:p>
      <text:p text:style-name="P33"><text:tab/>}</text:p>
      <text:p text:style-name="P30"/>
      <text:p text:style-name="P29"><text:span text:style-name="T24"><text:tab/>printf</text:span><text:span text:style-name="T23">("</text:span><text:span text:style-name="T33">Исходная матрица:</text:span><text:span text:style-name="T23">\n");</text:span></text:p>
      <text:p text:style-name="P29"><text:span text:style-name="T24"><text:tab/>print_matrix</text:span><text:span text:style-name="T23">(</text:span>matrix<text:span text:style-name="T23">,</text:span> rows<text:span text:style-name="T23">,</text:span> cols<text:span text:style-name="T23">);</text:span></text:p>
      <text:p text:style-name="P32"><text:tab/>// Транспонируем матрицу, чтобы массив состоял из столбцов</text:p>
      <text:p text:style-name="P29"><text:span text:style-name="T22"><text:tab/>uint32_t</text:span> <text:span text:style-name="T22">trans_matrix</text:span><text:span text:style-name="T23">[</text:span>rows <text:span text:style-name="T23">*</text:span> cols<text:span text:style-name="T23">];</text:span></text:p>
      <text:p text:style-name="P29"><text:span text:style-name="T32"><text:tab/>for</text:span> <text:span text:style-name="T23">(</text:span><text:span text:style-name="T22">int</text:span> i <text:span text:style-name="T23">=</text:span> <text:span text:style-name="T34">0</text:span><text:span text:style-name="T23">;</text:span> i <text:span text:style-name="T23">&lt;</text:span> rows<text:span text:style-name="T23">;</text:span> i<text:span text:style-name="T23">++)</text:span> <text:span text:style-name="T23">{</text:span></text:p>
      <text:p text:style-name="P29"><text:span text:style-name="T32"><text:tab/><text:tab/>for</text:span> <text:span text:style-name="T23">(</text:span><text:span text:style-name="T22">int</text:span> j <text:span text:style-name="T23">=</text:span> <text:span text:style-name="T34">0</text:span><text:span text:style-name="T23">;</text:span> j <text:span text:style-name="T23">&lt;</text:span> cols<text:span text:style-name="T23">;</text:span> j<text:span text:style-name="T23">++)</text:span> <text:span text:style-name="T23">{</text:span></text:p>
      <text:p text:style-name="P29"><text:span text:style-name="T22"><text:tab/><text:tab/><text:tab/>trans_matrix</text:span><text:span text:style-name="T23">[</text:span>j <text:span text:style-name="T23">*</text:span> rows <text:span text:style-name="T23">+</text:span> i<text:span text:style-name="T23">]</text:span> <text:span text:style-name="T23">=</text:span> <text:span text:style-name="T22">matrix</text:span><text:span text:style-name="T23">[</text:span>i <text:span text:style-name="T23">*</text:span> cols <text:span text:style-name="T23">+</text:span> j<text:span text:style-name="T23">];</text:span></text:p>
      <text:p text:style-name="P33"><text:tab/><text:tab/>}</text:p>
      <text:p text:style-name="P33"><text:tab/>}</text:p>
      <text:p text:style-name="P32">// Считаем характеристику для каждого столбца и сдвигаем столбцы</text:p>
      <text:p text:style-name="P29"><text:span text:style-name="T32"><text:tab/>for</text:span> <text:span text:style-name="T23">(</text:span><text:span text:style-name="T22">int</text:span> j <text:span text:style-name="T23">=</text:span> <text:span text:style-name="T34">0</text:span><text:span text:style-name="T23">;</text:span> j <text:span text:style-name="T23">&lt;</text:span> cols<text:span text:style-name="T23">;</text:span> j<text:span text:style-name="T23">++)</text:span> <text:span text:style-name="T23">{</text:span></text:p>
      <text:p text:style-name="P29"><text:span text:style-name="T22"><text:tab/><text:tab/>uint32_t</text:span> characteristic <text:span text:style-name="T23">=</text:span> <text:span text:style-name="T24">column_characteristic</text:span><text:span text:style-name="T23">(</text:span>trans_matrix<text:span text:style-name="T23">,</text:span> rows<text:span text:style-name="T23">,</text:span> cols<text:span text:style-name="T23">,</text:span> j<text:span text:style-name="T23">);</text:span></text:p>
      <text:p text:style-name="P29"><text:span text:style-name="T22"><text:tab/><text:tab/>int</text:span> shift <text:span text:style-name="T23">=</text:span> <text:span text:style-name="T23">(</text:span>characteristic <text:span text:style-name="T23">&gt;&gt;</text:span> <text:span text:style-name="T23">(sizeof(</text:span><text:span text:style-name="T22">uint32_t</text:span><text:span text:style-name="T23">)</text:span> <text:span text:style-name="T23">-</text:span> <text:span text:style-name="T34">1</text:span><text:span text:style-name="T23">)*</text:span><text:span text:style-name="T34">8</text:span><text:span text:style-name="T23">)</text:span> <text:span text:style-name="T23">&amp;</text:span> <text:span text:style-name="T32">0x</text:span><text:span text:style-name="T34">FF</text:span><text:span text:style-name="T23">;</text:span><text:span text:style-name="T35"> </text:span><text:span text:style-name="T36">// Считаем единицы в старшем байте</text:span></text:p>
      <text:p text:style-name="P29"><text:span text:style-name="T24"><text:tab/><text:tab/>cyclic_shift_column</text:span><text:span text:style-name="T23">(</text:span>trans_matrix<text:span text:style-name="T23">,</text:span> rows<text:span text:style-name="T23">,</text:span> cols<text:span text:style-name="T23">,</text:span> j<text:span text:style-name="T23">,</text:span> shift<text:span text:style-name="T23">);</text:span></text:p>
      <text:p text:style-name="P33"><text:tab/>}</text:p>
      <text:p text:style-name="P30"/>
      <text:p text:style-name="P32"><text:tab/>// Полученную матрицу опять транспонируем для вывода ответа</text:p>
      <text:p text:style-name="P29"><text:span text:style-name="T22"><text:tab/>uint32_t</text:span> <text:span text:style-name="T22">res_matrix</text:span><text:span text:style-name="T23">[</text:span>rows <text:span text:style-name="T23">*</text:span> cols<text:span text:style-name="T23">];</text:span></text:p>
      <text:p text:style-name="P29"><text:span text:style-name="T32"><text:tab/>for</text:span> <text:span text:style-name="T23">(</text:span><text:span text:style-name="T22">int</text:span> i <text:span text:style-name="T23">=</text:span> <text:span text:style-name="T34">0</text:span><text:span text:style-name="T23">;</text:span> i <text:span text:style-name="T23">&lt;</text:span> rows<text:span text:style-name="T23">;</text:span> i<text:span text:style-name="T23">++)</text:span> <text:span text:style-name="T23">{</text:span></text:p>
      <text:p text:style-name="P29"><text:span text:style-name="T32"><text:tab/><text:tab/>for</text:span> <text:span text:style-name="T23">(</text:span><text:span text:style-name="T22">int</text:span> j <text:span text:style-name="T23">=</text:span> <text:span text:style-name="T34">0</text:span><text:span text:style-name="T23">;</text:span> j <text:span text:style-name="T23">&lt;</text:span> cols<text:span text:style-name="T23">;</text:span> j<text:span text:style-name="T23">++)</text:span> <text:span text:style-name="T23">{</text:span></text:p>
      <text:p text:style-name="P29"><text:span text:style-name="T22"><text:tab/><text:tab/><text:tab/>res_matrix</text:span><text:span text:style-name="T23">[</text:span>j <text:span text:style-name="T23">*</text:span> rows <text:span text:style-name="T23">+</text:span> i<text:span text:style-name="T23">]</text:span> <text:span text:style-name="T23">=</text:span> <text:span text:style-name="T22">trans_matrix</text:span><text:span text:style-name="T23">[</text:span>i <text:span text:style-name="T23">*</text:span> cols <text:span text:style-name="T23">+</text:span> j<text:span text:style-name="T23">];</text:span></text:p>
      <text:p text:style-name="P33"><text:tab/><text:tab/>}</text:p>
      <text:p text:style-name="P33"><text:tab/>}</text:p>
      <text:p text:style-name="P29"><text:span text:style-name="T24"><text:tab/>printf</text:span><text:span text:style-name="T23">("</text:span><text:span text:style-name="T33">Результат:</text:span><text:span text:style-name="T23">\n");</text:span></text:p>
      <text:p text:style-name="P29"><text:span text:style-name="T24"><text:tab/>print_m<text:tab/>atrix</text:span><text:span text:style-name="T23">(</text:span>res_matrix<text:span text:style-name="T23">,</text:span> cols<text:span text:style-name="T23">,</text:span> rows<text:span text:style-name="T23">);</text:span></text:p>
      <text:p text:style-name="P30"/>
      <text:p text:style-name="P29"><text:span text:style-name="T32"><text:tab/>return</text:span> EXIT_SUCCESS<text:span text:style-name="T23">;</text:span></text:p>
      <text:p text:style-name="P3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63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>
        <style:tab-stops/>
      </style:paragraph-properties>
      <style:text-properties style:font-name="Times New Roman3" fo:font-family="'Times New Roman'" style:font-style-name="Жирный" style:font-family-generic="roman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y</meta:initial-creator>
    <meta:editing-cycles>21</meta:editing-cycles>
    <meta:creation-date>2021-10-17T09:09:00</meta:creation-date>
    <dc:date>2024-12-04T23:09:39.147077060</dc:date>
    <meta:editing-duration>PT2H19M53S</meta:editing-duration>
    <meta:generator>LibreOffice/24.8.1.2$Linux_X86_64 LibreOffice_project/480$Build-2</meta:generator>
    <meta:document-statistic meta:table-count="0" meta:image-count="4" meta:object-count="0" meta:page-count="7" meta:paragraph-count="166" meta:word-count="834" meta:character-count="5529" meta:non-whitespace-character-count="4682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