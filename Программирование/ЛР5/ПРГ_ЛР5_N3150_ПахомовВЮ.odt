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F000003B5D8F5C14E.png" manifest:media-type="image/png"/>
  <manifest:file-entry manifest:full-path="Pictures/100000010000022100000100AD173D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 fo:text-align="center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Normal_20__28_Web_29_">
      <style:paragraph-properties fo:margin-left="3.747cm" fo:margin-top="0.494cm" fo:margin-bottom="0.494cm" style:contextual-spacing="false" fo:text-indent="2.498cm" style:auto-text-indent="false"/>
      <style:text-properties fo:background-color="transparen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2fd663" officeooo:paragraph-rsid="002fd663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end" style:justify-single-word="false"/>
    </style:style>
    <style:style style:name="P8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officeooo:rsid="00024d6c" officeooo:paragraph-rsid="00024d6c" fo:background-color="transparent" style:font-size-asian="14pt"/>
    </style:style>
    <style:style style:name="P9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style:font-size-asian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3.5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24d6c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weight="bold" officeooo:rsid="0004f2fb" officeooo:paragraph-rsid="0004f2fb" style:font-weight-asian="bold" style:font-weight-complex="bold"/>
    </style:style>
    <style:style style:name="P14" style:family="paragraph" style:parent-style-name="Normal_20__28_Web_29_" style:list-style-name="" style:master-page-name="">
      <style:paragraph-properties fo:margin-top="0.494cm" fo:margin-bottom="0.494cm" style:contextual-spacing="false" fo:text-align="center" style:justify-single-word="false" style:page-number="auto" fo:break-before="page"/>
      <style:text-properties fo:color="#000000" loext:opacity="100%" fo:font-size="12pt" fo:font-weight="bold" officeooo:rsid="0004f2fb" officeooo:paragraph-rsid="0004f2fb" style:font-size-asian="12pt" style:font-weight-asian="bold" style:font-size-complex="12pt" style:font-weight-complex="bold"/>
    </style:style>
    <style:style style:name="P15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2pt" fo:font-weight="normal" officeooo:rsid="002fd663" officeooo:paragraph-rsid="002fd663" style:font-size-asian="12pt" style:font-weight-asian="normal" style:font-size-complex="12pt" style:font-weight-complex="normal"/>
    </style:style>
    <style:style style:name="P16" style:family="paragraph" style:parent-style-name="Normal_20__28_Web_29_" style:list-style-name="">
      <style:paragraph-properties fo:margin-top="0.494cm" fo:margin-bottom="0.494cm" style:contextual-spacing="false" fo:text-align="center" style:justify-single-word="false" fo:break-before="page"/>
      <style:text-properties fo:color="#000000" loext:opacity="100%" fo:font-size="12pt" fo:font-weight="bold" officeooo:rsid="002fd663" officeooo:paragraph-rsid="002fd663" style:font-size-asian="12pt" style:font-weight-asian="bold" style:font-size-complex="12pt" style:font-weight-complex="bold"/>
    </style:style>
    <style:style style:name="P17" style:family="paragraph" style:parent-style-name="Normal_20__28_Web_29_" style:list-style-name="">
      <style:paragraph-properties fo:margin-top="0.494cm" fo:margin-bottom="0.494cm" style:contextual-spacing="false" fo:text-align="center" style:justify-single-word="false" fo:break-before="page"/>
      <style:text-properties fo:color="#000000" loext:opacity="100%" fo:font-size="12pt" fo:font-weight="bold" officeooo:rsid="0030d2a3" officeooo:paragraph-rsid="0030d2a3" style:font-size-asian="12pt" style:font-weight-asian="bold" style:font-size-complex="12pt" style:font-weight-complex="bold"/>
    </style:style>
    <style:style style:name="P18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2pt" fo:font-weight="normal" officeooo:rsid="0030d2a3" officeooo:paragraph-rsid="0030d2a3" style:font-size-asian="12pt" style:font-weight-asian="normal" style:font-size-complex="12pt" style:font-weight-complex="normal"/>
    </style:style>
    <style:style style:name="P19" style:family="paragraph" style:parent-style-name="Normal_20__28_Web_29_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Source Code Pro" fo:font-size="8.5pt" fo:font-weight="normal" officeooo:rsid="0030d2a3" officeooo:paragraph-rsid="0030d2a3" style:font-size-asian="8.5pt" style:font-weight-asian="normal" style:font-size-complex="8.5pt" style:font-weight-complex="normal"/>
    </style:style>
    <style:style style:name="P20" style:family="paragraph" style:parent-style-name="Normal_20__28_Web_29_">
      <style:paragraph-properties fo:margin-top="0.494cm" fo:margin-bottom="0.494cm" style:contextual-spacing="false" fo:text-align="justify" style:justify-single-word="false" fo:break-before="page"/>
      <style:text-properties fo:color="#000000" loext:opacity="100%" fo:font-size="12pt" fo:font-weight="normal" officeooo:rsid="0030d2a3" officeooo:paragraph-rsid="0030d2a3" style:font-size-asian="12pt" style:font-weight-asian="normal" style:font-size-complex="12pt" style:font-weight-complex="normal"/>
    </style:style>
    <style:style style:name="T1" style:family="text">
      <style:text-properties fo:color="#000000" loext:opacity="100%" fo:font-size="10pt" style:font-size-asian="10pt" style:font-size-complex="13.5pt"/>
    </style:style>
    <style:style style:name="T2" style:family="text">
      <style:text-properties fo:color="#000000" loext:opacity="100%" fo:font-size="16pt" fo:font-weight="bold" style:font-size-asian="16pt" style:font-weight-asian="bold" style:font-size-complex="14pt"/>
    </style:style>
    <style:style style:name="T3" style:family="text">
      <style:text-properties fo:color="#000000" loext:opacity="100%" fo:font-size="14pt" fo:font-weight="bold" style:font-size-asian="14pt" style:font-weight-asian="bold" style:font-size-complex="13.5pt"/>
    </style:style>
    <style:style style:name="T4" style:family="text">
      <style:text-properties fo:color="#000000" loext:opacity="100%" fo:font-size="14pt" style:font-size-asian="14pt" style:font-size-complex="13.5pt"/>
    </style:style>
    <style:style style:name="T5" style:family="text">
      <style:text-properties fo:color="#000000" loext:opacity="100%" fo:font-size="14pt" officeooo:rsid="00024d6c" style:font-size-asian="14pt" style:font-size-complex="13.5pt"/>
    </style:style>
    <style:style style:name="T6" style:family="text">
      <style:text-properties fo:color="#000000" loext:opacity="100%" fo:font-size="14pt" fo:font-weight="bold" officeooo:rsid="002a34ed" style:font-size-asian="14pt" style:font-weight-asian="bold" style:font-size-complex="13.5pt"/>
    </style:style>
    <style:style style:name="T7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8" style:family="text">
      <style:text-properties fo:color="#000000" loext:opacity="100%" fo:font-size="13.5pt" fo:font-weight="bold" officeooo:rsid="002fd663" style:font-size-asian="13.5pt" style:font-weight-asian="bold" style:font-size-complex="13.5pt"/>
    </style:style>
    <style:style style:name="T9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loext:opacity="100%" fo:font-size="13.5pt" style:font-size-asian="13.5pt" style:font-size-complex="13.5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fo:background-color="transparent" loext:char-shading-value="0" style:font-size-asian="14pt"/>
    </style:style>
    <style:style style:name="T14" style:family="text">
      <style:text-properties fo:font-size="14pt" fo:language="en" fo:country="US" officeooo:rsid="00024d6c" fo:background-color="transparent" loext:char-shading-value="0" style:font-size-asian="14pt"/>
    </style:style>
    <style:style style:name="T15" style:family="text">
      <style:text-properties fo:font-size="14pt" officeooo:rsid="002bf3ce" style:font-size-asian="14pt"/>
    </style:style>
    <style:style style:name="T16" style:family="text">
      <style:text-properties fo:font-size="14pt" officeooo:rsid="00024d6c" style:font-size-asian="14pt"/>
    </style:style>
    <style:style style:name="T17" style:family="text">
      <style:text-properties fo:color="#000000" loext:opacity="100%" fo:font-size="14pt" officeooo:rsid="002bf3ce" style:font-size-asian="14pt" style:font-size-complex="13.5pt"/>
    </style:style>
    <style:style style:name="T18" style:family="text">
      <style:text-properties officeooo:rsid="002fd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P2" loext:marker-style-name="T3"><text:span text:style-name="T3">Факультет безопасности информационных технологий</text:span></text:p>
      <text:p text:style-name="P2" loext:marker-style-name="T3"><text:span text:style-name="T3">Дисциплина: <text:tab/></text:span></text:p>
      <text:p text:style-name="P3"><text:span text:style-name="T4">«</text:span><text:span text:style-name="T5">Программирование</text:span><text:span text:style-name="T4">»</text:span></text:p>
      <text:p text:style-name="P2" loext:marker-style-name="T3"><text:span text:style-name="T3">ОТЧ</text:span><text:span text:style-name="T6">Ё</text:span><text:span text:style-name="T3">Т ПО ЛАБОРАТОРНОЙ РАБОТЕ </text:span><text:span text:style-name="T7">№</text:span><text:span text:style-name="T8">5</text:span></text:p>
      <text:p text:style-name="P4" loext:marker-style-name="T9"><text:span text:style-name="T9">Объектно-ориентированное программирование в Python</text:span></text:p>
      <text:p text:style-name="P5" loext:marker-style-name="T10"/>
      <text:p text:style-name="P5" loext:marker-style-name="T10"/>
      <text:p text:style-name="P5" loext:marker-style-name="T10"/>
      <text:p text:style-name="P6" loext:marker-style-name="T10"/>
      <text:p text:style-name="P7" loext:marker-style-name="T11"><text:span text:style-name="T11">Выполнил:</text:span></text:p>
      <text:p text:style-name="P7" loext:marker-style-name="T12"><text:span text:style-name="T12">Студент группы </text:span><text:span text:style-name="T13">N31</text:span><text:bookmark text:name="_GoBack"/><text:span text:style-name="T14">50</text:span></text:p>
      <text:p text:style-name="P8">Пахомов Владимир Юрьевич</text:p>
      <text:p text:style-name="P9" loext:marker-style-name="T12"><draw:frame draw:style-name="fr1" draw:name="Изображение1" text:anchor-type="char" svg:x="13.21cm" svg:y="-0.023cm" svg:width="3.344cm" svg:height="1.572cm" draw:z-index="0"><draw:image xlink:href="Pictures/100000010000022100000100AD173DF0.png" xlink:type="simple" xlink:show="embed" xlink:actuate="onLoad" draw:mime-type="image/png"/></draw:frame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>Проверил:</text:span></text:p>
      <text:p text:style-name="P7" loext:marker-style-name="T12"><text:span text:style-name="T15">Грозов </text:span><text:span text:style-name="T16">В</text:span><text:span text:style-name="T12">. </text:span><text:span text:style-name="T15">А.</text:span></text:p>
      <text:p text:style-name="P10"/>
      <text:p text:style-name="P10" loext:marker-style-name="T4"/>
      <text:p text:style-name="P10" loext:marker-style-name="T4"/>
      <text:p text:style-name="P2" loext:marker-style-name="T4"><text:span text:style-name="T4">Санкт-Петербург</text:span></text:p>
      <text:p text:style-name="P11"><text:span text:style-name="T4">202</text:span><text:span text:style-name="T17">5</text:span><text:span text:style-name="T4">г</text:span><text:bookmark text:name="_1_Введение"/><text:span text:style-name="T4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Contents_20_Heading"><text:soft-page-break/>Оглавление</text:p>
          </text:index-title>
          <text:p text:style-name="P12"><text:a xlink:type="simple" xlink:href="#__RefHeading___Toc35_4078790415" text:style-name="Index_20_Link" text:visited-style-name="Index_20_Link">Задание. Вариант 4-1<text:tab/>3</text:a></text:p>
          <text:p text:style-name="P12"><text:a xlink:type="simple" xlink:href="#__RefHeading___Toc1428_3890036197" text:style-name="Index_20_Link" text:visited-style-name="Index_20_Link">Пример работы программы при различных исходных данных<text:tab/>4</text:a></text:p>
          <text:p text:style-name="P12"><text:a xlink:type="simple" xlink:href="#__RefHeading___Toc1430_3890036197" text:style-name="Index_20_Link" text:visited-style-name="Index_20_Link">Исходный текст программы с комментариями<text:tab/>5</text:a></text:p>
        </text:index-body>
      </text:table-of-content>
      <text:p text:style-name="P13"><text:span text:style-name="T4"/></text:p>
      <text:h text:style-name="P14" text:outline-level="1"><text:bookmark-start text:name="__RefHeading___Toc35_4078790415"/>Задание. Вариант <text:span text:style-name="T18">4-1</text:span><text:bookmark-end text:name="__RefHeading___Toc35_4078790415"/></text:h>
      <text:p text:style-name="P15">Таблица 1:</text:p>
      <text:p text:style-name="P15">4 — dict (ограничение формата накладывается на ключи словаря)</text:p>
      <text:p text:style-name="P15">Таблица 2:</text:p>
      <text:p text:style-name="P15">1 — IPv4-адрес Десятичный формат с точками</text:p>
      <text:h text:style-name="P16" text:outline-level="1"><text:bookmark-start text:name="__RefHeading___Toc1428_3890036197"/>Пример работы программы при различных исходных данных<text:bookmark-end text:name="__RefHeading___Toc1428_3890036197"/></text:h>
      <text:p text:style-name="P15"><draw:frame draw:style-name="fr1" draw:name="Image1" text:anchor-type="char" svg:x="-1.466cm" svg:y="-0.146cm" svg:width="18.724cm" svg:height="20.978cm" draw:z-index="1"><draw:image xlink:href="Pictures/100000000000034F000003B5D8F5C14E.png" xlink:type="simple" xlink:show="embed" xlink:actuate="onLoad" draw:mime-type="image/png"/></draw:frame></text:p>
      <text:h text:style-name="P17" text:outline-level="1"><text:bookmark-start text:name="__RefHeading___Toc1430_3890036197"/>Исходный текст программы с комментариями<text:bookmark-end text:name="__RefHeading___Toc1430_3890036197"/></text:h>
      <text:p text:style-name="P18">Файл prg5vypN3150.py:</text:p>
      <text:p text:style-name="P19">class FormatError(Exception):</text:p>
      <text:p text:style-name="P19"><text:s text:c="4"/>def __init__(self, message='Неверный формат IPv4'):</text:p>
      <text:p text:style-name="P19"><text:s text:c="8"/>super().__init__(message)</text:p>
      <text:p text:style-name="P19"/>
      <text:p text:style-name="P19">class UndoError(Exception):</text:p>
      <text:p text:style-name="P19"><text:s text:c="4"/>def __init__(self, message='Невозможно выполнить undo'):</text:p>
      <text:p text:style-name="P19"><text:s text:c="8"/>super().__init__(message)</text:p>
      <text:p text:style-name="P19"/>
      <text:p text:style-name="P19">class RedoError(Exception):</text:p>
      <text:p text:style-name="P19"><text:s text:c="4"/>def __init__(self, message='Невозможно выполнить redo'):</text:p>
      <text:p text:style-name="P19"><text:s text:c="8"/>super().__init__(message)</text:p>
      <text:p text:style-name="P19"/>
      <text:p text:style-name="P19"/>
      <text:p text:style-name="P19"># Необходимо выбрать один из классов (см. Табл. 1 в задании)</text:p>
      <text:p text:style-name="P19"/>
      <text:p text:style-name="P19">#class MyList(list):</text:p>
      <text:p text:style-name="P19">#class MySet(set):</text:p>
      <text:p text:style-name="P19">#class MyDict(dict):</text:p>
      <text:p text:style-name="P19"/>
      <text:p text:style-name="P19"/>
      <text:p text:style-name="P19">class MyDict(dict):</text:p>
      <text:p text:style-name="P19"><text:s text:c="4"/># Тут ваш код</text:p>
      <text:p text:style-name="P19"/>
      <text:p text:style-name="P19"><text:s text:c="4"/>def __init__(self, iterable={}):</text:p>
      <text:p text:style-name="P19"><text:s text:c="8"/>super().__init__(iterable)</text:p>
      <text:p text:style-name="P19"><text:s text:c="8"/>self.check_type(iterable)</text:p>
      <text:p text:style-name="P19"><text:s text:c="8"/>self.undo_stack = [super().copy()]</text:p>
      <text:p text:style-name="P19"><text:s text:c="8"/>self.redo_stack = []</text:p>
      <text:p text:style-name="P19"/>
      <text:p text:style-name="P19"><text:s text:c="4"/>'''Проверка формата строки'''</text:p>
      <text:p text:style-name="P19"><text:s text:c="4"/>def check_format(self, value):</text:p>
      <text:p text:style-name="P19"><text:s text:c="8"/>import re</text:p>
      <text:p text:style-name="P19"><text:s text:c="8"/>part = r'((25[0-5])|(2[0-4]\d)|(1\d\d)|([1-9]?\d))'</text:p>
      <text:p text:style-name="P19"><text:s text:c="8"/>if not isinstance(value, str):</text:p>
      <text:p text:style-name="P19"><text:s text:c="12"/>raise TypeError()</text:p>
      <text:p text:style-name="P19"><text:s text:c="8"/>if not re.match(fr'^{part}\.{part}\.{part}\.{part}$', value):</text:p>
      <text:p text:style-name="P19"><text:s text:c="12"/>raise FormatError()</text:p>
      <text:p text:style-name="P19"/>
      <text:p text:style-name="P19"><text:s text:c="4"/>'''Проверка типа данных'''</text:p>
      <text:p text:style-name="P19"><text:s text:c="4"/>def check_type(self, iterable):</text:p>
      <text:p text:style-name="P19"><text:s text:c="8"/>if isinstance(iterable, dict):</text:p>
      <text:p text:style-name="P19"><text:s text:c="12"/>for key in iterable.keys():</text:p>
      <text:p text:style-name="P19"><text:s text:c="16"/>if isinstance(key, str):</text:p>
      <text:p text:style-name="P19"><text:s text:c="20"/>self.check_format(key)</text:p>
      <text:p text:style-name="P19"><text:s text:c="16"/>else:</text:p>
      <text:p text:style-name="P19"><text:s text:c="20"/>raise TypeError('Ошибка типа данных')</text:p>
      <text:p text:style-name="P19"><text:s text:c="8"/>elif isinstance(iterable, list) or isinstance(iterable, tuple) or isinstance(iterable, set):</text:p>
      <text:p text:style-name="P19"><text:s text:c="12"/>for el in iterable:</text:p>
      <text:p text:style-name="P19"><text:s text:c="16"/>if isinstance(el, tuple) and len(el) == 2:</text:p>
      <text:p text:style-name="P19"><text:s text:c="20"/>if isinstance(el[0], str):</text:p>
      <text:p text:style-name="P19"><text:s text:c="24"/>self.check_format(el[0])</text:p>
      <text:p text:style-name="P19"><text:s text:c="20"/>else:</text:p>
      <text:p text:style-name="P19"><text:s text:c="24"/>raise TypeError('Ошибка типа данных')</text:p>
      <text:p text:style-name="P19"><text:s text:c="16"/>else:</text:p>
      <text:p text:style-name="P19"><text:s text:c="20"/>raise TypeError('Ошибка типа данных')</text:p>
      <text:p text:style-name="P19"><text:s text:c="8"/>else:</text:p>
      <text:p text:style-name="P19"><text:s text:c="12"/>raise TypeError('Ошибка типа данных')</text:p>
      <text:p text:style-name="P19"><text:s text:c="4"/></text:p>
      <text:p text:style-name="P19"><text:s text:c="4"/>'''Команда undo'''</text:p>
      <text:p text:style-name="P19"><text:s text:c="4"/>def undo(self):</text:p>
      <text:p text:style-name="P19"><text:soft-page-break/><text:s text:c="8"/>if len(self.undo_stack) == 1:</text:p>
      <text:p text:style-name="P19"><text:s text:c="12"/>raise UndoError()</text:p>
      <text:p text:style-name="P19"><text:s text:c="8"/>self.redo_stack.append(self.undo_stack[-1].copy())</text:p>
      <text:p text:style-name="P19"><text:s text:c="8"/>del self.undo_stack[-1]</text:p>
      <text:p text:style-name="P19"><text:s text:c="8"/>super().clear()</text:p>
      <text:p text:style-name="P19"><text:s text:c="8"/>super().update(self.undo_stack[-1].copy())</text:p>
      <text:p text:style-name="P19"/>
      <text:p text:style-name="P19"><text:s text:c="4"/>'''Команда redo'''</text:p>
      <text:p text:style-name="P19"><text:s text:c="4"/>def redo(self):</text:p>
      <text:p text:style-name="P19"><text:s text:c="8"/>if len(self.redo_stack) == 0:</text:p>
      <text:p text:style-name="P19"><text:s text:c="12"/>raise RedoError()</text:p>
      <text:p text:style-name="P19"><text:s text:c="8"/>self.undo_stack.append(self.redo_stack[-1].copy())</text:p>
      <text:p text:style-name="P19"><text:s text:c="8"/>del self.redo_stack[-1]</text:p>
      <text:p text:style-name="P19"><text:s text:c="8"/>super().clear()</text:p>
      <text:p text:style-name="P19"><text:s text:c="8"/>super().update(self.undo_stack[-1].copy())</text:p>
      <text:p text:style-name="P19"><text:s text:c="4"/></text:p>
      <text:p text:style-name="P19"><text:s text:c="4"/>'''Переопределение методов словаря'''</text:p>
      <text:p text:style-name="P19"><text:s text:c="4"/>def __setitem__(self, key, value):</text:p>
      <text:p text:style-name="P19"><text:s text:c="8"/>self.check_format(key)</text:p>
      <text:p text:style-name="P19"><text:s text:c="8"/>super().__setitem__(key, value)</text:p>
      <text:p text:style-name="P19"><text:s text:c="8"/>self.undo_stack.append(super().copy())</text:p>
      <text:p text:style-name="P19"><text:s text:c="8"/>self.redo_stack.clear()</text:p>
      <text:p text:style-name="P19"><text:s text:c="4"/></text:p>
      <text:p text:style-name="P19"><text:s text:c="4"/>def __delitem__(self, key):</text:p>
      <text:p text:style-name="P19"><text:s text:c="8"/>super().__delitem__(key)</text:p>
      <text:p text:style-name="P19"><text:s text:c="8"/>self.undo_stack.append(super().copy())</text:p>
      <text:p text:style-name="P19"><text:s text:c="8"/>self.redo_stack.clear()</text:p>
      <text:p text:style-name="P19"><text:s text:c="4"/></text:p>
      <text:p text:style-name="P19"><text:s text:c="4"/>def __ior__(self, iterable):</text:p>
      <text:p text:style-name="P19"><text:s text:c="8"/>self.check_type(iterable)</text:p>
      <text:p text:style-name="P19"><text:s text:c="8"/>super().update(iterable)</text:p>
      <text:p text:style-name="P19"><text:s text:c="8"/>self.undo_stack.append(super().copy())</text:p>
      <text:p text:style-name="P19"><text:s text:c="8"/>self.redo_stack.clear()</text:p>
      <text:p text:style-name="P19"><text:s text:c="8"/>return self</text:p>
      <text:p text:style-name="P19"><text:s text:c="4"/></text:p>
      <text:p text:style-name="P19"><text:s text:c="4"/>def __or__(self, iterable):</text:p>
      <text:p text:style-name="P19"><text:s text:c="8"/>self.check_type(iterable)</text:p>
      <text:p text:style-name="P19"><text:s text:c="8"/>new = MyDict()</text:p>
      <text:p text:style-name="P19"><text:s text:c="8"/>new.update(self.copy())</text:p>
      <text:p text:style-name="P19"><text:s text:c="8"/>new.undo_stack = self.undo_stack.copy()</text:p>
      <text:p text:style-name="P19"><text:s text:c="8"/>new.redo_stack = self.redo_stack.copy()</text:p>
      <text:p text:style-name="P19"><text:s text:c="8"/>new.update(iterable)</text:p>
      <text:p text:style-name="P19"><text:s text:c="8"/>return new</text:p>
      <text:p text:style-name="P19"><text:s text:c="4"/></text:p>
      <text:p text:style-name="P19"><text:s text:c="4"/>def update(self, iterable):</text:p>
      <text:p text:style-name="P19"><text:s text:c="8"/>self.check_type(iterable)</text:p>
      <text:p text:style-name="P19"><text:s text:c="8"/>super().update(iterable)</text:p>
      <text:p text:style-name="P19"><text:s text:c="8"/>self.undo_stack.append(super().copy())</text:p>
      <text:p text:style-name="P19"><text:s text:c="8"/>self.redo_stack.clear()</text:p>
      <text:p text:style-name="P19"><text:s text:c="4"/></text:p>
      <text:p text:style-name="P19"><text:s text:c="4"/>def pop(self, key):</text:p>
      <text:p text:style-name="P19"><text:s text:c="8"/>del_key = super().pop(key)</text:p>
      <text:p text:style-name="P19"><text:s text:c="8"/>self.undo_stack.append(super().copy())</text:p>
      <text:p text:style-name="P19"><text:s text:c="8"/>self.redo_stack.clear()</text:p>
      <text:p text:style-name="P19"><text:s text:c="8"/>return del_key</text:p>
      <text:p text:style-name="P19"/>
      <text:p text:style-name="P19"><text:s text:c="4"/>def popitem(self):</text:p>
      <text:p text:style-name="P19"><text:s text:c="8"/>del_item = super().popitem()</text:p>
      <text:p text:style-name="P19"><text:s text:c="8"/>self.undo_stack.append(super().copy())</text:p>
      <text:p text:style-name="P19"><text:s text:c="8"/>self.redo_stack.clear()</text:p>
      <text:p text:style-name="P19"><text:s text:c="8"/>return del_item</text:p>
      <text:p text:style-name="P19"><text:s text:c="4"/></text:p>
      <text:p text:style-name="P19"><text:s text:c="4"/>def setdefault(self, key, default):</text:p>
      <text:p text:style-name="P19"><text:s text:c="8"/>self.undo_stack.append(super().copy())</text:p>
      <text:p text:style-name="P19"><text:s text:c="8"/>super().setdefault(key, default)</text:p>
      <text:p text:style-name="P19"><text:s text:c="8"/>self.redo_stack.clear()</text:p>
      <text:p text:style-name="P19"><text:s text:c="8"/>return default</text:p>
      <text:p text:style-name="P19"/>
      <text:p text:style-name="P19"><text:soft-page-break/><text:s text:c="4"/>def clear(self):</text:p>
      <text:p text:style-name="P19"><text:s text:c="8"/>super().clear()</text:p>
      <text:p text:style-name="P19"><text:s text:c="8"/>self.undo_stack.append(super().copy())</text:p>
      <text:p text:style-name="P19"><text:s text:c="8"/>self.redo_stack.clear()</text:p>
      <text:p text:style-name="P19"/>
      <text:p text:style-name="P19"/>
      <text:p text:style-name="P19"># Вариант 4-1</text:p>
      <text:p text:style-name="P19"># 4 - dict (ограничение на ключи словаря)</text:p>
      <text:p text:style-name="P19"># 1 - IPv4</text:p>
      <text:p text:style-name="P20">Файл test_prg5vypN3150.py</text:p>
      <text:p text:style-name="P19">from prg5vypN3150 import FormatError, UndoError, RedoError, MyDict <text:s text:c="3"/># Импортировать ваш класс</text:p>
      <text:p text:style-name="P19">import pytest</text:p>
      <text:p text:style-name="P19"/>
      <text:p text:style-name="P19"/>
      <text:p text:style-name="P19"># Тут ваши тесты</text:p>
      <text:p text:style-name="P19"/>
      <text:p text:style-name="P19"/>
      <text:p text:style-name="P19">def test_init_dict():</text:p>
      <text:p text:style-name="P19"><text:s text:c="4"/>d1 = MyDict({'192.168.0.1': 12, '8.8.8.8': True})</text:p>
      <text:p text:style-name="P19"><text:s text:c="4"/>d2 = MyDict([('255.255.255.0', 'Hello'), ('0.0.0.0', 123.21)])</text:p>
      <text:p text:style-name="P19"><text:s text:c="4"/>d3 = MyDict()</text:p>
      <text:p text:style-name="P19"><text:s text:c="4"/>assert d1['192.168.0.1'] == 12</text:p>
      <text:p text:style-name="P19"><text:s text:c="4"/>assert d2['0.0.0.0'] == 123.21</text:p>
      <text:p text:style-name="P19"><text:s text:c="4"/>assert d3 == {}</text:p>
      <text:p text:style-name="P19"/>
      <text:p text:style-name="P19">def test_check_format():</text:p>
      <text:p text:style-name="P19"><text:s text:c="4"/>with pytest.raises(FormatError):</text:p>
      <text:p text:style-name="P19"><text:s text:c="8"/>d = MyDict({'123.355.3.1': 213})</text:p>
      <text:p text:style-name="P19"><text:s text:c="8"/>d = MyDict({'123.355.3.1.1'})</text:p>
      <text:p text:style-name="P19"/>
      <text:p text:style-name="P19">def test_check_type():</text:p>
      <text:p text:style-name="P19"><text:s text:c="4"/>with pytest.raises(TypeError):</text:p>
      <text:p text:style-name="P19"><text:s text:c="8"/>d = MyDict([(255.12, 90)])</text:p>
      <text:p text:style-name="P19"><text:s text:c="8"/>d = MyDict([['2.2.2.2', False]])</text:p>
      <text:p text:style-name="P19"><text:s text:c="8"/>d = MyDict(12390)</text:p>
      <text:p text:style-name="P19"/>
      <text:p text:style-name="P19">def test_setitem():</text:p>
      <text:p text:style-name="P19"><text:s text:c="4"/>d = MyDict({'192.168.0.1': 12, '8.8.8.8': True})</text:p>
      <text:p text:style-name="P19"><text:s text:c="4"/>d['8.8.8.8'] = 5</text:p>
      <text:p text:style-name="P19"><text:s text:c="4"/>d['7.7.7.7'] = 90</text:p>
      <text:p text:style-name="P19"><text:s text:c="4"/>assert d['8.8.8.8'] == 5</text:p>
      <text:p text:style-name="P19"><text:s text:c="4"/>assert d['7.7.7.7'] == 90</text:p>
      <text:p text:style-name="P19"><text:s text:c="4"/>with pytest.raises(FormatError):</text:p>
      <text:p text:style-name="P19"><text:s text:c="8"/>d['256.0.0.0'] = 21</text:p>
      <text:p text:style-name="P19"/>
      <text:p text:style-name="P19">def test_ior_and_or():</text:p>
      <text:p text:style-name="P19"><text:s text:c="4"/>d = MyDict({'192.168.0.1': 12, '8.8.8.8': True})</text:p>
      <text:p text:style-name="P19"><text:s text:c="4"/>d |= {'5.5.5.5': 321}</text:p>
      <text:p text:style-name="P19"><text:s text:c="4"/>assert '5.5.5.5' in d</text:p>
      <text:p text:style-name="P19"><text:s text:c="4"/>d | {'4.4.4.4': 432}</text:p>
      <text:p text:style-name="P19"><text:s text:c="4"/>assert '4.4.4.4' not in d</text:p>
      <text:p text:style-name="P19"/>
      <text:p text:style-name="P19">def test_pop_and_popitem():</text:p>
      <text:p text:style-name="P19"><text:s text:c="4"/>d = MyDict({'192.168.0.1': 12, '8.8.8.8': True, '5.5.5.5': False})</text:p>
      <text:p text:style-name="P19"><text:s text:c="4"/>del_key = d.pop('8.8.8.8')</text:p>
      <text:p text:style-name="P19"><text:s text:c="4"/>assert del_key not in d</text:p>
      <text:p text:style-name="P19"><text:s text:c="4"/>assert del_key == True</text:p>
      <text:p text:style-name="P19"><text:s text:c="4"/>del_item = d.popitem()</text:p>
      <text:p text:style-name="P19"><text:s text:c="4"/>assert ('5.5.5.5', False) == del_item</text:p>
      <text:p text:style-name="P19"/>
      <text:p text:style-name="P19">def test_update_and_setdefault():</text:p>
      <text:p text:style-name="P19"><text:s text:c="4"/>d = MyDict({'192.168.0.1': 12, '8.8.8.8': True, '5.5.5.5': False})</text:p>
      <text:p text:style-name="P19"><text:s text:c="4"/>d.update([('2.2.2.2', '1'), ('1.2.3.4', '3')])</text:p>
      <text:p text:style-name="P19"><text:s text:c="4"/>assert '2.2.2.2' in d and '1.2.3.4' in d</text:p>
      <text:p text:style-name="P19"><text:s text:c="4"/>d.setdefault('8.8.8.8', 'True')</text:p>
      <text:p text:style-name="P19"><text:s text:c="4"/>d.setdefault('9.8.7.6', 'True')</text:p>
      <text:p text:style-name="P19"><text:s text:c="4"/>assert d['8.8.8.8'] == True</text:p>
      <text:p text:style-name="P19"><text:s text:c="4"/>assert d['9.8.7.6'] == 'True'</text:p>
      <text:p text:style-name="P19"/>
      <text:p text:style-name="P19">def test_delitem_and_clear():</text:p>
      <text:p text:style-name="P19"><text:s text:c="4"/>d = MyDict({'192.168.0.1': 12, '8.8.8.8': True, '5.5.5.5': False})</text:p>
      <text:p text:style-name="P19"><text:s text:c="4"/>del d['8.8.8.8']</text:p>
      <text:p text:style-name="P19"><text:s text:c="4"/>assert '8.8.8.8' not in d</text:p>
      <text:p text:style-name="P19"><text:soft-page-break/><text:s text:c="4"/>d.clear()</text:p>
      <text:p text:style-name="P19"><text:s text:c="4"/>assert len(d) == 0</text:p>
      <text:p text:style-name="P19"/>
      <text:p text:style-name="P19">def test_undo_and_redo():</text:p>
      <text:p text:style-name="P19"><text:s text:c="4"/>d = MyDict({'192.168.0.1': 12, '8.8.8.8': True, '5.5.5.5': False})</text:p>
      <text:p text:style-name="P19"><text:s text:c="4"/>cp = d.copy()</text:p>
      <text:p text:style-name="P19"><text:s text:c="4"/>del d['8.8.8.8']</text:p>
      <text:p text:style-name="P19"><text:s text:c="4"/>cp_r = d.copy()</text:p>
      <text:p text:style-name="P19"><text:s text:c="4"/>d.undo()</text:p>
      <text:p text:style-name="P19"><text:s text:c="4"/>assert cp == d</text:p>
      <text:p text:style-name="P19"><text:s text:c="4"/>d.redo()</text:p>
      <text:p text:style-name="P19"><text:s text:c="4"/>assert cp_r == d</text:p>
      <text:p text:style-name="P19"><text:s text:c="4"/>with pytest.raises(UndoError):</text:p>
      <text:p text:style-name="P19"><text:s text:c="8"/>d.undo()</text:p>
      <text:p text:style-name="P19"><text:s text:c="8"/>d.undo()</text:p>
      <text:p text:style-name="P19"><text:s text:c="4"/>with pytest.raises(RedoError):</text:p>
      <text:p text:style-name="P19"><text:s text:c="8"/>d.redo()</text:p>
      <text:p text:style-name="P19"><text:s text:c="8"/>d.redo()</text:p>
      <text:p text:style-name="P19"/>
      <text:p text:style-name="P19"/>
      <text:p text:style-name="P19"/>
      <text:p text:style-name="P19"># Количество тестов выбирайте самостоятельно,</text:p>
      <text:p text:style-name="P19"># но так, чтобы вся необходимая функциональность</text:p>
      <text:p text:style-name="P19"># была проверен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63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>
        <style:tab-stops/>
      </style:paragraph-properties>
      <style:text-properties style:font-name="Times New Roman2" fo:font-family="'Times New Roman'" style:font-style-name="Жирный" style:font-family-generic="roman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drey</meta:initial-creator>
    <meta:editing-cycles>25</meta:editing-cycles>
    <meta:creation-date>2021-10-17T09:09:00</meta:creation-date>
    <dc:date>2025-04-25T22:51:44.100200547</dc:date>
    <meta:editing-duration>PT2H40M20S</meta:editing-duration>
    <meta:generator>LibreOffice/25.2.2.2$Linux_X86_64 LibreOffice_project/520$Build-2</meta:generator>
    <meta:document-statistic meta:table-count="0" meta:image-count="2" meta:object-count="0" meta:page-count="9" meta:paragraph-count="221" meta:word-count="628" meta:character-count="7124" meta:non-whitespace-character-count="5518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