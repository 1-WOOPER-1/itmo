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1BF4A5275FC.png" manifest:media-type="image/png"/>
  <manifest:file-entry manifest:full-path="Pictures/10000000000003160000014376A3B5BE.png" manifest:media-type="image/png"/>
  <manifest:file-entry manifest:full-path="Pictures/10000000000002E2000001889D510E80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2bf3ce" officeooo:paragraph-rsid="002bf3ce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.494cm" fo:margin-bottom="0.494cm" style:contextual-spacing="false" fo:text-align="center" style:justify-single-word="false" style:page-number="auto" fo:break-before="page"/>
      <style:text-properties fo:color="#000000" loext:opacity="100%" fo:font-size="12pt" fo:font-weight="bold" officeooo:rsid="0004f2fb" officeooo:paragraph-rsid="0004f2fb" style:font-size-asian="12pt" style:font-weight-asian="bold" style:font-size-complex="12pt" style:font-weight-complex="bold"/>
    </style:style>
    <style:style style:name="P1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2pt" officeooo:rsid="00275f7c" officeooo:paragraph-rsid="00275f7c" style:font-size-asian="12pt" style:font-size-complex="12pt"/>
    </style:style>
    <style:style style:name="P16" style:family="paragraph" style:parent-style-name="Normal_20__28_Web_29_" style:master-page-name="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fo:font-size="12pt" officeooo:rsid="002bf3ce" officeooo:paragraph-rsid="002bf3ce" style:font-size-asian="12pt" style:font-size-complex="12pt"/>
    </style:style>
    <style:style style:name="P17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fo:color="#000000" loext:opacity="100%" fo:font-size="12pt" officeooo:rsid="002bf3ce" officeooo:paragraph-rsid="002bf3ce" style:font-size-asian="12pt" style:font-size-complex="12pt"/>
    </style:style>
    <style:style style:name="P18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fo:font-size="12pt" officeooo:rsid="00275f7c" officeooo:paragraph-rsid="00275f7c" style:font-size-asian="10.5pt" style:font-size-complex="12pt"/>
    </style:style>
    <style:style style:name="P19" style:family="paragraph" style:parent-style-name="Normal_20__28_Web_29_" style:master-page-name="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fo:color="#000000" loext:opacity="100%" fo:font-size="12pt" officeooo:rsid="002bf3ce" officeooo:paragraph-rsid="002bf3ce" style:font-size-asian="10.5pt" style:font-size-complex="12pt"/>
    </style:style>
    <style:style style:name="P20" style:family="paragraph" style:parent-style-name="Normal_20__28_Web_29_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fo:color="#000000" loext:opacity="100%" fo:font-size="12pt" officeooo:rsid="002bf3ce" officeooo:paragraph-rsid="002bf3ce" style:font-size-asian="10.5pt" style:font-size-complex="12pt"/>
    </style:style>
    <style:style style:name="P21" style:family="paragraph" style:parent-style-name="Normal_20__28_Web_29_" style:master-page-name="">
      <loext:graphic-properties draw:fill="none"/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weight="bold" officeooo:rsid="0006222e" officeooo:paragraph-rsid="00275f7c" style:font-size-asian="12pt" style:font-weight-asian="bold" style:font-size-complex="12pt" style:font-weight-complex="bold"/>
    </style:style>
    <style:style style:name="P22" style:family="paragraph" style:parent-style-name="Normal_20__28_Web_29_" style:list-style-name="">
      <style:paragraph-properties fo:margin-top="0.494cm" fo:margin-bottom="0.494cm" style:contextual-spacing="false" fo:text-align="center" style:justify-single-word="false" fo:break-before="page"/>
      <style:text-properties fo:color="#000000" loext:opacity="100%" fo:font-size="12pt" fo:font-weight="bold" officeooo:rsid="0006222e" officeooo:paragraph-rsid="002bf3c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3b3b3b" loext:opacity="100%" style:font-name="Droid Sans Mono1" fo:font-size="10.5pt" fo:font-weight="normal" officeooo:rsid="0006222e" fo:background-color="#fffff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style:line-height-at-least="0.503cm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b3b3b" loext:opacity="100%" style:font-name="Droid Sans Mono1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pt" fo:font-weight="bold" officeooo:rsid="0006222e" fo:background-color="transparent" style:font-size-asian="10pt" style:font-weight-asian="bold" style:font-size-complex="10pt" style:font-weight-complex="bold"/>
    </style:style>
    <style:style style:name="P27" style:family="paragraph" style:parent-style-name="Preformatted_20_Text" style:list-style-name="">
      <style:paragraph-properties fo:line-height="150%" fo:text-align="center" style:justify-single-word="false" fo:break-before="page"/>
      <style:text-properties style:font-name="Times New Roman" fo:font-size="12pt" officeooo:paragraph-rsid="000708d3" style:font-size-asian="12pt" style:font-size-complex="12pt"/>
    </style:style>
    <style:style style:name="P28" style:family="paragraph" style:parent-style-name="Preformatted_20_Text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2bf3ce" officeooo:paragraph-rsid="002bf3ce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2db902" officeooo:paragraph-rsid="002db902" style:font-size-asian="10.5pt" style:font-weight-asian="normal" style:font-size-complex="12pt" style:font-weight-complex="normal"/>
    </style:style>
    <style:style style:name="P30" style:family="paragraph" style:parent-style-name="Preformatted_20_Text" style:list-style-name="">
      <style:paragraph-properties fo:text-align="center" style:justify-single-word="false" fo:break-before="page"/>
      <style:text-properties fo:color="#000000" loext:opacity="100%" style:font-name="Times New Roman" fo:font-size="12pt" fo:font-weight="bold" officeooo:rsid="000a70d9" officeooo:paragraph-rsid="000a70d9" style:font-size-asian="12pt" style:font-weight-asian="bold" style:font-size-complex="12pt" style:font-weight-complex="bold"/>
    </style:style>
    <style:style style:name="P31" style:family="paragraph" style:parent-style-name="Preformatted_20_Text" style:list-style-name="">
      <style:paragraph-properties fo:text-align="start" style:justify-single-word="false"/>
      <style:text-properties fo:color="#000000" loext:opacity="100%" style:font-name="Source Code Pro" fo:font-size="9pt" fo:font-weight="normal" officeooo:rsid="002db902" officeooo:paragraph-rsid="002db902" style:font-size-asian="9pt" style:font-weight-asian="normal" style:font-size-complex="9pt" style:font-weight-complex="normal"/>
    </style:style>
    <style:style style:name="P32" style:family="paragraph" style:parent-style-name="Preformatted_20_Text" style:list-style-name="">
      <style:paragraph-properties fo:text-align="start" style:justify-single-word="false" fo:break-before="page"/>
      <style:text-properties fo:color="#000000" loext:opacity="100%" style:font-name="Source Code Pro" fo:font-size="9pt" fo:font-weight="normal" officeooo:rsid="002db902" officeooo:paragraph-rsid="002db902" style:font-size-asian="9pt" style:font-weight-asian="normal" style:font-size-complex="9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loext:opacity="100%" style:font-name="Source Code Pro" fo:font-size="9pt" fo:font-weight="normal" officeooo:rsid="002db902" officeooo:paragraph-rsid="002db902" style:font-size-asian="9pt" style:font-weight-asian="normal" style:font-size-complex="9pt" style:font-weight-complex="normal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024d6c" style:font-size-asian="14pt" style:font-size-complex="13.5pt"/>
    </style:style>
    <style:style style:name="T6" style:family="text">
      <style:text-properties fo:color="#000000" loext:opacity="100%" fo:font-size="14pt" fo:font-weight="bold" officeooo:rsid="002a34ed" style:font-size-asian="14pt" style:font-weight-asian="bold" style:font-size-complex="13.5pt"/>
    </style:style>
    <style:style style:name="T7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8" style:family="text">
      <style:text-properties fo:color="#000000" loext:opacity="100%" fo:font-size="13.5pt" fo:font-weight="bold" officeooo:rsid="002bf3ce" style:font-size-asian="13.5pt" style:font-weight-asian="bold" style:font-size-complex="13.5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4pt" fo:font-weight="bold" officeooo:rsid="0026de0c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3.5pt" style:font-size-asian="13.5pt" style:font-size-complex="13.5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background-color="transparent" loext:char-shading-value="0" style:font-size-asian="14pt"/>
    </style:style>
    <style:style style:name="T15" style:family="text">
      <style:text-properties fo:font-size="14pt" fo:language="en" fo:country="US" officeooo:rsid="00024d6c" fo:background-color="transparent" loext:char-shading-value="0" style:font-size-asian="14pt"/>
    </style:style>
    <style:style style:name="T16" style:family="text">
      <style:text-properties fo:font-size="14pt" officeooo:rsid="002bf3ce" style:font-size-asian="14pt"/>
    </style:style>
    <style:style style:name="T17" style:family="text">
      <style:text-properties fo:font-size="14pt" officeooo:rsid="00024d6c" style:font-size-asian="14pt"/>
    </style:style>
    <style:style style:name="T18" style:family="text">
      <style:text-properties fo:color="#000000" loext:opacity="100%" fo:font-size="14pt" officeooo:rsid="002bf3ce" style:font-size-asian="14pt" style:font-size-complex="13.5pt"/>
    </style:style>
    <style:style style:name="T19" style:family="text">
      <style:text-properties officeooo:rsid="002bf3ce"/>
    </style:style>
    <style:style style:name="T20" style:family="text">
      <style:text-properties officeooo:rsid="0026de0c"/>
    </style:style>
    <style:style style:name="T21" style:family="text">
      <style:text-properties fo:color="#000000" loext:opacity="100%"/>
    </style:style>
    <style:style style:name="T22" style:family="text">
      <style:text-properties fo:color="#795e26" loext:opacity="100%"/>
    </style:style>
    <style:style style:name="T23" style:family="text">
      <style:text-properties fo:color="#001080" loext:opacity="100%"/>
    </style:style>
    <style:style style:name="T24" style:family="text">
      <style:text-properties fo:color="#a31515" loext:opacity="100%"/>
    </style:style>
    <style:style style:name="T25" style:family="text">
      <style:text-properties fo:color="#000000" loext:opacity="100%" fo:font-weight="bold" officeooo:rsid="0006222e" style:font-weight-asian="bold" style:font-weight-complex="bold"/>
    </style:style>
    <style:style style:name="T26" style:family="text">
      <style:text-properties fo:color="#000000" loext:opacity="100%" fo:font-weight="bold" officeooo:rsid="000708d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Программирование</text:span><text:span text:style-name="T4">»</text:span></text:p>
      <text:p text:style-name="P2" loext:marker-style-name="T3"><text:span text:style-name="T3">ОТЧ</text:span><text:span text:style-name="T6">Ё</text:span><text:span text:style-name="T3">Т ПО ЛАБОРАТОРНОЙ РАБОТЕ </text:span><text:span text:style-name="T7">№</text:span><text:span text:style-name="T8">4</text:span></text:p>
      <text:p text:style-name="P4" loext:marker-style-name="T9"><text:span text:style-name="T10">Р</text:span><text:span text:style-name="T9">абота с файлами и структуры данных на основе указателей</text:span></text:p>
      <text:p text:style-name="P5" loext:marker-style-name="T11"/>
      <text:p text:style-name="P5" loext:marker-style-name="T11"/>
      <text:p text:style-name="P5" loext:marker-style-name="T11"/>
      <text:p text:style-name="P6" loext:marker-style-name="T11"/>
      <text:p text:style-name="P7" loext:marker-style-name="T12"><text:span text:style-name="T12">Выполнил:</text:span></text:p>
      <text:p text:style-name="P7" loext:marker-style-name="T13"><text:span text:style-name="T13">Студент группы </text:span><text:span text:style-name="T14">N31</text:span><text:bookmark text:name="_GoBack"/><text:span text:style-name="T15">50</text:span></text:p>
      <text:p text:style-name="P8">Пахомов Владимир Юрьевич</text:p>
      <text:p text:style-name="P9" loext:marker-style-name="T13"><draw:frame draw:style-name="fr1" draw:name="Изображение1" text:anchor-type="char" svg:x="13.21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2"><text:span text:style-name="T12"/></text:p>
      <text:p text:style-name="P7" loext:marker-style-name="T12"><text:span text:style-name="T12"/></text:p>
      <text:p text:style-name="P7" loext:marker-style-name="T12"><text:span text:style-name="T12">Проверил:</text:span></text:p>
      <text:p text:style-name="P7" loext:marker-style-name="T13"><text:span text:style-name="T16">Грозов </text:span><text:span text:style-name="T17">В</text:span><text:span text:style-name="T13">. </text:span><text:span text:style-name="T16">А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</text:span><text:span text:style-name="T18">5</text:span><text:span text:style-name="T4">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1-9-10-2<text:tab/>3</text:a></text:p>
          <text:p text:style-name="P12"><text:a xlink:type="simple" xlink:href="#__RefHeading___Toc3346_3715533565" text:style-name="Index_20_Link" text:visited-style-name="Index_20_Link">Make-файл<text:tab/>4</text:a></text:p>
          <text:p text:style-name="P12"><text:a xlink:type="simple" xlink:href="#__RefHeading___Toc48_4078790415" text:style-name="Index_20_Link" text:visited-style-name="Index_20_Link">Примеры работы программы на различных исходных данных<text:tab/>5</text:a></text:p>
          <text:p text:style-name="P12"><text:a xlink:type="simple" xlink:href="#__RefHeading___Toc52_4078790415" text:style-name="Index_20_Link" text:visited-style-name="Index_20_Link">Исходный текст программы с комментариями<text:tab/>6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<text:span text:style-name="T19">1</text:span><text:span text:style-name="T20">-</text:span><text:span text:style-name="T19">9</text:span><text:span text:style-name="T20">-1</text:span><text:span text:style-name="T19">0</text:span><text:span text:style-name="T20">-2</text:span><text:bookmark-end text:name="__RefHeading___Toc35_4078790415"/></text:h>
      <text:p text:style-name="P15">Таблица 1. <text:span text:style-name="T19">Тип списка</text:span>:</text:p>
      <text:p text:style-name="P16"><text:span text:style-name="T21">Односвязный список</text:span></text:p>
      <text:p text:style-name="P15">Таблица 2. <text:span text:style-name="T19">Формат данных в строке:</text:span></text:p>
      <text:p text:style-name="P17">ISBN-13</text:p>
      <text:p text:style-name="P17">С проверкой по алгоритму ISBN-13. Примеры:</text:p>
      <text:p text:style-name="P17">978-0-306-40615-7, 978-2-266-11156-0</text:p>
      <text:p text:style-name="P18">Таблица 3. <text:span text:style-name="T19">Команда</text:span>:</text:p>
      <text:p text:style-name="P19">Команда: min_first</text:p>
      <text:p text:style-name="P20">Описание: Переместить элемент с максимальным значением (или все элементы с</text:p>
      <text:p text:style-name="P20">максимальным значением, если их в списке несколько) в начало списка, не</text:p>
      <text:p text:style-name="P20">изменяя порядок других элементов.</text:p>
      <text:p text:style-name="P18">Таблица 4. <text:span text:style-name="T19">Формат файла:</text:span></text:p>
      <text:p text:style-name="P21"><draw:frame draw:style-name="fr2" draw:name="Image1" text:anchor-type="char" svg:width="16.501cm" svg:height="8.765cm" draw:z-index="1"><draw:image xlink:href="Pictures/10000000000002E2000001889D510E80.png" xlink:type="simple" xlink:show="embed" xlink:actuate="onLoad" draw:mime-type="image/png"/></draw:frame></text:p>
      <text:h text:style-name="P22" text:outline-level="1"><text:bookmark-start text:name="__RefHeading___Toc3346_3715533565"/>Make-файл<text:bookmark-end text:name="__RefHeading___Toc3346_3715533565"/></text:h>
      <text:p text:style-name="P23"><text:span text:style-name="T22">.PHONY</text:span>: all clean</text:p>
      <text:p text:style-name="P24"/>
      <text:p text:style-name="P25"><text:span text:style-name="T23">APP</text:span>=prg4vypN3150</text:p>
      <text:p text:style-name="P25"><text:span text:style-name="T23">CFLAGS</text:span>=-Wall -Wextra -Werror -g</text:p>
      <text:p text:style-name="P24"/>
      <text:p text:style-name="P25"><text:span text:style-name="T22">all</text:span>: <text:span text:style-name="T24">$(</text:span><text:span text:style-name="T23">APP</text:span><text:span text:style-name="T24">)</text:span></text:p>
      <text:p text:style-name="P24"/>
      <text:p text:style-name="P25"><text:span text:style-name="T24">$(</text:span><text:span text:style-name="T23">APP</text:span><text:span text:style-name="T24">)</text:span>: <text:span text:style-name="T24">$(</text:span><text:span text:style-name="T23">APP</text:span><text:span text:style-name="T24">)</text:span>.c</text:p>
      <text:p text:style-name="P25">gcc -o <text:span text:style-name="T24">$(</text:span><text:span text:style-name="T23">APP</text:span><text:span text:style-name="T24">)</text:span> <text:span text:style-name="T24">$(</text:span><text:span text:style-name="T23">CFLAGS</text:span><text:span text:style-name="T24">)</text:span> <text:span text:style-name="T24">$(</text:span><text:span text:style-name="T23">APP</text:span><text:span text:style-name="T24">)</text:span>.c</text:p>
      <text:p text:style-name="P24"/>
      <text:p text:style-name="P25"><text:span text:style-name="T22">clean</text:span>:</text:p>
      <text:p text:style-name="P25">rm <text:span text:style-name="T24">$(</text:span><text:span text:style-name="T23">APP</text:span><text:span text:style-name="T24">)</text:span></text:p>
      <text:p text:style-name="P26"/>
      <text:h text:style-name="P27" text:outline-level="1"><text:bookmark-start text:name="__RefHeading___Toc48_4078790415"/><text:span text:style-name="T25">П</text:span><text:span text:style-name="T26">римеры работы программы на различных исходных данных</text:span><text:bookmark-end text:name="__RefHeading___Toc48_4078790415"/></text:h>
      <text:p text:style-name="P28"><text:bookmark-start text:name="__RefHeading___Toc50_4078790415"/>Python файл:<text:bookmark-end text:name="__RefHeading___Toc50_4078790415"/></text:p>
      <text:p text:style-name="P29"><draw:frame draw:style-name="fr3" draw:name="Image2" text:anchor-type="char" svg:width="16.501cm" svg:height="6.745cm" draw:z-index="2"><draw:image xlink:href="Pictures/10000000000003160000014376A3B5BE.png" xlink:type="simple" xlink:show="embed" xlink:actuate="onLoad" draw:mime-type="image/png"/></draw:frame>C файл:</text:p>
      <text:p text:style-name="P29"><draw:frame draw:style-name="fr3" draw:name="Image3" text:anchor-type="char" svg:width="16.501cm" svg:height="11.107cm" draw:z-index="3"><draw:image xlink:href="Pictures/1000000000000298000001BF4A5275FC.png" xlink:type="simple" xlink:show="embed" xlink:actuate="onLoad" draw:mime-type="image/png"/></draw:frame></text:p>
      <text:h text:style-name="P30" text:outline-level="1"><text:bookmark-start text:name="__RefHeading___Toc52_4078790415"/>Исходный текст программы с комментариями<text:bookmark-end text:name="__RefHeading___Toc52_4078790415"/></text:h>
      <text:p text:style-name="P31">Python файл:</text:p>
      <text:p text:style-name="P31">#!/usr/bin/python3</text:p>
      <text:p text:style-name="P31">from sys import exit</text:p>
      <text:p text:style-name="P31">from random import randint</text:p>
      <text:p text:style-name="P31">from argparse import ArgumentParser</text:p>
      <text:p text:style-name="P31">from struct import pack</text:p>
      <text:p text:style-name="P31"/>
      <text:p text:style-name="P31">def generate_isbn13():</text:p>
      <text:p text:style-name="P31"><text:s text:c="4"/>prefix = str(randint(978, 979))</text:p>
      <text:p text:style-name="P31"><text:s text:c="4"/>group = str(randint(0, 5))</text:p>
      <text:p text:style-name="P31"><text:s text:c="4"/>publisher = str(randint(0, 999)).zfill(3)</text:p>
      <text:p text:style-name="P31"><text:s text:c="4"/>title = str(randint(0, 99999)).zfill(5)</text:p>
      <text:p text:style-name="P31"><text:s text:c="4"/></text:p>
      <text:p text:style-name="P31"><text:s text:c="4"/>digits = prefix + group + publisher + title</text:p>
      <text:p text:style-name="P31"><text:s text:c="4"/>total = sum(int(digits[i]) if i % 2 == 0 else int(digits[i]) * 3 for i in range(len(digits)))</text:p>
      <text:p text:style-name="P31"><text:s text:c="4"/>checksum = (10 - (total % 10)) % 10</text:p>
      <text:p text:style-name="P31"><text:s text:c="4"/>return f"{prefix}-{group}-{publisher}-{title}-{checksum}"</text:p>
      <text:p text:style-name="P31"/>
      <text:p text:style-name="P31">def main():</text:p>
      <text:p text:style-name="P31"><text:s text:c="4"/>parser = ArgumentParser()</text:p>
      <text:p text:style-name="P31"><text:s text:c="4"/>parser.add_argument("-v", action="store_true")</text:p>
      <text:p text:style-name="P31"><text:s text:c="4"/>parser.add_argument("-n", type=int)</text:p>
      <text:p text:style-name="P31"><text:s text:c="4"/>parser.add_argument("filename", nargs="?")</text:p>
      <text:p text:style-name="P31"><text:s text:c="4"/>args = parser.parse_args()</text:p>
      <text:p text:style-name="P31"/>
      <text:p text:style-name="P31"><text:s text:c="4"/>author = "Пахомов Владимир Юрьевич, гр. N3150\nВариант: 1-9-10-2";</text:p>
      <text:p text:style-name="P31"/>
      <text:p text:style-name="P31"><text:s text:c="4"/>if args.v:</text:p>
      <text:p text:style-name="P31"><text:s text:c="8"/>print(author)</text:p>
      <text:p text:style-name="P31"><text:s text:c="8"/>exit(0)</text:p>
      <text:p text:style-name="P31"/>
      <text:p text:style-name="P31"><text:s text:c="4"/>if not args.filename:</text:p>
      <text:p text:style-name="P31"><text:s text:c="8"/>print("Ошибка: выходной файл не задан.")</text:p>
      <text:p text:style-name="P31"><text:s text:c="8"/>exit(1)</text:p>
      <text:p text:style-name="P31"/>
      <text:p text:style-name="P31"><text:s text:c="4"/>num_strings = args.n if args.n is not None else randint(10, 1000)</text:p>
      <text:p text:style-name="P31"><text:s text:c="4"/>if num_strings &lt;= 0:</text:p>
      <text:p text:style-name="P31"><text:s text:c="8"/>print("Ошибка: количество строк должно быть положительным.")</text:p>
      <text:p text:style-name="P31"><text:s text:c="8"/>exit(2)</text:p>
      <text:p text:style-name="P31"/>
      <text:p text:style-name="P31"><text:s text:c="4"/>strings = [generate_isbn13().encode("utf-8") + b"\x00" for _ in range(num_strings)]</text:p>
      <text:p text:style-name="P31"/>
      <text:p text:style-name="P31"><text:s text:c="4"/>data_size = randint(0, 1024)</text:p>
      <text:p text:style-name="P31"><text:s text:c="4"/>data = bytes(randint(0, 255) for _ in range(data_size))</text:p>
      <text:p text:style-name="P31"/>
      <text:p text:style-name="P31"><text:s text:c="4"/>offset = 4</text:p>
      <text:p text:style-name="P31"><text:s text:c="4"/>string_positions = []</text:p>
      <text:p text:style-name="P31"><text:s text:c="4"/>current_pos = offset</text:p>
      <text:p text:style-name="P31"><text:s text:c="4"/>for s in strings:</text:p>
      <text:p text:style-name="P31"><text:s text:c="8"/>string_positions.append(current_pos)</text:p>
      <text:p text:style-name="P31"><text:s text:c="8"/>current_pos += len(s)</text:p>
      <text:p text:style-name="P31"/>
      <text:p text:style-name="P31"><text:s text:c="4"/>data_pos = current_pos</text:p>
      <text:p text:style-name="P31"><text:soft-page-break/><text:s text:c="4"/>current_pos += len(data)</text:p>
      <text:p text:style-name="P31"/>
      <text:p text:style-name="P31"><text:s text:c="4"/>index_positions = []</text:p>
      <text:p text:style-name="P31"><text:s text:c="4"/>indices = []</text:p>
      <text:p text:style-name="P31"><text:s text:c="4"/>for i in range(num_strings):</text:p>
      <text:p text:style-name="P31"><text:s text:c="8"/>index_positions.append(current_pos)</text:p>
      <text:p text:style-name="P31"><text:s text:c="8"/>indices.append(i)</text:p>
      <text:p text:style-name="P31"><text:s text:c="8"/>current_pos += 2</text:p>
      <text:p text:style-name="P31"/>
      <text:p text:style-name="P31"><text:s text:c="4"/># Запись в файл</text:p>
      <text:p text:style-name="P31"><text:s text:c="4"/>try:</text:p>
      <text:p text:style-name="P31"><text:s text:c="8"/>with open(args.filename, "wb") as f:</text:p>
      <text:p text:style-name="P31"><text:s text:c="12"/>f.write(pack("&lt;I", offset))</text:p>
      <text:p text:style-name="P31"><text:s text:c="12"/>for s in strings:</text:p>
      <text:p text:style-name="P31"><text:s text:c="16"/>f.write(s)</text:p>
      <text:p text:style-name="P31"><text:s text:c="12"/>f.write(data)</text:p>
      <text:p text:style-name="P31"><text:s text:c="12"/>for idx in indices:</text:p>
      <text:p text:style-name="P31"><text:s text:c="16"/>f.write(pack("&lt;H", idx))</text:p>
      <text:p text:style-name="P31"/>
      <text:p text:style-name="P31"><text:s text:c="8"/>print(f"Файл'{args.filename}' успешно сгенерирован.")</text:p>
      <text:p text:style-name="P31"><text:s text:c="8"/>exit(0)</text:p>
      <text:p text:style-name="P31"/>
      <text:p text:style-name="P31"><text:s text:c="4"/>except Exception as e:</text:p>
      <text:p text:style-name="P31"><text:s text:c="8"/>print(f"Ошибка записи в файл: {e}")</text:p>
      <text:p text:style-name="P31"><text:s text:c="8"/>exit(3)</text:p>
      <text:p text:style-name="P31"/>
      <text:p text:style-name="P31">if __name__ == "__main__":</text:p>
      <text:p text:style-name="P31"><text:s text:c="4"/>main()</text:p>
      <text:p text:style-name="P32">С файл:</text:p>
      <text:p text:style-name="P31">#include &lt;stdlib.h&gt;</text:p>
      <text:p text:style-name="P31">#include &lt;stdio.h&gt;</text:p>
      <text:p text:style-name="P31">#include &lt;string.h&gt;</text:p>
      <text:p text:style-name="P31"/>
      <text:p text:style-name="P31">#include &lt;ctype.h&gt;</text:p>
      <text:p text:style-name="P31">#include &lt;stdint.h&gt;</text:p>
      <text:p text:style-name="P31"/>
      <text:p text:style-name="P31">#define MAX_LINE 1024</text:p>
      <text:p text:style-name="P31">#define MAX_ISBN_LEN 18 <text:s/>// ISBN-13, например "978-0-5791-81415-1" + \0</text:p>
      <text:p text:style-name="P31"/>
      <text:p text:style-name="P31">int issaved = 0;</text:p>
      <text:p text:style-name="P31"/>
      <text:p text:style-name="P31">typedef struct Node {</text:p>
      <text:p text:style-name="P31"><text:s text:c="4"/>char isbn[MAX_ISBN_LEN];</text:p>
      <text:p text:style-name="P31"><text:s text:c="4"/>struct Node* next;</text:p>
      <text:p text:style-name="P31"><text:s text:c="4"/>int index;</text:p>
      <text:p text:style-name="P31">} Node;</text:p>
      <text:p text:style-name="P31"/>
      <text:p text:style-name="P31">// Список</text:p>
      <text:p text:style-name="P31">typedef struct {</text:p>
      <text:p text:style-name="P31"><text:s text:c="4"/>Node* head;</text:p>
      <text:p text:style-name="P31"><text:s text:c="4"/>int count;</text:p>
      <text:p text:style-name="P31"><text:s text:c="4"/>int modified;</text:p>
      <text:p text:style-name="P31">} List;</text:p>
      <text:p text:style-name="P31"/>
      <text:p text:style-name="P31">// Инициализация списка</text:p>
      <text:p text:style-name="P31">void init_list(List* list) {</text:p>
      <text:p text:style-name="P31"><text:s text:c="4"/>list-&gt;head = NULL;</text:p>
      <text:p text:style-name="P31"><text:s text:c="4"/>list-&gt;count = 0;</text:p>
      <text:p text:style-name="P31"><text:s text:c="4"/>list-&gt;modified = 0;</text:p>
      <text:p text:style-name="P31">}</text:p>
      <text:p text:style-name="P31"/>
      <text:p text:style-name="P31">// Освобождение списка</text:p>
      <text:p text:style-name="P31">void free_list(List* list) {</text:p>
      <text:p text:style-name="P31"><text:s text:c="4"/>Node* current = list-&gt;head;</text:p>
      <text:p text:style-name="P31"><text:s text:c="4"/>while (current) {</text:p>
      <text:p text:style-name="P31"><text:s text:c="8"/>Node* temp = current;</text:p>
      <text:p text:style-name="P31"><text:s text:c="8"/>current = current-&gt;next;</text:p>
      <text:p text:style-name="P31"><text:s text:c="8"/>free(temp);</text:p>
      <text:p text:style-name="P31"><text:s text:c="4"/>}</text:p>
      <text:p text:style-name="P31"><text:s text:c="4"/>list-&gt;head = NULL;</text:p>
      <text:p text:style-name="P31"><text:s text:c="4"/>list-&gt;count = 0;</text:p>
      <text:p text:style-name="P31"><text:s text:c="4"/>list-&gt;modified = 0;</text:p>
      <text:p text:style-name="P31">}</text:p>
      <text:p text:style-name="P31"/>
      <text:p text:style-name="P31">// Проверка на ISBN-13 </text:p>
      <text:p text:style-name="P31">int validate_isbn13(const char* isbn) {</text:p>
      <text:p text:style-name="P31"><text:s text:c="4"/>if (strlen(isbn) != MAX_ISBN_LEN - 1) return 0;</text:p>
      <text:p text:style-name="P31"><text:s text:c="4"/>if (isbn[3] != '-' || isbn[5] != '-' || isbn[9] != '-' || isbn[15] != '-') return 0;</text:p>
      <text:p text:style-name="P31"/>
      <text:p text:style-name="P31"><text:s text:c="4"/>int num_digits = 13;</text:p>
      <text:p text:style-name="P31"><text:s text:c="4"/>char digits[num_digits];</text:p>
      <text:p text:style-name="P31"><text:s text:c="4"/>int k = 0;</text:p>
      <text:p text:style-name="P31"><text:s text:c="4"/>for (int i = 0; i &lt; MAX_ISBN_LEN - 1; i++) {</text:p>
      <text:p text:style-name="P31"><text:soft-page-break/><text:s text:c="8"/>if (i == 3 || i == 5 || i == 9 || i == 15) continue;</text:p>
      <text:p text:style-name="P31"><text:s text:c="8"/>if (!isdigit(isbn[i])) {</text:p>
      <text:p text:style-name="P31"><text:s text:c="12"/>return 0;</text:p>
      <text:p text:style-name="P31"><text:s text:c="8"/>}</text:p>
      <text:p text:style-name="P31"><text:s text:c="8"/>digits[k++] = isbn[i] - '0';</text:p>
      <text:p text:style-name="P31"><text:s text:c="4"/>}</text:p>
      <text:p text:style-name="P31"/>
      <text:p text:style-name="P31"><text:s text:c="4"/>int sum = 0;</text:p>
      <text:p text:style-name="P31"><text:s text:c="4"/>for (int i = 0; i &lt; num_digits-1; i++) {</text:p>
      <text:p text:style-name="P31"><text:s text:c="8"/>sum += (i % 2 == 0) ? digits[i] : digits[i] * 3;</text:p>
      <text:p text:style-name="P31"><text:s text:c="4"/>}</text:p>
      <text:p text:style-name="P31"><text:s text:c="4"/>int checksum = (10 - (sum % 10)) % 10;</text:p>
      <text:p text:style-name="P31"><text:s text:c="4"/>return checksum == digits[num_digits-1];</text:p>
      <text:p text:style-name="P31">}</text:p>
      <text:p text:style-name="P31"/>
      <text:p text:style-name="P31">// Создание новой строки</text:p>
      <text:p text:style-name="P31">Node* create_node(const char* isbn) {</text:p>
      <text:p text:style-name="P31"><text:s text:c="4"/>Node* node = (Node*)malloc(sizeof(Node));</text:p>
      <text:p text:style-name="P31"><text:s text:c="4"/>if (!node) {</text:p>
      <text:p text:style-name="P31"><text:s text:c="8"/>fprintf(stderr, "Ошибка: не удалось выделить память.\n");</text:p>
      <text:p text:style-name="P31"><text:s text:c="8"/>exit(3);</text:p>
      <text:p text:style-name="P31"><text:s text:c="4"/>}</text:p>
      <text:p text:style-name="P31"><text:s text:c="4"/>strncpy(node-&gt;isbn, isbn, MAX_ISBN_LEN);</text:p>
      <text:p text:style-name="P31"><text:s text:c="4"/>node-&gt;isbn[MAX_ISBN_LEN - 1] = '\0';</text:p>
      <text:p text:style-name="P31"><text:s text:c="4"/>node-&gt;next = NULL;</text:p>
      <text:p text:style-name="P31"><text:s text:c="4"/>node-&gt;index = 0;</text:p>
      <text:p text:style-name="P31"><text:s text:c="4"/>return node;</text:p>
      <text:p text:style-name="P31">}</text:p>
      <text:p text:style-name="P31"/>
      <text:p text:style-name="P31">// Добавить строку в начало</text:p>
      <text:p text:style-name="P31">void push_front(List* list, const char* isbn) {</text:p>
      <text:p text:style-name="P31"><text:s text:c="4"/>if (!validate_isbn13(isbn)) {</text:p>
      <text:p text:style-name="P31"><text:s text:c="8"/>fprintf(stderr, "Ошибка: неправильный ISBN-13 формат: %s\n", isbn);</text:p>
      <text:p text:style-name="P31"><text:s text:c="8"/>return;</text:p>
      <text:p text:style-name="P31"><text:s text:c="4"/>}</text:p>
      <text:p text:style-name="P31"><text:s text:c="4"/>Node* node = create_node(isbn);</text:p>
      <text:p text:style-name="P31"><text:s text:c="4"/>node-&gt;next = list-&gt;head;</text:p>
      <text:p text:style-name="P31"><text:s text:c="4"/>list-&gt;head = node;</text:p>
      <text:p text:style-name="P31"><text:s text:c="4"/>list-&gt;count++;</text:p>
      <text:p text:style-name="P31"><text:s text:c="4"/>list-&gt;modified = 1;</text:p>
      <text:p text:style-name="P31">}</text:p>
      <text:p text:style-name="P31"/>
      <text:p text:style-name="P31">// Добавить строку в конец</text:p>
      <text:p text:style-name="P31">void push_back(List* list, const char* isbn) {</text:p>
      <text:p text:style-name="P31"><text:s text:c="4"/>if (!validate_isbn13(isbn)) {</text:p>
      <text:p text:style-name="P31"><text:s text:c="8"/>fprintf(stderr, "Ошибка: неправильный ISBN-13 формат: %s\n", isbn);</text:p>
      <text:p text:style-name="P31"><text:s text:c="8"/>return;</text:p>
      <text:p text:style-name="P31"><text:s text:c="4"/>}</text:p>
      <text:p text:style-name="P31"><text:s text:c="4"/>Node* node = create_node(isbn);</text:p>
      <text:p text:style-name="P31"><text:s text:c="4"/>if (!list-&gt;head) {</text:p>
      <text:p text:style-name="P31"><text:s text:c="8"/>list-&gt;head = node;</text:p>
      <text:p text:style-name="P31"><text:s text:c="4"/>} else {</text:p>
      <text:p text:style-name="P31"><text:s text:c="8"/>Node* current = list-&gt;head;</text:p>
      <text:p text:style-name="P31"><text:s text:c="8"/>while (current-&gt;next) {</text:p>
      <text:p text:style-name="P31"><text:s text:c="12"/>current = current-&gt;next;</text:p>
      <text:p text:style-name="P31"><text:s text:c="8"/>}</text:p>
      <text:p text:style-name="P31"><text:soft-page-break/><text:s text:c="8"/>current-&gt;next = node;</text:p>
      <text:p text:style-name="P31"><text:s text:c="4"/>}</text:p>
      <text:p text:style-name="P31"><text:s text:c="4"/>list-&gt;count++;</text:p>
      <text:p text:style-name="P31"><text:s text:c="4"/>list-&gt;modified = 1;</text:p>
      <text:p text:style-name="P31">}</text:p>
      <text:p text:style-name="P31"/>
      <text:p text:style-name="P31">// Удалить строку из начала</text:p>
      <text:p text:style-name="P31">void pop_front(List* list) {</text:p>
      <text:p text:style-name="P31"><text:s text:c="4"/>if (!list-&gt;head) return;</text:p>
      <text:p text:style-name="P31"><text:s text:c="4"/>Node* temp = list-&gt;head;</text:p>
      <text:p text:style-name="P31"><text:s text:c="4"/>list-&gt;head = list-&gt;head-&gt;next;</text:p>
      <text:p text:style-name="P31"><text:s text:c="4"/>free(temp);</text:p>
      <text:p text:style-name="P31"><text:s text:c="4"/>list-&gt;count--;</text:p>
      <text:p text:style-name="P31"><text:s text:c="4"/>list-&gt;modified = 1;</text:p>
      <text:p text:style-name="P31">}</text:p>
      <text:p text:style-name="P31"/>
      <text:p text:style-name="P31">// Удалить строку с конца</text:p>
      <text:p text:style-name="P31">void pop_back(List* list) {</text:p>
      <text:p text:style-name="P31"><text:s text:c="4"/>if (!list-&gt;head) return;</text:p>
      <text:p text:style-name="P31"><text:s text:c="4"/>if (!list-&gt;head-&gt;next) {</text:p>
      <text:p text:style-name="P31"><text:s text:c="8"/>free(list-&gt;head);</text:p>
      <text:p text:style-name="P31"><text:s text:c="8"/>list-&gt;head = NULL;</text:p>
      <text:p text:style-name="P31"><text:s text:c="8"/>list-&gt;count--;</text:p>
      <text:p text:style-name="P31"><text:s text:c="8"/>list-&gt;modified = 1;</text:p>
      <text:p text:style-name="P31"><text:s text:c="8"/>return;</text:p>
      <text:p text:style-name="P31"><text:s text:c="4"/>}</text:p>
      <text:p text:style-name="P31"><text:s text:c="4"/>Node* current = list-&gt;head;</text:p>
      <text:p text:style-name="P31"><text:s text:c="4"/>while (current-&gt;next-&gt;next) {</text:p>
      <text:p text:style-name="P31"><text:s text:c="8"/>current = current-&gt;next;</text:p>
      <text:p text:style-name="P31"><text:s text:c="4"/>}</text:p>
      <text:p text:style-name="P31"><text:s text:c="4"/>free(current-&gt;next);</text:p>
      <text:p text:style-name="P31"><text:s text:c="4"/>current-&gt;next = NULL;</text:p>
      <text:p text:style-name="P31"><text:s text:c="4"/>list-&gt;count--;</text:p>
      <text:p text:style-name="P31"><text:s text:c="4"/>list-&gt;modified = 1;</text:p>
      <text:p text:style-name="P31">}</text:p>
      <text:p text:style-name="P31"/>
      <text:p text:style-name="P31">// Записать список в поток вывода</text:p>
      <text:p text:style-name="P31">void dump_list(List* list, const char* filename) {</text:p>
      <text:p text:style-name="P31"><text:s text:c="4"/>FILE* fp = stdout;</text:p>
      <text:p text:style-name="P31"><text:s text:c="4"/>if (filename) {</text:p>
      <text:p text:style-name="P31"><text:s text:c="8"/>fp = fopen(filename, "w");</text:p>
      <text:p text:style-name="P31"><text:s text:c="8"/>if (!fp) {</text:p>
      <text:p text:style-name="P31"><text:s text:c="12"/>fprintf(stderr, "Ошибка: Не удалось открыть файл %s.\n", filename);</text:p>
      <text:p text:style-name="P31"><text:s text:c="12"/>return;</text:p>
      <text:p text:style-name="P31"><text:s text:c="8"/>}</text:p>
      <text:p text:style-name="P31"><text:s text:c="8"/>issaved = 1;</text:p>
      <text:p text:style-name="P31"><text:s text:c="4"/>}</text:p>
      <text:p text:style-name="P31"/>
      <text:p text:style-name="P31"><text:s text:c="4"/>Node* current = list-&gt;head;</text:p>
      <text:p text:style-name="P31"><text:s text:c="4"/>int i = 0;</text:p>
      <text:p text:style-name="P31"><text:s text:c="4"/>while (current) {</text:p>
      <text:p text:style-name="P31"><text:s text:c="8"/>uintptr_t addr = (uintptr_t)(current);</text:p>
      <text:p text:style-name="P31"><text:s text:c="8"/>uintptr_t next_addr = current-&gt;next ? (uintptr_t)(current-&gt;next) : 0;</text:p>
      <text:p text:style-name="P31"><text:s text:c="8"/>fprintf(fp, "0x%016lx 0x%016lx %s\n", addr, next_addr, current-&gt;isbn);</text:p>
      <text:p text:style-name="P31"><text:s text:c="8"/>current = current-&gt;next;</text:p>
      <text:p text:style-name="P31"><text:s text:c="8"/>i++;</text:p>
      <text:p text:style-name="P31"><text:soft-page-break/><text:s text:c="4"/>}</text:p>
      <text:p text:style-name="P31"/>
      <text:p text:style-name="P31"><text:s text:c="4"/>if (filename) fclose(fp);</text:p>
      <text:p text:style-name="P31">}</text:p>
      <text:p text:style-name="P31"/>
      <text:p text:style-name="P31">// Переместить минимальные элементы в начало списка</text:p>
      <text:p text:style-name="P31">void min_first(List* list) {</text:p>
      <text:p text:style-name="P31"><text:s text:c="4"/>if (!list-&gt;head || !list-&gt;head-&gt;next) return;</text:p>
      <text:p text:style-name="P31"/>
      <text:p text:style-name="P31"><text:s text:c="4"/>// Нахождение минимального ISBN-13</text:p>
      <text:p text:style-name="P31"><text:s text:c="4"/>Node* current = list-&gt;head;</text:p>
      <text:p text:style-name="P31"><text:s text:c="4"/>char* min_isbn = current-&gt;isbn;</text:p>
      <text:p text:style-name="P31"><text:s text:c="4"/>while (current) {</text:p>
      <text:p text:style-name="P31"><text:s text:c="8"/>if (strcmp(current-&gt;isbn, min_isbn) &lt; 0) {</text:p>
      <text:p text:style-name="P31"><text:s text:c="12"/>min_isbn = current-&gt;isbn;</text:p>
      <text:p text:style-name="P31"><text:s text:c="8"/>}</text:p>
      <text:p text:style-name="P31"><text:s text:c="8"/>current = current-&gt;next;</text:p>
      <text:p text:style-name="P31"><text:s text:c="4"/>}</text:p>
      <text:p text:style-name="P31"/>
      <text:p text:style-name="P31"><text:s text:c="4"/>Node* min_nodes = NULL;</text:p>
      <text:p text:style-name="P31"><text:s text:c="4"/>Node* other_nodes = NULL;</text:p>
      <text:p text:style-name="P31"><text:s text:c="4"/>Node* min_tail = NULL;</text:p>
      <text:p text:style-name="P31"><text:s text:c="4"/>Node* other_tail = NULL;</text:p>
      <text:p text:style-name="P31"/>
      <text:p text:style-name="P31"><text:s text:c="4"/>current = list-&gt;head;</text:p>
      <text:p text:style-name="P31"><text:s text:c="4"/>while (current) {</text:p>
      <text:p text:style-name="P31"><text:s text:c="8"/>Node* next = current-&gt;next;</text:p>
      <text:p text:style-name="P31"><text:s text:c="8"/>current-&gt;next = NULL;</text:p>
      <text:p text:style-name="P31"><text:s text:c="8"/>if (strcmp(current-&gt;isbn, min_isbn) == 0) {</text:p>
      <text:p text:style-name="P31"><text:s text:c="12"/>if (!min_nodes) {</text:p>
      <text:p text:style-name="P31"><text:s text:c="16"/>min_nodes = current;</text:p>
      <text:p text:style-name="P31"><text:s text:c="16"/>min_tail = current;</text:p>
      <text:p text:style-name="P31"><text:s text:c="12"/>} else {</text:p>
      <text:p text:style-name="P31"><text:s text:c="16"/>min_tail-&gt;next = current;</text:p>
      <text:p text:style-name="P31"><text:s text:c="16"/>min_tail = current;</text:p>
      <text:p text:style-name="P31"><text:s text:c="12"/>}</text:p>
      <text:p text:style-name="P31"><text:s text:c="8"/>} else {</text:p>
      <text:p text:style-name="P31"><text:s text:c="12"/>if (!other_nodes) {</text:p>
      <text:p text:style-name="P31"><text:s text:c="16"/>other_nodes = current;</text:p>
      <text:p text:style-name="P31"><text:s text:c="16"/>other_tail = current;</text:p>
      <text:p text:style-name="P31"><text:s text:c="12"/>} else {</text:p>
      <text:p text:style-name="P31"><text:s text:c="16"/>other_tail-&gt;next = current;</text:p>
      <text:p text:style-name="P31"><text:s text:c="16"/>other_tail = current;</text:p>
      <text:p text:style-name="P31"><text:s text:c="12"/>}</text:p>
      <text:p text:style-name="P31"><text:s text:c="8"/>}</text:p>
      <text:p text:style-name="P31"><text:s text:c="8"/>current = next;</text:p>
      <text:p text:style-name="P31"><text:s text:c="4"/>}</text:p>
      <text:p text:style-name="P31"/>
      <text:p text:style-name="P31"><text:s text:c="4"/>if (min_tail) {</text:p>
      <text:p text:style-name="P31"><text:s text:c="8"/>min_tail-&gt;next = other_nodes;</text:p>
      <text:p text:style-name="P31"><text:s text:c="8"/>list-&gt;head = min_nodes;</text:p>
      <text:p text:style-name="P31"><text:s text:c="4"/>} else {</text:p>
      <text:p text:style-name="P31"><text:s text:c="8"/>list-&gt;head = other_nodes;</text:p>
      <text:p text:style-name="P31"><text:s text:c="4"/>}</text:p>
      <text:p text:style-name="P31"><text:s text:c="4"/>list-&gt;modified = 1;</text:p>
      <text:p text:style-name="P31">}</text:p>
      <text:p text:style-name="P31"><text:soft-page-break/></text:p>
      <text:p text:style-name="P31"/>
      <text:p text:style-name="P31">// Чтение файла</text:p>
      <text:p text:style-name="P31">int read_file(List* list, const char* filename, uint8_t** data_section, size_t* data_size) {</text:p>
      <text:p text:style-name="P31"><text:s text:c="4"/>FILE* fp = fopen(filename, "rb");</text:p>
      <text:p text:style-name="P31"><text:s text:c="4"/>if (!fp) return 0;</text:p>
      <text:p text:style-name="P31"/>
      <text:p text:style-name="P31"><text:s text:c="4"/>fseek(fp, 0, SEEK_END);</text:p>
      <text:p text:style-name="P31"><text:s text:c="4"/>long size = ftell(fp);</text:p>
      <text:p text:style-name="P31"><text:s text:c="4"/>if (size == 0) {</text:p>
      <text:p text:style-name="P31"><text:s text:c="8"/>fclose(fp);</text:p>
      <text:p text:style-name="P31"><text:s text:c="8"/>return 0;</text:p>
      <text:p text:style-name="P31"><text:s text:c="4"/>}</text:p>
      <text:p text:style-name="P31"><text:s text:c="4"/>fseek(fp, 0, SEEK_SET);</text:p>
      <text:p text:style-name="P31"/>
      <text:p text:style-name="P31"><text:s text:c="4"/>// Чтение offset</text:p>
      <text:p text:style-name="P31"><text:s text:c="4"/>uint32_t offset;</text:p>
      <text:p text:style-name="P31"><text:s text:c="4"/>if (fread(&amp;offset, sizeof(uint32_t), 1, fp) != 1) {</text:p>
      <text:p text:style-name="P31"><text:s text:c="8"/>fclose(fp);</text:p>
      <text:p text:style-name="P31"><text:s text:c="8"/>fprintf(stderr, "Ошибка: Неправильный формат файла.\n");</text:p>
      <text:p text:style-name="P31"><text:s text:c="8"/>return 1;</text:p>
      <text:p text:style-name="P31"><text:s text:c="4"/>}</text:p>
      <text:p text:style-name="P31"/>
      <text:p text:style-name="P31"><text:s text:c="4"/>// Чтение строк</text:p>
      <text:p text:style-name="P31"><text:s text:c="4"/>fseek(fp, offset, SEEK_SET);</text:p>
      <text:p text:style-name="P31"><text:s text:c="4"/>long pos = offset;</text:p>
      <text:p text:style-name="P31"><text:s text:c="4"/>char buffer[MAX_ISBN_LEN];</text:p>
      <text:p text:style-name="P31"><text:s text:c="4"/>int string_count = 0;</text:p>
      <text:p text:style-name="P31"><text:s text:c="4"/>while (1) {</text:p>
      <text:p text:style-name="P31"><text:s text:c="8"/>int i = 0;</text:p>
      <text:p text:style-name="P31"><text:s text:c="8"/>char c;</text:p>
      <text:p text:style-name="P31"><text:s text:c="8"/>while (fread(&amp;c, 1, 1, fp) &amp;&amp; c != '\0' &amp;&amp; i &lt; MAX_ISBN_LEN) {</text:p>
      <text:p text:style-name="P31"><text:s text:c="12"/>buffer[i++] = c;</text:p>
      <text:p text:style-name="P31"><text:s text:c="8"/>}</text:p>
      <text:p text:style-name="P31"><text:s text:c="8"/>if (c != '\0') break; <text:s/>// Конец строк</text:p>
      <text:p text:style-name="P31"><text:s text:c="8"/>buffer[i] = '\0';</text:p>
      <text:p text:style-name="P31"><text:s text:c="8"/>pos = ftell(fp);</text:p>
      <text:p text:style-name="P31"><text:s text:c="8"/>if (!validate_isbn13(buffer)) {</text:p>
      <text:p text:style-name="P31"><text:s text:c="12"/>fclose(fp);</text:p>
      <text:p text:style-name="P31"><text:s text:c="12"/>fprintf(stderr, "Ошибка: неправильный формат ISBN-13: %s\n", buffer);</text:p>
      <text:p text:style-name="P31"><text:s text:c="12"/>return 1;</text:p>
      <text:p text:style-name="P31"><text:s text:c="8"/>}</text:p>
      <text:p text:style-name="P31"><text:s text:c="8"/>push_back(list, buffer);</text:p>
      <text:p text:style-name="P31"><text:s text:c="8"/>string_count++;</text:p>
      <text:p text:style-name="P31"><text:s text:c="4"/>}</text:p>
      <text:p text:style-name="P31"/>
      <text:p text:style-name="P31"/>
      <text:p text:style-name="P31"><text:s text:c="4"/>// Позиция начала данных</text:p>
      <text:p text:style-name="P31"><text:s text:c="4"/>long data_start = pos;</text:p>
      <text:p text:style-name="P31"><text:s text:c="4"/>fseek(fp, -string_count * sizeof(uint16_t), SEEK_END);</text:p>
      <text:p text:style-name="P31"><text:s text:c="4"/>long indices_start = ftell(fp);</text:p>
      <text:p text:style-name="P31"><text:s text:c="4"/>if (indices_start &lt;= data_start) {</text:p>
      <text:p text:style-name="P31"><text:s text:c="8"/>fclose(fp);</text:p>
      <text:p text:style-name="P31"><text:s text:c="8"/>fprintf(stderr, "Ошибка: неправильный формат файла.\n");</text:p>
      <text:p text:style-name="P31"><text:s text:c="8"/>return 1;</text:p>
      <text:p text:style-name="P31"><text:soft-page-break/><text:s text:c="4"/>}</text:p>
      <text:p text:style-name="P31"/>
      <text:p text:style-name="P31"><text:s text:c="4"/>// Выделяем память и читаем секцию данных</text:p>
      <text:p text:style-name="P31"><text:s text:c="4"/>*data_size = indices_start - data_start;</text:p>
      <text:p text:style-name="P31"><text:s text:c="4"/>*data_section = malloc(*data_size);</text:p>
      <text:p text:style-name="P31"><text:s text:c="4"/>if (!*data_section) {</text:p>
      <text:p text:style-name="P31"><text:s text:c="8"/>fclose(fp);</text:p>
      <text:p text:style-name="P31"><text:s text:c="8"/>fprintf(stderr, "Ошибка: не удалось выделить память.\n");</text:p>
      <text:p text:style-name="P31"><text:s text:c="8"/>return 1;</text:p>
      <text:p text:style-name="P31"><text:s text:c="4"/>}</text:p>
      <text:p text:style-name="P31"/>
      <text:p text:style-name="P31"><text:s text:c="4"/>fseek(fp, data_start, SEEK_SET);</text:p>
      <text:p text:style-name="P31"><text:s text:c="4"/>if (fread(*data_section, 1, *data_size, fp) != *data_size) {</text:p>
      <text:p text:style-name="P31"><text:s text:c="8"/>fclose(fp);</text:p>
      <text:p text:style-name="P31"><text:s text:c="8"/>free(*data_section);</text:p>
      <text:p text:style-name="P31"><text:s text:c="8"/>*data_section = NULL;</text:p>
      <text:p text:style-name="P31"><text:s text:c="8"/>*data_size = 0;</text:p>
      <text:p text:style-name="P31"><text:s text:c="8"/>fprintf(stderr, "Ошибка: не удалось прочитать секцию данных.\n");</text:p>
      <text:p text:style-name="P31"><text:s text:c="8"/>return 1;</text:p>
      <text:p text:style-name="P31"><text:s text:c="4"/>}</text:p>
      <text:p text:style-name="P31"/>
      <text:p text:style-name="P31"><text:s text:c="4"/>// Чтение индексов</text:p>
      <text:p text:style-name="P31"><text:s text:c="4"/>Node* current = list-&gt;head;</text:p>
      <text:p text:style-name="P31"><text:s text:c="4"/>for (int i = 0; i &lt; string_count &amp;&amp; current; i++) {</text:p>
      <text:p text:style-name="P31"><text:s text:c="8"/>uint16_t index;</text:p>
      <text:p text:style-name="P31"><text:s text:c="8"/>if (fread(&amp;index, sizeof(uint16_t), 1, fp) != 1) {</text:p>
      <text:p text:style-name="P31"><text:s text:c="12"/>fclose(fp);</text:p>
      <text:p text:style-name="P31"><text:s text:c="12"/>free(*data_section);</text:p>
      <text:p text:style-name="P31"><text:s text:c="12"/>*data_section = NULL;</text:p>
      <text:p text:style-name="P31"><text:s text:c="12"/>*data_size = 0;</text:p>
      <text:p text:style-name="P31"><text:s text:c="12"/>fprintf(stderr, "Ошибка: неправльный формат файла.\n");</text:p>
      <text:p text:style-name="P31"><text:s text:c="12"/>return 1;</text:p>
      <text:p text:style-name="P31"><text:s text:c="8"/>}</text:p>
      <text:p text:style-name="P31"><text:s text:c="8"/>current-&gt;index = index;</text:p>
      <text:p text:style-name="P31"><text:s text:c="8"/>current = current-&gt;next;</text:p>
      <text:p text:style-name="P31"><text:s text:c="4"/>}</text:p>
      <text:p text:style-name="P31"/>
      <text:p text:style-name="P31"><text:s text:c="4"/>fclose(fp);</text:p>
      <text:p text:style-name="P31"><text:s text:c="4"/>return 0;</text:p>
      <text:p text:style-name="P31">}</text:p>
      <text:p text:style-name="P31"/>
      <text:p text:style-name="P31"/>
      <text:p text:style-name="P31"/>
      <text:p text:style-name="P31"/>
      <text:p text:style-name="P31">// Write file</text:p>
      <text:p text:style-name="P31">void write_file(List* list, const char* filename, uint8_t* data_section, size_t data_size) {</text:p>
      <text:p text:style-name="P31"><text:s text:c="4"/>FILE* fp = fopen(filename, "wb");</text:p>
      <text:p text:style-name="P31"><text:s text:c="4"/>if (!fp) {</text:p>
      <text:p text:style-name="P31"><text:s text:c="8"/>fprintf(stderr, "Ошибка: не удалось открыть файл %s.\n", filename);</text:p>
      <text:p text:style-name="P31"><text:s text:c="8"/>exit(2);</text:p>
      <text:p text:style-name="P31"><text:s text:c="4"/>}</text:p>
      <text:p text:style-name="P31"/>
      <text:p text:style-name="P31"><text:s text:c="4"/>if (list-&gt;count == 0) {</text:p>
      <text:p text:style-name="P31"><text:s text:c="8"/>fclose(fp);</text:p>
      <text:p text:style-name="P31"><text:s text:c="8"/>return;</text:p>
      <text:p text:style-name="P31"><text:soft-page-break/><text:s text:c="4"/>}</text:p>
      <text:p text:style-name="P31"/>
      <text:p text:style-name="P31"><text:s text:c="4"/>// Запись offset</text:p>
      <text:p text:style-name="P31"><text:s text:c="4"/>uint32_t offset = 4;</text:p>
      <text:p text:style-name="P31"><text:s text:c="4"/>fwrite(&amp;offset, sizeof(uint32_t), 1, fp);</text:p>
      <text:p text:style-name="P31"/>
      <text:p text:style-name="P31"><text:s text:c="4"/>// Запись строк</text:p>
      <text:p text:style-name="P31"><text:s text:c="4"/>Node* current = list-&gt;head;</text:p>
      <text:p text:style-name="P31"><text:s text:c="4"/>int i = 0;</text:p>
      <text:p text:style-name="P31"><text:s text:c="4"/>while (current) {</text:p>
      <text:p text:style-name="P31"><text:s text:c="8"/>current-&gt;index = i++;</text:p>
      <text:p text:style-name="P31"><text:s text:c="8"/>fwrite(current-&gt;isbn, strlen(current-&gt;isbn) + 1, 1, fp);</text:p>
      <text:p text:style-name="P31"><text:s text:c="8"/>current = current-&gt;next;</text:p>
      <text:p text:style-name="P31"><text:s text:c="4"/>}</text:p>
      <text:p text:style-name="P31"/>
      <text:p text:style-name="P31"><text:s text:c="4"/>// Запись данных</text:p>
      <text:p text:style-name="P31"><text:s text:c="4"/>if (data_section &amp;&amp; data_size &gt; 0) {</text:p>
      <text:p text:style-name="P31"><text:s text:c="8"/>fwrite(data_section, 1, data_size, fp);</text:p>
      <text:p text:style-name="P31"><text:s text:c="4"/>}</text:p>
      <text:p text:style-name="P31"/>
      <text:p text:style-name="P31"><text:s text:c="4"/>// Запись индексов</text:p>
      <text:p text:style-name="P31"><text:s text:c="4"/>current = list-&gt;head;</text:p>
      <text:p text:style-name="P31"><text:s text:c="4"/>while (current) {</text:p>
      <text:p text:style-name="P31"><text:s text:c="8"/>uint16_t index = current-&gt;index;</text:p>
      <text:p text:style-name="P31"><text:s text:c="8"/>fwrite(&amp;index, sizeof(uint16_t), 1, fp);</text:p>
      <text:p text:style-name="P31"><text:s text:c="8"/>current = current-&gt;next;</text:p>
      <text:p text:style-name="P31"><text:s text:c="4"/>}</text:p>
      <text:p text:style-name="P31"/>
      <text:p text:style-name="P31"><text:s text:c="4"/>fclose(fp);</text:p>
      <text:p text:style-name="P31">}</text:p>
      <text:p text:style-name="P31"/>
      <text:p text:style-name="P31">// Обработка команд</text:p>
      <text:p text:style-name="P31">void handle_commands(List* list, const char* filename, uint8_t* data_section, size_t data_size) {</text:p>
      <text:p text:style-name="P31"><text:s text:c="4"/>char line[MAX_LINE];</text:p>
      <text:p text:style-name="P31"><text:s text:c="4"/>while (fgets(line, MAX_LINE, stdin)) {</text:p>
      <text:p text:style-name="P31"><text:s text:c="8"/>line[strcspn(line, "\n")] = '\0';</text:p>
      <text:p text:style-name="P31"><text:s text:c="8"/>if (strlen(line) == 0) continue;</text:p>
      <text:p text:style-name="P31"/>
      <text:p text:style-name="P31"><text:s text:c="8"/>char* token = strtok(line, " ");</text:p>
      <text:p text:style-name="P31"><text:s text:c="8"/>if (!token) continue;</text:p>
      <text:p text:style-name="P31"/>
      <text:p text:style-name="P31"><text:s text:c="8"/>if (strcmp(token, "push_front") == 0) {</text:p>
      <text:p text:style-name="P31"><text:s text:c="12"/>token = strtok(NULL, " ");</text:p>
      <text:p text:style-name="P31"><text:s text:c="12"/>while (token) {</text:p>
      <text:p text:style-name="P31"><text:s text:c="16"/>push_front(list, token);</text:p>
      <text:p text:style-name="P31"><text:s text:c="16"/>token = strtok(NULL, " ");</text:p>
      <text:p text:style-name="P31"><text:s text:c="12"/>}</text:p>
      <text:p text:style-name="P31"><text:s text:c="8"/>}</text:p>
      <text:p text:style-name="P31"><text:s text:c="8"/>else if (strcmp(token, "push_back") == 0) {</text:p>
      <text:p text:style-name="P31"><text:s text:c="12"/>token = strtok(NULL, " ");</text:p>
      <text:p text:style-name="P31"><text:s text:c="12"/>while (token) {</text:p>
      <text:p text:style-name="P31"><text:s text:c="16"/>push_back(list, token);</text:p>
      <text:p text:style-name="P31"><text:s text:c="16"/>token = strtok(NULL, " ");</text:p>
      <text:p text:style-name="P31"><text:s text:c="12"/>}</text:p>
      <text:p text:style-name="P31"><text:s text:c="8"/>}</text:p>
      <text:p text:style-name="P31"><text:soft-page-break/><text:s text:c="8"/>else if (strcmp(token, "pop_front") == 0) {</text:p>
      <text:p text:style-name="P31"><text:s text:c="12"/>pop_front(list);</text:p>
      <text:p text:style-name="P31"><text:s text:c="8"/>}</text:p>
      <text:p text:style-name="P31"><text:s text:c="8"/>else if (strcmp(token, "pop_back") == 0) {</text:p>
      <text:p text:style-name="P31"><text:s text:c="12"/>pop_back(list);</text:p>
      <text:p text:style-name="P31"><text:s text:c="8"/>}</text:p>
      <text:p text:style-name="P31"><text:s text:c="8"/>else if (strcmp(token, "dump") == 0) {</text:p>
      <text:p text:style-name="P31"><text:s text:c="12"/>token = strtok(NULL, " ");</text:p>
      <text:p text:style-name="P31"><text:s text:c="12"/>dump_list(list, token);</text:p>
      <text:p text:style-name="P31"><text:s text:c="8"/>}</text:p>
      <text:p text:style-name="P31"><text:s text:c="8"/>else if (strcmp(token, "min_first") == 0) {</text:p>
      <text:p text:style-name="P31"><text:s text:c="12"/>min_first(list);</text:p>
      <text:p text:style-name="P31"><text:s text:c="8"/>}</text:p>
      <text:p text:style-name="P31"><text:s text:c="8"/>else if (strcmp(token, "exit") == 0) {</text:p>
      <text:p text:style-name="P31"><text:s text:c="12"/>break;</text:p>
      <text:p text:style-name="P31"><text:s text:c="8"/>}</text:p>
      <text:p text:style-name="P31"><text:s text:c="8"/>else {</text:p>
      <text:p text:style-name="P31"><text:s text:c="12"/>fprintf(stderr, "Ошибка: неподдерживаемая команда: '%s'.\n", token);</text:p>
      <text:p text:style-name="P31"><text:s text:c="8"/>}</text:p>
      <text:p text:style-name="P31"><text:s text:c="4"/>}</text:p>
      <text:p text:style-name="P31"/>
      <text:p text:style-name="P31"><text:s text:c="4"/>if (list-&gt;modified &amp;&amp; issaved == 0) {</text:p>
      <text:p text:style-name="P31"><text:s text:c="8"/>write_file(list, filename, data_section, data_size);</text:p>
      <text:p text:style-name="P31"><text:s text:c="4"/>}</text:p>
      <text:p text:style-name="P31">}</text:p>
      <text:p text:style-name="P31"/>
      <text:p text:style-name="P31"/>
      <text:p text:style-name="P31">int main(int argc, char* argv[]) {</text:p>
      <text:p text:style-name="P31"><text:s text:c="4"/>// Проверка запуска с переменной среды, включающей отладочный вывод.</text:p>
      <text:p text:style-name="P31"><text:s text:c="4"/>// Пример запуска с установкой переменной LAB4DEBUG в 1:</text:p>
      <text:p text:style-name="P31"><text:s text:c="4"/>// $ LAB4DEBUG=1 ./prg4abcNXXXXX test.txt</text:p>
      <text:p text:style-name="P31"><text:s text:c="4"/>char *DEBUG = getenv("LAB4DEBUG");</text:p>
      <text:p text:style-name="P31"><text:s text:c="4"/>if (DEBUG) {</text:p>
      <text:p text:style-name="P31"><text:s text:c="8"/>fprintf(stderr, "Включен вывод отладочных сообщений\n");</text:p>
      <text:p text:style-name="P31"><text:s text:c="4"/>}</text:p>
      <text:p text:style-name="P31"/>
      <text:p text:style-name="P31"/>
      <text:p text:style-name="P31"><text:s text:c="4"/>char *author = "Пахомов Владимир Юрьевич, гр. N3150\nВариант: 1-9-10-2";</text:p>
      <text:p text:style-name="P31"/>
      <text:p text:style-name="P31"><text:s text:c="4"/>if (argc == 2) {</text:p>
      <text:p text:style-name="P31"><text:s text:c="8"/>if (strcmp(argv[1], "-v") == 0) {</text:p>
      <text:p text:style-name="P31"><text:s text:c="12"/>fprintf(stdout, "%s\n", author);</text:p>
      <text:p text:style-name="P31"><text:s text:c="12"/>exit(0);</text:p>
      <text:p text:style-name="P31"><text:s text:c="8"/>}</text:p>
      <text:p text:style-name="P31"><text:s text:c="4"/>}</text:p>
      <text:p text:style-name="P31"><text:s text:c="4"/>if (argc == 1) {</text:p>
      <text:p text:style-name="P31"><text:s text:c="8"/>fprintf(stderr, "Ошибка: не задано имя файла.\n");</text:p>
      <text:p text:style-name="P31"><text:s text:c="8"/>exit(1);</text:p>
      <text:p text:style-name="P31"><text:s text:c="4"/>}</text:p>
      <text:p text:style-name="P31"><text:s text:c="4"/>if (argc &gt; 2) {</text:p>
      <text:p text:style-name="P31"><text:s text:c="8"/>fprintf(stderr, "Использование: %s [-v] имя_файла.\n", argv[0]);</text:p>
      <text:p text:style-name="P31"><text:s text:c="8"/>exit(2);</text:p>
      <text:p text:style-name="P31"><text:s text:c="4"/>}</text:p>
      <text:p text:style-name="P31"/>
      <text:p text:style-name="P31"><text:s text:c="4"/>List list;</text:p>
      <text:p text:style-name="P31"><text:s text:c="4"/>init_list(&amp;list);</text:p>
      <text:p text:style-name="P31"><text:soft-page-break/></text:p>
      <text:p text:style-name="P31"><text:s text:c="4"/>uint8_t* data_section = NULL;</text:p>
      <text:p text:style-name="P31"><text:s text:c="4"/>size_t data_size = 0;</text:p>
      <text:p text:style-name="P31"/>
      <text:p text:style-name="P31"><text:s text:c="4"/>if (read_file(&amp;list, argv[1], &amp;data_section, &amp;data_size) != 0) {</text:p>
      <text:p text:style-name="P31"><text:s text:c="8"/>free_list(&amp;list);</text:p>
      <text:p text:style-name="P31"><text:s text:c="8"/>exit(1);</text:p>
      <text:p text:style-name="P31"><text:s text:c="4"/>}</text:p>
      <text:p text:style-name="P31"/>
      <text:p text:style-name="P31"><text:s text:c="4"/>handle_commands(&amp;list, argv[1], data_section, data_size);</text:p>
      <text:p text:style-name="P31"/>
      <text:p text:style-name="P31"><text:s text:c="4"/>free_list(&amp;list);</text:p>
      <text:p text:style-name="P31"><text:s text:c="4"/>free(data_section);</text:p>
      <text:p text:style-name="P31"><text:s text:c="4"/>return EXIT_SUCCESS;</text:p>
      <text:p text:style-name="P31">}</text:p>
      <text:p text:style-name="P31"/>
      <text:p text:style-name="P31">// Вариант 1-9-10-2</text:p>
      <text:p text:style-name="P31">// 1 - Односвязный список</text:p>
      <text:p text:style-name="P31">// 9 - ISBN-13 978-0-306-40615-7, 978-2-266-11156-0</text:p>
      <text:p text:style-name="P31">// 10 - Команда: min_first</text:p>
      <text:p text:style-name="P31">// <text:s text:c="5"/>Описание: Переместить элемент с минимальным значением (или все элементы с</text:p>
      <text:p text:style-name="P31">// <text:s text:c="5"/>минимальным значением, если их в списке несколько) в начало списка, не</text:p>
      <text:p text:style-name="P31">// <text:s text:c="5"/>изменяя порядок других элементов.</text:p>
      <text:p text:style-name="P33">// 2 - offset(4 байта) + строки + данные + индексы(2 байта каждый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63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rey</meta:initial-creator>
    <meta:editing-cycles>24</meta:editing-cycles>
    <meta:creation-date>2021-10-17T09:09:00</meta:creation-date>
    <dc:date>2025-04-16T20:44:37.733649272</dc:date>
    <meta:editing-duration>PT2H34M43S</meta:editing-duration>
    <meta:generator>LibreOffice/25.2.2.2$Linux_X86_64 LibreOffice_project/520$Build-2</meta:generator>
    <meta:document-statistic meta:table-count="0" meta:image-count="4" meta:object-count="0" meta:page-count="16" meta:paragraph-count="520" meta:word-count="1806" meta:character-count="14879" meta:non-whitespace-character-count="10931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