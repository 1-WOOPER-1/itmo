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C000000A3A96B18E1.png" manifest:media-type="image/png"/>
  <manifest:file-entry manifest:full-path="Pictures/100000010000029100000133FA256B59.png" manifest:media-type="image/png"/>
  <manifest:file-entry manifest:full-path="Pictures/100000000000025400000036D0D1DA86.png" manifest:media-type="image/png"/>
  <manifest:file-entry manifest:full-path="Pictures/100000010000026C0000013525C450C3.png" manifest:media-type="image/png"/>
  <manifest:file-entry manifest:full-path="Pictures/10000001000002B600000134347AF64A.png" manifest:media-type="image/png"/>
  <manifest:file-entry manifest:full-path="Pictures/100000010000021F0000004685248824.png" manifest:media-type="image/png"/>
  <manifest:file-entry manifest:full-path="Pictures/10000000000003900000010FD1606888.png" manifest:media-type="image/png"/>
  <manifest:file-entry manifest:full-path="Pictures/100000010000022100000100AD173D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 Source code" svg:font-family="'Source code'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Code Pro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</office:font-face-decls>
  <office:automatic-styles>
    <style:style style:name="P1" style:family="paragraph" style:parent-style-name="Normal_20__28_Web_29_">
      <style:paragraph-properties fo:margin-top="0cm" fo:margin-bottom="0.494cm" style:contextual-spacing="false" fo:text-align="center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Normal_20__28_Web_29_">
      <style:paragraph-properties fo:margin-left="3.747cm" fo:margin-top="0.494cm" fo:margin-bottom="0.494cm" style:contextual-spacing="false" fo:text-indent="2.498cm" style:auto-text-indent="false"/>
      <style:text-properties fo:background-color="transparent"/>
    </style:style>
    <style:style style:name="P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111975" officeooo:paragraph-rsid="00111975"/>
    </style:style>
    <style:style style:name="P5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style:font-size-asian="13.5pt" style:font-size-complex="13.5pt"/>
    </style:style>
    <style:style style:name="P6" style:family="paragraph" style:parent-style-name="Normal_20__28_Web_29_">
      <style:paragraph-properties fo:margin-top="0.494cm" fo:margin-bottom="0.494cm" style:contextual-spacing="false"/>
      <style:text-properties fo:color="#000000" loext:opacity="100%" fo:font-size="13.5pt" style:font-size-asian="13.5pt" style:font-size-complex="13.5pt"/>
    </style:style>
    <style:style style:name="P7" style:family="paragraph" style:parent-style-name="Normal_20__28_Web_29_">
      <style:paragraph-properties fo:margin-top="0.494cm" fo:margin-bottom="0.494cm" style:contextual-spacing="false" fo:text-align="end" style:justify-single-word="false"/>
    </style:style>
    <style:style style:name="P8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font-size="14pt" officeooo:rsid="00024d6c" officeooo:paragraph-rsid="00024d6c" fo:background-color="transparent" style:font-size-asian="14pt"/>
    </style:style>
    <style:style style:name="P9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font-size="14pt" style:font-size-asian="14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style:font-size-asian="14pt" style:font-size-complex="13.5pt"/>
    </style:style>
    <style:style style:name="P1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24d6c"/>
    </style:style>
    <style:style style:name="P1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font-weight="bold" officeooo:rsid="0004f2fb" officeooo:paragraph-rsid="0004f2fb" style:font-weight-asian="bold" style:font-weight-complex="bold"/>
    </style:style>
    <style:style style:name="P14" style:family="paragraph" style:parent-style-name="Normal_20__28_Web_29_" style:list-style-name="" style:master-page-name="">
      <style:paragraph-properties fo:margin-top="0.494cm" fo:margin-bottom="0.494cm" style:contextual-spacing="false" fo:text-align="center" style:justify-single-word="false" style:page-number="auto" fo:break-before="page"/>
      <style:text-properties fo:color="#000000" loext:opacity="100%" fo:font-size="12pt" fo:font-weight="bold" officeooo:rsid="0004f2fb" officeooo:paragraph-rsid="0004f2fb" style:font-size-asian="12pt" style:font-weight-asian="bold" style:font-size-complex="12pt" style:font-weight-complex="bold"/>
    </style:style>
    <style:style style:name="P15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font-size="12pt" officeooo:rsid="00275f7c" officeooo:paragraph-rsid="00275f7c" style:font-size-asian="12pt" style:font-size-complex="12pt"/>
    </style:style>
    <style:style style:name="P16" style:family="paragraph" style:parent-style-name="Normal_20__28_Web_29_" style:master-page-name="">
      <loext:graphic-properties draw:fill="none"/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cm" style:auto-text-indent="false" style:page-number="auto" fo:background-color="transparent" style:writing-mode="lr-tb"/>
      <style:text-properties fo:font-size="12pt" officeooo:rsid="00275f7c" officeooo:paragraph-rsid="00275f7c" style:font-size-asian="12pt" style:font-size-complex="12pt"/>
    </style:style>
    <style:style style:name="P17" style:family="paragraph" style:parent-style-name="Normal_20__28_Web_29_">
      <loext:graphic-properties draw:fill="none"/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cm" style:auto-text-indent="false" fo:background-color="transparent" style:writing-mode="lr-tb"/>
      <style:text-properties fo:font-size="12pt" officeooo:rsid="00275f7c" officeooo:paragraph-rsid="00275f7c" style:font-size-asian="12pt" style:font-size-complex="12pt"/>
    </style:style>
    <style:style style:name="P18" style:family="paragraph" style:parent-style-name="Normal_20__28_Web_29_">
      <loext:graphic-properties draw:fill="none"/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cm" style:auto-text-indent="false" fo:background-color="transparent" style:writing-mode="lr-tb"/>
      <style:text-properties officeooo:rsid="00275f7c" officeooo:paragraph-rsid="00275f7c"/>
    </style:style>
    <style:style style:name="P19" style:family="paragraph" style:parent-style-name="Normal_20__28_Web_29_">
      <loext:graphic-properties draw:fill="none"/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2pt" officeooo:rsid="00275f7c" officeooo:paragraph-rsid="00275f7c" style:font-size-asian="10.5pt" style:font-size-complex="12pt"/>
    </style:style>
    <style:style style:name="P20" style:family="paragraph" style:parent-style-name="Normal_20__28_Web_29_" style:master-page-name="">
      <loext:graphic-properties draw:fill="none"/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cm" style:auto-text-indent="false" style:page-number="auto" fo:background-color="transparent" style:writing-mode="lr-tb"/>
      <style:text-properties fo:font-size="12pt" officeooo:rsid="00275f7c" officeooo:paragraph-rsid="00275f7c" style:font-size-asian="10.5pt" style:font-size-complex="12pt"/>
    </style:style>
    <style:style style:name="P21" style:family="paragraph" style:parent-style-name="Normal_20__28_Web_29_" style:list-style-name="">
      <style:paragraph-properties fo:margin-top="0.494cm" fo:margin-bottom="0.494cm" style:contextual-spacing="false" fo:text-align="center" style:justify-single-word="false"/>
      <style:text-properties fo:color="#000000" loext:opacity="100%" fo:font-size="12pt" fo:font-weight="bold" officeooo:rsid="0006222e" officeooo:paragraph-rsid="0006222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color="#333333" loext:opacity="100%" style:font-name="Source Code Pro" fo:font-size="12pt" fo:font-weight="normal" fo:background-color="transparen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style:line-height-at-least="0.503cm"/>
      <style:text-properties style:font-name="Source Code Pro" fo:font-size="12pt" fo:background-color="transparent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333333" loext:opacity="100%" style:font-name="Source Code Pro" fo:font-size="12pt" fo:font-weight="normal" fo:background-color="transparent" style:font-size-asian="12pt" style:font-size-complex="12pt"/>
    </style:style>
    <style:style style:name="P25" style:family="paragraph" style:parent-style-name="Standard">
      <style:paragraph-properties style:line-height-at-least="0.503cm"/>
      <style:text-properties style:font-name="Droid Sans Mono" fo:font-size="10pt" fo:background-color="transparent" style:font-size-asian="10pt" style:font-size-complex="10pt"/>
    </style:style>
    <style:style style:name="P26" style:family="paragraph" style:parent-style-name="Preformatted_20_Text" style:list-style-name="">
      <style:paragraph-properties fo:line-height="150%" fo:text-align="center" style:justify-single-word="false" fo:break-before="page"/>
      <style:text-properties style:font-name="Times New Roman" fo:font-size="12pt" officeooo:paragraph-rsid="000708d3" style:font-size-asian="12pt" style:font-size-complex="12pt"/>
    </style:style>
    <style:style style:name="P27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weight="normal" officeooo:rsid="00289646" officeooo:paragraph-rsid="00289646" style:font-size-asian="10.5pt" style:font-weight-asian="normal" style:font-size-complex="12pt" style:font-weight-complex="normal"/>
    </style:style>
    <style:style style:name="P28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weight="normal" officeooo:rsid="00290867" officeooo:paragraph-rsid="00290867" style:font-size-asian="10.5pt" style:font-weight-asian="normal" style:font-size-complex="12pt" style:font-weight-complex="normal"/>
    </style:style>
    <style:style style:name="P29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weight="normal" officeooo:rsid="000a70d9" officeooo:paragraph-rsid="00290867" style:font-size-asian="10.5pt" style:font-weight-asian="normal" style:font-size-complex="12pt" style:font-weight-complex="normal"/>
    </style:style>
    <style:style style:name="P30" style:family="paragraph" style:parent-style-name="Preformatted_20_Text" style:list-style-name="">
      <style:paragraph-properties fo:text-align="center" style:justify-single-word="false" fo:break-before="page"/>
      <style:text-properties fo:font-size="12pt" officeooo:paragraph-rsid="000a70d9" style:font-size-asian="12pt" style:font-size-complex="12pt"/>
    </style:style>
    <style:style style:name="P31" style:family="paragraph" style:parent-style-name="Preformatted_20_Text" style:list-style-name="">
      <style:paragraph-properties fo:line-height="100%" fo:text-align="start" style:justify-single-word="false"/>
      <style:text-properties style:font-name="Source Code Pro" fo:font-size="8pt" fo:font-weight="normal" officeooo:paragraph-rsid="000a70d9" style:font-size-asian="8pt" style:font-weight-asian="normal" style:font-size-complex="8pt" style:font-weight-complex="normal"/>
    </style:style>
    <style:style style:name="P32" style:family="paragraph" style:parent-style-name="Preformatted_20_Text">
      <style:paragraph-properties fo:line-height="100%" fo:text-align="start" style:justify-single-word="false"/>
      <style:text-properties style:font-name="Source Code Pro" fo:font-size="8pt" fo:font-weight="normal" officeooo:paragraph-rsid="000a70d9" style:font-size-asian="8pt" style:font-weight-asian="normal" style:font-size-complex="8pt" style:font-weight-complex="normal"/>
    </style:style>
    <style:style style:name="T1" style:family="text">
      <style:text-properties fo:color="#000000" loext:opacity="100%" fo:font-size="10pt" style:font-size-asian="10pt" style:font-size-complex="13.5pt"/>
    </style:style>
    <style:style style:name="T2" style:family="text">
      <style:text-properties fo:color="#000000" loext:opacity="100%" fo:font-size="16pt" fo:font-weight="bold" style:font-size-asian="16pt" style:font-weight-asian="bold" style:font-size-complex="14pt"/>
    </style:style>
    <style:style style:name="T3" style:family="text">
      <style:text-properties fo:color="#000000" loext:opacity="100%" fo:font-size="14pt" fo:font-weight="bold" style:font-size-asian="14pt" style:font-weight-asian="bold" style:font-size-complex="13.5pt"/>
    </style:style>
    <style:style style:name="T4" style:family="text">
      <style:text-properties fo:color="#000000" loext:opacity="100%" fo:font-size="14pt" style:font-size-asian="14pt" style:font-size-complex="13.5pt"/>
    </style:style>
    <style:style style:name="T5" style:family="text">
      <style:text-properties fo:color="#000000" loext:opacity="100%" fo:font-size="14pt" officeooo:rsid="00024d6c" style:font-size-asian="14pt" style:font-size-complex="13.5pt"/>
    </style:style>
    <style:style style:name="T6" style:family="text">
      <style:text-properties fo:color="#000000" loext:opacity="100%" fo:font-size="14pt" fo:font-weight="bold" officeooo:rsid="002a34ed" style:font-size-asian="14pt" style:font-weight-asian="bold" style:font-size-complex="13.5pt"/>
    </style:style>
    <style:style style:name="T7" style:family="text">
      <style:text-properties fo:color="#000000" loext:opacity="100%" fo:font-size="13.5pt" fo:font-weight="bold" style:font-size-asian="13.5pt" style:font-weight-asian="bold" style:font-size-complex="13.5pt"/>
    </style:style>
    <style:style style:name="T8" style:family="text">
      <style:text-properties fo:color="#000000" loext:opacity="100%" fo:font-size="13.5pt" fo:font-weight="bold" officeooo:rsid="0026de0c" style:font-size-asian="13.5pt" style:font-weight-asian="bold" style:font-size-complex="13.5pt"/>
    </style:style>
    <style:style style:name="T9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loext:opacity="100%" fo:font-size="14pt" fo:font-weight="bold" officeooo:rsid="0026de0c" style:font-size-asian="14pt" style:font-weight-asian="bold" style:font-size-complex="14pt" style:font-weight-complex="bold"/>
    </style:style>
    <style:style style:name="T11" style:family="text">
      <style:text-properties fo:color="#000000" loext:opacity="100%" fo:font-size="13.5pt" style:font-size-asian="13.5pt" style:font-size-complex="13.5pt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fo:background-color="transparent" loext:char-shading-value="0" style:font-size-asian="14pt"/>
    </style:style>
    <style:style style:name="T15" style:family="text">
      <style:text-properties fo:font-size="14pt" fo:language="en" fo:country="US" officeooo:rsid="00024d6c" fo:background-color="transparent" loext:char-shading-value="0" style:font-size-asian="14pt"/>
    </style:style>
    <style:style style:name="T16" style:family="text">
      <style:text-properties fo:font-size="14pt" officeooo:rsid="00024d6c" style:font-size-asian="14pt"/>
    </style:style>
    <style:style style:name="T17" style:family="text">
      <style:text-properties officeooo:rsid="0026de0c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officeooo:rsid="0006222e"/>
    </style:style>
    <style:style style:name="T20" style:family="text">
      <style:text-properties fo:color="#000000" loext:opacity="100%" officeooo:rsid="00285f53"/>
    </style:style>
    <style:style style:name="T21" style:family="text">
      <style:text-properties fo:color="#000000" loext:opacity="100%" fo:font-size="12pt" style:font-size-asian="12pt" style:font-size-complex="12pt"/>
    </style:style>
    <style:style style:name="T22" style:family="text">
      <style:text-properties fo:color="#aa3731" loext:opacity="100%" fo:font-weight="bold" officeooo:rsid="0006222e" style:font-weight-asian="bold" style:font-weight-complex="bold"/>
    </style:style>
    <style:style style:name="T23" style:family="text">
      <style:text-properties fo:color="#777777" loext:opacity="100%" officeooo:rsid="0006222e" style:font-weight-asian="bold" style:font-weight-complex="bold"/>
    </style:style>
    <style:style style:name="T24" style:family="text">
      <style:text-properties officeooo:rsid="0006222e" style:font-weight-asian="bold" style:font-weight-complex="bold"/>
    </style:style>
    <style:style style:name="T25" style:family="text">
      <style:text-properties fo:color="#7a3e9d" loext:opacity="100%"/>
    </style:style>
    <style:style style:name="T26" style:family="text">
      <style:text-properties fo:color="#777777" loext:opacity="100%"/>
    </style:style>
    <style:style style:name="T27" style:family="text">
      <style:text-properties officeooo:rsid="00275f7c"/>
    </style:style>
    <style:style style:name="T28" style:family="text">
      <style:text-properties fo:color="#aa3731" loext:opacity="100%" fo:font-weight="bold"/>
    </style:style>
    <style:style style:name="T29" style:family="text">
      <style:text-properties fo:color="#000000" loext:opacity="100%" fo:font-weight="bold" officeooo:rsid="0006222e" style:font-weight-asian="bold" style:font-weight-complex="bold"/>
    </style:style>
    <style:style style:name="T30" style:family="text">
      <style:text-properties fo:color="#000000" loext:opacity="100%" fo:font-weight="bold" officeooo:rsid="000708d3" style:font-weight-asian="bold" style:font-weight-complex="bold"/>
    </style:style>
    <style:style style:name="T31" style:family="text">
      <style:text-properties fo:color="#000000" loext:opacity="100%" officeooo:rsid="001e03a5"/>
    </style:style>
    <style:style style:name="T32" style:family="text">
      <style:text-properties fo:color="#000000" loext:opacity="100%" style:font-name="Times New Roman" fo:font-weight="bold" officeooo:rsid="000a70d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65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2" loext:marker-style-name="T2"><text:span text:style-name="T2">«Национальный исследовательский университет ИТМО»</text:span></text:p>
      <text:p text:style-name="P2" loext:marker-style-name="T3"><text:span text:style-name="T3">Факультет безопасности информационных технологий</text:span></text:p>
      <text:p text:style-name="P2" loext:marker-style-name="T3"><text:span text:style-name="T3">Дисциплина: <text:tab/></text:span></text:p>
      <text:p text:style-name="P3"><text:span text:style-name="T4">«</text:span><text:span text:style-name="T5">Программирование</text:span><text:span text:style-name="T4">»</text:span></text:p>
      <text:p text:style-name="P2" loext:marker-style-name="T3"><text:span text:style-name="T3">ОТЧ</text:span><text:span text:style-name="T6">Ё</text:span><text:span text:style-name="T3">Т ПО ЛАБОРАТОРНОЙ РАБОТЕ </text:span><text:span text:style-name="T7">№</text:span><text:span text:style-name="T8">3</text:span></text:p>
      <text:p text:style-name="P4" loext:marker-style-name="T9"><text:span text:style-name="T10">Строки и ввод-вывод</text:span><text:span text:style-name="T9">.</text:span></text:p>
      <text:p text:style-name="P5" loext:marker-style-name="T11"/>
      <text:p text:style-name="P5" loext:marker-style-name="T11"/>
      <text:p text:style-name="P5" loext:marker-style-name="T11"/>
      <text:p text:style-name="P6" loext:marker-style-name="T11"/>
      <text:p text:style-name="P7" loext:marker-style-name="T12"><text:span text:style-name="T12">Выполнил:</text:span></text:p>
      <text:p text:style-name="P7" loext:marker-style-name="T13"><text:span text:style-name="T13">Студент группы </text:span><text:span text:style-name="T14">N31</text:span><text:bookmark text:name="_GoBack"/><text:span text:style-name="T15">50</text:span></text:p>
      <text:p text:style-name="P8">Пахомов Владимир Юрьевич</text:p>
      <text:p text:style-name="P9" loext:marker-style-name="T13"><draw:frame draw:style-name="fr1" draw:name="Изображение1" text:anchor-type="char" svg:x="13.21cm" svg:y="-0.023cm" svg:width="3.344cm" svg:height="1.572cm" draw:z-index="0"><draw:image xlink:href="Pictures/100000010000022100000100AD173DF0.png" xlink:type="simple" xlink:show="embed" xlink:actuate="onLoad" draw:mime-type="image/png"/></draw:frame></text:p>
      <text:p text:style-name="P7" loext:marker-style-name="T12"><text:span text:style-name="T12"/></text:p>
      <text:p text:style-name="P7" loext:marker-style-name="T12"><text:span text:style-name="T12"/></text:p>
      <text:p text:style-name="P7" loext:marker-style-name="T12"><text:span text:style-name="T12">Проверил:</text:span></text:p>
      <text:p text:style-name="P7" loext:marker-style-name="T13"><text:span text:style-name="T16">Гирик</text:span><text:span text:style-name="T13"> </text:span><text:span text:style-name="T16">А</text:span><text:span text:style-name="T13">.</text:span><text:span text:style-name="T16">В</text:span><text:span text:style-name="T13">.</text:span></text:p>
      <text:p text:style-name="P10"/>
      <text:p text:style-name="P10" loext:marker-style-name="T4"/>
      <text:p text:style-name="P10" loext:marker-style-name="T4"/>
      <text:p text:style-name="P2" loext:marker-style-name="T4"><text:span text:style-name="T4">Санкт-Петербург</text:span></text:p>
      <text:p text:style-name="P11"><text:span text:style-name="T4">2024г</text:span><text:bookmark text:name="_1_Введение"/><text:span text:style-name="T4">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 text:protected="true">
            <text:p text:style-name="Contents_20_Heading"><text:soft-page-break/>Оглавление</text:p>
          </text:index-title>
          <text:p text:style-name="P12"><text:a xlink:type="simple" xlink:href="#__RefHeading___Toc35_4078790415" text:style-name="Index_20_Link" text:visited-style-name="Index_20_Link">Задание. Вариант 8-1-1-2<text:tab/>3</text:a></text:p>
          <text:p text:style-name="P12"><text:a xlink:type="simple" xlink:href="#__RefHeading___Toc46_4078790415" text:style-name="Index_20_Link" text:visited-style-name="Index_20_Link">Make-файл<text:tab/>3</text:a></text:p>
          <text:p text:style-name="P12"><text:a xlink:type="simple" xlink:href="#__RefHeading___Toc48_4078790415" text:style-name="Index_20_Link" text:visited-style-name="Index_20_Link">Примеры работы программы на различных исходных данных<text:tab/>4</text:a></text:p>
          <text:p text:style-name="P12"><text:a xlink:type="simple" xlink:href="#__RefHeading___Toc52_4078790415" text:style-name="Index_20_Link" text:visited-style-name="Index_20_Link">Исходный текст программы с комментариями<text:tab/>6</text:a></text:p>
        </text:index-body>
      </text:table-of-content>
      <text:p text:style-name="P13"><text:span text:style-name="T4"/></text:p>
      <text:h text:style-name="P14" text:outline-level="1"><text:bookmark-start text:name="__RefHeading___Toc35_4078790415"/>Задание. Вариант <text:span text:style-name="T17">8-1-1-2</text:span><text:bookmark-end text:name="__RefHeading___Toc35_4078790415"/></text:h>
      <text:p text:style-name="P15"><text:span text:style-name="T18">Таблица 1. Данные для поиска:</text:span></text:p>
      <text:p text:style-name="P16"><text:span text:style-name="T18">8. Дата и время в формате HH:MM:SS dd.mm.yyyy</text:span></text:p>
      <text:p text:style-name="P17"><text:span text:style-name="T19">П</text:span><text:span text:style-name="T18">римеры: 12:24:01 01.02.2001, 00:00:00 31.12.2023</text:span></text:p>
      <text:p text:style-name="P15"><text:span text:style-name="T18">Таблица 2. Опции, с помощью которых задаётся ограничение преобразования:</text:span></text:p>
      <text:p text:style-name="P17"><text:span text:style-name="T18">-b=M</text:span></text:p>
      <text:p text:style-name="P16"><text:span text:style-name="T18">Опция -b задаёт номер начальной строки (строки нумеруются с единицы).</text:span></text:p>
      <text:p text:style-name="P17"><text:span text:style-name="T18">Преобразование выполняется, начиная со строки M. Если опция -b не указана, то</text:span></text:p>
      <text:p text:style-name="P17"><text:span text:style-name="T18">преобразование начинается с первой строки.</text:span></text:p>
      <text:p text:style-name="P17"><text:span text:style-name="T18">-e=N</text:span></text:p>
      <text:p text:style-name="P17"><text:span text:style-name="T18">Опция -</text:span><text:span text:style-name="T20">e</text:span><text:span text:style-name="T18"> задаёт номер конечной строки. Преобразование выполняется до строки N</text:span></text:p>
      <text:p text:style-name="P17"><text:span text:style-name="T18">включительно. Если опция -e не указана, преобразование продолжается до</text:span></text:p>
      <text:p text:style-name="P18"><text:span text:style-name="T21">последней строки.</text:span></text:p>
      <text:p text:style-name="P19"><text:span text:style-name="T18">Таблица 3. Разметка Markdown, используемая для выделения найденных фрагментов текста:</text:span></text:p>
      <text:p text:style-name="P20"><text:span text:style-name="T18">Курсив *Пример*</text:span></text:p>
      <text:p text:style-name="P19"><text:span text:style-name="T18">Таблица 4. Цвет для выделения найденных фрагментов текста при выводе с опцией -c:</text:span></text:p>
      <text:p text:style-name="P20"><text:span text:style-name="T18">Зелёный (green) 32</text:span></text:p>
      <text:h text:style-name="P21" text:outline-level="1"><text:bookmark-start text:name="__RefHeading___Toc46_4078790415"/>Make-файл<text:bookmark-end text:name="__RefHeading___Toc46_4078790415"/></text:h>
      <text:p text:style-name="P22"><text:span text:style-name="T22">.PHONY</text:span><text:span text:style-name="T23">:</text:span><text:span text:style-name="T24"> all clean</text:span></text:p>
      <text:p text:style-name="P23"/>
      <text:p text:style-name="P24"><text:span text:style-name="T25">APP</text:span><text:span text:style-name="T26">=</text:span>prg<text:span text:style-name="T27">3</text:span>vypN3150</text:p>
      <text:p text:style-name="P24"><text:span text:style-name="T25">CFLAGS</text:span><text:span text:style-name="T26">=</text:span>-Wall -Wextra -Werror -g</text:p>
      <text:p text:style-name="P23"/>
      <text:p text:style-name="P24"><text:span text:style-name="T28">all</text:span><text:span text:style-name="T26">:</text:span> <text:span text:style-name="T26">$(</text:span><text:span text:style-name="T25">APP</text:span><text:span text:style-name="T26">)</text:span></text:p>
      <text:p text:style-name="P23"/>
      <text:p text:style-name="P24"><text:span text:style-name="T26">$(</text:span><text:span text:style-name="T25">APP</text:span><text:span text:style-name="T26">)</text:span>: <text:span text:style-name="T26">$(</text:span><text:span text:style-name="T25">APP</text:span><text:span text:style-name="T26">)</text:span>.c</text:p>
      <text:p text:style-name="P24"><text:tab/>gcc -o <text:span text:style-name="T26">$(</text:span><text:span text:style-name="T25">APP</text:span><text:span text:style-name="T26">)</text:span> <text:span text:style-name="T26">$(</text:span><text:span text:style-name="T25">CFLAGS</text:span><text:span text:style-name="T26">)</text:span> <text:span text:style-name="T26">$(</text:span><text:span text:style-name="T25">APP</text:span><text:span text:style-name="T26">)</text:span>.c</text:p>
      <text:p text:style-name="P23"/>
      <text:p text:style-name="P24"><text:span text:style-name="T28">clean</text:span><text:span text:style-name="T26">:</text:span></text:p>
      <text:p text:style-name="P24"><text:tab/>rm <text:span text:style-name="T26">$(</text:span><text:span text:style-name="T25">APP</text:span><text:span text:style-name="T26">)</text:span></text:p>
      <text:p text:style-name="P25"><text:span text:style-name="T29"/></text:p>
      <text:h text:style-name="P26" text:outline-level="1"><text:bookmark-start text:name="__RefHeading___Toc48_4078790415"/><text:span text:style-name="T29">П</text:span><text:span text:style-name="T30">римеры работы программы на различных исходных данных</text:span><text:bookmark-end text:name="__RefHeading___Toc48_4078790415"/></text:h>
      <text:p text:style-name="P27"><text:span text:style-name="T18">Без опций и указания входных и выходных потоков программа обрабатывает строку из ввода пользователя и выводит результат в консоль:</text:span></text:p>
      <text:p text:style-name="P27"><draw:frame draw:style-name="fr1" draw:name="Изображение2" text:anchor-type="char" svg:x="0cm" svg:y="-0.064cm" svg:width="16.501cm" svg:height="4.902cm" draw:z-index="1"><draw:image xlink:href="Pictures/10000000000003900000010FD1606888.png" xlink:type="simple" xlink:show="embed" xlink:actuate="onLoad" draw:mime-type="image/png"/></draw:frame><text:span text:style-name="T18">При использовании опции -v выводится информация об авторе:</text:span></text:p>
      <text:p text:style-name="P27"><draw:frame draw:style-name="fr2" draw:name="Изображение3" text:anchor-type="char" svg:x="0.051cm" svg:y="-0.145cm" svg:width="15.475cm" svg:height="1.993cm" draw:z-index="2"><draw:image xlink:href="Pictures/100000010000021F0000004685248824.png" xlink:type="simple" xlink:show="embed" xlink:actuate="onLoad" draw:mime-type="image/png"/></draw:frame><text:span text:style-name="T18">При добавлении опций, входного и выходного потока программа обрабатывает переданные аргументы и меняет своё поведение:</text:span></text:p>
      <text:p text:style-name="P27"><draw:frame draw:style-name="fr3" draw:name="Изображение4" text:anchor-type="char" svg:width="16.501cm" svg:height="7.322cm" draw:z-index="3"><draw:image xlink:href="Pictures/10000001000002B600000134347AF64A.png" xlink:type="simple" xlink:show="embed" xlink:actuate="onLoad" draw:mime-type="image/png"/></draw:frame><text:span text:style-name="T18"/></text:p>
      <text:p text:style-name="P27"><draw:frame draw:style-name="fr1" draw:name="Изображение6" text:anchor-type="char" svg:x="-0.06cm" svg:y="0.122cm" svg:width="16.402cm" svg:height="8.174cm" draw:z-index="5"><draw:image xlink:href="Pictures/100000010000026C0000013525C450C3.png" xlink:type="simple" xlink:show="embed" xlink:actuate="onLoad" draw:mime-type="image/png"/></draw:frame><draw:frame draw:style-name="fr1" draw:name="Изображение5" text:anchor-type="char" svg:x="0.025cm" svg:y="8.682cm" svg:width="16.501cm" svg:height="7.71cm" draw:z-index="4"><draw:image xlink:href="Pictures/100000010000029100000133FA256B59.png" xlink:type="simple" xlink:show="embed" xlink:actuate="onLoad" draw:mime-type="image/png"/></draw:frame><text:span text:style-name="T18"/></text:p>
      <text:p text:style-name="P27"><text:soft-page-break/><text:span text:style-name="T31"/></text:p>
      <text:p text:style-name="P28"><text:span text:style-name="T31">П</text:span><text:span text:style-name="T18">ри указании выходного файла, весь вывод записывается в указанный файл</text:span></text:p>
      <text:p text:style-name="P28"><draw:frame draw:style-name="fr4" draw:name="Изображение7" text:anchor-type="char" svg:x="0.367cm" svg:y="0.065cm" svg:width="15.767cm" svg:height="1.363cm" draw:z-index="6"><draw:image xlink:href="Pictures/100000000000025400000036D0D1DA86.png" xlink:type="simple" xlink:show="embed" xlink:actuate="onLoad" draw:mime-type="image/png"/></draw:frame><text:span text:style-name="T18"/></text:p>
      <text:p text:style-name="P28"><text:span text:style-name="T31">П</text:span><text:span text:style-name="T18">ри возникновении ошибок программа выводит информацию о них в консоль:</text:span></text:p>
      <text:p text:style-name="P29"><text:bookmark-start text:name="__RefHeading___Toc50_4078790415"/><draw:frame draw:style-name="fr3" draw:name="Изображение8" text:anchor-type="char" svg:width="16.501cm" svg:height="3.247cm" draw:z-index="7"><draw:image xlink:href="Pictures/100000000000033C000000A3A96B18E1.png" xlink:type="simple" xlink:show="embed" xlink:actuate="onLoad" draw:mime-type="image/png"/></draw:frame><text:bookmark-end text:name="__RefHeading___Toc50_4078790415"/><text:span text:style-name="T31"/></text:p>
      <text:h text:style-name="P30" text:outline-level="1"><text:bookmark-start text:name="__RefHeading___Toc52_4078790415"/><text:span text:style-name="T32">Исходный текст программы с комментариями</text:span><text:bookmark-end text:name="__RefHeading___Toc52_4078790415"/></text:h>
      <text:p text:style-name="P31"><text:bookmark-start text:name="__RefHeading___Toc3635_2495405208"/>#include &lt;stdlib.h&gt;<text:bookmark-end text:name="__RefHeading___Toc3635_2495405208"/></text:p>
      <text:p text:style-name="P31"><text:bookmark-start text:name="__RefHeading___Toc3637_2495405208"/>#include &lt;stdio.h&gt;<text:bookmark-end text:name="__RefHeading___Toc3637_2495405208"/></text:p>
      <text:p text:style-name="P31"><text:bookmark-start text:name="__RefHeading___Toc3639_2495405208"/>#include &lt;string.h&gt;<text:bookmark-end text:name="__RefHeading___Toc3639_2495405208"/></text:p>
      <text:p text:style-name="P31"/>
      <text:p text:style-name="P31"><text:bookmark-start text:name="__RefHeading___Toc3641_2495405208"/>#include &lt;getopt.h&gt;<text:bookmark-end text:name="__RefHeading___Toc3641_2495405208"/></text:p>
      <text:p text:style-name="P31"><text:bookmark-start text:name="__RefHeading___Toc3643_2495405208"/>#include &lt;unistd.h&gt;<text:bookmark-end text:name="__RefHeading___Toc3643_2495405208"/></text:p>
      <text:p text:style-name="P31"/>
      <text:p text:style-name="P31"/>
      <text:p text:style-name="P31"><text:bookmark-start text:name="__RefHeading___Toc3645_2495405208"/>// Подсчёт количества символов \n<text:bookmark-end text:name="__RefHeading___Toc3645_2495405208"/></text:p>
      <text:p text:style-name="P31"><text:bookmark-start text:name="__RefHeading___Toc3647_2495405208"/>int count_newlines(const char *str) {<text:bookmark-end text:name="__RefHeading___Toc3647_2495405208"/></text:p>
      <text:p text:style-name="P31"><text:bookmark-start text:name="__RefHeading___Toc3649_2495405208"/><text:s text:c="4"/>int count = 0;<text:bookmark-end text:name="__RefHeading___Toc3649_2495405208"/></text:p>
      <text:p text:style-name="P31"><text:bookmark-start text:name="__RefHeading___Toc3651_2495405208"/><text:s text:c="4"/>for (int i = 0; str[i] != '\0'; i++) {<text:bookmark-end text:name="__RefHeading___Toc3651_2495405208"/></text:p>
      <text:p text:style-name="P31"><text:bookmark-start text:name="__RefHeading___Toc3653_2495405208"/><text:s text:c="8"/>if (str[i] == '\n') {<text:bookmark-end text:name="__RefHeading___Toc3653_2495405208"/></text:p>
      <text:p text:style-name="P31"><text:bookmark-start text:name="__RefHeading___Toc3655_2495405208"/><text:s text:c="12"/>count++;<text:bookmark-end text:name="__RefHeading___Toc3655_2495405208"/></text:p>
      <text:p text:style-name="P31"><text:bookmark-start text:name="__RefHeading___Toc3657_2495405208"/><text:s text:c="8"/>}<text:bookmark-end text:name="__RefHeading___Toc3657_2495405208"/></text:p>
      <text:p text:style-name="P31"><text:bookmark-start text:name="__RefHeading___Toc3659_2495405208"/><text:s text:c="4"/>}<text:bookmark-end text:name="__RefHeading___Toc3659_2495405208"/></text:p>
      <text:p text:style-name="P31"><text:bookmark-start text:name="__RefHeading___Toc3661_2495405208"/><text:s text:c="4"/>return count;<text:bookmark-end text:name="__RefHeading___Toc3661_2495405208"/></text:p>
      <text:p text:style-name="P31"><text:bookmark-start text:name="__RefHeading___Toc3663_2495405208"/>}<text:bookmark-end text:name="__RefHeading___Toc3663_2495405208"/></text:p>
      <text:p text:style-name="P31"/>
      <text:p text:style-name="P31"><text:bookmark-start text:name="__RefHeading___Toc3665_2495405208"/>// Пропуск символов перехода на следующую строку<text:bookmark-end text:name="__RefHeading___Toc3665_2495405208"/></text:p>
      <text:p text:style-name="P31"><text:bookmark-start text:name="__RefHeading___Toc3667_2495405208"/>int skip_newlines(const char *str, int *pos) {<text:bookmark-end text:name="__RefHeading___Toc3667_2495405208"/></text:p>
      <text:p text:style-name="P31"><text:bookmark-start text:name="__RefHeading___Toc3669_2495405208"/><text:s text:c="4"/>while (str[*pos] == '\n') {<text:bookmark-end text:name="__RefHeading___Toc3669_2495405208"/></text:p>
      <text:p text:style-name="P31"><text:bookmark-start text:name="__RefHeading___Toc3671_2495405208"/><text:s text:c="8"/>(*pos)++;<text:bookmark-end text:name="__RefHeading___Toc3671_2495405208"/></text:p>
      <text:p text:style-name="P31"><text:bookmark-start text:name="__RefHeading___Toc3673_2495405208"/><text:s text:c="4"/>}<text:bookmark-end text:name="__RefHeading___Toc3673_2495405208"/></text:p>
      <text:p text:style-name="P31"><text:bookmark-start text:name="__RefHeading___Toc3675_2495405208"/><text:s text:c="4"/>return *pos;<text:bookmark-end text:name="__RefHeading___Toc3675_2495405208"/></text:p>
      <text:p text:style-name="P31"><text:bookmark-start text:name="__RefHeading___Toc3677_2495405208"/>}<text:bookmark-end text:name="__RefHeading___Toc3677_2495405208"/></text:p>
      <text:p text:style-name="P31"/>
      <text:p text:style-name="P31"><text:bookmark-start text:name="__RefHeading___Toc3679_2495405208"/>// Поиск времени в формате HH:MM:SS с учетом разрывов строк<text:bookmark-end text:name="__RefHeading___Toc3679_2495405208"/></text:p>
      <text:p text:style-name="P31"><text:bookmark-start text:name="__RefHeading___Toc3681_2495405208"/>int find_time_pattern(const char *str, int *start, int *end, int n_flag) {<text:bookmark-end text:name="__RefHeading___Toc3681_2495405208"/></text:p>
      <text:p text:style-name="P31"><text:bookmark-start text:name="__RefHeading___Toc3683_2495405208"/><text:s text:c="4"/>int pos = *start;<text:bookmark-end text:name="__RefHeading___Toc3683_2495405208"/></text:p>
      <text:p text:style-name="P31"><text:bookmark-start text:name="__RefHeading___Toc3685_2495405208"/><text:s text:c="4"/>int original_pos = pos;<text:bookmark-end text:name="__RefHeading___Toc3685_2495405208"/></text:p>
      <text:p text:style-name="P31"/>
      <text:p text:style-name="P31"><text:bookmark-start text:name="__RefHeading___Toc3687_2495405208"/><text:s text:c="4"/>// Проверка часов (HH)<text:bookmark-end text:name="__RefHeading___Toc3687_2495405208"/></text:p>
      <text:p text:style-name="P31"><text:bookmark-start text:name="__RefHeading___Toc3689_2495405208"/><text:s text:c="4"/>if (!(str[pos] &gt;= '0' &amp;&amp; str[pos] &lt;= '2')) return 0;<text:bookmark-end text:name="__RefHeading___Toc3689_2495405208"/></text:p>
      <text:p text:style-name="P31"><text:bookmark-start text:name="__RefHeading___Toc3691_2495405208"/><text:s text:c="4"/>pos++;<text:bookmark-end text:name="__RefHeading___Toc3691_2495405208"/></text:p>
      <text:p text:style-name="P31"><text:bookmark-start text:name="__RefHeading___Toc3693_2495405208"/><text:s text:c="4"/>if (!n_flag) skip_newlines(str, &amp;pos);<text:bookmark-end text:name="__RefHeading___Toc3693_2495405208"/></text:p>
      <text:p text:style-name="P31"><text:bookmark-start text:name="__RefHeading___Toc3695_2495405208"/><text:s text:c="4"/>if (!(((str[pos-1] == '2') &amp;&amp; (str[pos] &gt;= '0' &amp;&amp; str[pos] &lt;= '3')) || ((str[pos-1] &gt;= '0' &amp;&amp; str[pos-1] &lt;= '1') &amp;&amp; (str[pos] &gt;= '0' &amp;&amp; str[pos] &lt;= '9')))) return 0;<text:bookmark-end text:name="__RefHeading___Toc3695_2495405208"/></text:p>
      <text:p text:style-name="P31"><text:bookmark-start text:name="__RefHeading___Toc3697_2495405208"/><text:s text:c="4"/>pos++;<text:bookmark-end text:name="__RefHeading___Toc3697_2495405208"/></text:p>
      <text:p text:style-name="P31"><text:bookmark-start text:name="__RefHeading___Toc3699_2495405208"/><text:s text:c="4"/>if (!n_flag) skip_newlines(str, &amp;pos);<text:bookmark-end text:name="__RefHeading___Toc3699_2495405208"/></text:p>
      <text:p text:style-name="P31"><text:bookmark-start text:name="__RefHeading___Toc3701_2495405208"/><text:s text:c="4"/>if (str[pos] != ':') return 0;<text:bookmark-end text:name="__RefHeading___Toc3701_2495405208"/></text:p>
      <text:p text:style-name="P31"><text:bookmark-start text:name="__RefHeading___Toc3703_2495405208"/><text:s text:c="4"/>pos++;<text:bookmark-end text:name="__RefHeading___Toc3703_2495405208"/></text:p>
      <text:p text:style-name="P31"><text:bookmark-start text:name="__RefHeading___Toc3705_2495405208"/><text:s text:c="4"/>if (!n_flag) skip_newlines(str, &amp;pos);<text:bookmark-end text:name="__RefHeading___Toc3705_2495405208"/></text:p>
      <text:p text:style-name="P31"/>
      <text:p text:style-name="P31"><text:bookmark-start text:name="__RefHeading___Toc3707_2495405208"/><text:s text:c="4"/>// Проверка минут (MM)<text:bookmark-end text:name="__RefHeading___Toc3707_2495405208"/></text:p>
      <text:p text:style-name="P31"><text:bookmark-start text:name="__RefHeading___Toc3709_2495405208"/><text:s text:c="4"/>if (!(str[pos] &gt;= '0' &amp;&amp; str[pos] &lt;= '5')) return 0;<text:bookmark-end text:name="__RefHeading___Toc3709_2495405208"/></text:p>
      <text:p text:style-name="P31"><text:bookmark-start text:name="__RefHeading___Toc3711_2495405208"/><text:s text:c="4"/>pos++;<text:bookmark-end text:name="__RefHeading___Toc3711_2495405208"/></text:p>
      <text:p text:style-name="P31"><text:bookmark-start text:name="__RefHeading___Toc3713_2495405208"/><text:s text:c="4"/>if (!n_flag) skip_newlines(str, &amp;pos);<text:bookmark-end text:name="__RefHeading___Toc3713_2495405208"/></text:p>
      <text:p text:style-name="P31"><text:bookmark-start text:name="__RefHeading___Toc3715_2495405208"/><text:s text:c="4"/>if (!(str[pos] &gt;= '0' &amp;&amp; str[pos] &lt;= '9')) return 0;<text:bookmark-end text:name="__RefHeading___Toc3715_2495405208"/></text:p>
      <text:p text:style-name="P31"><text:bookmark-start text:name="__RefHeading___Toc3717_2495405208"/><text:s text:c="4"/>pos++;<text:bookmark-end text:name="__RefHeading___Toc3717_2495405208"/></text:p>
      <text:p text:style-name="P31"><text:bookmark-start text:name="__RefHeading___Toc3719_2495405208"/><text:s text:c="4"/>if (!n_flag) skip_newlines(str, &amp;pos);<text:bookmark-end text:name="__RefHeading___Toc3719_2495405208"/></text:p>
      <text:p text:style-name="P31"><text:bookmark-start text:name="__RefHeading___Toc3721_2495405208"/><text:s text:c="4"/>if (str[pos] != ':') return 0;<text:bookmark-end text:name="__RefHeading___Toc3721_2495405208"/></text:p>
      <text:p text:style-name="P31"><text:bookmark-start text:name="__RefHeading___Toc3723_2495405208"/><text:s text:c="4"/>pos++;<text:bookmark-end text:name="__RefHeading___Toc3723_2495405208"/></text:p>
      <text:p text:style-name="P31"><text:bookmark-start text:name="__RefHeading___Toc3725_2495405208"/><text:s text:c="4"/>if (!n_flag) skip_newlines(str, &amp;pos);<text:bookmark-end text:name="__RefHeading___Toc3725_2495405208"/></text:p>
      <text:p text:style-name="P31"/>
      <text:p text:style-name="P31"><text:bookmark-start text:name="__RefHeading___Toc3727_2495405208"/><text:s text:c="4"/>// Проверка секунд (SS)<text:bookmark-end text:name="__RefHeading___Toc3727_2495405208"/></text:p>
      <text:p text:style-name="P31"><text:bookmark-start text:name="__RefHeading___Toc3729_2495405208"/><text:s text:c="4"/>if (!(str[pos] &gt;= '0' &amp;&amp; str[pos] &lt;= '5')) return 0;<text:bookmark-end text:name="__RefHeading___Toc3729_2495405208"/></text:p>
      <text:p text:style-name="P31"><text:bookmark-start text:name="__RefHeading___Toc3731_2495405208"/><text:s text:c="4"/>pos++;<text:bookmark-end text:name="__RefHeading___Toc3731_2495405208"/></text:p>
      <text:p text:style-name="P31"><text:bookmark-start text:name="__RefHeading___Toc3733_2495405208"/><text:s text:c="4"/>if (!n_flag) skip_newlines(str, &amp;pos);<text:bookmark-end text:name="__RefHeading___Toc3733_2495405208"/></text:p>
      <text:p text:style-name="P31"><text:bookmark-start text:name="__RefHeading___Toc3735_2495405208"/><text:s text:c="4"/>if (!(str[pos] &gt;= '0' &amp;&amp; str[pos] &lt;= '9')) return 0;<text:bookmark-end text:name="__RefHeading___Toc3735_2495405208"/></text:p>
      <text:p text:style-name="P31"><text:bookmark-start text:name="__RefHeading___Toc3737_2495405208"/><text:s text:c="4"/>pos++;<text:bookmark-end text:name="__RefHeading___Toc3737_2495405208"/></text:p>
      <text:p text:style-name="P31"/>
      <text:p text:style-name="P31"><text:bookmark-start text:name="__RefHeading___Toc3739_2495405208"/><text:s text:c="4"/>*start = original_pos;<text:bookmark-end text:name="__RefHeading___Toc3739_2495405208"/></text:p>
      <text:p text:style-name="P31"><text:bookmark-start text:name="__RefHeading___Toc3741_2495405208"/><text:s text:c="4"/>*end = pos;<text:bookmark-end text:name="__RefHeading___Toc3741_2495405208"/></text:p>
      <text:p text:style-name="P31"><text:bookmark-start text:name="__RefHeading___Toc3743_2495405208"/><text:s text:c="4"/>return 1;<text:bookmark-end text:name="__RefHeading___Toc3743_2495405208"/></text:p>
      <text:p text:style-name="P31"><text:bookmark-start text:name="__RefHeading___Toc3745_2495405208"/>}<text:bookmark-end text:name="__RefHeading___Toc3745_2495405208"/></text:p>
      <text:p text:style-name="P31"/>
      <text:p text:style-name="P31"><text:bookmark-start text:name="__RefHeading___Toc3747_2495405208"/>// Поиск даты в формате dd.mm.yyyy с учетом разрывов строк<text:bookmark-end text:name="__RefHeading___Toc3747_2495405208"/></text:p>
      <text:p text:style-name="P31"><text:bookmark-start text:name="__RefHeading___Toc3749_2495405208"/>int find_date_pattern(const char *str, int *start, int *end, int n_flag) {<text:bookmark-end text:name="__RefHeading___Toc3749_2495405208"/></text:p>
      <text:p text:style-name="P31"><text:bookmark-start text:name="__RefHeading___Toc3751_2495405208"/><text:s text:c="4"/>int pos = *start;<text:bookmark-end text:name="__RefHeading___Toc3751_2495405208"/></text:p>
      <text:p text:style-name="P31"><text:bookmark-start text:name="__RefHeading___Toc3753_2495405208"/><text:soft-page-break/><text:s text:c="4"/>int original_pos = pos;<text:bookmark-end text:name="__RefHeading___Toc3753_2495405208"/></text:p>
      <text:p text:style-name="P31"/>
      <text:p text:style-name="P31"><text:bookmark-start text:name="__RefHeading___Toc3755_2495405208"/><text:s text:c="4"/>// Проверка дня (dd)<text:bookmark-end text:name="__RefHeading___Toc3755_2495405208"/></text:p>
      <text:p text:style-name="P31"><text:bookmark-start text:name="__RefHeading___Toc3757_2495405208"/><text:s text:c="4"/>if (!(str[pos] &gt;= '0' &amp;&amp; str[pos] &lt;= '3')) return 0;<text:bookmark-end text:name="__RefHeading___Toc3757_2495405208"/></text:p>
      <text:p text:style-name="P31"><text:bookmark-start text:name="__RefHeading___Toc3759_2495405208"/><text:s text:c="4"/>pos++;<text:bookmark-end text:name="__RefHeading___Toc3759_2495405208"/></text:p>
      <text:p text:style-name="P31"><text:bookmark-start text:name="__RefHeading___Toc3761_2495405208"/><text:s text:c="4"/>if (!n_flag) skip_newlines(str, &amp;pos);<text:bookmark-end text:name="__RefHeading___Toc3761_2495405208"/></text:p>
      <text:p text:style-name="P31"><text:bookmark-start text:name="__RefHeading___Toc3763_2495405208"/><text:s text:c="4"/>if (!((str[pos-1] == '3' &amp;&amp; str[pos] &gt;= '0' &amp;&amp; str[pos] &lt;= '1') || (str[pos-1] &gt;= '0' &amp;&amp; str[pos-1] &lt;= '2' &amp;&amp; str[pos] &gt;= '0' &amp;&amp; str[pos] &lt;= '9'))) return 0;<text:bookmark-end text:name="__RefHeading___Toc3763_2495405208"/></text:p>
      <text:p text:style-name="P31"><text:bookmark-start text:name="__RefHeading___Toc3765_2495405208"/><text:s text:c="4"/>pos++;<text:bookmark-end text:name="__RefHeading___Toc3765_2495405208"/></text:p>
      <text:p text:style-name="P31"><text:bookmark-start text:name="__RefHeading___Toc3767_2495405208"/><text:s text:c="4"/>if (!n_flag) skip_newlines(str, &amp;pos);<text:bookmark-end text:name="__RefHeading___Toc3767_2495405208"/></text:p>
      <text:p text:style-name="P31"><text:bookmark-start text:name="__RefHeading___Toc3769_2495405208"/><text:s text:c="4"/>if (str[pos] != '.') return 0;<text:bookmark-end text:name="__RefHeading___Toc3769_2495405208"/></text:p>
      <text:p text:style-name="P31"><text:bookmark-start text:name="__RefHeading___Toc3771_2495405208"/><text:s text:c="4"/>pos++;<text:bookmark-end text:name="__RefHeading___Toc3771_2495405208"/></text:p>
      <text:p text:style-name="P31"><text:bookmark-start text:name="__RefHeading___Toc3773_2495405208"/><text:s text:c="4"/>if (!n_flag) skip_newlines(str, &amp;pos);<text:bookmark-end text:name="__RefHeading___Toc3773_2495405208"/></text:p>
      <text:p text:style-name="P31"/>
      <text:p text:style-name="P31"><text:bookmark-start text:name="__RefHeading___Toc3775_2495405208"/><text:s text:c="4"/>// Проверка месяца (mm)<text:bookmark-end text:name="__RefHeading___Toc3775_2495405208"/></text:p>
      <text:p text:style-name="P31"><text:bookmark-start text:name="__RefHeading___Toc3777_2495405208"/><text:s text:c="4"/>if (!(str[pos] &gt;= '0' &amp;&amp; str[pos] &lt;= '1')) return 0;<text:bookmark-end text:name="__RefHeading___Toc3777_2495405208"/></text:p>
      <text:p text:style-name="P31"><text:bookmark-start text:name="__RefHeading___Toc3779_2495405208"/><text:s text:c="4"/>pos++;<text:bookmark-end text:name="__RefHeading___Toc3779_2495405208"/></text:p>
      <text:p text:style-name="P31"><text:bookmark-start text:name="__RefHeading___Toc3781_2495405208"/><text:s text:c="4"/>if (!n_flag) skip_newlines(str, &amp;pos);<text:bookmark-end text:name="__RefHeading___Toc3781_2495405208"/></text:p>
      <text:p text:style-name="P31"><text:bookmark-start text:name="__RefHeading___Toc3783_2495405208"/><text:s text:c="4"/>if (!((str[pos-1] == '1' &amp;&amp; str[pos] &gt;= '0' &amp;&amp; str[pos] &lt;= '2') || (str[pos-1] == '0' &amp;&amp; str[pos] &gt;= '0' &amp;&amp; str[pos] &lt;= '9'))) return 0;<text:bookmark-end text:name="__RefHeading___Toc3783_2495405208"/></text:p>
      <text:p text:style-name="P31"><text:bookmark-start text:name="__RefHeading___Toc3785_2495405208"/><text:s text:c="4"/>pos++;<text:bookmark-end text:name="__RefHeading___Toc3785_2495405208"/></text:p>
      <text:p text:style-name="P31"><text:bookmark-start text:name="__RefHeading___Toc3787_2495405208"/><text:s text:c="4"/>if (!n_flag) skip_newlines(str, &amp;pos);<text:bookmark-end text:name="__RefHeading___Toc3787_2495405208"/></text:p>
      <text:p text:style-name="P31"><text:bookmark-start text:name="__RefHeading___Toc3789_2495405208"/><text:s text:c="4"/>if (str[pos] != '.') return 0;<text:bookmark-end text:name="__RefHeading___Toc3789_2495405208"/></text:p>
      <text:p text:style-name="P31"><text:bookmark-start text:name="__RefHeading___Toc3791_2495405208"/><text:s text:c="4"/>pos++;<text:bookmark-end text:name="__RefHeading___Toc3791_2495405208"/></text:p>
      <text:p text:style-name="P31"><text:bookmark-start text:name="__RefHeading___Toc3793_2495405208"/><text:s text:c="4"/>if (!n_flag) skip_newlines(str, &amp;pos);<text:bookmark-end text:name="__RefHeading___Toc3793_2495405208"/></text:p>
      <text:p text:style-name="P31"/>
      <text:p text:style-name="P31"><text:bookmark-start text:name="__RefHeading___Toc3795_2495405208"/><text:s text:c="4"/>// Проверка года (yyyy)<text:bookmark-end text:name="__RefHeading___Toc3795_2495405208"/></text:p>
      <text:p text:style-name="P31"><text:bookmark-start text:name="__RefHeading___Toc3797_2495405208"/><text:s text:c="4"/>if (!(str[pos] &gt;= '0' &amp;&amp; str[pos] &lt;= '9')) return 0;<text:bookmark-end text:name="__RefHeading___Toc3797_2495405208"/></text:p>
      <text:p text:style-name="P31"><text:bookmark-start text:name="__RefHeading___Toc3799_2495405208"/><text:s text:c="4"/>pos++;<text:bookmark-end text:name="__RefHeading___Toc3799_2495405208"/></text:p>
      <text:p text:style-name="P31"><text:bookmark-start text:name="__RefHeading___Toc3801_2495405208"/><text:s text:c="4"/>if (!n_flag) skip_newlines(str, &amp;pos);<text:bookmark-end text:name="__RefHeading___Toc3801_2495405208"/></text:p>
      <text:p text:style-name="P31"><text:bookmark-start text:name="__RefHeading___Toc3803_2495405208"/><text:s text:c="4"/>if (!(str[pos] &gt;= '0' &amp;&amp; str[pos] &lt;= '9')) return 0;<text:bookmark-end text:name="__RefHeading___Toc3803_2495405208"/></text:p>
      <text:p text:style-name="P31"><text:bookmark-start text:name="__RefHeading___Toc3805_2495405208"/><text:s text:c="4"/>pos++;<text:bookmark-end text:name="__RefHeading___Toc3805_2495405208"/></text:p>
      <text:p text:style-name="P31"><text:bookmark-start text:name="__RefHeading___Toc3807_2495405208"/><text:s text:c="4"/>if (!n_flag) skip_newlines(str, &amp;pos);<text:bookmark-end text:name="__RefHeading___Toc3807_2495405208"/></text:p>
      <text:p text:style-name="P31"><text:bookmark-start text:name="__RefHeading___Toc3809_2495405208"/><text:s text:c="4"/>if (!(str[pos] &gt;= '0' &amp;&amp; str[pos] &lt;= '9')) return 0;<text:bookmark-end text:name="__RefHeading___Toc3809_2495405208"/></text:p>
      <text:p text:style-name="P31"><text:bookmark-start text:name="__RefHeading___Toc3811_2495405208"/><text:s text:c="4"/>pos++;<text:bookmark-end text:name="__RefHeading___Toc3811_2495405208"/></text:p>
      <text:p text:style-name="P31"><text:bookmark-start text:name="__RefHeading___Toc3813_2495405208"/><text:s text:c="4"/>if (!n_flag) skip_newlines(str, &amp;pos);<text:bookmark-end text:name="__RefHeading___Toc3813_2495405208"/></text:p>
      <text:p text:style-name="P31"><text:bookmark-start text:name="__RefHeading___Toc3815_2495405208"/><text:s text:c="4"/>if (!(str[pos] &gt;= '0' &amp;&amp; str[pos] &lt;= '9')) return 0;<text:bookmark-end text:name="__RefHeading___Toc3815_2495405208"/></text:p>
      <text:p text:style-name="P31"><text:bookmark-start text:name="__RefHeading___Toc3817_2495405208"/><text:s text:c="4"/>pos++;<text:bookmark-end text:name="__RefHeading___Toc3817_2495405208"/></text:p>
      <text:p text:style-name="P31"/>
      <text:p text:style-name="P31"><text:bookmark-start text:name="__RefHeading___Toc3819_2495405208"/><text:s text:c="4"/>*start = original_pos;<text:bookmark-end text:name="__RefHeading___Toc3819_2495405208"/></text:p>
      <text:p text:style-name="P31"><text:bookmark-start text:name="__RefHeading___Toc3821_2495405208"/><text:s text:c="4"/>*end = pos;<text:bookmark-end text:name="__RefHeading___Toc3821_2495405208"/></text:p>
      <text:p text:style-name="P31"><text:bookmark-start text:name="__RefHeading___Toc3823_2495405208"/><text:s text:c="4"/>return 1;<text:bookmark-end text:name="__RefHeading___Toc3823_2495405208"/></text:p>
      <text:p text:style-name="P31"><text:bookmark-start text:name="__RefHeading___Toc3825_2495405208"/>}<text:bookmark-end text:name="__RefHeading___Toc3825_2495405208"/></text:p>
      <text:p text:style-name="P31"/>
      <text:p text:style-name="P31"><text:bookmark-start text:name="__RefHeading___Toc3827_2495405208"/>// Выделение найденных подстрок *Курсивом*<text:bookmark-end text:name="__RefHeading___Toc3827_2495405208"/></text:p>
      <text:p text:style-name="P31"><text:bookmark-start text:name="__RefHeading___Toc3829_2495405208"/>char* mark_times_and_dates(const char* input, int n_flag, int b_value, int e_value, int c_flag) {<text:bookmark-end text:name="__RefHeading___Toc3829_2495405208"/></text:p>
      <text:p text:style-name="P31"><text:bookmark-start text:name="__RefHeading___Toc3831_2495405208"/><text:s text:c="4"/>int input_len = strlen(input);<text:bookmark-end text:name="__RefHeading___Toc3831_2495405208"/></text:p>
      <text:p text:style-name="P31"><text:bookmark-start text:name="__RefHeading___Toc3833_2495405208"/><text:s text:c="4"/>char* output = malloc(input_len * 3 + 1); // Увеличиваем размер буфера для учета ANSI кодов<text:bookmark-end text:name="__RefHeading___Toc3833_2495405208"/></text:p>
      <text:p text:style-name="P31"><text:bookmark-start text:name="__RefHeading___Toc3835_2495405208"/><text:s text:c="4"/>char* out_ptr = output;<text:bookmark-end text:name="__RefHeading___Toc3835_2495405208"/></text:p>
      <text:p text:style-name="P31"><text:bookmark-start text:name="__RefHeading___Toc3837_2495405208"/><text:s text:c="4"/>int i = 0;<text:bookmark-end text:name="__RefHeading___Toc3837_2495405208"/></text:p>
      <text:p text:style-name="P31"><text:bookmark-start text:name="__RefHeading___Toc3839_2495405208"/><text:s text:c="4"/>int count_n = 0;<text:bookmark-end text:name="__RefHeading___Toc3839_2495405208"/></text:p>
      <text:p text:style-name="P31"/>
      <text:p text:style-name="P31"><text:bookmark-start text:name="__RefHeading___Toc3841_2495405208"/><text:s text:c="4"/>// Пропуск строк до b_value<text:bookmark-end text:name="__RefHeading___Toc3841_2495405208"/></text:p>
      <text:p text:style-name="P31"><text:bookmark-start text:name="__RefHeading___Toc3843_2495405208"/><text:s text:c="4"/>while (i &lt; input_len &amp;&amp; count_n &lt; b_value - 1) {<text:bookmark-end text:name="__RefHeading___Toc3843_2495405208"/></text:p>
      <text:p text:style-name="P31"><text:bookmark-start text:name="__RefHeading___Toc3845_2495405208"/><text:s text:c="8"/>if (input[i] == '\n') {<text:bookmark-end text:name="__RefHeading___Toc3845_2495405208"/></text:p>
      <text:p text:style-name="P31"><text:bookmark-start text:name="__RefHeading___Toc3847_2495405208"/><text:s text:c="12"/>count_n++;<text:bookmark-end text:name="__RefHeading___Toc3847_2495405208"/></text:p>
      <text:p text:style-name="P31"><text:bookmark-start text:name="__RefHeading___Toc3849_2495405208"/><text:s text:c="8"/>}<text:bookmark-end text:name="__RefHeading___Toc3849_2495405208"/></text:p>
      <text:p text:style-name="P31"><text:bookmark-start text:name="__RefHeading___Toc3851_2495405208"/><text:s text:c="8"/>*out_ptr++ = input[i++];<text:bookmark-end text:name="__RefHeading___Toc3851_2495405208"/></text:p>
      <text:p text:style-name="P31"><text:bookmark-start text:name="__RefHeading___Toc3853_2495405208"/><text:s text:c="4"/>}<text:bookmark-end text:name="__RefHeading___Toc3853_2495405208"/></text:p>
      <text:p text:style-name="P31"/>
      <text:p text:style-name="P31"><text:bookmark-start text:name="__RefHeading___Toc3855_2495405208"/><text:s text:c="4"/>// Обработка строк от b_value до e_value<text:bookmark-end text:name="__RefHeading___Toc3855_2495405208"/></text:p>
      <text:p text:style-name="P31"><text:bookmark-start text:name="__RefHeading___Toc3857_2495405208"/><text:s text:c="4"/>while (i &lt; input_len &amp;&amp; count_n &lt; e_value) {<text:bookmark-end text:name="__RefHeading___Toc3857_2495405208"/></text:p>
      <text:p text:style-name="P31"><text:bookmark-start text:name="__RefHeading___Toc3859_2495405208"/><text:s text:c="8"/>int start = i;<text:bookmark-end text:name="__RefHeading___Toc3859_2495405208"/></text:p>
      <text:p text:style-name="P31"><text:bookmark-start text:name="__RefHeading___Toc3861_2495405208"/><text:s text:c="8"/>int end = i;<text:bookmark-end text:name="__RefHeading___Toc3861_2495405208"/></text:p>
      <text:p text:style-name="P31"/>
      <text:p text:style-name="P31"><text:bookmark-start text:name="__RefHeading___Toc3863_2495405208"/><text:s text:c="8"/>if (find_time_pattern(input, &amp;start, &amp;end, n_flag) || find_date_pattern(input, &amp;start, &amp;end, n_flag)) {<text:bookmark-end text:name="__RefHeading___Toc3863_2495405208"/></text:p>
      <text:p text:style-name="P31"><text:bookmark-start text:name="__RefHeading___Toc3865_2495405208"/><text:s text:c="12"/>// Проверка, что время или дата полностью находится в пределах строк<text:bookmark-end text:name="__RefHeading___Toc3865_2495405208"/></text:p>
      <text:p text:style-name="P31"><text:bookmark-start text:name="__RefHeading___Toc3867_2495405208"/><text:s text:c="12"/>int line_start = start;<text:bookmark-end text:name="__RefHeading___Toc3867_2495405208"/></text:p>
      <text:p text:style-name="P31"><text:bookmark-start text:name="__RefHeading___Toc3869_2495405208"/><text:s text:c="12"/>int line_end = end;<text:bookmark-end text:name="__RefHeading___Toc3869_2495405208"/></text:p>
      <text:p text:style-name="P31"><text:bookmark-start text:name="__RefHeading___Toc3871_2495405208"/><text:s text:c="12"/>while (line_start &gt; 0 &amp;&amp; input[line_start - 1] != '\n') line_start--;<text:bookmark-end text:name="__RefHeading___Toc3871_2495405208"/></text:p>
      <text:p text:style-name="P31"><text:bookmark-start text:name="__RefHeading___Toc3873_2495405208"/><text:s text:c="12"/>while (line_end &lt; input_len &amp;&amp; input[line_end] != '\n') line_end++;<text:bookmark-end text:name="__RefHeading___Toc3873_2495405208"/></text:p>
      <text:p text:style-name="P31"><text:soft-page-break/></text:p>
      <text:p text:style-name="P31"><text:bookmark-start text:name="__RefHeading___Toc3875_2495405208"/><text:s text:c="12"/>int line_count_start = 0;<text:bookmark-end text:name="__RefHeading___Toc3875_2495405208"/></text:p>
      <text:p text:style-name="P31"><text:bookmark-start text:name="__RefHeading___Toc3877_2495405208"/><text:s text:c="12"/>int line_count_end = 0;<text:bookmark-end text:name="__RefHeading___Toc3877_2495405208"/></text:p>
      <text:p text:style-name="P31"><text:bookmark-start text:name="__RefHeading___Toc3879_2495405208"/><text:s text:c="12"/>for (int j = 0; j &lt; line_start; j++) {<text:bookmark-end text:name="__RefHeading___Toc3879_2495405208"/></text:p>
      <text:p text:style-name="P31"><text:bookmark-start text:name="__RefHeading___Toc3881_2495405208"/><text:s text:c="16"/>if (input[j] == '\n') line_count_start++;<text:bookmark-end text:name="__RefHeading___Toc3881_2495405208"/></text:p>
      <text:p text:style-name="P31"><text:bookmark-start text:name="__RefHeading___Toc3883_2495405208"/><text:s text:c="12"/>}<text:bookmark-end text:name="__RefHeading___Toc3883_2495405208"/></text:p>
      <text:p text:style-name="P31"><text:bookmark-start text:name="__RefHeading___Toc3885_2495405208"/><text:s text:c="12"/>for (int j = 0; j &lt; line_end; j++) {<text:bookmark-end text:name="__RefHeading___Toc3885_2495405208"/></text:p>
      <text:p text:style-name="P31"><text:bookmark-start text:name="__RefHeading___Toc3887_2495405208"/><text:s text:c="16"/>if (input[j] == '\n') line_count_end++;<text:bookmark-end text:name="__RefHeading___Toc3887_2495405208"/></text:p>
      <text:p text:style-name="P31"><text:bookmark-start text:name="__RefHeading___Toc3889_2495405208"/><text:s text:c="12"/>}<text:bookmark-end text:name="__RefHeading___Toc3889_2495405208"/></text:p>
      <text:p text:style-name="P31"/>
      <text:p text:style-name="P31"><text:bookmark-start text:name="__RefHeading___Toc3891_2495405208"/><text:s text:c="12"/>if (line_count_start &gt;= b_value - 1 &amp;&amp; line_count_end &lt; e_value) {<text:bookmark-end text:name="__RefHeading___Toc3891_2495405208"/></text:p>
      <text:p text:style-name="P31"><text:bookmark-start text:name="__RefHeading___Toc3893_2495405208"/><text:s text:c="16"/>if (c_flag) {<text:bookmark-end text:name="__RefHeading___Toc3893_2495405208"/></text:p>
      <text:p text:style-name="P31"><text:bookmark-start text:name="__RefHeading___Toc3895_2495405208"/><text:s text:c="20"/>// Добавляем ANSI код для зеленого цвета<text:bookmark-end text:name="__RefHeading___Toc3895_2495405208"/></text:p>
      <text:p text:style-name="P31"><text:bookmark-start text:name="__RefHeading___Toc3897_2495405208"/><text:s text:c="20"/>*out_ptr++ = '\033';<text:bookmark-end text:name="__RefHeading___Toc3897_2495405208"/></text:p>
      <text:p text:style-name="P31"><text:bookmark-start text:name="__RefHeading___Toc3899_2495405208"/><text:s text:c="20"/>*out_ptr++ = '[';<text:bookmark-end text:name="__RefHeading___Toc3899_2495405208"/></text:p>
      <text:p text:style-name="P31"><text:bookmark-start text:name="__RefHeading___Toc3901_2495405208"/><text:s text:c="20"/>*out_ptr++ = '3';<text:bookmark-end text:name="__RefHeading___Toc3901_2495405208"/></text:p>
      <text:p text:style-name="P31"><text:bookmark-start text:name="__RefHeading___Toc3903_2495405208"/><text:s text:c="20"/>*out_ptr++ = '2';<text:bookmark-end text:name="__RefHeading___Toc3903_2495405208"/></text:p>
      <text:p text:style-name="P31"><text:bookmark-start text:name="__RefHeading___Toc3905_2495405208"/><text:s text:c="20"/>*out_ptr++ = 'm';<text:bookmark-end text:name="__RefHeading___Toc3905_2495405208"/></text:p>
      <text:p text:style-name="P31"><text:bookmark-start text:name="__RefHeading___Toc3907_2495405208"/><text:s text:c="16"/>} else {<text:bookmark-end text:name="__RefHeading___Toc3907_2495405208"/></text:p>
      <text:p text:style-name="P31"><text:bookmark-start text:name="__RefHeading___Toc3909_2495405208"/><text:s text:c="20"/>*out_ptr++ = '*';<text:bookmark-end text:name="__RefHeading___Toc3909_2495405208"/></text:p>
      <text:p text:style-name="P31"><text:bookmark-start text:name="__RefHeading___Toc3911_2495405208"/><text:s text:c="16"/>}<text:bookmark-end text:name="__RefHeading___Toc3911_2495405208"/></text:p>
      <text:p text:style-name="P31"/>
      <text:p text:style-name="P31"><text:bookmark-start text:name="__RefHeading___Toc3913_2495405208"/><text:s text:c="16"/>memcpy(out_ptr, input + start, end - start);<text:bookmark-end text:name="__RefHeading___Toc3913_2495405208"/></text:p>
      <text:p text:style-name="P31"><text:bookmark-start text:name="__RefHeading___Toc3915_2495405208"/><text:s text:c="16"/>out_ptr += end - start;<text:bookmark-end text:name="__RefHeading___Toc3915_2495405208"/></text:p>
      <text:p text:style-name="P31"/>
      <text:p text:style-name="P31"><text:bookmark-start text:name="__RefHeading___Toc3917_2495405208"/><text:s text:c="16"/>if (c_flag) {<text:bookmark-end text:name="__RefHeading___Toc3917_2495405208"/></text:p>
      <text:p text:style-name="P31"><text:bookmark-start text:name="__RefHeading___Toc3919_2495405208"/><text:s text:c="20"/>// Возвращаем цвет к стандартному<text:bookmark-end text:name="__RefHeading___Toc3919_2495405208"/></text:p>
      <text:p text:style-name="P31"><text:bookmark-start text:name="__RefHeading___Toc3921_2495405208"/><text:s text:c="20"/>*out_ptr++ = '\033';<text:bookmark-end text:name="__RefHeading___Toc3921_2495405208"/></text:p>
      <text:p text:style-name="P31"><text:bookmark-start text:name="__RefHeading___Toc3923_2495405208"/><text:s text:c="20"/>*out_ptr++ = '[';<text:bookmark-end text:name="__RefHeading___Toc3923_2495405208"/></text:p>
      <text:p text:style-name="P31"><text:bookmark-start text:name="__RefHeading___Toc3925_2495405208"/><text:s text:c="20"/>*out_ptr++ = '0';<text:bookmark-end text:name="__RefHeading___Toc3925_2495405208"/></text:p>
      <text:p text:style-name="P31"><text:bookmark-start text:name="__RefHeading___Toc3927_2495405208"/><text:s text:c="20"/>*out_ptr++ = 'm';<text:bookmark-end text:name="__RefHeading___Toc3927_2495405208"/></text:p>
      <text:p text:style-name="P31"><text:bookmark-start text:name="__RefHeading___Toc3929_2495405208"/><text:s text:c="16"/>} else {<text:bookmark-end text:name="__RefHeading___Toc3929_2495405208"/></text:p>
      <text:p text:style-name="P31"><text:bookmark-start text:name="__RefHeading___Toc3931_2495405208"/><text:s text:c="20"/>*out_ptr++ = '*';<text:bookmark-end text:name="__RefHeading___Toc3931_2495405208"/></text:p>
      <text:p text:style-name="P31"><text:bookmark-start text:name="__RefHeading___Toc3933_2495405208"/><text:s text:c="16"/>}<text:bookmark-end text:name="__RefHeading___Toc3933_2495405208"/></text:p>
      <text:p text:style-name="P31"><text:bookmark-start text:name="__RefHeading___Toc3935_2495405208"/><text:s text:c="12"/>} else {<text:bookmark-end text:name="__RefHeading___Toc3935_2495405208"/></text:p>
      <text:p text:style-name="P31"><text:bookmark-start text:name="__RefHeading___Toc3937_2495405208"/><text:s text:c="16"/>memcpy(out_ptr, input + start, end - start);<text:bookmark-end text:name="__RefHeading___Toc3937_2495405208"/></text:p>
      <text:p text:style-name="P31"><text:bookmark-start text:name="__RefHeading___Toc3939_2495405208"/><text:s text:c="16"/>out_ptr += end - start;<text:bookmark-end text:name="__RefHeading___Toc3939_2495405208"/></text:p>
      <text:p text:style-name="P31"><text:bookmark-start text:name="__RefHeading___Toc3941_2495405208"/><text:s text:c="12"/>}<text:bookmark-end text:name="__RefHeading___Toc3941_2495405208"/></text:p>
      <text:p text:style-name="P31"><text:bookmark-start text:name="__RefHeading___Toc3943_2495405208"/><text:s text:c="12"/>i = end;<text:bookmark-end text:name="__RefHeading___Toc3943_2495405208"/></text:p>
      <text:p text:style-name="P31"><text:bookmark-start text:name="__RefHeading___Toc3945_2495405208"/><text:s text:c="8"/>} else {<text:bookmark-end text:name="__RefHeading___Toc3945_2495405208"/></text:p>
      <text:p text:style-name="P31"><text:bookmark-start text:name="__RefHeading___Toc3947_2495405208"/><text:s text:c="12"/>if (input[i] == '\n') {<text:bookmark-end text:name="__RefHeading___Toc3947_2495405208"/></text:p>
      <text:p text:style-name="P31"><text:bookmark-start text:name="__RefHeading___Toc3949_2495405208"/><text:s text:c="16"/>count_n++;<text:bookmark-end text:name="__RefHeading___Toc3949_2495405208"/></text:p>
      <text:p text:style-name="P31"><text:bookmark-start text:name="__RefHeading___Toc3951_2495405208"/><text:s text:c="12"/>}<text:bookmark-end text:name="__RefHeading___Toc3951_2495405208"/></text:p>
      <text:p text:style-name="P31"><text:bookmark-start text:name="__RefHeading___Toc3953_2495405208"/><text:s text:c="12"/>*out_ptr++ = input[i++];<text:bookmark-end text:name="__RefHeading___Toc3953_2495405208"/></text:p>
      <text:p text:style-name="P31"><text:bookmark-start text:name="__RefHeading___Toc3955_2495405208"/><text:s text:c="8"/>}<text:bookmark-end text:name="__RefHeading___Toc3955_2495405208"/></text:p>
      <text:p text:style-name="P31"><text:bookmark-start text:name="__RefHeading___Toc3957_2495405208"/><text:s text:c="4"/>}<text:bookmark-end text:name="__RefHeading___Toc3957_2495405208"/></text:p>
      <text:p text:style-name="P31"/>
      <text:p text:style-name="P31"><text:bookmark-start text:name="__RefHeading___Toc3959_2495405208"/><text:s text:c="4"/>// Копирование оставшейся части строки после e_value без обработки<text:bookmark-end text:name="__RefHeading___Toc3959_2495405208"/></text:p>
      <text:p text:style-name="P31"><text:bookmark-start text:name="__RefHeading___Toc3961_2495405208"/><text:s text:c="4"/>while (i &lt; input_len) {<text:bookmark-end text:name="__RefHeading___Toc3961_2495405208"/></text:p>
      <text:p text:style-name="P31"><text:bookmark-start text:name="__RefHeading___Toc3963_2495405208"/><text:s text:c="8"/>*out_ptr++ = input[i++];<text:bookmark-end text:name="__RefHeading___Toc3963_2495405208"/></text:p>
      <text:p text:style-name="P31"><text:bookmark-start text:name="__RefHeading___Toc3965_2495405208"/><text:s text:c="4"/>}<text:bookmark-end text:name="__RefHeading___Toc3965_2495405208"/></text:p>
      <text:p text:style-name="P31"/>
      <text:p text:style-name="P31"><text:bookmark-start text:name="__RefHeading___Toc3967_2495405208"/><text:s text:c="4"/>*out_ptr = '\0';<text:bookmark-end text:name="__RefHeading___Toc3967_2495405208"/></text:p>
      <text:p text:style-name="P31"><text:bookmark-start text:name="__RefHeading___Toc3969_2495405208"/><text:s text:c="4"/>return output;<text:bookmark-end text:name="__RefHeading___Toc3969_2495405208"/></text:p>
      <text:p text:style-name="P31"><text:bookmark-start text:name="__RefHeading___Toc3971_2495405208"/>}<text:bookmark-end text:name="__RefHeading___Toc3971_2495405208"/></text:p>
      <text:p text:style-name="P31"/>
      <text:p text:style-name="P31"/>
      <text:p text:style-name="P31"/>
      <text:p text:style-name="P31"><text:bookmark-start text:name="__RefHeading___Toc3973_2495405208"/>int main(int argc, char *argv[]) {<text:bookmark-end text:name="__RefHeading___Toc3973_2495405208"/></text:p>
      <text:p text:style-name="P31"><text:bookmark-start text:name="__RefHeading___Toc3975_2495405208"/><text:s text:c="4"/>// Проверка запуска с переменной среды, включающей отладочный вывод.<text:bookmark-end text:name="__RefHeading___Toc3975_2495405208"/></text:p>
      <text:p text:style-name="P31"><text:bookmark-start text:name="__RefHeading___Toc3977_2495405208"/><text:s text:c="4"/>// Пример запуска с установкой переменной LAB3DEBUG в 1:<text:bookmark-end text:name="__RefHeading___Toc3977_2495405208"/></text:p>
      <text:p text:style-name="P31"><text:bookmark-start text:name="__RefHeading___Toc3979_2495405208"/><text:s text:c="4"/>// $ LAB3DEBUG=1 ./prg3abcNXXXXX test.txt<text:bookmark-end text:name="__RefHeading___Toc3979_2495405208"/></text:p>
      <text:p text:style-name="P31"><text:bookmark-start text:name="__RefHeading___Toc3981_2495405208"/><text:s text:c="4"/>char *DEBUG = getenv("LAB3DEBUG");<text:bookmark-end text:name="__RefHeading___Toc3981_2495405208"/></text:p>
      <text:p text:style-name="P31"><text:bookmark-start text:name="__RefHeading___Toc3983_2495405208"/><text:s text:c="4"/>if (DEBUG) {<text:bookmark-end text:name="__RefHeading___Toc3983_2495405208"/></text:p>
      <text:p text:style-name="P31"><text:bookmark-start text:name="__RefHeading___Toc3985_2495405208"/><text:s text:c="8"/>fprintf(stderr, "Включен вывод отладочных сообщений\n");<text:bookmark-end text:name="__RefHeading___Toc3985_2495405208"/></text:p>
      <text:p text:style-name="P31"><text:bookmark-start text:name="__RefHeading___Toc3987_2495405208"/><text:s text:c="4"/>}<text:bookmark-end text:name="__RefHeading___Toc3987_2495405208"/></text:p>
      <text:p text:style-name="P31"/>
      <text:p text:style-name="P31"><text:bookmark-start text:name="__RefHeading___Toc3989_2495405208"/><text:s text:c="4"/>// Автор<text:bookmark-end text:name="__RefHeading___Toc3989_2495405208"/></text:p>
      <text:p text:style-name="P31"><text:bookmark-start text:name="__RefHeading___Toc3991_2495405208"/><text:s text:c="4"/>char *author = "Пахомов Владимир Юрьевич, гр. N3150\nВариант: 8-1-1-2\n";<text:bookmark-end text:name="__RefHeading___Toc3991_2495405208"/></text:p>
      <text:p text:style-name="P31"/>
      <text:p text:style-name="P31"><text:bookmark-start text:name="__RefHeading___Toc3993_2495405208"/><text:s text:c="4"/>// Переменные опций<text:bookmark-end text:name="__RefHeading___Toc3993_2495405208"/></text:p>
      <text:p text:style-name="P31"><text:bookmark-start text:name="__RefHeading___Toc3995_2495405208"/><text:s text:c="4"/>int opt;<text:bookmark-end text:name="__RefHeading___Toc3995_2495405208"/></text:p>
      <text:p text:style-name="P31"><text:bookmark-start text:name="__RefHeading___Toc3997_2495405208"/><text:soft-page-break/><text:s text:c="4"/>int c_flag = 0; <text:s/>// выделение цветом<text:bookmark-end text:name="__RefHeading___Toc3997_2495405208"/></text:p>
      <text:p text:style-name="P31"><text:bookmark-start text:name="__RefHeading___Toc3999_2495405208"/><text:s text:c="4"/>int v_flag = 0; <text:s/>// информация об авторе<text:bookmark-end text:name="__RefHeading___Toc3999_2495405208"/></text:p>
      <text:p text:style-name="P31"><text:bookmark-start text:name="__RefHeading___Toc4001_2495405208"/><text:s text:c="4"/>int n_flag = 0; <text:s/>// отключение \n<text:bookmark-end text:name="__RefHeading___Toc4001_2495405208"/></text:p>
      <text:p text:style-name="P31"><text:bookmark-start text:name="__RefHeading___Toc4003_2495405208"/><text:s text:c="4"/>int b_value = 1; // начальная строка<text:bookmark-end text:name="__RefHeading___Toc4003_2495405208"/></text:p>
      <text:p text:style-name="P31"><text:bookmark-start text:name="__RefHeading___Toc4005_2495405208"/><text:s text:c="4"/>int e_value = 0; // конечная строка<text:bookmark-end text:name="__RefHeading___Toc4005_2495405208"/></text:p>
      <text:p text:style-name="P31"/>
      <text:p text:style-name="P31"><text:bookmark-start text:name="__RefHeading___Toc4007_2495405208"/><text:s text:c="4"/>// Переменные ввода/вывода<text:bookmark-end text:name="__RefHeading___Toc4007_2495405208"/></text:p>
      <text:p text:style-name="P31"><text:bookmark-start text:name="__RefHeading___Toc4009_2495405208"/><text:s text:c="4"/>FILE *input_file = NULL;<text:bookmark-end text:name="__RefHeading___Toc4009_2495405208"/></text:p>
      <text:p text:style-name="P31"><text:bookmark-start text:name="__RefHeading___Toc4011_2495405208"/><text:s text:c="4"/>FILE *output_file = NULL;<text:bookmark-end text:name="__RefHeading___Toc4011_2495405208"/></text:p>
      <text:p text:style-name="P31"><text:bookmark-start text:name="__RefHeading___Toc4013_2495405208"/><text:s text:c="4"/>size_t input_size = 0;<text:bookmark-end text:name="__RefHeading___Toc4013_2495405208"/></text:p>
      <text:p text:style-name="P31"><text:bookmark-start text:name="__RefHeading___Toc4015_2495405208"/><text:s text:c="4"/>char *input_str = NULL;<text:bookmark-end text:name="__RefHeading___Toc4015_2495405208"/></text:p>
      <text:p text:style-name="P31"><text:bookmark-start text:name="__RefHeading___Toc4017_2495405208"/><text:s text:c="4"/>char *input_filename = NULL;<text:bookmark-end text:name="__RefHeading___Toc4017_2495405208"/></text:p>
      <text:p text:style-name="P31"><text:bookmark-start text:name="__RefHeading___Toc4019_2495405208"/><text:s text:c="4"/>char *output_filename = NULL;<text:bookmark-end text:name="__RefHeading___Toc4019_2495405208"/></text:p>
      <text:p text:style-name="P31"><text:bookmark-start text:name="__RefHeading___Toc4021_2495405208"/><text:s text:c="4"/><text:bookmark-end text:name="__RefHeading___Toc4021_2495405208"/></text:p>
      <text:p text:style-name="P31"/>
      <text:p text:style-name="P31"><text:bookmark-start text:name="__RefHeading___Toc4023_2495405208"/><text:s text:c="4"/>char *endptr;<text:bookmark-end text:name="__RefHeading___Toc4023_2495405208"/></text:p>
      <text:p text:style-name="P31"><text:bookmark-start text:name="__RefHeading___Toc4025_2495405208"/><text:s text:c="4"/>char *value;<text:bookmark-end text:name="__RefHeading___Toc4025_2495405208"/></text:p>
      <text:p text:style-name="P31"><text:bookmark-start text:name="__RefHeading___Toc4027_2495405208"/><text:s text:c="4"/>// Обрабатываем опции командной строки<text:bookmark-end text:name="__RefHeading___Toc4027_2495405208"/></text:p>
      <text:p text:style-name="P31"><text:bookmark-start text:name="__RefHeading___Toc4029_2495405208"/><text:s text:c="4"/>while ((opt = getopt(argc, argv, "vcnb:e:")) != -1) {<text:bookmark-end text:name="__RefHeading___Toc4029_2495405208"/></text:p>
      <text:p text:style-name="P31"><text:bookmark-start text:name="__RefHeading___Toc4031_2495405208"/><text:s text:c="8"/>if (opt == 'v') v_flag = 1;<text:bookmark-end text:name="__RefHeading___Toc4031_2495405208"/></text:p>
      <text:p text:style-name="P31"><text:bookmark-start text:name="__RefHeading___Toc4033_2495405208"/><text:s text:c="8"/>else if (opt == 'c') c_flag = 1;<text:bookmark-end text:name="__RefHeading___Toc4033_2495405208"/></text:p>
      <text:p text:style-name="P31"><text:bookmark-start text:name="__RefHeading___Toc4035_2495405208"/><text:s text:c="8"/>else if (opt == 'n') n_flag = 1;<text:bookmark-end text:name="__RefHeading___Toc4035_2495405208"/></text:p>
      <text:p text:style-name="P31"><text:bookmark-start text:name="__RefHeading___Toc4037_2495405208"/><text:s text:c="8"/>else if (opt == 'b') {<text:bookmark-end text:name="__RefHeading___Toc4037_2495405208"/></text:p>
      <text:p text:style-name="P31"><text:bookmark-start text:name="__RefHeading___Toc4039_2495405208"/><text:s text:c="12"/>value = optarg;<text:bookmark-end text:name="__RefHeading___Toc4039_2495405208"/></text:p>
      <text:p text:style-name="P31"><text:bookmark-start text:name="__RefHeading___Toc4041_2495405208"/><text:s text:c="12"/>if (value[0] == '=') {<text:bookmark-end text:name="__RefHeading___Toc4041_2495405208"/></text:p>
      <text:p text:style-name="P31"><text:bookmark-start text:name="__RefHeading___Toc4043_2495405208"/><text:s text:c="16"/>value++;<text:bookmark-end text:name="__RefHeading___Toc4043_2495405208"/></text:p>
      <text:p text:style-name="P31"><text:bookmark-start text:name="__RefHeading___Toc4045_2495405208"/><text:s text:c="12"/>}<text:bookmark-end text:name="__RefHeading___Toc4045_2495405208"/></text:p>
      <text:p text:style-name="P31"><text:bookmark-start text:name="__RefHeading___Toc4047_2495405208"/><text:s text:c="12"/>b_value = strtol(value, &amp;endptr, 10);<text:bookmark-end text:name="__RefHeading___Toc4047_2495405208"/></text:p>
      <text:p text:style-name="P31"><text:bookmark-start text:name="__RefHeading___Toc4049_2495405208"/><text:s text:c="12"/>if (endptr == value || *endptr != '\0' || b_value &lt; 0) {<text:bookmark-end text:name="__RefHeading___Toc4049_2495405208"/></text:p>
      <text:p text:style-name="P31"><text:bookmark-start text:name="__RefHeading___Toc4051_2495405208"/><text:s text:c="16"/>fprintf(stderr, "Ошибка: '%s' не является целым положительным числом.\n", value);<text:bookmark-end text:name="__RefHeading___Toc4051_2495405208"/></text:p>
      <text:p text:style-name="P31"><text:bookmark-start text:name="__RefHeading___Toc4053_2495405208"/><text:s text:c="16"/>return EXIT_FAILURE;<text:bookmark-end text:name="__RefHeading___Toc4053_2495405208"/></text:p>
      <text:p text:style-name="P31"><text:bookmark-start text:name="__RefHeading___Toc4055_2495405208"/><text:s text:c="12"/>}<text:bookmark-end text:name="__RefHeading___Toc4055_2495405208"/></text:p>
      <text:p text:style-name="P31"><text:bookmark-start text:name="__RefHeading___Toc4057_2495405208"/><text:s text:c="8"/>} else if (opt == 'e') {<text:bookmark-end text:name="__RefHeading___Toc4057_2495405208"/></text:p>
      <text:p text:style-name="P31"><text:bookmark-start text:name="__RefHeading___Toc4059_2495405208"/><text:s text:c="12"/>value = optarg;<text:bookmark-end text:name="__RefHeading___Toc4059_2495405208"/></text:p>
      <text:p text:style-name="P31"><text:bookmark-start text:name="__RefHeading___Toc4061_2495405208"/><text:s text:c="12"/>if (value[0] == '=') {<text:bookmark-end text:name="__RefHeading___Toc4061_2495405208"/></text:p>
      <text:p text:style-name="P31"><text:bookmark-start text:name="__RefHeading___Toc4063_2495405208"/><text:s text:c="16"/>value++;<text:bookmark-end text:name="__RefHeading___Toc4063_2495405208"/></text:p>
      <text:p text:style-name="P31"><text:bookmark-start text:name="__RefHeading___Toc4065_2495405208"/><text:s text:c="12"/>}<text:bookmark-end text:name="__RefHeading___Toc4065_2495405208"/></text:p>
      <text:p text:style-name="P31"><text:bookmark-start text:name="__RefHeading___Toc4067_2495405208"/><text:s text:c="12"/>e_value = strtol(value, &amp;endptr, 10);<text:bookmark-end text:name="__RefHeading___Toc4067_2495405208"/></text:p>
      <text:p text:style-name="P31"><text:bookmark-start text:name="__RefHeading___Toc4069_2495405208"/><text:s text:c="12"/>if (endptr == value || *endptr != '\0') {<text:bookmark-end text:name="__RefHeading___Toc4069_2495405208"/></text:p>
      <text:p text:style-name="P31"><text:bookmark-start text:name="__RefHeading___Toc4071_2495405208"/><text:s text:c="16"/>fprintf(stderr, "Ошибка: '%s' не является целым положительным числом.\n", value);<text:bookmark-end text:name="__RefHeading___Toc4071_2495405208"/></text:p>
      <text:p text:style-name="P31"><text:bookmark-start text:name="__RefHeading___Toc4073_2495405208"/><text:s text:c="16"/>return EXIT_FAILURE;<text:bookmark-end text:name="__RefHeading___Toc4073_2495405208"/></text:p>
      <text:p text:style-name="P31"><text:bookmark-start text:name="__RefHeading___Toc4075_2495405208"/><text:s text:c="12"/>}<text:bookmark-end text:name="__RefHeading___Toc4075_2495405208"/></text:p>
      <text:p text:style-name="P31"><text:bookmark-start text:name="__RefHeading___Toc4077_2495405208"/><text:s text:c="8"/>} else {<text:bookmark-end text:name="__RefHeading___Toc4077_2495405208"/></text:p>
      <text:p text:style-name="P31"><text:bookmark-start text:name="__RefHeading___Toc4079_2495405208"/><text:s text:c="12"/>return EXIT_FAILURE;<text:bookmark-end text:name="__RefHeading___Toc4079_2495405208"/></text:p>
      <text:p text:style-name="P31"><text:bookmark-start text:name="__RefHeading___Toc4081_2495405208"/><text:s text:c="8"/>}<text:bookmark-end text:name="__RefHeading___Toc4081_2495405208"/></text:p>
      <text:p text:style-name="P31"><text:bookmark-start text:name="__RefHeading___Toc4083_2495405208"/><text:s text:c="4"/>}<text:bookmark-end text:name="__RefHeading___Toc4083_2495405208"/></text:p>
      <text:p text:style-name="P31"/>
      <text:p text:style-name="P31"><text:bookmark-start text:name="__RefHeading___Toc4085_2495405208"/><text:s text:c="4"/>// Обработка аргументов ввода/вывода<text:bookmark-end text:name="__RefHeading___Toc4085_2495405208"/></text:p>
      <text:p text:style-name="P31"><text:bookmark-start text:name="__RefHeading___Toc4087_2495405208"/><text:s text:c="4"/>int args_left = argc - optind;<text:bookmark-end text:name="__RefHeading___Toc4087_2495405208"/></text:p>
      <text:p text:style-name="P31"><text:bookmark-start text:name="__RefHeading___Toc4089_2495405208"/><text:s text:c="4"/>if (args_left &gt; 2) {<text:bookmark-end text:name="__RefHeading___Toc4089_2495405208"/></text:p>
      <text:p text:style-name="P31"><text:bookmark-start text:name="__RefHeading___Toc4091_2495405208"/><text:s text:c="8"/>fprintf(stderr, "Ошибка: слишком много аргументов.\n");<text:bookmark-end text:name="__RefHeading___Toc4091_2495405208"/></text:p>
      <text:p text:style-name="P31"><text:bookmark-start text:name="__RefHeading___Toc4093_2495405208"/><text:s text:c="8"/>return EXIT_FAILURE;<text:bookmark-end text:name="__RefHeading___Toc4093_2495405208"/></text:p>
      <text:p text:style-name="P31"><text:bookmark-start text:name="__RefHeading___Toc4095_2495405208"/><text:s text:c="4"/>} else if (args_left == 2) {<text:bookmark-end text:name="__RefHeading___Toc4095_2495405208"/></text:p>
      <text:p text:style-name="P31"><text:bookmark-start text:name="__RefHeading___Toc4097_2495405208"/><text:s text:c="8"/>input_filename = argv[optind];<text:bookmark-end text:name="__RefHeading___Toc4097_2495405208"/></text:p>
      <text:p text:style-name="P31"><text:bookmark-start text:name="__RefHeading___Toc4099_2495405208"/><text:s text:c="8"/>output_filename = argv[optind + 1];<text:bookmark-end text:name="__RefHeading___Toc4099_2495405208"/></text:p>
      <text:p text:style-name="P31"><text:bookmark-start text:name="__RefHeading___Toc4101_2495405208"/><text:s text:c="4"/>} else if (args_left == 1) {<text:bookmark-end text:name="__RefHeading___Toc4101_2495405208"/></text:p>
      <text:p text:style-name="P31"><text:bookmark-start text:name="__RefHeading___Toc4103_2495405208"/><text:s text:c="8"/>input_filename = argv[optind];<text:bookmark-end text:name="__RefHeading___Toc4103_2495405208"/></text:p>
      <text:p text:style-name="P31"><text:bookmark-start text:name="__RefHeading___Toc4105_2495405208"/><text:s text:c="4"/>}<text:bookmark-end text:name="__RefHeading___Toc4105_2495405208"/></text:p>
      <text:p text:style-name="P31"/>
      <text:p text:style-name="P31"><text:bookmark-start text:name="__RefHeading___Toc4107_2495405208"/><text:s text:c="4"/>// Открываем входной файл, если указан<text:bookmark-end text:name="__RefHeading___Toc4107_2495405208"/></text:p>
      <text:p text:style-name="P31"><text:bookmark-start text:name="__RefHeading___Toc4109_2495405208"/><text:s text:c="4"/>if (input_filename != NULL) {<text:bookmark-end text:name="__RefHeading___Toc4109_2495405208"/></text:p>
      <text:p text:style-name="P31"><text:bookmark-start text:name="__RefHeading___Toc4111_2495405208"/><text:s text:c="8"/>input_file = fopen(input_filename, "r");<text:bookmark-end text:name="__RefHeading___Toc4111_2495405208"/></text:p>
      <text:p text:style-name="P31"><text:bookmark-start text:name="__RefHeading___Toc4113_2495405208"/><text:s text:c="8"/>if (input_file == NULL) {<text:bookmark-end text:name="__RefHeading___Toc4113_2495405208"/></text:p>
      <text:p text:style-name="P31"><text:bookmark-start text:name="__RefHeading___Toc4115_2495405208"/><text:s text:c="12"/>fprintf(stderr, "Ошибка: не удалось открыть файл %s.\n", input_filename);<text:bookmark-end text:name="__RefHeading___Toc4115_2495405208"/></text:p>
      <text:p text:style-name="P31"><text:bookmark-start text:name="__RefHeading___Toc4117_2495405208"/><text:s text:c="12"/>return EXIT_FAILURE;<text:bookmark-end text:name="__RefHeading___Toc4117_2495405208"/></text:p>
      <text:p text:style-name="P31"><text:bookmark-start text:name="__RefHeading___Toc4119_2495405208"/><text:s text:c="8"/>}<text:bookmark-end text:name="__RefHeading___Toc4119_2495405208"/></text:p>
      <text:p text:style-name="P31"><text:bookmark-start text:name="__RefHeading___Toc4121_2495405208"/><text:s text:c="4"/>} else {<text:bookmark-end text:name="__RefHeading___Toc4121_2495405208"/></text:p>
      <text:p text:style-name="P31"><text:bookmark-start text:name="__RefHeading___Toc4123_2495405208"/><text:s text:c="8"/>input_file = stdin;<text:bookmark-end text:name="__RefHeading___Toc4123_2495405208"/></text:p>
      <text:p text:style-name="P31"><text:bookmark-start text:name="__RefHeading___Toc4125_2495405208"/><text:s text:c="4"/>}<text:bookmark-end text:name="__RefHeading___Toc4125_2495405208"/></text:p>
      <text:p text:style-name="P31"/>
      <text:p text:style-name="P31"><text:bookmark-start text:name="__RefHeading___Toc4127_2495405208"/><text:s text:c="4"/>// Открываем выходной файл, если указан<text:bookmark-end text:name="__RefHeading___Toc4127_2495405208"/></text:p>
      <text:p text:style-name="P31"><text:bookmark-start text:name="__RefHeading___Toc4129_2495405208"/><text:s text:c="4"/>if (output_filename != NULL) {<text:bookmark-end text:name="__RefHeading___Toc4129_2495405208"/></text:p>
      <text:p text:style-name="P31"><text:bookmark-start text:name="__RefHeading___Toc4131_2495405208"/><text:soft-page-break/><text:s text:c="8"/>output_file = fopen(output_filename, "w");<text:bookmark-end text:name="__RefHeading___Toc4131_2495405208"/></text:p>
      <text:p text:style-name="P31"><text:bookmark-start text:name="__RefHeading___Toc4133_2495405208"/><text:s text:c="8"/>if (output_file == NULL) {<text:bookmark-end text:name="__RefHeading___Toc4133_2495405208"/></text:p>
      <text:p text:style-name="P31"><text:bookmark-start text:name="__RefHeading___Toc4135_2495405208"/><text:s text:c="12"/>fprintf(stderr, "Ошибка: не удалось открыть файл %s.\n", output_filename);<text:bookmark-end text:name="__RefHeading___Toc4135_2495405208"/></text:p>
      <text:p text:style-name="P31"><text:bookmark-start text:name="__RefHeading___Toc4137_2495405208"/><text:s text:c="12"/>return EXIT_FAILURE;<text:bookmark-end text:name="__RefHeading___Toc4137_2495405208"/></text:p>
      <text:p text:style-name="P31"><text:bookmark-start text:name="__RefHeading___Toc4139_2495405208"/><text:s text:c="8"/>}<text:bookmark-end text:name="__RefHeading___Toc4139_2495405208"/></text:p>
      <text:p text:style-name="P31"><text:bookmark-start text:name="__RefHeading___Toc4141_2495405208"/><text:s text:c="4"/>} else {<text:bookmark-end text:name="__RefHeading___Toc4141_2495405208"/></text:p>
      <text:p text:style-name="P31"><text:bookmark-start text:name="__RefHeading___Toc4143_2495405208"/><text:s text:c="8"/>output_file = stdout;<text:bookmark-end text:name="__RefHeading___Toc4143_2495405208"/></text:p>
      <text:p text:style-name="P31"><text:bookmark-start text:name="__RefHeading___Toc4145_2495405208"/><text:s text:c="4"/>}<text:bookmark-end text:name="__RefHeading___Toc4145_2495405208"/></text:p>
      <text:p text:style-name="P31"/>
      <text:p text:style-name="P31"/>
      <text:p text:style-name="P31"><text:bookmark-start text:name="__RefHeading___Toc4147_2495405208"/><text:s text:c="4"/>// Вывод информации об авторе<text:bookmark-end text:name="__RefHeading___Toc4147_2495405208"/></text:p>
      <text:p text:style-name="P31"><text:bookmark-start text:name="__RefHeading___Toc4149_2495405208"/><text:s text:c="4"/>if (v_flag) {<text:bookmark-end text:name="__RefHeading___Toc4149_2495405208"/></text:p>
      <text:p text:style-name="P31"><text:bookmark-start text:name="__RefHeading___Toc4151_2495405208"/><text:s text:c="8"/>fprintf(output_file, "%s\n", author);<text:bookmark-end text:name="__RefHeading___Toc4151_2495405208"/></text:p>
      <text:p text:style-name="P31"><text:bookmark-start text:name="__RefHeading___Toc4153_2495405208"/><text:s text:c="8"/>return EXIT_SUCCESS;<text:bookmark-end text:name="__RefHeading___Toc4153_2495405208"/></text:p>
      <text:p text:style-name="P31"><text:bookmark-start text:name="__RefHeading___Toc4155_2495405208"/><text:s text:c="4"/>}<text:bookmark-end text:name="__RefHeading___Toc4155_2495405208"/></text:p>
      <text:p text:style-name="P31"/>
      <text:p text:style-name="P31"><text:bookmark-start text:name="__RefHeading___Toc4157_2495405208"/><text:s text:c="4"/>// Чтение входных данных<text:bookmark-end text:name="__RefHeading___Toc4157_2495405208"/></text:p>
      <text:p text:style-name="P31"><text:bookmark-start text:name="__RefHeading___Toc4159_2495405208"/><text:s text:c="4"/>char buffer[1024];<text:bookmark-end text:name="__RefHeading___Toc4159_2495405208"/></text:p>
      <text:p text:style-name="P31"><text:bookmark-start text:name="__RefHeading___Toc4161_2495405208"/><text:s text:c="4"/>while (fgets(buffer, sizeof(buffer), input_file)) {<text:bookmark-end text:name="__RefHeading___Toc4161_2495405208"/></text:p>
      <text:p text:style-name="P31"><text:bookmark-start text:name="__RefHeading___Toc4163_2495405208"/><text:s text:c="8"/>size_t len = strlen(buffer);<text:bookmark-end text:name="__RefHeading___Toc4163_2495405208"/></text:p>
      <text:p text:style-name="P31"><text:bookmark-start text:name="__RefHeading___Toc4165_2495405208"/><text:s text:c="8"/>input_str = (char*) realloc(input_str, input_size + len + 1);<text:bookmark-end text:name="__RefHeading___Toc4165_2495405208"/></text:p>
      <text:p text:style-name="P31"><text:bookmark-start text:name="__RefHeading___Toc4167_2495405208"/><text:s text:c="8"/>if (input_str == NULL) {<text:bookmark-end text:name="__RefHeading___Toc4167_2495405208"/></text:p>
      <text:p text:style-name="P31"><text:bookmark-start text:name="__RefHeading___Toc4169_2495405208"/><text:s text:c="12"/>fprintf(stderr, "Ошибка: не удалось выделить память.\n");<text:bookmark-end text:name="__RefHeading___Toc4169_2495405208"/></text:p>
      <text:p text:style-name="P31"><text:bookmark-start text:name="__RefHeading___Toc4171_2495405208"/><text:s text:c="12"/>fclose(input_file);<text:bookmark-end text:name="__RefHeading___Toc4171_2495405208"/></text:p>
      <text:p text:style-name="P31"><text:bookmark-start text:name="__RefHeading___Toc4173_2495405208"/><text:s text:c="12"/>fclose(output_file);<text:bookmark-end text:name="__RefHeading___Toc4173_2495405208"/></text:p>
      <text:p text:style-name="P31"><text:bookmark-start text:name="__RefHeading___Toc4175_2495405208"/><text:s text:c="12"/>free(input_str);<text:bookmark-end text:name="__RefHeading___Toc4175_2495405208"/></text:p>
      <text:p text:style-name="P31"><text:bookmark-start text:name="__RefHeading___Toc4177_2495405208"/><text:s text:c="12"/>return EXIT_FAILURE;<text:bookmark-end text:name="__RefHeading___Toc4177_2495405208"/></text:p>
      <text:p text:style-name="P31"><text:bookmark-start text:name="__RefHeading___Toc4179_2495405208"/><text:s text:c="8"/>}<text:bookmark-end text:name="__RefHeading___Toc4179_2495405208"/></text:p>
      <text:p text:style-name="P31"><text:bookmark-start text:name="__RefHeading___Toc4181_2495405208"/><text:s text:c="8"/>strcpy(input_str + input_size, buffer);<text:bookmark-end text:name="__RefHeading___Toc4181_2495405208"/></text:p>
      <text:p text:style-name="P31"><text:bookmark-start text:name="__RefHeading___Toc4183_2495405208"/><text:s text:c="8"/>input_size += len;<text:bookmark-end text:name="__RefHeading___Toc4183_2495405208"/></text:p>
      <text:p text:style-name="P31"><text:bookmark-start text:name="__RefHeading___Toc4185_2495405208"/><text:s text:c="4"/>}<text:bookmark-end text:name="__RefHeading___Toc4185_2495405208"/></text:p>
      <text:p text:style-name="P31"/>
      <text:p text:style-name="P31"/>
      <text:p text:style-name="P31"/>
      <text:p text:style-name="P31"><text:bookmark-start text:name="__RefHeading___Toc4187_2495405208"/><text:s text:c="4"/>// Обработка конца строки ввода<text:bookmark-end text:name="__RefHeading___Toc4187_2495405208"/></text:p>
      <text:p text:style-name="P31"><text:bookmark-start text:name="__RefHeading___Toc4189_2495405208"/><text:s text:c="4"/>if (ferror(input_file)) {<text:bookmark-end text:name="__RefHeading___Toc4189_2495405208"/></text:p>
      <text:p text:style-name="P31"><text:bookmark-start text:name="__RefHeading___Toc4191_2495405208"/><text:s text:c="8"/>perror("Ошибка чтения ввода.");<text:bookmark-end text:name="__RefHeading___Toc4191_2495405208"/></text:p>
      <text:p text:style-name="P31"><text:bookmark-start text:name="__RefHeading___Toc4193_2495405208"/><text:s text:c="8"/>fclose(input_file);<text:bookmark-end text:name="__RefHeading___Toc4193_2495405208"/></text:p>
      <text:p text:style-name="P31"><text:bookmark-start text:name="__RefHeading___Toc4195_2495405208"/><text:s text:c="8"/>fclose(output_file);<text:bookmark-end text:name="__RefHeading___Toc4195_2495405208"/></text:p>
      <text:p text:style-name="P31"><text:bookmark-start text:name="__RefHeading___Toc4197_2495405208"/><text:s text:c="8"/>free(input_str);<text:bookmark-end text:name="__RefHeading___Toc4197_2495405208"/></text:p>
      <text:p text:style-name="P31"><text:bookmark-start text:name="__RefHeading___Toc4199_2495405208"/><text:s text:c="8"/>return EXIT_FAILURE;<text:bookmark-end text:name="__RefHeading___Toc4199_2495405208"/></text:p>
      <text:p text:style-name="P31"><text:bookmark-start text:name="__RefHeading___Toc4201_2495405208"/><text:s text:c="4"/>}<text:bookmark-end text:name="__RefHeading___Toc4201_2495405208"/></text:p>
      <text:p text:style-name="P31"/>
      <text:p text:style-name="P31"><text:bookmark-start text:name="__RefHeading___Toc4203_2495405208"/><text:s text:c="4"/>// Если -e не указан (то есть не изменился после обработки опций), то берем все строки для преобразования<text:bookmark-end text:name="__RefHeading___Toc4203_2495405208"/></text:p>
      <text:p text:style-name="P31"><text:bookmark-start text:name="__RefHeading___Toc4205_2495405208"/><text:s text:c="4"/>if (e_value == 0) e_value = count_newlines(input_str) + 1;<text:bookmark-end text:name="__RefHeading___Toc4205_2495405208"/></text:p>
      <text:p text:style-name="P31"/>
      <text:p text:style-name="P31"><text:bookmark-start text:name="__RefHeading___Toc4207_2495405208"/><text:s text:c="4"/>// Поиск подстрок и вывод результата<text:bookmark-end text:name="__RefHeading___Toc4207_2495405208"/></text:p>
      <text:p text:style-name="P31"><text:bookmark-start text:name="__RefHeading___Toc4209_2495405208"/><text:s text:c="4"/>char *result = mark_times_and_dates(input_str, n_flag, b_value, e_value, c_flag);<text:bookmark-end text:name="__RefHeading___Toc4209_2495405208"/></text:p>
      <text:p text:style-name="P31"><text:bookmark-start text:name="__RefHeading___Toc4211_2495405208"/><text:s text:c="4"/>fprintf(output_file, "%s\n", result);<text:bookmark-end text:name="__RefHeading___Toc4211_2495405208"/></text:p>
      <text:p text:style-name="P31"/>
      <text:p text:style-name="P31"/>
      <text:p text:style-name="P31"><text:bookmark-start text:name="__RefHeading___Toc4213_2495405208"/><text:s text:c="4"/>// Освобождение памяти и закрытие потоков<text:bookmark-end text:name="__RefHeading___Toc4213_2495405208"/></text:p>
      <text:p text:style-name="P31"><text:bookmark-start text:name="__RefHeading___Toc4215_2495405208"/><text:s text:c="4"/>free(input_str);<text:bookmark-end text:name="__RefHeading___Toc4215_2495405208"/></text:p>
      <text:p text:style-name="P31"><text:bookmark-start text:name="__RefHeading___Toc4217_2495405208"/><text:s text:c="4"/>fclose(input_file);<text:bookmark-end text:name="__RefHeading___Toc4217_2495405208"/></text:p>
      <text:p text:style-name="P31"><text:bookmark-start text:name="__RefHeading___Toc4219_2495405208"/><text:s text:c="4"/>fclose(output_file);<text:bookmark-end text:name="__RefHeading___Toc4219_2495405208"/></text:p>
      <text:p text:style-name="P31"/>
      <text:p text:style-name="P31"><text:bookmark-start text:name="__RefHeading___Toc4221_2495405208"/><text:s text:c="4"/>return EXIT_SUCCESS;<text:bookmark-end text:name="__RefHeading___Toc4221_2495405208"/></text:p>
      <text:p text:style-name="P31"><text:bookmark-start text:name="__RefHeading___Toc4223_2495405208"/>}<text:bookmark-end text:name="__RefHeading___Toc4223_2495405208"/></text:p>
      <text:p text:style-name="P31"/>
      <text:p text:style-name="P31"/>
      <text:p text:style-name="P31"><text:bookmark-start text:name="__RefHeading___Toc4225_2495405208"/>// 8-1-1-2<text:bookmark-end text:name="__RefHeading___Toc4225_2495405208"/></text:p>
      <text:p text:style-name="P31"><text:bookmark-start text:name="__RefHeading___Toc4227_2495405208"/>// 8 <text:s/>Дата и время В формате HH:MM:SS dd.mm.yyyy Примеры: 12:24:01 01.02.2001, 00:00:00 31.12.2023 <text:bookmark-end text:name="__RefHeading___Toc4227_2495405208"/></text:p>
      <text:p text:style-name="P31"><text:bookmark-start text:name="__RefHeading___Toc4229_2495405208"/>// 1 <text:s/>-b=M <text:s/>- <text:s/>номер начальной строки (нумерация с 1), -e=N <text:s/>- <text:s/>номер конечной строки (включая её)<text:bookmark-end text:name="__RefHeading___Toc4229_2495405208"/></text:p>
      <text:p text:style-name="P31"><text:bookmark-start text:name="__RefHeading___Toc4231_2495405208"/>// 1 <text:s/>Markdown <text:s/>Курсив <text:s/>*Пример*<text:bookmark-end text:name="__RefHeading___Toc4231_2495405208"/></text:p>
      <text:p text:style-name="P32"><text:bookmark-start text:name="__RefHeading___Toc4233_2495405208"/>// 2 <text:s/>Выделение Зеленый 32<text:bookmark-end text:name="__RefHeading___Toc4233_2495405208"/></text:p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 Source code" svg:font-family="'Source code'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Code Pro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63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>
        <style:tab-stops/>
      </style:paragraph-properties>
      <style:text-properties style:font-name="Times New Roman3" fo:font-family="'Times New Roman'" style:font-style-name="Жирный" style:font-family-generic="roman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y</meta:initial-creator>
    <meta:editing-cycles>22</meta:editing-cycles>
    <meta:creation-date>2021-10-17T09:09:00</meta:creation-date>
    <dc:date>2024-12-26T19:41:35.895118270</dc:date>
    <meta:editing-duration>PT2H27M26S</meta:editing-duration>
    <meta:generator>LibreOffice/24.8.3.2$Linux_X86_64 LibreOffice_project/480$Build-2</meta:generator>
    <meta:document-statistic meta:table-count="0" meta:image-count="8" meta:object-count="0" meta:page-count="10" meta:paragraph-count="352" meta:word-count="1626" meta:character-count="12401" meta:non-whitespace-character-count="9061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