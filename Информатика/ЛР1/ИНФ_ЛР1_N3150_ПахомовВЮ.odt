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700000383BD474B09.png" manifest:media-type="image/png"/>
  <manifest:file-entry manifest:full-path="Pictures/100000010000032D00000385A7C02B56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c828b" officeooo:paragraph-rsid="001c828b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color="#000000" loext:opacity="100%" style:font-name="Times New Roman" fo:font-size="14pt" fo:font-weight="bold" officeooo:rsid="0004f2fb" officeooo:paragraph-rsid="0004f2fb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officeooo:rsid="0020e1bd" officeooo:paragraph-rsid="0020e1bd" style:font-size-asian="14pt" style:font-size-complex="14pt"/>
    </style:style>
    <style:style style:name="P16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20e1bd" style:font-size-asian="14pt" style:font-size-complex="14pt"/>
    </style:style>
    <style:style style:name="P17" style:family="paragraph" style:parent-style-name="Normal_20__28_Web_29_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22b894" officeooo:paragraph-rsid="0022b894" style:font-size-asian="14pt" style:font-size-complex="14pt"/>
    </style:style>
    <style:style style:name="P18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Consolas" fo:font-size="14pt" officeooo:rsid="0022b894" officeooo:paragraph-rsid="0022b894" style:font-size-asian="14pt" style:font-size-complex="14pt"/>
    </style:style>
    <style:style style:name="P19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fo:color="#000000" loext:opacity="100%" style:font-name="Consolas" fo:font-size="14pt" fo:font-weight="normal" officeooo:rsid="0022b894" officeooo:paragraph-rsid="0022b894" fo:background-color="#ffffff" style:font-size-asian="14pt" style:font-size-complex="14pt"/>
    </style:style>
    <style:style style:name="P20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Consolas" fo:font-size="14pt" officeooo:rsid="0022b894" officeooo:paragraph-rsid="002a418e" style:font-size-asian="14pt" style:font-size-complex="14pt"/>
    </style:style>
    <style:style style:name="P21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22b894" officeooo:paragraph-rsid="0022b894" style:font-size-asian="14pt" style:font-size-complex="14pt"/>
    </style:style>
    <style:style style:name="P22" style:family="paragraph" style:parent-style-name="Normal_20__28_Web_29_" style:list-style-name="">
      <style:paragraph-properties fo:margin-top="0cm" fo:margin-bottom="0cm" style:contextual-spacing="false" fo:line-height="150%" fo:text-align="start" style:justify-single-word="false" fo:break-before="page"/>
      <style:text-properties fo:color="#000000" loext:opacity="100%" style:font-name="Times New Roman" fo:font-size="14pt" fo:font-weight="bold" officeooo:rsid="00243557" officeooo:paragraph-rsid="00243557" fo:background-color="#ffffff" style:font-size-asian="14pt" style:font-weight-asian="bold" style:font-size-complex="14pt" style:font-weight-complex="bold"/>
    </style:style>
    <style:style style:name="P23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weight="normal" officeooo:rsid="00243557" officeooo:paragraph-rsid="00243557" fo:background-color="#ffffff" style:font-size-asian="14pt" style:font-size-complex="14pt"/>
    </style:style>
    <style:style style:name="P24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2b894" officeooo:paragraph-rsid="0022b894" style:font-size-asian="14pt" style:font-size-complex="14pt"/>
    </style:style>
    <style:style style:name="P25" style:family="paragraph" style:parent-style-name="Normal_20__28_Web_29_">
      <style:paragraph-properties fo:margin-top="0cm" fo:margin-bottom="0cm" style:contextual-spacing="false" fo:line-height="150%" fo:text-align="justify" style:justify-single-word="false" fo:break-before="page"/>
      <style:text-properties fo:color="#000000" loext:opacity="100%" style:font-name="Times New Roman" fo:font-size="14pt" fo:font-weight="normal" officeooo:rsid="00243557" officeooo:paragraph-rsid="00243557" fo:background-color="#ffffff" style:font-size-asian="14pt" style:font-size-complex="14pt"/>
    </style:style>
    <style:style style:name="P26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43557" officeooo:paragraph-rsid="00243557" style:font-size-asian="14pt" style:font-size-complex="14pt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1c828b" style:font-size-asian="14pt" style:font-size-complex="13.5pt"/>
    </style:style>
    <style:style style:name="T6" style:family="text">
      <style:text-properties fo:color="#000000" loext:opacity="100%" fo:font-size="14pt" fo:font-weight="bold" officeooo:rsid="001c828b" style:font-size-asian="14pt" style:font-weight-asian="bold" style:font-size-complex="13.5pt"/>
    </style:style>
    <style:style style:name="T7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3.5pt" style:font-size-asian="13.5pt" style:font-size-complex="13.5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background-color="transparent" loext:char-shading-value="0" style:font-size-asian="14pt"/>
    </style:style>
    <style:style style:name="T13" style:family="text">
      <style:text-properties fo:font-size="14pt" fo:language="en" fo:country="US" officeooo:rsid="00024d6c" fo:background-color="transparent" loext:char-shading-value="0" style:font-size-asian="14pt"/>
    </style:style>
    <style:style style:name="T14" style:family="text">
      <style:text-properties fo:font-size="14pt" officeooo:rsid="001c828b" style:font-size-asian="14pt"/>
    </style:style>
    <style:style style:name="T15" style:family="text">
      <style:text-properties officeooo:rsid="0020e1bd"/>
    </style:style>
    <style:style style:name="T16" style:family="text">
      <style:text-properties fo:color="#000000" loext:opacity="100%" officeooo:rsid="0020e1bd"/>
    </style:style>
    <style:style style:name="T17" style:family="text">
      <style:text-properties fo:color="#000000" loext:opacity="100%" fo:font-weight="bold" officeooo:rsid="0020e1bd" fo:background-color="#ff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9" style:family="text">
      <style:text-properties fo:color="#000000" loext:opacity="100%" fo:font-weight="normal" fo:background-color="#ffffff" loext:char-shading-value="0"/>
    </style:style>
    <style:style style:name="T20" style:family="text">
      <style:text-properties fo:color="#00a933" loext:opacity="100%" fo:font-weight="normal" fo:background-color="#ffffff" loext:char-shading-value="0"/>
    </style:style>
    <style:style style:name="T21" style:family="text">
      <style:text-properties fo:color="#4de3ff" loext:opacity="100%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Информатика</text:span><text:span text:style-name="T4">»</text:span></text:p>
      <text:p text:style-name="P2" loext:marker-style-name="T3"><text:span text:style-name="T3">ОТЧ</text:span><text:span text:style-name="T6">Ё</text:span><text:span text:style-name="T3">Т ПО ЛАБОРАТОРНОЙ РАБОТЕ </text:span><text:span text:style-name="T7">№1</text:span></text:p>
      <text:p text:style-name="P4" loext:marker-style-name="T8"><text:span text:style-name="T8">Основные принципы функционирования вычислительных устройств</text:span></text:p>
      <text:p text:style-name="P5" loext:marker-style-name="T9"/>
      <text:p text:style-name="P5" loext:marker-style-name="T9"/>
      <text:p text:style-name="P5" loext:marker-style-name="T9"/>
      <text:p text:style-name="P6" loext:marker-style-name="T9"/>
      <text:p text:style-name="P7" loext:marker-style-name="T10"><text:span text:style-name="T10">Выполнил:</text:span></text:p>
      <text:p text:style-name="P7" loext:marker-style-name="T11"><text:span text:style-name="T11">Студент группы </text:span><text:span text:style-name="T12">N31</text:span><text:bookmark text:name="_GoBack"/><text:span text:style-name="T13">50</text:span></text:p>
      <text:p text:style-name="P8">Пахомов Владимир Юрьевич</text:p>
      <text:p text:style-name="P9" loext:marker-style-name="T11"><draw:frame draw:style-name="fr1" draw:name="Изображение1" text:anchor-type="char" svg:x="12.728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0"><text:span text:style-name="T10"/></text:p>
      <text:p text:style-name="P7" loext:marker-style-name="T10"><text:span text:style-name="T10"/></text:p>
      <text:p text:style-name="P7" loext:marker-style-name="T10"><text:span text:style-name="T10">Проверил:</text:span></text:p>
      <text:p text:style-name="P7" loext:marker-style-name="T11"><text:span text:style-name="T14">Грозов</text:span><text:span text:style-name="T11"> </text:span><text:span text:style-name="T14">В</text:span><text:span text:style-name="T11">.</text:span><text:span text:style-name="T14">А</text:span><text:span text:style-name="T11">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4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10<text:tab/>3</text:a></text:p>
          <text:p text:style-name="P12"><text:a xlink:type="simple" xlink:href="#__RefHeading___Toc24491_4070095633" text:style-name="Index_20_Link" text:visited-style-name="Index_20_Link">Исходный текст программы<text:tab/>3</text:a></text:p>
          <text:p text:style-name="P12"><text:a xlink:type="simple" xlink:href="#__RefHeading___Toc24493_4070095633" text:style-name="Index_20_Link" text:visited-style-name="Index_20_Link">Скриншоты запуска программы на учебном стенде Simple CPU.<text:tab/>4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<text:span text:style-name="T15">10</text:span><text:bookmark-end text:name="__RefHeading___Toc35_4078790415"/></text:h>
      <text:p text:style-name="P15">Определить количество нулевых ячеек во второй половине памяти и записать результат в ячейку 0x7F.</text:p>
      <text:p text:style-name="P16"><text:span text:style-name="T16"/></text:p>
      <text:h text:style-name="P17" text:outline-level="1"><text:bookmark-start text:name="__RefHeading___Toc24491_4070095633"/><text:span text:style-name="T17">И</text:span><text:span text:style-name="T18">сходный текст программы</text:span><text:bookmark-end text:name="__RefHeading___Toc24491_4070095633"/></text:h>
      <text:p text:style-name="P18"><text:span text:style-name="T19"><text:s text:c="6"/>R00 &lt;- 0 <text:s text:c="5"/></text:span><text:span text:style-name="T20">; константа для сравнения с 0</text:span></text:p>
      <text:p text:style-name="P18"><text:span text:style-name="T19"><text:s text:c="6"/>R03 &lt;- 0 <text:s text:c="5"/></text:span><text:span text:style-name="T20">; количество нулевых ячеек</text:span></text:p>
      <text:p text:style-name="P18"><text:span text:style-name="T19"><text:s text:c="6"/>R02 &lt;- 0x80 <text:s text:c="2"/></text:span><text:span text:style-name="T20">; адрес ячейки, в которой находимся</text:span></text:p>
      <text:p text:style-name="P18"><text:span text:style-name="T21">LOOP:</text:span><text:span text:style-name="T19"> R01 &lt;- @0x80</text:span></text:p>
      <text:p text:style-name="P19"><text:s text:c="6"/>RF &lt;- R01 ~ R00</text:p>
      <text:p text:style-name="P19"><text:s text:c="6"/>RC &lt;- @SKIP (Z)</text:p>
      <text:p text:style-name="P19"><text:s text:c="6"/>R03 &lt;- R03++</text:p>
      <text:p text:style-name="P18"><text:span text:style-name="T21">SKIP:</text:span><text:span text:style-name="T19"> R02 &lt;- R02++</text:span></text:p>
      <text:p text:style-name="P19"><text:s text:c="6"/>RC &lt;- @EXIT (C)</text:p>
      <text:p text:style-name="P19"><text:s text:c="6"/>@0x07 &lt;- R02</text:p>
      <text:p text:style-name="P19"><text:s text:c="6"/>RC &lt;- @LOOP</text:p>
      <text:p text:style-name="P20"><text:span text:style-name="T21">EXIT:</text:span><text:span text:style-name="T19"> R00 &lt;- 128</text:span></text:p>
      <text:p text:style-name="P20"><text:span text:style-name="T19"><text:s text:c="6"/>R00 &lt;- R00 — R03</text:span></text:p>
      <text:p text:style-name="P20"><text:span text:style-name="T19"><text:s text:c="6"/>@0x7F &lt;- R00</text:span><text:span text:style-name="T19"/></text:p>
      <text:p text:style-name="P18"><text:span text:style-name="T21">HLT:</text:span><text:span text:style-name="T19"> <text:s/>RC &lt;- @HLT</text:span></text:p>
      <text:p text:style-name="P21"><text:span text:style-name="T19"/></text:p>
      <text:h text:style-name="P22" text:outline-level="1"><text:bookmark-start text:name="__RefHeading___Toc24493_4070095633"/>Скриншоты запуска программы на учебном стенде Simple CPU.<text:bookmark-end text:name="__RefHeading___Toc24493_4070095633"/></text:h>
      <text:p text:style-name="P23">Начальное состояние памяти и регистров:</text:p>
      <text:p text:style-name="P24"><draw:frame draw:style-name="fr2" draw:name="Изображение2" text:anchor-type="char" svg:width="16.501cm" svg:height="18.286cm" draw:z-index="2"><draw:image xlink:href="Pictures/100000010000032D00000385A7C02B56.png" xlink:type="simple" xlink:show="embed" xlink:actuate="onLoad" draw:mime-type="image/png"/></draw:frame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5">Финальное состояние памяти и регистров:</text:p>
      <text:p text:style-name="P26"><draw:frame draw:style-name="fr2" draw:name="Изображение3" text:anchor-type="char" svg:width="16.501cm" svg:height="19.142cm" draw:z-index="1"><draw:image xlink:href="Pictures/100000000000030700000383BD474B09.png" xlink:type="simple" xlink:show="embed" xlink:actuate="onLoad" draw:mime-type="image/png"/></draw:frame><text:span text:style-name="T19"/></text:p>
      <text:p text:style-name="P26"><text:span text:style-name="T19"/></text:p>
      <text:p text:style-name="P26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24</meta:editing-cycles>
    <meta:creation-date>2021-10-17T09:09:00</meta:creation-date>
    <dc:date>2024-11-27T10:44:54.343262704</dc:date>
    <meta:editing-duration>PT2H25M49S</meta:editing-duration>
    <meta:generator>LibreOffice/24.8.1.2$Linux_X86_64 LibreOffice_project/480$Build-2</meta:generator>
    <meta:print-date>2024-11-27T10:43:59.435553960</meta:print-date>
    <meta:printed-by>Файлы PDF</meta:printed-by>
    <meta:document-statistic meta:table-count="0" meta:image-count="3" meta:object-count="0" meta:page-count="5" meta:paragraph-count="40" meta:word-count="166" meta:character-count="1158" meta:non-whitespace-character-count="950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