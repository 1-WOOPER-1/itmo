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C000001BB57FA232E.png" manifest:media-type="image/png"/>
  <manifest:file-entry manifest:full-path="Pictures/1000000000000780000002DE2AC07565.png" manifest:media-type="image/png"/>
  <manifest:file-entry manifest:full-path="Pictures/1000000000000780000003BEF5DCADA9.png" manifest:media-type="image/png"/>
  <manifest:file-entry manifest:full-path="Pictures/100000010000031F000000F2ECDA17F7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c828b" officeooo:paragraph-rsid="001c828b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color="#000000" loext:opacity="100%" style:font-name="Times New Roman" fo:font-size="14pt" fo:font-weight="bold" officeooo:rsid="0022b894" officeooo:paragraph-rsid="0004f2fb" fo:background-color="#ffffff" style:font-size-asian="14pt" style:font-weight-asian="bold" style:font-size-complex="14pt" style:font-weight-complex="bold"/>
    </style:style>
    <style:style style:name="P15" style:family="paragraph" style:parent-style-name="Normal_20__28_Web_29_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3cm" style:auto-text-indent="false" style:page-number="auto" fo:background-color="transparent" style:writing-mode="lr-tb"/>
      <style:text-properties fo:color="#000000" loext:opacity="100%" style:font-name="Times New Roman" fo:font-size="14pt" fo:font-weight="normal" officeooo:rsid="0022b894" officeooo:paragraph-rsid="0004f2fb" fo:background-color="#ffffff" style:font-size-asian="14pt" style:font-size-complex="14pt"/>
    </style:style>
    <style:style style:name="P16" style:family="paragraph" style:parent-style-name="Normal_20__28_Web_29_" style:list-style-name="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font-weight="bold" officeooo:rsid="0022b894" officeooo:paragraph-rsid="0004f2fb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333333" loext:opacity="100%" style:font-name="Droid Sans Mono" fo:font-size="10.5pt" fo:font-weight="normal" officeooo:rsid="00243557" officeooo:paragraph-rsid="0022b894" fo:background-color="transparent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style:line-height-at-least="0.503cm"/>
      <style:text-properties fo:background-color="transparen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33333" loext:opacity="100%" style:font-name="Droid Sans Mono" fo:font-size="10.5pt" fo:font-weight="normal" fo:background-color="transparent"/>
    </style:style>
    <style:style style:name="P20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transparent"/>
    </style:style>
    <style:style style:name="P21" style:family="paragraph" style:parent-style-name="Normal_20__28_Web_29_" style:list-style-name="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font-weight="bold" officeooo:rsid="0030bc7a" officeooo:paragraph-rsid="0030bc7a" fo:background-color="#ffffff" style:font-size-asian="14pt" style:font-weight-asian="bold" style:font-size-complex="14pt" style:font-weight-complex="bold"/>
    </style:style>
    <style:style style:name="P22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243557" officeooo:paragraph-rsid="0022b894" style:font-size-asian="14pt" style:font-size-complex="14pt"/>
    </style:style>
    <style:style style:name="P23" style:family="paragraph" style:parent-style-name="Normal_20__28_Web_29_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31f724" officeooo:paragraph-rsid="0031f724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32adc1" officeooo:paragraph-rsid="0032adc1" style:font-size-asian="14pt" style:font-size-complex="14pt"/>
    </style:style>
    <style:style style:name="P25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31f724" officeooo:paragraph-rsid="0031f724" style:font-size-asian="14pt" style:font-size-complex="14pt"/>
    </style:style>
    <style:style style:name="P26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343d05" officeooo:paragraph-rsid="00343d05" style:font-size-asian="14pt" style:font-size-complex="14pt"/>
    </style:style>
    <style:style style:name="P27" style:family="paragraph" style:parent-style-name="Normal_20__28_Web_29_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343d05" officeooo:paragraph-rsid="00343d05" style:font-size-asian="14pt" style:font-weight-asian="bold" style:font-size-complex="14pt" style:font-weight-complex="bold"/>
    </style:style>
    <style:style style:name="P28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35f6df" officeooo:paragraph-rsid="0035f6df" style:font-size-asian="14pt" style:font-size-complex="14pt"/>
    </style:style>
    <style:style style:name="P29" style:family="paragraph" style:parent-style-name="Normal_20__28_Web_29_">
      <style:paragraph-properties fo:margin-top="0cm" fo:margin-bottom="0cm" style:contextual-spacing="false" fo:line-height="100%" fo:text-align="start" style:justify-single-word="false"/>
      <style:text-properties style:font-name="Source Code Pro" fo:font-size="8.5pt" officeooo:rsid="0035f6df" officeooo:paragraph-rsid="0035f6df" style:font-size-asian="8.5pt" style:font-size-complex="8.5pt"/>
    </style:style>
    <style:style style:name="P30" style:family="paragraph" style:parent-style-name="Normal_20__28_Web_29_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37991e" officeooo:paragraph-rsid="0037991e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color="#3b3b3b" loext:opacity="100%" style:font-name="Consolas" fo:font-size="8.5pt" fo:font-weight="normal" officeooo:rsid="000a70d9" officeooo:paragraph-rsid="0037991e" fo:background-color="#ffffff" style:font-size-asian="8.5pt" style:font-weight-asian="normal" style:font-size-complex="8.5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3b3b3b" loext:opacity="100%" style:font-name="Consolas" fo:font-size="8.5pt" fo:font-weight="normal" officeooo:paragraph-rsid="0037991e" fo:background-color="#ffffff" style:font-size-asian="8.5pt" style:font-size-complex="8.5pt"/>
    </style:style>
    <style:style style:name="P33" style:family="paragraph" style:parent-style-name="Standard">
      <style:paragraph-properties fo:margin-top="0cm" fo:margin-bottom="0cm" style:contextual-spacing="false" style:line-height-at-least="0cm"/>
      <style:text-properties style:font-name="Consolas" fo:font-size="8.5pt" officeooo:paragraph-rsid="0037991e" style:font-size-asian="8.5pt" style:font-size-complex="8.5pt"/>
    </style:style>
    <style:style style:name="P34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008000" loext:opacity="100%" style:font-name="Consolas" fo:font-size="8.5pt" fo:font-weight="normal" officeooo:paragraph-rsid="0037991e" fo:background-color="#ffffff" style:font-size-asian="8.5pt" style:font-size-complex="8.5pt"/>
    </style:style>
    <style:style style:name="P35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onsolas" fo:font-size="8.5pt" officeooo:paragraph-rsid="0037991e" style:font-size-asian="8.5pt" style:font-size-complex="8.5pt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1c828b" style:font-size-asian="14pt" style:font-size-complex="13.5pt"/>
    </style:style>
    <style:style style:name="T6" style:family="text">
      <style:text-properties fo:color="#000000" loext:opacity="100%" fo:font-size="14pt" fo:font-weight="bold" officeooo:rsid="001c828b" style:font-size-asian="14pt" style:font-weight-asian="bold" style:font-size-complex="13.5pt"/>
    </style:style>
    <style:style style:name="T7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8" style:family="text">
      <style:text-properties fo:color="#000000" loext:opacity="100%" fo:font-size="13.5pt" fo:font-weight="bold" officeooo:rsid="002fb580" style:font-size-asian="13.5pt" style:font-weight-asian="bold" style:font-size-complex="13.5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3.5pt" style:font-size-asian="13.5pt" style:font-size-complex="13.5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background-color="transparent" loext:char-shading-value="0" style:font-size-asian="14pt"/>
    </style:style>
    <style:style style:name="T14" style:family="text">
      <style:text-properties fo:font-size="14pt" fo:language="en" fo:country="US" officeooo:rsid="00024d6c" fo:background-color="transparent" loext:char-shading-value="0" style:font-size-asian="14pt"/>
    </style:style>
    <style:style style:name="T15" style:family="text">
      <style:text-properties fo:font-size="14pt" officeooo:rsid="001c828b" style:font-size-asian="14pt"/>
    </style:style>
    <style:style style:name="T16" style:family="text">
      <style:text-properties fo:color="#aa3731" loext:opacity="100%" fo:font-weight="bold"/>
    </style:style>
    <style:style style:name="T17" style:family="text">
      <style:text-properties fo:color="#777777" loext:opacity="100%"/>
    </style:style>
    <style:style style:name="T18" style:family="text">
      <style:text-properties fo:color="#7a3e9d" loext:opacity="100%"/>
    </style:style>
    <style:style style:name="T19" style:family="text">
      <style:text-properties fo:color="#000000" loext:opacity="100%" fo:font-weight="normal" fo:background-color="#ffffff" loext:char-shading-value="0"/>
    </style:style>
    <style:style style:name="T20" style:family="text">
      <style:text-properties fo:color="#000000" loext:opacity="100%" fo:background-color="#ffffff" loext:char-shading-value="0"/>
    </style:style>
    <style:style style:name="T21" style:family="text">
      <style:text-properties fo:color="#af00db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a31515" loext:opacity="100%"/>
    </style:style>
    <style:style style:name="T24" style:family="text">
      <style:text-properties fo:color="#795e26" loext:opacity="100%"/>
    </style:style>
    <style:style style:name="T25" style:family="text">
      <style:text-properties fo:color="#267f99" loext:opacity="100%"/>
    </style:style>
    <style:style style:name="T26" style:family="text">
      <style:text-properties fo:color="#001080" loext:opacity="100%"/>
    </style:style>
    <style:style style:name="T27" style:family="text">
      <style:text-properties fo:color="#000000" loext:opacity="100%"/>
    </style:style>
    <style:style style:name="T28" style:family="text">
      <style:text-properties fo:color="#098658" loext:opacity="100%"/>
    </style:style>
    <style:style style:name="T29" style:family="text">
      <style:text-properties fo:color="#ee0000" loext:opacity="100%"/>
    </style:style>
    <style:style style:name="T30" style:family="text">
      <style:text-properties fo:color="#0000ff" loext:opacity="100%" fo:font-weight="normal" fo:background-color="#ffffff" loext:char-shading-value="0"/>
    </style:style>
    <style:style style:name="T31" style:family="text">
      <style:text-properties fo:color="#3b3b3b" loext:opacity="100%" fo:font-weight="normal" fo:background-color="#ffffff" loext:char-shading-value="0"/>
    </style:style>
    <style:style style:name="T32" style:family="text">
      <style:text-properties fo:color="#001080" loext:opacity="100%" fo:font-weight="normal" fo:background-color="#ffffff" loext:char-shading-value="0"/>
    </style:style>
    <style:style style:name="T33" style:family="text">
      <style:text-properties fo:color="#0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61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Информатика</text:span><text:span text:style-name="T4">»</text:span></text:p>
      <text:p text:style-name="P2" loext:marker-style-name="T3"><text:span text:style-name="T3">ОТЧ</text:span><text:span text:style-name="T6">Ё</text:span><text:span text:style-name="T3">Т ПО ЛАБОРАТОРНОЙ РАБОТЕ </text:span><text:span text:style-name="T7">№</text:span><text:span text:style-name="T8">2</text:span></text:p>
      <text:p text:style-name="P4" loext:marker-style-name="T9"><text:span text:style-name="T9">Основные принципы функционирования вычислительных устройств</text:span></text:p>
      <text:p text:style-name="P5" loext:marker-style-name="T10"/>
      <text:p text:style-name="P5" loext:marker-style-name="T10"/>
      <text:p text:style-name="P5" loext:marker-style-name="T10"/>
      <text:p text:style-name="P6" loext:marker-style-name="T10"/>
      <text:p text:style-name="P7" loext:marker-style-name="T11"><text:span text:style-name="T11">Выполнил:</text:span></text:p>
      <text:p text:style-name="P7" loext:marker-style-name="T12"><text:span text:style-name="T12">Студент группы </text:span><text:span text:style-name="T13">N31</text:span><text:bookmark text:name="_GoBack"/><text:span text:style-name="T14">50</text:span></text:p>
      <text:p text:style-name="P8">Пахомов Владимир Юрьевич</text:p>
      <text:p text:style-name="P9" loext:marker-style-name="T12"><draw:frame draw:style-name="fr1" draw:name="Изображение1" text:anchor-type="char" svg:x="12.728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>Проверил:</text:span></text:p>
      <text:p text:style-name="P7" loext:marker-style-name="T12"><text:span text:style-name="T15">Грозов</text:span><text:span text:style-name="T12"> </text:span><text:span text:style-name="T15">В</text:span><text:span text:style-name="T12">.</text:span><text:span text:style-name="T15">А</text:span><text:span text:style-name="T12">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4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2311_1392867217" text:style-name="Index_20_Link" text:visited-style-name="Index_20_Link">Задание. Вариант 5-9<text:tab/>3</text:a></text:p>
          <text:p text:style-name="P12"><text:a xlink:type="simple" xlink:href="#__RefHeading___Toc2319_1392867217" text:style-name="Index_20_Link" text:visited-style-name="Index_20_Link">Make-файл<text:tab/>3</text:a></text:p>
          <text:p text:style-name="P12"><text:a xlink:type="simple" xlink:href="#__RefHeading___Toc2321_1392867217" text:style-name="Index_20_Link" text:visited-style-name="Index_20_Link">Примеры работы программ на различных исходных данных<text:tab/>3</text:a></text:p>
          <text:p text:style-name="P12"><text:a xlink:type="simple" xlink:href="#__RefHeading___Toc2323_1392867217" text:style-name="Index_20_Link" text:visited-style-name="Index_20_Link">Дизассемблерный листинг. Выводы<text:tab/>4</text:a></text:p>
          <text:p text:style-name="P12"><text:a xlink:type="simple" xlink:href="#__RefHeading___Toc2325_1392867217" text:style-name="Index_20_Link" text:visited-style-name="Index_20_Link">Исходные тексты программ с комментариями<text:tab/>5</text:a></text:p>
        </text:index-body>
      </text:table-of-content>
      <text:p text:style-name="P13"><text:span text:style-name="T4"/></text:p>
      <text:h text:style-name="P14" text:outline-level="1"><text:bookmark-start text:name="__RefHeading___Toc2311_1392867217"/>Задание. Вариант 5-9<text:bookmark-end text:name="__RefHeading___Toc2311_1392867217"/></text:h>
      <text:p text:style-name="P15"><text:bookmark-start text:name="__RefHeading___Toc2313_1392867217"/>Тип числа: uint16_t<text:bookmark-end text:name="__RefHeading___Toc2313_1392867217"/></text:p>
      <text:p text:style-name="P15"><text:bookmark-start text:name="__RefHeading___Toc2315_1392867217"/>Задание: Назовём свёрткой байта порядка N операцию циклического сдвига старшей тетрады на N битов вправо, а младшей тетрады на N битов влево. Выполнить свёртку всех байтов на случайное число из диапазона 0..3.<text:bookmark-end text:name="__RefHeading___Toc2315_1392867217"/></text:p>
      <text:p text:style-name="P15"><text:bookmark-start text:name="__RefHeading___Toc2317_1392867217"/>Пример преобразования: 0xDEADBEEF =&gt; 0x7BA7EBBF (N = 2)<text:bookmark-end text:name="__RefHeading___Toc2317_1392867217"/></text:p>
      <text:h text:style-name="P16" text:outline-level="1"><text:bookmark-start text:name="__RefHeading___Toc2319_1392867217"/>Make-файл<text:bookmark-end text:name="__RefHeading___Toc2319_1392867217"/></text:h>
      <text:p text:style-name="P17"><text:span text:style-name="T16">.PHONY</text:span><text:span text:style-name="T17">:</text:span> all clean debug</text:p>
      <text:p text:style-name="P18"/>
      <text:p text:style-name="P19"><text:span text:style-name="T18">APP</text:span><text:span text:style-name="T17">=</text:span>inf2vypN3150</text:p>
      <text:p text:style-name="P19"><text:span text:style-name="T18">CFLAGS</text:span><text:span text:style-name="T17">=</text:span>-Wall -Wextra -Werror</text:p>
      <text:p text:style-name="P18"/>
      <text:p text:style-name="P19"><text:span text:style-name="T16">all</text:span><text:span text:style-name="T17">:</text:span> <text:span text:style-name="T17">$(</text:span><text:span text:style-name="T18">APP</text:span><text:span text:style-name="T17">)</text:span></text:p>
      <text:p text:style-name="P18"/>
      <text:p text:style-name="P19"><text:span text:style-name="T17">$(</text:span><text:span text:style-name="T18">APP</text:span><text:span text:style-name="T17">)</text:span>: <text:span text:style-name="T17">$(</text:span><text:span text:style-name="T18">APP</text:span><text:span text:style-name="T17">)</text:span>.c <text:span text:style-name="T17">$(</text:span><text:span text:style-name="T18">APP</text:span><text:span text:style-name="T17">)</text:span>.S</text:p>
      <text:p text:style-name="P19"><text:tab/>gcc -o <text:span text:style-name="T17">$(</text:span><text:span text:style-name="T18">APP</text:span><text:span text:style-name="T17">)</text:span>_c <text:span text:style-name="T17">$(</text:span><text:span text:style-name="T18">CFLAGS</text:span><text:span text:style-name="T17">)</text:span> <text:span text:style-name="T17">$(</text:span><text:span text:style-name="T18">APP</text:span><text:span text:style-name="T17">)</text:span>.c</text:p>
      <text:p text:style-name="P19"><text:tab/>nasm -felf64 <text:span text:style-name="T17">$(</text:span><text:span text:style-name="T18">APP</text:span><text:span text:style-name="T17">)</text:span>.S</text:p>
      <text:p text:style-name="P19"><text:tab/>gcc -no-pie -o <text:span text:style-name="T17">$(</text:span><text:span text:style-name="T18">APP</text:span><text:span text:style-name="T17">)</text:span>_n <text:span text:style-name="T17">$(</text:span><text:span text:style-name="T18">APP</text:span><text:span text:style-name="T17">)</text:span>.o</text:p>
      <text:p text:style-name="P18"/>
      <text:p text:style-name="P19"><text:span text:style-name="T16">clean</text:span><text:span text:style-name="T17">:</text:span></text:p>
      <text:p text:style-name="P19"><text:tab/>rm -rf <text:span text:style-name="T17">$(</text:span><text:span text:style-name="T18">APP</text:span><text:span text:style-name="T17">)</text:span>_c <text:span text:style-name="T17">$(</text:span><text:span text:style-name="T18">APP</text:span><text:span text:style-name="T17">)</text:span>_n <text:span text:style-name="T17">$(</text:span><text:span text:style-name="T18">APP</text:span><text:span text:style-name="T17">)</text:span>.o</text:p>
      <text:p text:style-name="P20"/>
      <text:h text:style-name="P21" text:outline-level="1"><text:bookmark-start text:name="__RefHeading___Toc2321_1392867217"/>Примеры работы программ на различных исходных данных<text:bookmark-end text:name="__RefHeading___Toc2321_1392867217"/></text:h>
      <text:p text:style-name="P22"><draw:frame draw:style-name="fr2" draw:name="Изображение2" text:anchor-type="char" svg:width="16.501cm" svg:height="4.997cm" draw:z-index="1"><draw:image xlink:href="Pictures/100000010000031F000000F2ECDA17F7.png" xlink:type="simple" xlink:show="embed" xlink:actuate="onLoad" draw:mime-type="image/png"/></draw:frame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h text:style-name="P23" text:outline-level="1"><text:bookmark-start text:name="__RefHeading___Toc2323_1392867217"/><text:soft-page-break/><text:span text:style-name="T20">Дизассемблерный листинг. Выводы</text:span><text:bookmark-end text:name="__RefHeading___Toc2323_1392867217"/></text:h>
      <text:p text:style-name="P24"><text:span text:style-name="T19">Функция преобразования числа (слева C, справа NASM):</text:span></text:p>
      <text:p text:style-name="P25"><draw:frame draw:style-name="fr1" draw:name="Изображение4" text:anchor-type="char" svg:x="0cm" svg:y="-0.092cm" svg:width="16.501cm" svg:height="8.227cm" draw:z-index="3"><draw:image xlink:href="Pictures/1000000000000780000003BEF5DCADA9.png" xlink:type="simple" xlink:show="embed" xlink:actuate="onLoad" draw:mime-type="image/png"/></draw:frame><draw:frame draw:style-name="fr3" draw:name="Изображение3" text:anchor-type="char" svg:x="0cm" svg:y="8.133cm" svg:width="8.25cm" svg:height="3.639cm" draw:z-index="2"><draw:image xlink:href="Pictures/10000000000003BC000001BB57FA232E.png" xlink:type="simple" xlink:show="embed" xlink:actuate="onLoad" draw:mime-type="image/png"/></draw:frame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6"><text:span text:style-name="T19">Функция вывода числа в двоичном виде:</text:span></text:p>
      <text:p text:style-name="P26"><draw:frame draw:style-name="fr2" draw:name="Изображение5" text:anchor-type="char" svg:width="16.501cm" svg:height="6.302cm" draw:z-index="4"><draw:image xlink:href="Pictures/1000000000000780000002DE2AC07565.png" xlink:type="simple" xlink:show="embed" xlink:actuate="onLoad" draw:mime-type="image/png"/></draw:frame><text:span text:style-name="T19">Вывод: программа написанная на NASM выглядит короче и работает быстрее, чем программа дизассемблированная с C.</text:span></text:p>
      <text:p text:style-name="P26"><text:span text:style-name="T19"/></text:p>
      <text:h text:style-name="P27" text:outline-level="1"><text:bookmark-start text:name="__RefHeading___Toc2325_1392867217"/><text:soft-page-break/><text:span text:style-name="T20">Исходные тексты программ с комментариями</text:span><text:bookmark-end text:name="__RefHeading___Toc2325_1392867217"/></text:h>
      <text:p text:style-name="P28"><text:span text:style-name="T19">Программа NASM:</text:span></text:p>
      <text:p text:style-name="P29"><text:span text:style-name="T19">global main</text:span></text:p>
      <text:p text:style-name="P29"><text:span text:style-name="T19"/></text:p>
      <text:p text:style-name="P29"><text:span text:style-name="T19">extern printf</text:span></text:p>
      <text:p text:style-name="P29"><text:span text:style-name="T19">extern fprintf</text:span></text:p>
      <text:p text:style-name="P29"><text:span text:style-name="T19">extern stderr</text:span></text:p>
      <text:p text:style-name="P29"><text:span text:style-name="T19"/></text:p>
      <text:p text:style-name="P29"><text:span text:style-name="T19">extern srand</text:span></text:p>
      <text:p text:style-name="P29"><text:span text:style-name="T19">extern rand</text:span></text:p>
      <text:p text:style-name="P29"><text:span text:style-name="T19"/></text:p>
      <text:p text:style-name="P29"><text:span text:style-name="T19">extern time</text:span></text:p>
      <text:p text:style-name="P29"><text:span text:style-name="T19"/></text:p>
      <text:p text:style-name="P29"><text:span text:style-name="T19">extern getpid</text:span></text:p>
      <text:p text:style-name="P29"><text:span text:style-name="T19"/></text:p>
      <text:p text:style-name="P29"><text:span text:style-name="T19">extern strtol</text:span></text:p>
      <text:p text:style-name="P29"><text:span text:style-name="T19"/></text:p>
      <text:p text:style-name="P29"><text:span text:style-name="T19">section .text</text:span></text:p>
      <text:p text:style-name="P29"><text:span text:style-name="T19"/></text:p>
      <text:p text:style-name="P29"><text:span text:style-name="T19">circular_shift:</text:span></text:p>
      <text:p text:style-name="P29"><text:span text:style-name="T19"><text:tab/>mov rax, 0</text:span></text:p>
      <text:p text:style-name="P29"><text:span text:style-name="T19"><text:tab/>mov dl, 0</text:span></text:p>
      <text:p text:style-name="P29"><text:span text:style-name="T19"/></text:p>
      <text:p text:style-name="P29"><text:span text:style-name="T19"><text:tab/>mov r9b, 4</text:span></text:p>
      <text:p text:style-name="P29"><text:span text:style-name="T19"><text:tab/>sub r9b, sil</text:span></text:p>
      <text:p text:style-name="P29"><text:span text:style-name="T19"/></text:p>
      <text:p text:style-name="P29"><text:span text:style-name="T19"><text:tab/>circular_shift_loop:</text:span></text:p>
      <text:p text:style-name="P29"><text:span text:style-name="T19"><text:tab/><text:tab/>cmp dl, 16</text:span></text:p>
      <text:p text:style-name="P29"><text:span text:style-name="T19"><text:tab/><text:tab/>jae circular_shift_exit</text:span></text:p>
      <text:p text:style-name="P29"><text:span text:style-name="T19"><text:tab/><text:tab/></text:span></text:p>
      <text:p text:style-name="P29"><text:span text:style-name="T19"><text:tab/><text:tab/>mov r10w, di</text:span></text:p>
      <text:p text:style-name="P29"><text:span text:style-name="T19"><text:tab/><text:tab/>mov cl, dl</text:span></text:p>
      <text:p text:style-name="P29"><text:span text:style-name="T19"><text:tab/><text:tab/>shr r10w, cl</text:span></text:p>
      <text:p text:style-name="P29"><text:span text:style-name="T19"><text:tab/><text:tab/>and r10w, 0xFF</text:span></text:p>
      <text:p text:style-name="P29"><text:span text:style-name="T19"><text:tab/><text:tab/></text:span></text:p>
      <text:p text:style-name="P29"><text:span text:style-name="T19"><text:tab/><text:tab/>mov r11w, r10w <text:s text:c="2"/>; high_tetr</text:span></text:p>
      <text:p text:style-name="P29"><text:span text:style-name="T19"><text:tab/><text:tab/>shr r11w, 4</text:span></text:p>
      <text:p text:style-name="P29"><text:span text:style-name="T19"><text:tab/><text:tab/>mov r12w, r10w <text:s text:c="2"/>; low_tetr </text:span></text:p>
      <text:p text:style-name="P29"><text:span text:style-name="T19"><text:tab/><text:tab/>and r12w, 0b1111</text:span></text:p>
      <text:p text:style-name="P29"><text:span text:style-name="T19"><text:tab/><text:tab/></text:span></text:p>
      <text:p text:style-name="P29"><text:span text:style-name="T19"><text:tab/><text:tab/>mov r13w, r11w</text:span></text:p>
      <text:p text:style-name="P29"><text:span text:style-name="T19"><text:tab/><text:tab/>mov cl, sil</text:span></text:p>
      <text:p text:style-name="P29"><text:span text:style-name="T19"><text:tab/><text:tab/>shr r13w, cl</text:span></text:p>
      <text:p text:style-name="P29"><text:span text:style-name="T19"><text:tab/><text:tab/>mov cl, r9b</text:span></text:p>
      <text:p text:style-name="P29"><text:span text:style-name="T19"><text:tab/><text:tab/>shl r11w, cl</text:span></text:p>
      <text:p text:style-name="P29"><text:span text:style-name="T19"><text:tab/><text:tab/>or r11w, r13w</text:span></text:p>
      <text:p text:style-name="P29"><text:span text:style-name="T19"><text:tab/><text:tab/>and r11w, 0b1111</text:span></text:p>
      <text:p text:style-name="P29"><text:span text:style-name="T19"><text:tab/><text:tab/></text:span></text:p>
      <text:p text:style-name="P29"><text:span text:style-name="T19"><text:tab/><text:tab/>mov r14w, r12w</text:span></text:p>
      <text:p text:style-name="P29"><text:span text:style-name="T19"><text:tab/><text:tab/>mov cl, sil</text:span></text:p>
      <text:p text:style-name="P29"><text:span text:style-name="T19"><text:tab/><text:tab/>shl r14w, cl</text:span></text:p>
      <text:p text:style-name="P29"><text:span text:style-name="T19"><text:tab/><text:tab/>mov cl, r9b</text:span></text:p>
      <text:p text:style-name="P29"><text:span text:style-name="T19"><text:tab/><text:tab/>shr r12w, cl</text:span></text:p>
      <text:p text:style-name="P29"><text:span text:style-name="T19"><text:tab/><text:tab/>or r12w, r14w</text:span></text:p>
      <text:p text:style-name="P29"><text:span text:style-name="T19"><text:tab/><text:tab/>and r12w, 0b1111</text:span></text:p>
      <text:p text:style-name="P29"><text:span text:style-name="T19"><text:tab/><text:tab/></text:span></text:p>
      <text:p text:style-name="P29"><text:span text:style-name="T19"><text:tab/><text:tab/>shl r11w, 4</text:span></text:p>
      <text:p text:style-name="P29"><text:span text:style-name="T19"><text:tab/><text:tab/>or r11w, r12w</text:span></text:p>
      <text:p text:style-name="P29"><text:span text:style-name="T19"><text:tab/><text:tab/>mov cl, dl</text:span></text:p>
      <text:p text:style-name="P29"><text:span text:style-name="T19"><text:tab/><text:tab/>shl r11w, cl</text:span></text:p>
      <text:p text:style-name="P29"><text:span text:style-name="T19"><text:tab/><text:tab/>or ax, r11w</text:span></text:p>
      <text:p text:style-name="P29"><text:soft-page-break/><text:span text:style-name="T19"/></text:p>
      <text:p text:style-name="P29"><text:span text:style-name="T19"><text:tab/><text:tab/>add dl, 8</text:span></text:p>
      <text:p text:style-name="P29"><text:span text:style-name="T19"><text:tab/><text:tab/>jmp circular_shift_loop</text:span></text:p>
      <text:p text:style-name="P29"><text:span text:style-name="T19"><text:tab/>circular_shift_exit:</text:span></text:p>
      <text:p text:style-name="P29"><text:span text:style-name="T19"><text:tab/>ret</text:span></text:p>
      <text:p text:style-name="P29"><text:span text:style-name="T19"/></text:p>
      <text:p text:style-name="P29"><text:span text:style-name="T19">print_bin:</text:span></text:p>
      <text:p text:style-name="P29"><text:span text:style-name="T19"><text:tab/>sub rsp, 3</text:span></text:p>
      <text:p text:style-name="P29"><text:span text:style-name="T19"><text:tab/>mov byte [rsp], 16</text:span></text:p>
      <text:p text:style-name="P29"><text:span text:style-name="T19"><text:tab/>mov [rsp+1], di</text:span></text:p>
      <text:p text:style-name="P29"><text:span text:style-name="T19"/></text:p>
      <text:p text:style-name="P29"><text:span text:style-name="T19"><text:tab/>print_bin_loop:</text:span></text:p>
      <text:p text:style-name="P29"><text:span text:style-name="T19"><text:tab/><text:tab/>mov cl, [rsp]</text:span></text:p>
      <text:p text:style-name="P29"><text:span text:style-name="T19"><text:tab/><text:tab/>dec cl</text:span></text:p>
      <text:p text:style-name="P29"><text:span text:style-name="T19"><text:tab/><text:tab/>mov [rsp], cl</text:span></text:p>
      <text:p text:style-name="P29"><text:span text:style-name="T19"/></text:p>
      <text:p text:style-name="P29"><text:span text:style-name="T19"><text:tab/><text:tab/>cmp cl, 0</text:span></text:p>
      <text:p text:style-name="P29"><text:span text:style-name="T19"><text:tab/><text:tab/>jl print_bin_loop_exit</text:span></text:p>
      <text:p text:style-name="P29"><text:span text:style-name="T19"><text:tab/><text:tab/></text:span></text:p>
      <text:p text:style-name="P29"><text:span text:style-name="T19"><text:tab/><text:tab/>mov r10, 0</text:span></text:p>
      <text:p text:style-name="P29"><text:span text:style-name="T19"><text:tab/><text:tab/>mov r10w, [rsp+1]</text:span></text:p>
      <text:p text:style-name="P29"><text:span text:style-name="T19"><text:tab/><text:tab/>shr r10, cl</text:span></text:p>
      <text:p text:style-name="P29"><text:span text:style-name="T19"><text:tab/><text:tab/>and r10, 1</text:span></text:p>
      <text:p text:style-name="P29"><text:span text:style-name="T19"><text:tab/><text:tab/>mov rdi, numberstr</text:span></text:p>
      <text:p text:style-name="P29"><text:span text:style-name="T19"><text:tab/><text:tab/>mov rsi, r10</text:span></text:p>
      <text:p text:style-name="P29"><text:span text:style-name="T19"><text:tab/><text:tab/>mov rax, 0</text:span></text:p>
      <text:p text:style-name="P29"><text:span text:style-name="T19"><text:tab/><text:tab/>call printf</text:span></text:p>
      <text:p text:style-name="P29"><text:span text:style-name="T19"/></text:p>
      <text:p text:style-name="P29"><text:span text:style-name="T19"><text:tab/><text:tab/>mov r11, [rsp]</text:span></text:p>
      <text:p text:style-name="P29"><text:span text:style-name="T19"><text:tab/><text:tab/>cmp r11, 0</text:span></text:p>
      <text:p text:style-name="P29"><text:span text:style-name="T19"><text:tab/><text:tab/>je print_bin_loop</text:span></text:p>
      <text:p text:style-name="P29"><text:span text:style-name="T19"><text:tab/><text:tab/>and r11, 0b111</text:span></text:p>
      <text:p text:style-name="P29"><text:span text:style-name="T19"><text:tab/><text:tab/>cmp r11, 0</text:span></text:p>
      <text:p text:style-name="P29"><text:span text:style-name="T19"><text:tab/><text:tab/>jne print_bin_loop</text:span></text:p>
      <text:p text:style-name="P29"><text:span text:style-name="T19"/></text:p>
      <text:p text:style-name="P29"><text:span text:style-name="T19"><text:tab/><text:tab/>mov rdi, spacestr</text:span></text:p>
      <text:p text:style-name="P29"><text:span text:style-name="T19"><text:tab/><text:tab/>mov rax, 0</text:span></text:p>
      <text:p text:style-name="P29"><text:span text:style-name="T19"><text:tab/><text:tab/>call printf</text:span></text:p>
      <text:p text:style-name="P29"><text:span text:style-name="T19"><text:tab/><text:tab/></text:span></text:p>
      <text:p text:style-name="P29"><text:span text:style-name="T19"><text:tab/><text:tab/>jmp print_bin_loop</text:span></text:p>
      <text:p text:style-name="P29"><text:span text:style-name="T19"><text:tab/>print_bin_loop_exit:</text:span></text:p>
      <text:p text:style-name="P29"><text:span text:style-name="T19"><text:tab/>mov rdi, lbstr</text:span></text:p>
      <text:p text:style-name="P29"><text:span text:style-name="T19"><text:tab/>mov rax, 0</text:span></text:p>
      <text:p text:style-name="P29"><text:span text:style-name="T19"><text:tab/>call printf</text:span></text:p>
      <text:p text:style-name="P29"><text:span text:style-name="T19"/></text:p>
      <text:p text:style-name="P29"><text:span text:style-name="T19"><text:tab/>add rsp, 3</text:span></text:p>
      <text:p text:style-name="P29"><text:span text:style-name="T19"><text:tab/>ret</text:span></text:p>
      <text:p text:style-name="P29"><text:span text:style-name="T19"/></text:p>
      <text:p text:style-name="P29"><text:span text:style-name="T19">main:</text:span></text:p>
      <text:p text:style-name="P29"><text:span text:style-name="T19"><text:tab/>push rbp</text:span></text:p>
      <text:p text:style-name="P29"><text:span text:style-name="T19"><text:tab/>mov rbp, rsp</text:span></text:p>
      <text:p text:style-name="P29"><text:span text:style-name="T19"><text:tab/>sub rsp, 16</text:span></text:p>
      <text:p text:style-name="P29"><text:span text:style-name="T19"/></text:p>
      <text:p text:style-name="P29"><text:span text:style-name="T19"><text:tab/>mov r12, rdi ; argc</text:span></text:p>
      <text:p text:style-name="P29"><text:span text:style-name="T19"><text:tab/>mov r13, rsi ; argv</text:span></text:p>
      <text:p text:style-name="P29"><text:span text:style-name="T19"/></text:p>
      <text:p text:style-name="P29"><text:span text:style-name="T19"><text:tab/>; word [rsp+1] - number</text:span></text:p>
      <text:p text:style-name="P29"><text:span text:style-name="T19"><text:tab/>; byte [rsp] - N</text:span></text:p>
      <text:p text:style-name="P29"><text:span text:style-name="T19"><text:tab/>sub rsp, 3</text:span></text:p>
      <text:p text:style-name="P29"><text:span text:style-name="T19"/></text:p>
      <text:p text:style-name="P29"><text:span text:style-name="T19"><text:tab/>mov rdi, 0</text:span></text:p>
      <text:p text:style-name="P29"><text:span text:style-name="T19"><text:tab/>mov rax, 0</text:span></text:p>
      <text:p text:style-name="P29"><text:span text:style-name="T19"><text:tab/>call time</text:span></text:p>
      <text:p text:style-name="P29"><text:span text:style-name="T19"><text:tab/>mov r10, rax</text:span></text:p>
      <text:p text:style-name="P29"><text:soft-page-break/><text:span text:style-name="T19"/></text:p>
      <text:p text:style-name="P29"><text:span text:style-name="T19"><text:tab/>mov rax, 0</text:span></text:p>
      <text:p text:style-name="P29"><text:span text:style-name="T19"><text:tab/>call getpid</text:span></text:p>
      <text:p text:style-name="P29"><text:span text:style-name="T19"><text:tab/>add rax, r10</text:span></text:p>
      <text:p text:style-name="P29"><text:span text:style-name="T19"/></text:p>
      <text:p text:style-name="P29"><text:span text:style-name="T19"><text:tab/>mov rdi, rax</text:span></text:p>
      <text:p text:style-name="P29"><text:span text:style-name="T19"><text:tab/>mov rax, 0</text:span></text:p>
      <text:p text:style-name="P29"><text:span text:style-name="T19"><text:tab/>call srand</text:span></text:p>
      <text:p text:style-name="P29"><text:span text:style-name="T19"/></text:p>
      <text:p text:style-name="P29"><text:span text:style-name="T19"><text:tab/>mov rax, 0</text:span></text:p>
      <text:p text:style-name="P29"><text:span text:style-name="T19"><text:tab/>call rand</text:span></text:p>
      <text:p text:style-name="P29"><text:span text:style-name="T19"><text:tab/></text:span></text:p>
      <text:p text:style-name="P29"><text:span text:style-name="T19"><text:tab/>and al, 0b11</text:span></text:p>
      <text:p text:style-name="P29"><text:span text:style-name="T19"><text:tab/>mov byte [rsp], al</text:span></text:p>
      <text:p text:style-name="P29"><text:span text:style-name="T19"/></text:p>
      <text:p text:style-name="P29"><text:span text:style-name="T19"><text:tab/>cmp r12, 1</text:span></text:p>
      <text:p text:style-name="P29"><text:span text:style-name="T19"><text:tab/>je arg1</text:span></text:p>
      <text:p text:style-name="P29"><text:span text:style-name="T19"><text:tab/>cmp r12, 2</text:span></text:p>
      <text:p text:style-name="P29"><text:span text:style-name="T19"><text:tab/>je arg2</text:span></text:p>
      <text:p text:style-name="P29"><text:span text:style-name="T19"><text:tab/></text:span></text:p>
      <text:p text:style-name="P29"><text:span text:style-name="T19"><text:tab/>mov rdi, [stderr]</text:span></text:p>
      <text:p text:style-name="P29"><text:span text:style-name="T19"><text:tab/>mov rsi, usagemsg</text:span></text:p>
      <text:p text:style-name="P29"><text:span text:style-name="T19"><text:tab/>mov rdx, [r13]</text:span></text:p>
      <text:p text:style-name="P29"><text:span text:style-name="T19"><text:tab/>mov rax, 0</text:span></text:p>
      <text:p text:style-name="P29"><text:span text:style-name="T19"><text:tab/>call fprintf</text:span></text:p>
      <text:p text:style-name="P29"><text:span text:style-name="T19"><text:tab/>jmp error</text:span></text:p>
      <text:p text:style-name="P29"><text:span text:style-name="T19"/></text:p>
      <text:p text:style-name="P29"><text:span text:style-name="T19"><text:tab/>arg1:</text:span></text:p>
      <text:p text:style-name="P29"><text:span text:style-name="T19"><text:tab/><text:tab/>mov rax, 0</text:span></text:p>
      <text:p text:style-name="P29"><text:span text:style-name="T19"><text:tab/><text:tab/>call rand</text:span></text:p>
      <text:p text:style-name="P29"><text:span text:style-name="T19"><text:tab/><text:tab/>mov word [rsp+1], ax</text:span></text:p>
      <text:p text:style-name="P29"><text:span text:style-name="T19"><text:tab/><text:tab/>jmp argend</text:span></text:p>
      <text:p text:style-name="P29"><text:span text:style-name="T19"/></text:p>
      <text:p text:style-name="P29"><text:span text:style-name="T19"><text:tab/>arg2:</text:span></text:p>
      <text:p text:style-name="P29"><text:span text:style-name="T19"><text:tab/><text:tab/>sub rsp, 8</text:span></text:p>
      <text:p text:style-name="P29"><text:span text:style-name="T19"><text:tab/><text:tab/>mov rdi, [r13+8]</text:span></text:p>
      <text:p text:style-name="P29"><text:span text:style-name="T19"><text:tab/><text:tab/>mov rsi, rsp</text:span></text:p>
      <text:p text:style-name="P29"><text:span text:style-name="T19"><text:tab/><text:tab/>mov rdx, 10</text:span></text:p>
      <text:p text:style-name="P29"><text:span text:style-name="T19"><text:tab/><text:tab/>mov rax, 0</text:span></text:p>
      <text:p text:style-name="P29"><text:span text:style-name="T19"><text:tab/><text:tab/>call strtol</text:span></text:p>
      <text:p text:style-name="P29"><text:span text:style-name="T19"><text:tab/><text:tab/>mov word [rsp+9], ax</text:span></text:p>
      <text:p text:style-name="P29"><text:span text:style-name="T19"/></text:p>
      <text:p text:style-name="P29"><text:span text:style-name="T19"><text:tab/><text:tab/>pop rax</text:span></text:p>
      <text:p text:style-name="P29"><text:span text:style-name="T19"><text:tab/><text:tab/>cmp rax, [r13+8]</text:span></text:p>
      <text:p text:style-name="P29"><text:span text:style-name="T19"><text:tab/><text:tab/>je arg2error</text:span></text:p>
      <text:p text:style-name="P29"><text:span text:style-name="T19"/></text:p>
      <text:p text:style-name="P29"><text:span text:style-name="T19"><text:tab/><text:tab/>mov al, [rax]</text:span></text:p>
      <text:p text:style-name="P29"><text:span text:style-name="T19"><text:tab/><text:tab/>cmp al, 0</text:span></text:p>
      <text:p text:style-name="P29"><text:span text:style-name="T19"><text:tab/><text:tab/>jne arg2error</text:span></text:p>
      <text:p text:style-name="P29"><text:span text:style-name="T19"/></text:p>
      <text:p text:style-name="P29"><text:span text:style-name="T19"><text:tab/><text:tab/>jmp argend</text:span></text:p>
      <text:p text:style-name="P29"><text:span text:style-name="T19"/></text:p>
      <text:p text:style-name="P29"><text:span text:style-name="T19"><text:tab/><text:tab/>arg2error:</text:span></text:p>
      <text:p text:style-name="P29"><text:span text:style-name="T19"><text:tab/><text:tab/><text:tab/>mov rdi, [stderr]</text:span></text:p>
      <text:p text:style-name="P29"><text:span text:style-name="T19"><text:tab/><text:tab/><text:tab/>mov rsi, arg2errmsg</text:span></text:p>
      <text:p text:style-name="P29"><text:span text:style-name="T19"><text:tab/><text:tab/><text:tab/>mov rdx, [r13+8]</text:span></text:p>
      <text:p text:style-name="P29"><text:span text:style-name="T19"><text:tab/><text:tab/><text:tab/>mov rax, 0</text:span></text:p>
      <text:p text:style-name="P29"><text:span text:style-name="T19"><text:tab/><text:tab/><text:tab/>call fprintf</text:span></text:p>
      <text:p text:style-name="P29"><text:span text:style-name="T19"><text:tab/><text:tab/><text:tab/>jmp error</text:span></text:p>
      <text:p text:style-name="P29"><text:span text:style-name="T19"/></text:p>
      <text:p text:style-name="P29"><text:span text:style-name="T19"><text:tab/>argend:</text:span></text:p>
      <text:p text:style-name="P29"><text:span text:style-name="T19"><text:tab/></text:span></text:p>
      <text:p text:style-name="P29"><text:span text:style-name="T19"><text:tab/>mov rdi, nmsg</text:span></text:p>
      <text:p text:style-name="P29"><text:span text:style-name="T19"><text:tab/>mov rsi, 0</text:span></text:p>
      <text:p text:style-name="P29"><text:soft-page-break/><text:span text:style-name="T19"><text:tab/>mov sil, byte [rsp]</text:span></text:p>
      <text:p text:style-name="P29"><text:span text:style-name="T19"><text:tab/>mov rax, 0</text:span></text:p>
      <text:p text:style-name="P29"><text:span text:style-name="T19"><text:tab/>call printf</text:span></text:p>
      <text:p text:style-name="P29"><text:span text:style-name="T19"/></text:p>
      <text:p text:style-name="P29"><text:span text:style-name="T19"><text:tab/>mov rdi, 0</text:span></text:p>
      <text:p text:style-name="P29"><text:span text:style-name="T19"><text:tab/>mov di, word [rsp+1]</text:span></text:p>
      <text:p text:style-name="P29"><text:span text:style-name="T19"><text:tab/>call print_bin</text:span></text:p>
      <text:p text:style-name="P29"><text:span text:style-name="T19"/></text:p>
      <text:p text:style-name="P29"><text:span text:style-name="T19"><text:tab/>mov di, [rsp+1]</text:span></text:p>
      <text:p text:style-name="P29"><text:span text:style-name="T19"><text:tab/>mov sil, [rsp]</text:span></text:p>
      <text:p text:style-name="P29"><text:span text:style-name="T19"><text:tab/>call circular_shift</text:span></text:p>
      <text:p text:style-name="P29"><text:span text:style-name="T19"><text:tab/>mov [rsp+1], ax</text:span></text:p>
      <text:p text:style-name="P29"><text:span text:style-name="T19"/></text:p>
      <text:p text:style-name="P29"><text:span text:style-name="T19"><text:tab/>mov rdi, 0</text:span></text:p>
      <text:p text:style-name="P29"><text:span text:style-name="T19"><text:tab/>mov di, word [rsp+1]</text:span></text:p>
      <text:p text:style-name="P29"><text:span text:style-name="T19"><text:tab/>call print_bin</text:span></text:p>
      <text:p text:style-name="P29"><text:span text:style-name="T19"><text:tab/></text:span></text:p>
      <text:p text:style-name="P29"><text:span text:style-name="T19"><text:tab/>add rsp, 3</text:span></text:p>
      <text:p text:style-name="P29"><text:span text:style-name="T19"><text:tab/>mov rax, 0</text:span></text:p>
      <text:p text:style-name="P29"><text:span text:style-name="T19"><text:tab/>leave</text:span></text:p>
      <text:p text:style-name="P29"><text:span text:style-name="T19"><text:tab/>ret</text:span></text:p>
      <text:p text:style-name="P29"><text:span text:style-name="T19"><text:tab/>error:</text:span></text:p>
      <text:p text:style-name="P29"><text:span text:style-name="T19"><text:tab/>add rsp, 3</text:span></text:p>
      <text:p text:style-name="P29"><text:span text:style-name="T19"><text:tab/>mov rax, 1</text:span></text:p>
      <text:p text:style-name="P29"><text:span text:style-name="T19"><text:tab/>leave</text:span></text:p>
      <text:p text:style-name="P29"><text:span text:style-name="T19"><text:tab/>ret</text:span></text:p>
      <text:p text:style-name="P29"><text:span text:style-name="T19"><text:tab/></text:span></text:p>
      <text:p text:style-name="P29"><text:span text:style-name="T19">section .data</text:span></text:p>
      <text:p text:style-name="P29"><text:span text:style-name="T19"><text:tab/>usagemsg<text:tab/>db<text:tab/>`Usage: %s [число]\n`, 0</text:span></text:p>
      <text:p text:style-name="P29"><text:span text:style-name="T19"><text:tab/>arg2errmsg<text:tab/>db<text:tab/>`Ошибка: '%s' не является целым числом\n`, 0</text:span></text:p>
      <text:p text:style-name="P29"><text:span text:style-name="T19"><text:tab/>nmsg <text:tab/><text:tab/>db <text:tab/>`N: %d\n`, 0</text:span></text:p>
      <text:p text:style-name="P29"><text:span text:style-name="T19"><text:tab/>numberstr<text:tab/>db<text:tab/>`%d`, 0</text:span></text:p>
      <text:p text:style-name="P29"><text:span text:style-name="T19"><text:tab/>spacestr<text:tab/>db <text:tab/>` `, 0</text:span></text:p>
      <text:p text:style-name="P29"><text:span text:style-name="T19"><text:tab/>lbstr<text:tab/><text:tab/>db <text:tab/>`\n`, 0</text:span></text:p>
      <text:p text:style-name="P26"><text:span text:style-name="T19"/></text:p>
      <text:p text:style-name="P30"><text:span text:style-name="T19">Программа C:</text:span></text:p>
      <text:p text:style-name="P30"/>
      <text:p text:style-name="P31"><text:span text:style-name="T21">#include</text:span><text:span text:style-name="T22"> </text:span><text:span text:style-name="T23">&lt;stdlib.h&gt;</text:span></text:p>
      <text:p text:style-name="P32"><text:span text:style-name="T21">#include</text:span><text:span text:style-name="T22"> </text:span><text:span text:style-name="T23">&lt;stdio.h&gt;</text:span></text:p>
      <text:p text:style-name="P33"/>
      <text:p text:style-name="P32"><text:span text:style-name="T21">#include</text:span><text:span text:style-name="T22"> </text:span><text:span text:style-name="T23">&lt;stdint.h&gt;</text:span></text:p>
      <text:p text:style-name="P32"><text:span text:style-name="T21">#include</text:span><text:span text:style-name="T22"> </text:span><text:span text:style-name="T23">&lt;inttypes.h&gt;</text:span></text:p>
      <text:p text:style-name="P32"><text:span text:style-name="T21">#include</text:span><text:span text:style-name="T22"> </text:span><text:span text:style-name="T23">&lt;time.h&gt;</text:span></text:p>
      <text:p text:style-name="P32"><text:span text:style-name="T21">#include</text:span><text:span text:style-name="T22"> </text:span><text:span text:style-name="T23">&lt;unistd.h&gt;</text:span></text:p>
      <text:p text:style-name="P33"/>
      <text:p text:style-name="P32"><text:span text:style-name="T22">void</text:span> <text:span text:style-name="T24">print_bin</text:span>(<text:span text:style-name="T25">uint16_t</text:span> <text:span text:style-name="T26">number</text:span>);</text:p>
      <text:p text:style-name="P32"><text:span text:style-name="T25">uint16_t</text:span> <text:span text:style-name="T24">circular_shift</text:span>(<text:span text:style-name="T25">uint16_t</text:span> <text:span text:style-name="T26">number</text:span>, <text:span text:style-name="T22">int</text:span> <text:span text:style-name="T26">N</text:span>);</text:p>
      <text:p text:style-name="P33"/>
      <text:p text:style-name="P34">// Вывод двоичного числа с пробелами</text:p>
      <text:p text:style-name="P32"><text:span text:style-name="T22">void</text:span> <text:span text:style-name="T24">print_bin</text:span>(<text:span text:style-name="T25">uint16_t</text:span> <text:span text:style-name="T26">number</text:span>) {</text:p>
      <text:p text:style-name="P32"><text:span text:style-name="T21"><text:tab/>for</text:span> (<text:span text:style-name="T22">int</text:span> <text:span text:style-name="T26">i</text:span> <text:span text:style-name="T27">=</text:span> <text:span text:style-name="T22">sizeof</text:span>(<text:span text:style-name="T26">number</text:span>) <text:span text:style-name="T27">*</text:span> <text:span text:style-name="T28">8</text:span> <text:span text:style-name="T27">-</text:span> <text:span text:style-name="T28">1</text:span>; <text:span text:style-name="T26">i</text:span> <text:span text:style-name="T27">&gt;=</text:span> <text:span text:style-name="T28">0</text:span>; <text:span text:style-name="T26">i</text:span><text:span text:style-name="T27">--</text:span>) {</text:p>
      <text:p text:style-name="P32"><text:span text:style-name="T22"><text:tab/><text:tab/>int</text:span> <text:span text:style-name="T26">bit</text:span> <text:span text:style-name="T27">=</text:span> (<text:span text:style-name="T26">number</text:span> <text:span text:style-name="T27">&gt;&gt;</text:span> <text:span text:style-name="T26">i</text:span>) <text:span text:style-name="T27">&amp;</text:span> <text:span text:style-name="T28">1</text:span>;</text:p>
      <text:p text:style-name="P32"><text:span text:style-name="T24"><text:tab/><text:tab/>printf</text:span>(<text:span text:style-name="T23">"</text:span><text:span text:style-name="T26">%d</text:span><text:span text:style-name="T23">"</text:span>, <text:span text:style-name="T26">bit</text:span>);</text:p>
      <text:p text:style-name="P32"><text:span text:style-name="T21"><text:tab/><text:tab/>if</text:span> (<text:span text:style-name="T26">i</text:span> <text:span text:style-name="T27">%</text:span> <text:span text:style-name="T28">8</text:span> <text:span text:style-name="T27">==</text:span> <text:span text:style-name="T28">0</text:span> <text:span text:style-name="T27">&amp;&amp;</text:span> <text:span text:style-name="T26">i</text:span> <text:span text:style-name="T27">!=</text:span> <text:span text:style-name="T28">0</text:span>) {</text:p>
      <text:p text:style-name="P32"><text:span text:style-name="T24"><text:tab/><text:tab/><text:tab/>printf</text:span>(<text:span text:style-name="T23">" "</text:span>);</text:p>
      <text:p text:style-name="P32"><text:tab/><text:tab/>}</text:p>
      <text:p text:style-name="P32"><text:tab/>}</text:p>
      <text:p text:style-name="P32"><text:span text:style-name="T24"><text:tab/>printf</text:span>(<text:span text:style-name="T23">"</text:span><text:span text:style-name="T29">\n</text:span><text:span text:style-name="T23">"</text:span>);</text:p>
      <text:p text:style-name="P32"><text:soft-page-break/>}</text:p>
      <text:p text:style-name="P33"/>
      <text:p text:style-name="P34">// Циклический сдвиг со свёрткой байтов</text:p>
      <text:p text:style-name="P32"><text:span text:style-name="T25">uint16_t</text:span> <text:span text:style-name="T24">circular_shift</text:span>(<text:span text:style-name="T25">uint16_t</text:span> <text:span text:style-name="T26">number</text:span>, <text:span text:style-name="T22">int</text:span> <text:span text:style-name="T26">N</text:span>) {</text:p>
      <text:p text:style-name="P32"><text:span text:style-name="T25"><text:tab/>uint16_t</text:span> <text:span text:style-name="T26">result</text:span> <text:span text:style-name="T27">=</text:span> <text:span text:style-name="T28">0</text:span>;</text:p>
      <text:p text:style-name="P32"><text:span text:style-name="T21"><text:tab/>for</text:span> (<text:span text:style-name="T22">int</text:span> <text:span text:style-name="T26">i</text:span> <text:span text:style-name="T27">=</text:span> <text:span text:style-name="T28">0</text:span>; <text:span text:style-name="T26">i</text:span> <text:span text:style-name="T27">&lt;</text:span> (<text:span text:style-name="T22">int</text:span>) <text:span text:style-name="T22">sizeof</text:span>(<text:span text:style-name="T26">number</text:span>); <text:span text:style-name="T26">i</text:span><text:span text:style-name="T27">++</text:span>) {</text:p>
      <text:p text:style-name="P32"><text:span text:style-name="T25"><text:tab/><text:tab/>uint8_t</text:span> <text:span text:style-name="T26">byte</text:span> <text:span text:style-name="T27">=</text:span> (<text:span text:style-name="T26">number</text:span> <text:span text:style-name="T27">&gt;&gt;</text:span> (<text:span text:style-name="T26">i</text:span> <text:span text:style-name="T27">*</text:span> <text:span text:style-name="T28">8</text:span>)) <text:span text:style-name="T27">&amp;</text:span> <text:span text:style-name="T28">0xFF</text:span>;</text:p>
      <text:p text:style-name="P34"><text:tab/><text:tab/>// Извлечение старшей и младшей тетрады</text:p>
      <text:p text:style-name="P32"><text:span text:style-name="T25"><text:tab/><text:tab/>uint8_t</text:span> <text:span text:style-name="T26">high_tetr</text:span> <text:span text:style-name="T27">=</text:span> <text:span text:style-name="T26">byte</text:span> <text:span text:style-name="T27">&gt;&gt;</text:span> <text:span text:style-name="T28">4</text:span>;</text:p>
      <text:p text:style-name="P32"><text:span text:style-name="T25"><text:tab/><text:tab/>uint8_t</text:span> <text:span text:style-name="T26">low_tetr</text:span> <text:span text:style-name="T27">=</text:span> <text:span text:style-name="T26">byte</text:span> <text:span text:style-name="T27">&amp;</text:span> <text:span text:style-name="T28">0xF</text:span>;</text:p>
      <text:p text:style-name="P34"><text:tab/><text:tab/>// Циклический сдвиг тетрад</text:p>
      <text:p text:style-name="P32"><text:span text:style-name="T26"><text:tab/><text:tab/>high_tetr</text:span> <text:span text:style-name="T27">=</text:span> ((<text:span text:style-name="T26">high_tetr</text:span> <text:span text:style-name="T27">&gt;&gt;</text:span> <text:span text:style-name="T26">N</text:span>) <text:span text:style-name="T27">|</text:span> (<text:span text:style-name="T26">high_tetr</text:span> <text:span text:style-name="T27">&lt;&lt;</text:span> (<text:span text:style-name="T28">4</text:span> <text:span text:style-name="T27">-</text:span> <text:span text:style-name="T26">N</text:span>))) <text:span text:style-name="T27">&amp;</text:span> <text:span text:style-name="T28">0xF</text:span>;</text:p>
      <text:p text:style-name="P32"><text:span text:style-name="T26"><text:tab/><text:tab/>low_tetr</text:span> <text:span text:style-name="T27">=</text:span> ((<text:span text:style-name="T26">low_tetr</text:span> <text:span text:style-name="T27">&lt;&lt;</text:span> <text:span text:style-name="T26">N</text:span>) <text:span text:style-name="T27">|</text:span> (<text:span text:style-name="T26">low_tetr</text:span> <text:span text:style-name="T27">&gt;&gt;</text:span> (<text:span text:style-name="T28">4</text:span> <text:span text:style-name="T27">-</text:span> <text:span text:style-name="T26">N</text:span>))) <text:span text:style-name="T27">&amp;</text:span> <text:span text:style-name="T28">0xF</text:span>;</text:p>
      <text:p text:style-name="P32"><text:span text:style-name="T25"><text:tab/><text:tab/>uint8_t</text:span> <text:span text:style-name="T26">new_byte</text:span> <text:span text:style-name="T27">=</text:span> (<text:span text:style-name="T26">high_tetr</text:span> <text:span text:style-name="T27">&lt;&lt;</text:span> <text:span text:style-name="T28">4</text:span>) <text:span text:style-name="T27">|</text:span> <text:span text:style-name="T26">low_tetr</text:span>;</text:p>
      <text:p text:style-name="P32"><text:span text:style-name="T26"><text:tab/><text:tab/>result</text:span> <text:span text:style-name="T27">|=</text:span> (<text:span text:style-name="T26">new_byte</text:span> <text:span text:style-name="T27">&lt;&lt;</text:span> (<text:span text:style-name="T26">i</text:span> <text:span text:style-name="T27">*</text:span> <text:span text:style-name="T28">8</text:span>));</text:p>
      <text:p text:style-name="P32"><text:tab/>}</text:p>
      <text:p text:style-name="P32"><text:span text:style-name="T21"><text:tab/>return</text:span> <text:span text:style-name="T26">result</text:span>;</text:p>
      <text:p text:style-name="P32">}</text:p>
      <text:p text:style-name="P33"/>
      <text:p text:style-name="P32"><text:span text:style-name="T22">int</text:span> <text:span text:style-name="T24">main</text:span>(<text:span text:style-name="T22">int</text:span> <text:span text:style-name="T26">argc</text:span>, <text:span text:style-name="T22">char</text:span> <text:span text:style-name="T27">*</text:span><text:span text:style-name="T26">argv</text:span><text:span text:style-name="T22">[]</text:span>) {</text:p>
      <text:p text:style-name="P34"><text:tab/>// Проверка запуска с переменной среды, включающей отладочный вывод.</text:p>
      <text:p text:style-name="P32"><text:span text:style-name="T22"><text:tab/>char</text:span> <text:span text:style-name="T27">*</text:span><text:span text:style-name="T26">DEBUG</text:span> <text:span text:style-name="T27">=</text:span> <text:span text:style-name="T24">getenv</text:span>(<text:span text:style-name="T23">"LAB1DEBUG"</text:span>);</text:p>
      <text:p text:style-name="P32"><text:span text:style-name="T21"><text:tab/>if</text:span> (<text:span text:style-name="T26">DEBUG</text:span>) {</text:p>
      <text:p text:style-name="P32"><text:span text:style-name="T24"><text:tab/><text:tab/>fprintf</text:span>(<text:span text:style-name="T22">stderr</text:span>, <text:span text:style-name="T23">"Включен вывод отладочных сообщений</text:span><text:span text:style-name="T29">\n</text:span><text:span text:style-name="T23">"</text:span>);</text:p>
      <text:p text:style-name="P32"><text:tab/>}</text:p>
      <text:p text:style-name="P33"/>
      <text:p text:style-name="P32"><text:span text:style-name="T24"><text:tab/>srand</text:span>(<text:span text:style-name="T24">time</text:span>(<text:span text:style-name="T22">NULL</text:span>) <text:span text:style-name="T27">+</text:span> <text:span text:style-name="T24">getpid</text:span>());</text:p>
      <text:p text:style-name="P32"><text:span text:style-name="T25"><text:tab/>uint16_t</text:span> <text:span text:style-name="T26">number</text:span>;</text:p>
      <text:p text:style-name="P32"><text:span text:style-name="T22"><text:tab/>int</text:span> <text:span text:style-name="T26">N</text:span> <text:span text:style-name="T27">=</text:span> <text:span text:style-name="T24">rand</text:span>() <text:span text:style-name="T27">%</text:span> <text:span text:style-name="T28">4</text:span>;</text:p>
      <text:p text:style-name="P35"><text:span text:style-name="T30"><text:tab/>char</text:span><text:span text:style-name="T31"> </text:span><text:span text:style-name="T19">*</text:span><text:span text:style-name="T32">endptr</text:span><text:span text:style-name="T31">;</text:span></text:p>
      <text:p text:style-name="P32"><text:span text:style-name="T21"><text:tab/>if</text:span> (<text:span text:style-name="T26">argc</text:span> <text:span text:style-name="T27">==</text:span> <text:span text:style-name="T28">1</text:span>) {<text:span text:style-name="T33"> <text:s text:c="17"/>// Если число не передано, то генерируем рандомное</text:span></text:p>
      <text:p text:style-name="P32"><text:span text:style-name="T26"><text:tab/><text:tab/>number</text:span> <text:span text:style-name="T27">=</text:span> <text:span text:style-name="T24">rand</text:span>() <text:span text:style-name="T27">&amp;</text:span> <text:span text:style-name="T22">UINT16_MAX</text:span>;</text:p>
      <text:p text:style-name="P32"><text:tab/>} <text:span text:style-name="T21">else</text:span> <text:span text:style-name="T21">if</text:span> (<text:span text:style-name="T26">argc</text:span> <text:span text:style-name="T27">==</text:span> <text:span text:style-name="T28">2</text:span>) {<text:span text:style-name="T33"> <text:s text:c="22"/>// Если число передано, то </text:span></text:p>
      <text:p text:style-name="P32"><text:span text:style-name="T26"><text:tab/><text:tab/>number</text:span> <text:span text:style-name="T27">=</text:span> <text:span text:style-name="T24">strtol</text:span>(<text:span text:style-name="T26">argv</text:span>[<text:span text:style-name="T28">1</text:span>], <text:span text:style-name="T27">&amp;</text:span><text:span text:style-name="T26">endptr</text:span>, <text:span text:style-name="T28">10</text:span>);<text:span text:style-name="T33"> // проверяем на валидность</text:span></text:p>
      <text:p text:style-name="P32"><text:span text:style-name="T21"><text:tab/><text:tab/>if</text:span> (<text:span text:style-name="T26">endptr</text:span> <text:span text:style-name="T27">==</text:span> <text:span text:style-name="T26">argv</text:span>[<text:span text:style-name="T28">1</text:span>] <text:span text:style-name="T27">||</text:span> <text:span text:style-name="T27">*</text:span><text:span text:style-name="T26">endptr</text:span> <text:span text:style-name="T27">!=</text:span> <text:span text:style-name="T23">'</text:span><text:span text:style-name="T29">\0</text:span><text:span text:style-name="T23">'</text:span>) {</text:p>
      <text:p text:style-name="P32"><text:span text:style-name="T24"><text:tab/><text:tab/><text:tab/>fprintf</text:span>(<text:span text:style-name="T22">stderr</text:span>, <text:span text:style-name="T23">"Ошибка: '</text:span><text:span text:style-name="T26">%s</text:span><text:span text:style-name="T23">' не является целым числом.</text:span><text:span text:style-name="T29">\n</text:span><text:span text:style-name="T23">"</text:span>, <text:span text:style-name="T26">argv</text:span>[<text:span text:style-name="T28">1</text:span>]);</text:p>
      <text:p text:style-name="P32"><text:span text:style-name="T21"><text:tab/><text:tab/><text:tab/>return</text:span> <text:span text:style-name="T22">EXIT_FAILURE</text:span>;</text:p>
      <text:p text:style-name="P32"><text:tab/><text:tab/>}</text:p>
      <text:p text:style-name="P33"/>
      <text:p text:style-name="P32"><text:tab/>} <text:span text:style-name="T21">else</text:span> {</text:p>
      <text:p text:style-name="P32"><text:span text:style-name="T24"><text:tab/><text:tab/>fprintf</text:span>(<text:span text:style-name="T22">stderr</text:span>, <text:span text:style-name="T23">"Usage: </text:span><text:span text:style-name="T26">%s</text:span><text:span text:style-name="T23"> [число]</text:span><text:span text:style-name="T29">\n</text:span><text:span text:style-name="T23">"</text:span>, <text:span text:style-name="T26">argv</text:span>[<text:span text:style-name="T28">0</text:span>]);</text:p>
      <text:p text:style-name="P32"><text:span text:style-name="T21"><text:tab/><text:tab/>return</text:span> <text:span text:style-name="T22">EXIT_FAILURE</text:span>;</text:p>
      <text:p text:style-name="P32"><text:tab/>}</text:p>
      <text:p text:style-name="P33"/>
      <text:p text:style-name="P32"><text:span text:style-name="T24"><text:tab/>printf</text:span>(<text:span text:style-name="T23">"N: </text:span><text:span text:style-name="T26">%d</text:span><text:span text:style-name="T29">\n</text:span><text:span text:style-name="T23">"</text:span>, <text:span text:style-name="T26">N</text:span>);</text:p>
      <text:p text:style-name="P32"><text:span text:style-name="T24"><text:tab/>print_bin</text:span>(<text:span text:style-name="T26">number</text:span>);</text:p>
      <text:p text:style-name="P32"><text:span text:style-name="T24"><text:tab/>print_bin</text:span>(<text:span text:style-name="T24">circular_shift</text:span>(<text:span text:style-name="T26">number</text:span>, <text:span text:style-name="T26">N</text:span>));</text:p>
      <text:p text:style-name="P33"/>
      <text:p text:style-name="P32"><text:span text:style-name="T21"><text:tab/>return</text:span> <text:span text:style-name="T22">EXIT_SUCCESS</text:span>;</text:p>
      <text:p text:style-name="P3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29</meta:editing-cycles>
    <meta:creation-date>2021-10-17T09:09:00</meta:creation-date>
    <dc:date>2024-12-21T11:45:13.496095593</dc:date>
    <meta:editing-duration>PT2H53M16S</meta:editing-duration>
    <meta:generator>LibreOffice/24.8.3.2$Linux_X86_64 LibreOffice_project/480$Build-2</meta:generator>
    <meta:print-date>2024-11-27T10:43:59.435553960</meta:print-date>
    <meta:printed-by>Файлы PDF</meta:printed-by>
    <meta:document-statistic meta:table-count="0" meta:image-count="5" meta:object-count="0" meta:page-count="9" meta:paragraph-count="293" meta:word-count="967" meta:character-count="5864" meta:non-whitespace-character-count="4785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