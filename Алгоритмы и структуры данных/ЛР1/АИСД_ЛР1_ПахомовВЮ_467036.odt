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8000008B691D0C1C2.png" manifest:media-type="image/png"/>
  <manifest:file-entry manifest:full-path="Pictures/10000001000003A60000028705A0C9AD.png" manifest:media-type="image/png"/>
  <manifest:file-entry manifest:full-path="Pictures/10000001000003EB000007D9DFDA09CB.png" manifest:media-type="image/png"/>
  <manifest:file-entry manifest:full-path="Pictures/10000001000003A900000227230C97DB.png" manifest:media-type="image/png"/>
  <manifest:file-entry manifest:full-path="Pictures/100000010000033D000001AD3D28C5EF.png" manifest:media-type="image/png"/>
  <manifest:file-entry manifest:full-path="Pictures/10000001000000A50000001DBB8EC582.png" manifest:media-type="image/png"/>
  <manifest:file-entry manifest:full-path="Pictures/10008D210000110400000305176C48D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91cm" table:align="margins"/>
    </style:style>
    <style:style style:name="Table1.A" style:family="table-column">
      <style:table-column-properties style:column-width="4.147cm" style:rel-column-width="16383*"/>
    </style:style>
    <style:style style:name="Table1.D" style:family="table-column">
      <style:table-column-properties style:column-width="4.149cm" style:rel-column-width="16386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f758d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2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3" style:family="paragraph" style:parent-style-name="Text_20_body" style:master-page-name="">
      <loext:graphic-properties draw:fill="none"/>
      <style:paragraph-properties fo:margin-left="0cm" fo:margin-right="0.9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ca6c1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5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7" style:family="paragraph" style:parent-style-name="Contents_20_1">
      <style:paragraph-properties fo:line-height="150%">
        <style:tab-stops>
          <style:tab-stop style:position="16.589cm" style:type="right" style:leader-style="dotted" style:leader-text="."/>
        </style:tab-stops>
      </style:paragraph-properties>
    </style:style>
    <style:style style:name="P18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0f2314" officeooo:paragraph-rsid="002680d2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0f2314" officeooo:paragraph-rsid="002680d2"/>
    </style:style>
    <style:style style:name="P2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paragraph-rsid="004b6835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19963" officeooo:paragraph-rsid="00919963"/>
    </style:style>
    <style:style style:name="P23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19963" officeooo:paragraph-rsid="00919963"/>
    </style:style>
    <style:style style:name="P24" style:family="paragraph" style:parent-style-name="Text_20_body" style:list-style-name="L2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19963" officeooo:paragraph-rsid="00919963"/>
    </style:style>
    <style:style style:name="P25" style:family="paragraph" style:parent-style-name="Text_20_body" style:list-style-name="L2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19963" officeooo:paragraph-rsid="00935d7a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 style:parent-style-name="Text_20_body" style:list-style-name="L2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935d7a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935d7a"/>
    </style:style>
    <style:style style:name="P2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2680d2" officeooo:paragraph-rsid="0028636d" style:font-weight-asian="bold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rsid="0028636d" officeooo:paragraph-rsid="0028636d"/>
    </style:style>
    <style:style style:name="P31" style:family="paragraph" style:parent-style-name="Таблица">
      <style:paragraph-properties fo:keep-with-next="always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8636d" officeooo:paragraph-rsid="0028636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93bfe0" officeooo:paragraph-rsid="0093bfe0"/>
    </style:style>
    <style:style style:name="P34" style:family="paragraph" style:parent-style-name="Table_20_Contents">
      <style:paragraph-properties fo:text-align="center" style:justify-single-word="false"/>
      <style:text-properties officeooo:rsid="00a4dcf4" officeooo:paragraph-rsid="00a4dcf4"/>
    </style:style>
    <style:style style:name="P35" style:family="paragraph" style:parent-style-name="Table_20_Contents">
      <style:paragraph-properties fo:text-align="center" style:justify-single-word="false"/>
      <style:text-properties officeooo:rsid="00a722a7" officeooo:paragraph-rsid="00a722a7"/>
    </style:style>
    <style:style style:name="P36" style:family="paragraph" style:parent-style-name="Table_20_Contents">
      <style:paragraph-properties fo:text-align="center" style:justify-single-word="false"/>
      <style:text-properties officeooo:rsid="0093cfa2" officeooo:paragraph-rsid="0093cfa2"/>
    </style:style>
    <style:style style:name="P37" style:family="paragraph" style:parent-style-name="Table_20_Contents">
      <style:paragraph-properties fo:text-align="center" style:justify-single-word="false"/>
      <style:text-properties officeooo:rsid="0093bfe0" officeooo:paragraph-rsid="0093cfa2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28636d"/>
    </style:style>
    <style:style style:name="P3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a877b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a877b" officeooo:paragraph-rsid="003a877b"/>
    </style:style>
    <style:style style:name="P41" style:family="paragraph" style:parent-style-name="Text_20_body" style:list-style-name="" style:master-page-name="">
      <style:paragraph-properties fo:margin-top="0cm" fo:margin-bottom="0.25cm" style:contextual-spacing="false" fo:line-height="150%" fo:text-align="center" style:justify-single-word="false" style:page-number="auto" fo:break-before="auto" fo:break-after="auto"/>
      <style:text-properties officeooo:rsid="002680d2" officeooo:paragraph-rsid="003a877b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3a877b"/>
    </style:style>
    <style:style style:name="P43" style:family="paragraph" style:parent-style-name="Рисунок">
      <style:paragraph-properties fo:text-align="center" style:justify-single-word="false"/>
    </style:style>
    <style:style style:name="P44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c4608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96f977" officeooo:paragraph-rsid="0096f977"/>
    </style:style>
    <style:style style:name="P46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7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000" loext:opacity="100%" fo:font-size="8pt" fo:language="zxx" fo:country="none" fo:font-style="normal" style:text-underline-style="none" fo:font-weight="normal" fo:background-color="transparen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3c4608"/>
    </style:style>
    <style:style style:name="P49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style:use-window-font-color="true" loext:opacity="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50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8000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51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0000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fo:color="#008000" loext:opacity="100%" fo:font-style="normal" style:text-underline-style="none" fo:font-weight="normal" officeooo:rsid="003c4608" officeooo:paragraph-rsid="003c4608"/>
    </style:style>
    <style:style style:name="P53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3ecf82" officeooo:paragraph-rsid="003ecf82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paragraph-rsid="0044e4e9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44e4e9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99743d" officeooo:paragraph-rsid="003a877b"/>
    </style:style>
    <style:style style:name="P57" style:family="paragraph" style:parent-style-name="Text_20_body" style:list-style-name="" style:master-page-name="Landscape">
      <style:paragraph-properties fo:margin-top="0cm" fo:margin-bottom="0.25cm" style:contextual-spacing="false" fo:line-height="150%" fo:text-align="center" style:justify-single-word="false" style:page-number="auto"/>
      <style:text-properties officeooo:rsid="003ecf82" officeooo:paragraph-rsid="003ecf82"/>
    </style:style>
    <style:style style:name="P58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3ecf82" officeooo:paragraph-rsid="003ecf82" style:font-weight-asian="bold" style:font-weight-complex="bold"/>
    </style:style>
    <style:style style:name="P5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28636d" officeooo:paragraph-rsid="003ecf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758d"/>
    </style:style>
    <style:style style:name="T3" style:family="text">
      <style:text-properties officeooo:rsid="00394161"/>
    </style:style>
    <style:style style:name="T4" style:family="text">
      <style:text-properties officeooo:rsid="000ca6c1"/>
    </style:style>
    <style:style style:name="T5" style:family="text">
      <style:text-properties officeooo:rsid="00910ddb"/>
    </style:style>
    <style:style style:name="T6" style:family="text">
      <style:text-properties officeooo:rsid="0016960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919963"/>
    </style:style>
    <style:style style:name="T9" style:family="text">
      <style:text-properties officeooo:rsid="00a1ba0b"/>
    </style:style>
    <style:style style:name="T10" style:family="text">
      <style:text-properties officeooo:rsid="00adfa83"/>
    </style:style>
    <style:style style:name="T11" style:family="text">
      <style:text-properties fo:font-weight="bold" officeooo:rsid="000f2314" style:font-weight-asian="bold" style:font-weight-complex="bold"/>
    </style:style>
    <style:style style:name="T12" style:family="text">
      <style:text-properties fo:font-weight="bold" officeooo:rsid="004c1b85" style:font-weight-asian="bold" style:font-weight-complex="bold"/>
    </style:style>
    <style:style style:name="T13" style:family="text">
      <style:text-properties fo:font-weight="bold" officeooo:rsid="00910ddb" style:font-weight-asian="bold" style:font-weight-complex="bold"/>
    </style:style>
    <style:style style:name="T14" style:family="text">
      <style:text-properties officeooo:rsid="00935d7a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935d7a"/>
    </style:style>
    <style:style style:name="T17" style:family="text">
      <style:text-properties officeooo:rsid="009cce28"/>
    </style:style>
    <style:style style:name="T18" style:family="text">
      <style:text-properties officeooo:rsid="00ae4403"/>
    </style:style>
    <style:style style:name="T19" style:family="text">
      <style:text-properties fo:font-weight="bold" officeooo:rsid="004b6835" style:font-weight-asian="bold" style:font-weight-complex="bold"/>
    </style:style>
    <style:style style:name="T20" style:family="text">
      <style:text-properties fo:font-weight="bold" officeooo:rsid="0028636d" style:font-weight-asian="bold" style:font-weight-complex="bold"/>
    </style:style>
    <style:style style:name="T21" style:family="text">
      <style:text-properties officeooo:rsid="0079b2f7"/>
    </style:style>
    <style:style style:name="T22" style:family="text">
      <style:text-properties officeooo:rsid="00afc727"/>
    </style:style>
    <style:style style:name="T23" style:family="text">
      <style:text-properties officeooo:rsid="00a4dcf4"/>
    </style:style>
    <style:style style:name="T24" style:family="text">
      <style:text-properties officeooo:rsid="00a89256"/>
    </style:style>
    <style:style style:name="T25" style:family="text">
      <style:text-properties officeooo:rsid="00a722a7"/>
    </style:style>
    <style:style style:name="T26" style:family="text">
      <style:text-properties officeooo:rsid="009f3a8d"/>
    </style:style>
    <style:style style:name="T27" style:family="text">
      <style:text-properties fo:font-weight="bold" officeooo:rsid="003a877b" style:font-weight-asian="bold" style:font-weight-complex="bold"/>
    </style:style>
    <style:style style:name="T28" style:family="text">
      <style:text-properties fo:font-weight="bold" officeooo:rsid="00a1ba0b" style:font-weight-asian="bold" style:font-weight-complex="bold"/>
    </style:style>
    <style:style style:name="T29" style:family="text">
      <style:text-properties officeooo:rsid="008d1351"/>
    </style:style>
    <style:style style:name="T30" style:family="text">
      <style:text-properties officeooo:rsid="0093ff84"/>
    </style:style>
    <style:style style:name="T31" style:family="text">
      <style:text-properties fo:font-weight="bold" officeooo:rsid="003c4608" style:font-weight-asian="bold" style:font-weight-complex="bold"/>
    </style:style>
    <style:style style:name="T32" style:family="text">
      <style:text-properties officeooo:rsid="0098e618"/>
    </style:style>
    <style:style style:name="T33" style:family="text">
      <style:text-properties fo:color="#008000" loext:opacity="100%" fo:font-size="8pt"/>
    </style:style>
    <style:style style:name="T34" style:family="text">
      <style:text-properties fo:color="#000000" loext:opacity="100%"/>
    </style:style>
    <style:style style:name="T35" style:family="text">
      <style:text-properties fo:color="#0000ff" loext:opacity="100%"/>
    </style:style>
    <style:style style:name="T36" style:family="text">
      <style:text-properties fo:color="#008000" loext:opacity="100%" fo:font-size="8pt" fo:language="zxx" fo:country="none" fo:font-style="normal" style:text-underline-style="none" fo:font-weight="normal" fo:background-color="transparent" loext:char-shading-value="0"/>
    </style:style>
    <style:style style:name="T37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38" style:family="text">
      <style:text-properties fo:color="#0000ff" loext:opacity="100%" fo:language="zxx" fo:country="none" fo:font-style="normal" style:text-underline-style="none" fo:font-weight="normal" fo:background-color="transparent" loext:char-shading-value="0"/>
    </style:style>
    <style:style style:name="T39" style:family="text">
      <style:text-properties fo:color="#008000" loext:opacity="100%"/>
    </style:style>
    <style:style style:name="T40" style:family="text">
      <style:text-properties fo:color="#2b91af" loext:opacity="100%"/>
    </style:style>
    <style:style style:name="T41" style:family="text">
      <style:text-properties fo:color="#a31515" loext:opacity="100%"/>
    </style:style>
    <style:style style:name="T42" style:family="text">
      <style:text-properties officeooo:rsid="0028636d"/>
    </style:style>
    <style:style style:name="T43" style:family="text">
      <style:text-properties officeooo:rsid="0099743d"/>
    </style:style>
    <style:style style:name="T44" style:family="text">
      <style:text-properties officeooo:rsid="00a61a93"/>
    </style:style>
    <style:style style:name="T45" style:family="text">
      <style:text-properties officeooo:rsid="00b2fb3a"/>
    </style:style>
    <style:style style:name="T46" style:family="text">
      <style:text-properties officeooo:rsid="00b37be3"/>
    </style:style>
    <style:style style:name="T47" style:family="text">
      <style:text-properties officeooo:rsid="009ba42a"/>
    </style:style>
    <style:style style:name="T48" style:family="text">
      <style:text-properties officeooo:rsid="00b571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Алгоритмы и структуры данных</text:span>»</text:p>
      <text:p text:style-name="P3"/>
      <text:p text:style-name="P3"/>
      <text:p text:style-name="P3">ОТЧ<text:span text:style-name="T3">Ё</text:span>Т ПО ЛАБОРАТОРНОЙ РАБОТЕ <text:span text:style-name="T4">№</text:span><text:span text:style-name="T5">1</text:span></text:p>
      <text:p text:style-name="P3">«<text:span text:style-name="T5">Сортировка распределением (карманная сортировка)</text:span>»</text:p>
      <text:p text:style-name="P3"/>
      <text:p text:style-name="P5">Выполнил:</text:p>
      <text:p text:style-name="P5">Пахомов Владимир Юрьевич, студент группы N3250</text:p>
      <text:p text:style-name="P5"/>
      <text:p text:style-name="P6"/>
      <text:p text:style-name="P7">________________</text:p>
      <text:p text:style-name="P8">(подпись)</text:p>
      <text:p text:style-name="P5"/>
      <text:p text:style-name="P5">Проверил:</text:p>
      <text:p text:style-name="P9">Ерофеев Сергей Анатольевич</text:p>
      <text:p text:style-name="P10"/>
      <text:p text:style-name="P10"/>
      <text:p text:style-name="P11">_____________________</text:p>
      <text:p text:style-name="P12">(отметка о выполнении)</text:p>
      <text:p text:style-name="P11"/>
      <text:p text:style-name="P11"/>
      <text:p text:style-name="P11">________________</text:p>
      <text:p text:style-name="P13">(подпись)</text:p>
      <text:p text:style-name="P2"/>
      <text:p text:style-name="P2"/>
      <text:p text:style-name="P14">Санкт-Петербург</text:p>
      <text:p text:style-name="P14">202<text:span text:style-name="T6">6</text:span>.</text:p>
      <text:h text:style-name="P15" text:outline-level="1"><text:bookmark-start text:name="__RefHeading___Toc80_2058273410"/>СОДЕРЖАНИЕ<text:bookmark-end text:name="__RefHeading___Toc80_2058273410"/></text:h>
      <text:p text:style-name="P16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80_2058273410" office:name="СОДЕРЖАНИЕ" text:style-name="Index_20_Link" text:visited-style-name="Index_20_Link">СОДЕРЖАНИЕ<text:tab/>2</text:a></text:p>
          <text:p text:style-name="P17"><text:a xlink:type="simple" xlink:href="#__RefHeading___Toc82_2058273410" office:name="ВВЕДЕНИЕ" text:style-name="Index_20_Link" text:visited-style-name="Index_20_Link">ВВЕДЕНИЕ<text:tab/>3</text:a></text:p>
          <text:p text:style-name="P17"><text:a xlink:type="simple" xlink:href="#__RefHeading___Toc143_2058273410%20Copy%201%20Copy%203" office:name="1. АЛГОРИТМ СОРТИРОВКИ" text:style-name="Index_20_Link" text:visited-style-name="Index_20_Link">1. АЛГОРИТМ СОРТИРОВКИ<text:tab/>4</text:a></text:p>
          <text:p text:style-name="P17"><text:a xlink:type="simple" xlink:href="#__RefHeading___Toc143_2058273410%20Copy%201" office:name="2. ОПИСАНИЕ ИСПОЛЬЗУЕМЫХ ПЕРЕМЕННЫХ" text:style-name="Index_20_Link" text:visited-style-name="Index_20_Link">2. ОПИСАНИЕ ИСПОЛЬЗУЕМЫХ ПЕРЕМЕННЫХ<text:tab/>5</text:a></text:p>
          <text:p text:style-name="P17"><text:a xlink:type="simple" xlink:href="#__RefHeading___Toc143_2058273410%20Copy%201%20Copy%202" office:name="3. БЛОК-СХЕМА АЛГОРИТМА" text:style-name="Index_20_Link" text:visited-style-name="Index_20_Link">3. БЛОК-СХЕМА АЛГОРИТМА<text:tab/>6</text:a></text:p>
          <text:p text:style-name="P17"><text:a xlink:type="simple" xlink:href="#__RefHeading___Toc143_2058273410%20Copy%201%20Copy%202%20Copy%201" office:name="4. ТЕСТИРОВАНИЕ АЛГОРИТМА" text:style-name="Index_20_Link" text:visited-style-name="Index_20_Link">4. ТЕСТИРОВАНИЕ АЛГОРИТМА<text:tab/>6</text:a></text:p>
          <text:p text:style-name="P17"><text:a xlink:type="simple" xlink:href="#__RefHeading___Toc143_2058273410%20Copy%201%20Copy%202%20Copy%202" office:name="5. ИСХОДНЫЙ КОД АЛГОРИТМА" text:style-name="Index_20_Link" text:visited-style-name="Index_20_Link">5. ИСХОДНЫЙ КОД АЛГОРИТМА<text:tab/>8</text:a></text:p>
          <text:p text:style-name="P17"><text:a xlink:type="simple" xlink:href="#__RefHeading___Toc143_2058273410%20Copy%201%20Copy%202%20Copy%206" office:name="ЗАКЛЮЧЕНИЕ" text:style-name="Index_20_Link" text:visited-style-name="Index_20_Link">ЗАКЛЮЧЕНИЕ<text:tab/>12</text:a></text:p>
          <text:p text:style-name="P17"><text:a xlink:type="simple" xlink:href="#__RefHeading___Toc143_2058273410%20Copy%201%20Copy%202%20Copy%207" office:name="ПРИЛОЖЕНИЕ А" text:style-name="Index_20_Link" text:visited-style-name="Index_20_Link">ПРИЛОЖЕНИЕ А<text:tab/>13</text:a></text:p>
        </text:index-body>
      </text:table-of-content>
      <text:p text:style-name="P16"/>
      <text:h text:style-name="P18" text:outline-level="1"><text:bookmark-start text:name="__RefHeading___Toc82_2058273410"/>ВВЕДЕНИЕ<text:bookmark-end text:name="__RefHeading___Toc82_2058273410"/></text:h>
      <text:p text:style-name="P19"><text:span text:style-name="T7">Цель работы</text:span> — разработать программу сортировки <text:span text:style-name="T5">распределением (карманной сортировки) </text:span>последовательности вещественных чисел,<text:span text:style-name="T5"> </text:span>которая <text:span text:style-name="T8">будет </text:span>хранит<text:span text:style-name="T9">ь</text:span>ся в статическом или<text:span text:style-name="T5"> </text:span>динамическом массиве<text:span text:style-name="T8"> по выбору пользователя</text:span>, определить сложность <text:span text:style-name="T10">алгоритма </text:span>путём подсчёта количества<text:span text:style-name="T5"> </text:span>элементарных операций, выполняемых в программе.</text:p>
      <text:p text:style-name="P20"/>
      <text:h text:style-name="P21" text:outline-level="1"><text:bookmark-start text:name="__RefHeading___Toc143_2058273410 Copy 1 Copy 3"/><text:span text:style-name="T11">1. </text:span><text:span text:style-name="T12">АЛГОРИТМ </text:span><text:span text:style-name="T13">СОРТИРОВКИ</text:span><text:bookmark-end text:name="__RefHeading___Toc143_2058273410 Copy 1 Copy 3"/></text:h>
      <text:p text:style-name="P22">Программа поддерживает несколько опций при запуске:</text:p>
      <text:list text:style-name="L1">
        <text:list-item>
          <text:p text:style-name="P23">-s, --static=SIZE - использовать в программе статический массив размера SIZE;</text:p>
        </text:list-item>
        <text:list-item>
          <text:p text:style-name="P23">-d, --dynamic - использовать в программе динамический массив;</text:p>
        </text:list-item>
        <text:list-item>
          <text:p text:style-name="P23">-h, --help - вывод справки;</text:p>
        </text:list-item>
        <text:list-item>
          <text:p text:style-name="P23">-v, --version - вывод информации об авторе.</text:p>
        </text:list-item>
      </text:list>
      <text:p text:style-name="P22">Наличие хотя бы одной из опций (-s или -d) является обязательным.</text:p>
      <text:p text:style-name="P22">Далее происходит сортировка массива по следующему алгоритму:</text:p>
      <text:list text:style-name="L2">
        <text:list-item>
          <text:p text:style-name="P24">Создаются карманы, количество карманов равно количеству элементов в массиве;</text:p>
        </text:list-item>
        <text:list-item>
          <text:p text:style-name="P25">Далее элементы распределяются по карманам. <text:span text:style-name="T14">Для начала определяются максимальный (max) и минимальный (min) элементы массива. </text:span>Индекс нужного кармана для каждого элемента определяется по формуле:<text:span text:style-name="T14"> </text:span><text:s/><text:span text:style-name="T15"><draw:frame text:anchor-type="as-char" svg:y="-0.603cm" draw:z-index="1" draw:name="Shape1" draw:style-name="gr1" draw:text-style-name="P26" svg:width="5.227cm" svg:height="0.929cm"><draw:image xlink:href="Pictures/10008D210000110400000305176C48DC.svg" xlink:type="simple" xlink:show="embed" xlink:actuate="onLoad" draw:mime-type="image/svg+xml"><text:p/></draw:image><draw:image xlink:href="Pictures/10000001000000A50000001DBB8EC582.png" xlink:type="simple" xlink:show="embed" xlink:actuate="onLoad" draw:mime-type="image/png"/><svg:title>TexMaths</svg:title><svg:desc>12§display§\frac{(x - min) \cdot (len(array) - 1)}{max- min}§svg§600§FALSE§</svg:desc></draw:frame></text:span><text:span text:style-name="T16">.</text:span></text:p>
        </text:list-item>
        <text:list-item>
          <text:p text:style-name="P27">Каждый заполненный карман сортируется с помощью сортировки <text:span text:style-name="T17">в</text:span>ставками;</text:p>
        </text:list-item>
        <text:list-item>
          <text:p text:style-name="P27">Содержимое карманов последовательно записывается в исходный массив.</text:p>
        </text:list-item>
      </text:list>
      <text:p text:style-name="P28">На выходе получаем отсортированный массив и <text:span text:style-name="T18">направляем</text:span> его в стандартный поток вывода.</text:p>
      <text:h text:style-name="P29" text:outline-level="1"><text:bookmark-start text:name="__RefHeading___Toc143_2058273410 Copy 1"/><text:span text:style-name="T19">2</text:span><text:span text:style-name="T11">. </text:span><text:span text:style-name="T20">ОПИСАНИЕ ИСПОЛЬЗУЕМЫХ ПЕРЕМЕННЫХ</text:span><text:bookmark-end text:name="__RefHeading___Toc143_2058273410 Copy 1"/></text:h>
      <text:p text:style-name="P30">Ниже представлена таблица с описанием использованных переменных<text:span text:style-name="T21">.</text:span></text:p>
      <text:p text:style-name="P31">Таблица <text:sequence text:ref-name="refТаблица0" text:name="Таблица" text:formula="ooow:Таблица+1" style:num-format="1">1</text:sequence><text:span text:style-name="T22"><text:s/></text:span>— Используемые переменные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>Название</text:p>
          </table:table-cell>
          <table:table-cell table:style-name="Table1.A1" office:value-type="string">
            <text:p text:style-name="P32">Тип</text:p>
          </table:table-cell>
          <table:table-cell table:style-name="Table1.A1" office:value-type="string">
            <text:p text:style-name="P32">Границы типа</text:p>
          </table:table-cell>
          <table:table-cell table:style-name="Table1.D1" office:value-type="string">
            <text:p text:style-name="P32">Назначение</text:p>
          </table:table-cell>
        </table:table-row>
        <table:table-row>
          <table:table-cell table:style-name="Table1.A2" office:value-type="string">
            <text:p text:style-name="P33">longopts[]</text:p>
          </table:table-cell>
          <table:table-cell table:style-name="Table1.A2" office:value-type="string">
            <text:p text:style-name="P33">struct option</text:p>
          </table:table-cell>
          <table:table-cell table:style-name="Table1.A2" office:value-type="string">
            <text:p text:style-name="P33">-</text:p>
          </table:table-cell>
          <table:table-cell table:style-name="Table1.D2" office:value-type="string">
            <text:p text:style-name="P33">Переменная, содержащая описания опций</text:p>
          </table:table-cell>
        </table:table-row>
        <table:table-row>
          <table:table-cell table:style-name="Table1.A2" office:value-type="string">
            <text:p text:style-name="P33">size</text:p>
          </table:table-cell>
          <table:table-cell table:style-name="Table1.A2" office:value-type="string">
            <text:p text:style-name="P33">int</text:p>
          </table:table-cell>
          <table:table-cell table:style-name="Table1.A2" office:value-type="string">
            <text:p text:style-name="P33">от <text:span text:style-name="T23">0</text:span> до<text:span text:style-name="T24"> </text:span>2147483647</text:p>
          </table:table-cell>
          <table:table-cell table:style-name="Table1.D2" office:value-type="string">
            <text:p text:style-name="P33">Размер исходного массива</text:p>
          </table:table-cell>
        </table:table-row>
        <table:table-row>
          <table:table-cell table:style-name="Table1.A2" office:value-type="string">
            <text:p text:style-name="P33">isDynamic</text:p>
          </table:table-cell>
          <table:table-cell table:style-name="Table1.A2" office:value-type="string">
            <text:p text:style-name="P33">int</text:p>
          </table:table-cell>
          <table:table-cell table:style-name="Table1.A2" office:value-type="string">
            <text:p text:style-name="P34">-1, 0, 1</text:p>
          </table:table-cell>
          <table:table-cell table:style-name="Table1.D2" office:value-type="string">
            <text:p text:style-name="P33">Флаг, определяющий тип массива</text:p>
          </table:table-cell>
        </table:table-row>
        <table:table-row>
          <table:table-cell table:style-name="Table1.A2" office:value-type="string">
            <text:p text:style-name="P33">opt</text:p>
          </table:table-cell>
          <table:table-cell table:style-name="Table1.A2" office:value-type="string">
            <text:p text:style-name="P33">int</text:p>
          </table:table-cell>
          <table:table-cell table:style-name="Table1.A2" office:value-type="string">
            <text:p text:style-name="P33">от <text:span text:style-name="T25">0</text:span> до<text:span text:style-name="T24"> </text:span>2147483647</text:p>
          </table:table-cell>
          <table:table-cell table:style-name="Table1.D2" office:value-type="string">
            <text:p text:style-name="P33">Используется для чтения опций из функции getopt_long</text:p>
          </table:table-cell>
        </table:table-row>
        <table:table-row>
          <table:table-cell table:style-name="Table1.A2" office:value-type="string">
            <text:p text:style-name="P33">argc</text:p>
          </table:table-cell>
          <table:table-cell table:style-name="Table1.A2" office:value-type="string">
            <text:p text:style-name="P33">int</text:p>
          </table:table-cell>
          <table:table-cell table:style-name="Table1.A2" office:value-type="string">
            <text:p text:style-name="P33">от <text:span text:style-name="T23">1</text:span> до<text:span text:style-name="T24"> </text:span>2147483647</text:p>
          </table:table-cell>
          <table:table-cell table:style-name="Table1.D2" office:value-type="string">
            <text:p text:style-name="P33">Хранит количество аргументов при запуске программы</text:p>
          </table:table-cell>
        </table:table-row>
        <table:table-row>
          <table:table-cell table:style-name="Table1.A2" office:value-type="string">
            <text:p text:style-name="P33">argv[]</text:p>
          </table:table-cell>
          <table:table-cell table:style-name="Table1.A2" office:value-type="string">
            <text:p text:style-name="P33">char**</text:p>
          </table:table-cell>
          <table:table-cell table:style-name="Table1.A2" office:value-type="string">
            <text:p text:style-name="P35">адрес памяти</text:p>
          </table:table-cell>
          <table:table-cell table:style-name="Table1.D2" office:value-type="string">
            <text:p text:style-name="P33">Массив переданных аргументов</text:p>
          </table:table-cell>
        </table:table-row>
        <table:table-row>
          <table:table-cell table:style-name="Table1.A2" office:value-type="string">
            <text:p text:style-name="P33">endptr</text:p>
          </table:table-cell>
          <table:table-cell table:style-name="Table1.A2" office:value-type="string">
            <text:p text:style-name="P33">char*</text:p>
          </table:table-cell>
          <table:table-cell table:style-name="Table1.A2" office:value-type="string">
            <text:p text:style-name="P35">адрес памяти</text:p>
          </table:table-cell>
          <table:table-cell table:style-name="Table1.D2" office:value-type="string">
            <text:p text:style-name="P33">Используется для работы функции strtol</text:p>
          </table:table-cell>
        </table:table-row>
        <table:table-row>
          <table:table-cell table:style-name="Table1.A2" office:value-type="string">
            <text:p text:style-name="P33">dynamicArray</text:p>
          </table:table-cell>
          <table:table-cell table:style-name="Table1.A2" office:value-type="string">
            <text:p text:style-name="P33">float*</text:p>
          </table:table-cell>
          <table:table-cell table:style-name="Table1.A2" office:value-type="string">
            <text:p text:style-name="P33">адрес памяти</text:p>
          </table:table-cell>
          <table:table-cell table:style-name="Table1.D2" office:value-type="string">
            <text:p text:style-name="P33">Указатель на выделенную память для динамического массива</text:p>
          </table:table-cell>
        </table:table-row>
        <table:table-row>
          <table:table-cell table:style-name="Table1.A2" office:value-type="string">
            <text:p text:style-name="P36">n</text:p>
          </table:table-cell>
          <table:table-cell table:style-name="Table1.A2" office:value-type="string">
            <text:p text:style-name="P36">int</text:p>
          </table:table-cell>
          <table:table-cell table:style-name="Table1.A2" office:value-type="string">
            <text:p text:style-name="P37">от <text:span text:style-name="T23">0</text:span> до 2147483647</text:p>
          </table:table-cell>
          <table:table-cell table:style-name="Table1.D2" office:value-type="string">
            <text:p text:style-name="P36">Размер массива</text:p>
          </table:table-cell>
        </table:table-row>
        <table:table-row>
          <table:table-cell table:style-name="Table1.A2" office:value-type="string">
            <text:p text:style-name="P36">staticArray[]</text:p>
          </table:table-cell>
          <table:table-cell table:style-name="Table1.A2" office:value-type="string">
            <text:p text:style-name="P36">float<text:span text:style-name="T25">[size]</text:span></text:p>
          </table:table-cell>
          <table:table-cell table:style-name="Table1.A2" office:value-type="string">
            <text:p text:style-name="P35">-</text:p>
          </table:table-cell>
          <table:table-cell table:style-name="Table1.D2" office:value-type="string">
            <text:p text:style-name="P36">Статический массив<text:span text:style-name="T25"> размера size</text:span></text:p>
          </table:table-cell>
        </table:table-row>
        <table:table-row>
          <table:table-cell table:style-name="Table1.A2" office:value-type="string">
            <text:p text:style-name="P36">filename</text:p>
          </table:table-cell>
          <table:table-cell table:style-name="Table1.A2" office:value-type="string">
            <text:p text:style-name="P36">char<text:span text:style-name="T26">*</text:span></text:p>
          </table:table-cell>
          <table:table-cell table:style-name="Table1.A2" office:value-type="string">
            <text:p text:style-name="P35">адрес памяти</text:p>
          </table:table-cell>
          <table:table-cell table:style-name="Table1.D2" office:value-type="string">
            <text:p text:style-name="P36">Ссылается на имя файла</text:p>
          </table:table-cell>
        </table:table-row>
      </table:table>
      <text:p text:style-name="P38"/>
      <text:p text:style-name="P38"/>
      <text:p text:style-name="P38"/>
      <text:h text:style-name="P39" text:outline-level="1"><text:bookmark-start text:name="__RefHeading___Toc143_2058273410 Copy 1 Copy 2"/><text:span text:style-name="T19">3</text:span><text:span text:style-name="T11">. </text:span><text:span text:style-name="T27">БЛОК</text:span><text:span text:style-name="T28">-</text:span><text:span text:style-name="T27">СХЕМА АЛГОРИТМА</text:span><text:bookmark-end text:name="__RefHeading___Toc143_2058273410 Copy 1 Copy 2"/></text:h>
      <text:p text:style-name="P40">Блок<text:span text:style-name="T9">-</text:span>схема алгоритма представлена в Приложении А.</text:p>
      <text:p text:style-name="P40"/>
      <text:h text:style-name="P41" text:outline-level="1"><text:bookmark-start text:name="__RefHeading___Toc143_2058273410 Copy 1 Copy 2 Copy 1"/><text:span text:style-name="T19">4</text:span><text:span text:style-name="T11">. </text:span><text:span text:style-name="T27">ТЕСТИРОВАНИЕ АЛГОРИТМА</text:span><text:bookmark-end text:name="__RefHeading___Toc143_2058273410 Copy 1 Copy 2 Copy 1"/></text:h>
      <text:p text:style-name="P42"><draw:frame draw:style-name="fr1" draw:name="Frame1" text:anchor-type="paragraph" svg:x="0cm" svg:y="0.323cm" svg:width="16.591cm" draw:z-index="0"><draw:text-box fo:min-height="3.582cm"><text:p text:style-name="P43"><draw:frame draw:style-name="fr2" draw:name="Image1" text:anchor-type="char" svg:width="13.536cm" svg:height="7.004cm" draw:z-index="2"><draw:image xlink:href="Pictures/100000010000033D000001AD3D28C5EF.png" xlink:type="simple" xlink:show="embed" xlink:actuate="onLoad" draw:mime-type="image/png"/></draw:frame>Рисунок <text:sequence text:ref-name="refРисунок0" text:name="Рисунок" text:formula="ooow:Рисунок+1" style:num-format="1">1</text:sequence><text:span text:style-name="T29"><text:s/></text:span>— Результат успешной работы алгоритма </text:p></draw:text-box></draw:frame><draw:frame draw:style-name="fr3" draw:name="Frame2" text:anchor-type="char" svg:x="0.048cm" svg:y="8.772cm" svg:width="16.591cm" draw:z-index="3"><draw:text-box fo:min-height="9.756cm"><text:p text:style-name="P43"><draw:frame draw:style-name="fr4" draw:name="Image2" text:anchor-type="paragraph" svg:width="13.771cm" style:rel-width="83%" svg:height="8.094cm" style:rel-height="scale" draw:z-index="4"><draw:image xlink:href="Pictures/10000001000003A900000227230C97DB.png" xlink:type="simple" xlink:show="embed" xlink:actuate="onLoad" draw:mime-type="image/png"/></draw:frame>Рисунок <text:sequence text:ref-name="refРисунок1" text:name="Рисунок" text:formula="ooow:Рисунок+1" style:num-format="1">2</text:sequence>: <text:span text:style-name="T30">Результат </text:span>работы алгоритма с опциями -v и -h</text:p></draw:text-box></draw:frame></text:p>
      <text:p text:style-name="P42"/>
      <text:p text:style-name="P42"><draw:frame draw:style-name="fr3" draw:name="Frame3" text:anchor-type="char" svg:x="0cm" svg:y="0.33cm" svg:width="16.591cm" draw:z-index="5"><draw:text-box fo:min-height="11.492cm"><text:p text:style-name="P43"><draw:frame draw:style-name="fr4" draw:name="Image3" text:anchor-type="paragraph" svg:width="15.431cm" style:rel-width="93%" svg:height="10.686cm" style:rel-height="scale" draw:z-index="6"><draw:image xlink:href="Pictures/10000001000003A60000028705A0C9AD.png" xlink:type="simple" xlink:show="embed" xlink:actuate="onLoad" draw:mime-type="image/png"/></draw:frame>Рисунок <text:sequence text:ref-name="refРисунок2" text:name="Рисунок" text:formula="ooow:Рисунок+1" style:num-format="1">3</text:sequence>: Результат работы алгоритма при вводе некорректных значений опций</text:p></draw:text-box></draw:frame><text:soft-page-break/></text:p>
      <text:p text:style-name="P42"/>
      <text:p text:style-name="P42"/>
      <text:h text:style-name="P44" text:outline-level="1"><text:bookmark-start text:name="__RefHeading___Toc143_2058273410 Copy 1 Copy 2 Copy 2"/><text:span text:style-name="T19">5</text:span><text:span text:style-name="T11">. </text:span><text:span text:style-name="T31">ИСХОДНЫЙ КОД АЛГОРИТМА</text:span><text:bookmark-end text:name="__RefHeading___Toc143_2058273410 Copy 1 Copy 2 Copy 2"/></text:h>
      <text:p text:style-name="P45">Программа написана на языке C, <text:span text:style-name="T32">для компиляции </text:span>использовался компилятор gcc.</text:p>
      <text:p text:style-name="P45">Исходный код Makefile:</text:p>
      <text:p text:style-name="P46"><text:span text:style-name="T33"><text:s/>1 <text:s/>| <text:s text:c="3"/></text:span><text:span text:style-name="T34">CC = gcc</text:span></text:p>
      <text:p text:style-name="P46"><text:span text:style-name="T33"><text:s/>2 <text:s/>| <text:s text:c="3"/></text:span><text:span text:style-name="T34">CFLAGS = -O3 -Wall -Wextra -Werror -fanalyzer</text:span></text:p>
      <text:p text:style-name="P46"><text:span text:style-name="T33"><text:s/>3 <text:s/>| <text:s text:c="3"/></text:span><text:span text:style-name="T34">TARGET = lab1</text:span></text:p>
      <text:p text:style-name="P47"><text:s/>4 <text:s/>| <text:s text:c="3"/></text:p>
      <text:p text:style-name="P46"><text:span text:style-name="T33"><text:s/>5 <text:s/>| <text:s text:c="3"/></text:span><text:span text:style-name="T34">all: </text:span><text:span text:style-name="T35">$(</text:span><text:span text:style-name="T34">TARGET</text:span><text:span text:style-name="T35">)</text:span></text:p>
      <text:p text:style-name="P47"><text:s/>6 <text:s/>| <text:s text:c="3"/></text:p>
      <text:p text:style-name="P46"><text:span text:style-name="T33"><text:s/>7 <text:s/>| <text:s text:c="3"/></text:span><text:span text:style-name="T34">$(TARGET): lab1.c</text:span></text:p>
      <text:p text:style-name="P46"><text:span text:style-name="T33"><text:s/>8 <text:s/>| <text:s text:c="3"/></text:span><text:span text:style-name="T34"><text:tab/></text:span><text:span text:style-name="T35">$(</text:span><text:span text:style-name="T34">CC</text:span><text:span text:style-name="T35">)</text:span><text:span text:style-name="T34"> </text:span><text:span text:style-name="T35">$(</text:span><text:span text:style-name="T34">CFLAGS</text:span><text:span text:style-name="T35">)</text:span><text:span text:style-name="T34"> </text:span><text:span text:style-name="T35">$(</text:span><text:span text:style-name="T34">TARGET</text:span><text:span text:style-name="T35">)</text:span><text:span text:style-name="T34">.c -o </text:span><text:span text:style-name="T35">$(</text:span><text:span text:style-name="T34">TARGET</text:span><text:span text:style-name="T35">)</text:span></text:p>
      <text:p text:style-name="P47"><text:s/>9 <text:s/>| <text:s text:c="3"/></text:p>
      <text:p text:style-name="P46"><text:span text:style-name="T33">10 <text:s/>| <text:s text:c="3"/></text:span><text:span text:style-name="T34">clean:</text:span></text:p>
      <text:p text:style-name="Code"><text:span text:style-name="T36">11 <text:s/>| <text:s text:c="3"/></text:span><text:span text:style-name="T37"><text:tab/>rm -f </text:span><text:span text:style-name="T38">$(</text:span><text:span text:style-name="T37">TARGET</text:span><text:span text:style-name="T38">)</text:span></text:p>
      <text:p text:style-name="P48"/>
      <text:p text:style-name="P45">Исходный код lab1.c:</text:p>
      <text:p text:style-name="P49"><text:span text:style-name="T39"><text:s text:c="2"/>1 <text:s/>| <text:s text:c="3"/></text:span><text:span text:style-name="T35">#include</text:span><text:span text:style-name="T34"> </text:span><text:span text:style-name="T39">&lt;stdio.h&gt;</text:span></text:p>
      <text:p text:style-name="P49"><text:span text:style-name="T39"><text:s text:c="2"/>2 <text:s/>| <text:s text:c="3"/></text:span><text:span text:style-name="T35">#include</text:span><text:span text:style-name="T34"> </text:span><text:span text:style-name="T39">&lt;fcntl.h&gt;</text:span></text:p>
      <text:p text:style-name="P49"><text:span text:style-name="T39"><text:s text:c="2"/>3 <text:s/>| <text:s text:c="3"/></text:span><text:span text:style-name="T35">#include</text:span><text:span text:style-name="T34"> </text:span><text:span text:style-name="T39">&lt;stdlib.h&gt;</text:span></text:p>
      <text:p text:style-name="P49"><text:span text:style-name="T39"><text:s text:c="2"/>4 <text:s/>| <text:s text:c="3"/></text:span><text:span text:style-name="T35">#include</text:span><text:span text:style-name="T34"> </text:span><text:span text:style-name="T39">&lt;getopt.h&gt;</text:span></text:p>
      <text:p text:style-name="P49"><text:span text:style-name="T39"><text:s text:c="2"/>5 <text:s/>| <text:s text:c="3"/></text:span><text:span text:style-name="T35">#include</text:span><text:span text:style-name="T34"> </text:span><text:span text:style-name="T39">&lt;errno.h&gt;</text:span></text:p>
      <text:p text:style-name="P49"><text:span text:style-name="T39"><text:s text:c="2"/>6 <text:s/>| <text:s text:c="3"/></text:span><text:span text:style-name="T35">#include</text:span><text:span text:style-name="T34"> </text:span><text:span text:style-name="T39">&lt;string.h&gt;</text:span></text:p>
      <text:p text:style-name="P50"><text:s text:c="2"/>7 <text:s/>| <text:s text:c="3"/></text:p>
      <text:p text:style-name="P49"><text:span text:style-name="T39"><text:s text:c="2"/>8 <text:s/>| <text:s text:c="3"/></text:span><text:span text:style-name="T40">void</text:span><text:span text:style-name="T34"> printArray(</text:span><text:span text:style-name="T35">const</text:span><text:span text:style-name="T34"> </text:span><text:span text:style-name="T40">char</text:span><text:span text:style-name="T34"> *desc, </text:span><text:span text:style-name="T40">float</text:span><text:span text:style-name="T34"> array[], </text:span><text:span text:style-name="T40">int</text:span><text:span text:style-name="T34"> size) {</text:span></text:p>
      <text:p text:style-name="P49"><text:span text:style-name="T39"><text:s text:c="2"/>9 <text:s/>| <text:s text:c="3"/></text:span><text:span text:style-name="T34"><text:s text:c="4"/></text:span><text:span text:style-name="T35">if</text:span><text:span text:style-name="T34"> (desc) printf(</text:span><text:span text:style-name="T41">"%s"</text:span><text:span text:style-name="T34">, desc); <text:s text:c="31"/></text:span><text:span text:style-name="T39">// (2) (неявное != NULL + вызов)</text:span></text:p>
      <text:p text:style-name="P49"><text:span text:style-name="T39"><text:s/>10 <text:s/>| <text:s text:c="3"/></text:span><text:span text:style-name="T34"><text:s text:c="4"/></text:span><text:span text:style-name="T35">for</text:span><text:span text:style-name="T34"> (</text:span><text:span text:style-name="T40">int</text:span><text:span text:style-name="T34"> i = 0; i &lt; size; i++) { <text:s text:c="28"/></text:span><text:span text:style-name="T39">// (1) + (n+1) + (2n) = 3n + 2</text:span></text:p>
      <text:p text:style-name="P49"><text:span text:style-name="T39"><text:s/>11 <text:s/>| <text:s text:c="3"/></text:span><text:span text:style-name="T34"><text:s text:c="8"/>printf(</text:span><text:span text:style-name="T41">"%.3f "</text:span><text:span text:style-name="T34">, array[i]); <text:s text:c="30"/></text:span><text:span text:style-name="T39">// (2) (индексация[] + вызов)</text:span></text:p>
      <text:p text:style-name="P49"><text:span text:style-name="T39"><text:s/>12 <text:s/>| <text:s text:c="3"/></text:span><text:span text:style-name="T34"><text:s text:c="4"/>}</text:span></text:p>
      <text:p text:style-name="P49"><text:span text:style-name="T39"><text:s/>13 <text:s/>| <text:s text:c="3"/></text:span><text:span text:style-name="T34"><text:s text:c="4"/>printf(</text:span><text:span text:style-name="T41">"\n"</text:span><text:span text:style-name="T34">); <text:s text:c="47"/></text:span><text:span text:style-name="T39">// (1)</text:span></text:p>
      <text:p text:style-name="P49"><text:span text:style-name="T39"><text:s/>14 <text:s/>| <text:s text:c="3"/></text:span><text:span text:style-name="T34">} </text:span></text:p>
      <text:p text:style-name="P50"><text:s/>15 <text:s/>| <text:s text:c="3"/>// Итоговая сложность printArray: 2 + 3n + 2 + 2n + 1 = 5n + 5</text:p>
      <text:p text:style-name="P50"><text:s/>16 <text:s/>| <text:s text:c="3"/></text:p>
      <text:p text:style-name="P49"><text:span text:style-name="T39"><text:s/>17 <text:s/>| <text:s text:c="3"/></text:span><text:span text:style-name="T40">int</text:span><text:span text:style-name="T34"> readFromFile(</text:span><text:span text:style-name="T40">char</text:span><text:span text:style-name="T34"> *filename, </text:span><text:span text:style-name="T40">float</text:span><text:span text:style-name="T34"> *array, </text:span><text:span text:style-name="T40">int</text:span><text:span text:style-name="T34"> maxSize) {</text:span></text:p>
      <text:p text:style-name="P49"><text:span text:style-name="T39"><text:s/>18 <text:s/>| <text:s text:c="3"/></text:span><text:span text:style-name="T34"><text:s text:c="4"/></text:span><text:span text:style-name="T40">FILE</text:span><text:span text:style-name="T34"> *file = fopen(filename, </text:span><text:span text:style-name="T41">"r"</text:span><text:span text:style-name="T34">); <text:s text:c="26"/></text:span><text:span text:style-name="T39">// (2) (вызов + присваивание)</text:span></text:p>
      <text:p text:style-name="P49"><text:span text:style-name="T39"><text:s/>19 <text:s/>| <text:s text:c="3"/></text:span><text:span text:style-name="T34"><text:s text:c="4"/></text:span><text:span text:style-name="T35">if</text:span><text:span text:style-name="T34"> (!file) { <text:s text:c="48"/></text:span><text:span text:style-name="T39">// (1) (логическое !)</text:span></text:p>
      <text:p text:style-name="P49"><text:span text:style-name="T39"><text:s/>20 <text:s/>| <text:s text:c="3"/></text:span><text:span text:style-name="T34"><text:s text:c="8"/>fprintf(stderr, </text:span><text:span text:style-name="T41">"Ошибка: не удалось открыть файл %s\n"</text:span><text:span text:style-name="T34">, filename); </text:span><text:span text:style-name="T39">// (1)</text:span></text:p>
      <text:p text:style-name="P49"><text:span text:style-name="T39"><text:s/>21 <text:s/>| <text:s text:c="3"/></text:span><text:span text:style-name="T34"><text:s text:c="8"/>exit(1); <text:s text:c="48"/></text:span><text:span text:style-name="T39">// (1)</text:span></text:p>
      <text:p text:style-name="P49"><text:span text:style-name="T39"><text:s/>22 <text:s/>| <text:s text:c="3"/></text:span><text:span text:style-name="T34"><text:s text:c="4"/>}</text:span></text:p>
      <text:p text:style-name="P50"><text:s/>23 <text:s/>| <text:s text:c="3"/></text:p>
      <text:p text:style-name="P49"><text:span text:style-name="T39"><text:s/>24 <text:s/>| <text:s text:c="3"/></text:span><text:span text:style-name="T34"><text:s text:c="4"/></text:span><text:span text:style-name="T40">int</text:span><text:span text:style-name="T34"> n = 0; <text:s text:c="50"/></text:span><text:span text:style-name="T39">// (1)</text:span></text:p>
      <text:p text:style-name="P49"><text:span text:style-name="T39"><text:s/>25 <text:s/>| <text:s text:c="3"/></text:span><text:span text:style-name="T34"><text:s text:c="4"/></text:span><text:span text:style-name="T35">while</text:span><text:span text:style-name="T34"> (n &lt; maxSize &amp;&amp; fscanf(file, </text:span><text:span text:style-name="T41">"%f"</text:span><text:span text:style-name="T34">, &amp;array[n]) == 1) { <text:s/></text:span><text:span text:style-name="T39">// (6) (&lt;, &amp;&amp;, &amp;,[], вызов, ==) * (n+1)</text:span></text:p>
      <text:p text:style-name="P49"><text:span text:style-name="T39"><text:s/>26 <text:s/>| <text:s text:c="3"/></text:span><text:span text:style-name="T34"><text:s text:c="8"/>n++; <text:s text:c="52"/></text:span><text:span text:style-name="T39">// (2) (инкремент) * n</text:span></text:p>
      <text:p text:style-name="P49"><text:span text:style-name="T39"><text:s/>27 <text:s/>| <text:s text:c="3"/></text:span><text:span text:style-name="T34"><text:s text:c="4"/>}</text:span></text:p>
      <text:p text:style-name="P51"><text:span text:style-name="T39"><text:s/>28 <text:s/>| <text:s text:c="3"/></text:span><text:s text:c="4"/></text:p>
      <text:p text:style-name="P49"><text:span text:style-name="T39"><text:s/>29 <text:s/>| <text:s text:c="3"/></text:span><text:span text:style-name="T34"><text:s text:c="4"/>fclose(file); <text:s text:c="47"/></text:span><text:span text:style-name="T39">// (1)</text:span></text:p>
      <text:p text:style-name="P49"><text:span text:style-name="T39"><text:s/>30 <text:s/>| <text:s text:c="3"/></text:span><text:span text:style-name="T34"><text:s text:c="4"/></text:span><text:span text:style-name="T35">return</text:span><text:span text:style-name="T34"> n; <text:s text:c="51"/></text:span><text:span text:style-name="T39">// (1)</text:span></text:p>
      <text:p text:style-name="P49"><text:span text:style-name="T39"><text:s/>31 <text:s/>| <text:s text:c="3"/></text:span><text:span text:style-name="T34">} </text:span></text:p>
      <text:p text:style-name="P50"><text:s/>32 <text:s/>| <text:s text:c="3"/>// Итоговая сложность readFromFile (успешное чтение): 2 + 1 + 1 + 6(n+1) + 2n + 1 + 1 = 8n + 12</text:p>
      <text:p text:style-name="P50"><text:s/>33 <text:s/>| <text:s text:c="3"/></text:p>
      <text:p text:style-name="P49"><text:span text:style-name="T39"><text:s/>34 <text:s/>| <text:s text:c="3"/></text:span><text:span text:style-name="T40">int</text:span><text:span text:style-name="T34"> countNums(</text:span><text:span text:style-name="T40">char</text:span><text:span text:style-name="T34"> *filename) {</text:span></text:p>
      <text:p text:style-name="P49"><text:span text:style-name="T39"><text:s/>35 <text:s/>| <text:s text:c="3"/></text:span><text:span text:style-name="T34"><text:s text:c="4"/></text:span><text:span text:style-name="T40">FILE</text:span><text:span text:style-name="T34"> *file = fopen(filename, </text:span><text:span text:style-name="T41">"r"</text:span><text:span text:style-name="T34">); <text:s text:c="26"/></text:span><text:span text:style-name="T39">// (2) (вызов + присваивание)</text:span></text:p>
      <text:p text:style-name="P49"><text:span text:style-name="T39"><text:s/>36 <text:s/>| <text:s text:c="3"/></text:span><text:span text:style-name="T34"><text:s text:c="4"/></text:span><text:span text:style-name="T35">if</text:span><text:span text:style-name="T34"> (!file) { <text:s text:c="48"/></text:span><text:span text:style-name="T39">// (1) (логическое !)</text:span></text:p>
      <text:p text:style-name="P49"><text:span text:style-name="T39"><text:s/>37 <text:s/>| <text:s text:c="3"/></text:span><text:span text:style-name="T34"><text:s text:c="8"/>fprintf(stderr, </text:span><text:span text:style-name="T41">"Ошибка: не удалось открыть файл %s\n"</text:span><text:span text:style-name="T34">, filename); </text:span><text:span text:style-name="T39">// (1)</text:span></text:p>
      <text:p text:style-name="P49"><text:span text:style-name="T39"><text:s/>38 <text:s/>| <text:s text:c="3"/></text:span><text:span text:style-name="T34"><text:s text:c="8"/>exit(1); <text:s text:c="48"/></text:span><text:span text:style-name="T39">// (1)</text:span></text:p>
      <text:p text:style-name="P49"><text:span text:style-name="T39"><text:s/>39 <text:s/>| <text:s text:c="3"/></text:span><text:span text:style-name="T34"><text:s text:c="4"/>}</text:span></text:p>
      <text:p text:style-name="P49"><text:span text:style-name="T39"><text:s/>40 <text:s/>| <text:s text:c="3"/></text:span><text:span text:style-name="T34"><text:s text:c="4"/></text:span><text:span text:style-name="T40">int</text:span><text:span text:style-name="T34"> count = 0; <text:s text:c="46"/></text:span><text:span text:style-name="T39">// (1)</text:span></text:p>
      <text:p text:style-name="P49"><text:span text:style-name="T39"><text:s/>41 <text:s/>| <text:s text:c="3"/></text:span><text:span text:style-name="T34"><text:s text:c="4"/></text:span><text:span text:style-name="T40">float</text:span><text:span text:style-name="T34"> temp; <text:s text:c="49"/></text:span><text:span text:style-name="T39">// (0)</text:span></text:p>
      <text:p text:style-name="P49"><text:soft-page-break/><text:span text:style-name="T39"><text:s/>42 <text:s/>| <text:s text:c="3"/></text:span><text:span text:style-name="T34"><text:s text:c="4"/></text:span><text:span text:style-name="T35">while</text:span><text:span text:style-name="T34"> (fscanf(file, </text:span><text:span text:style-name="T41">"%f"</text:span><text:span text:style-name="T34">, &amp;temp) == 1) { <text:s text:c="20"/></text:span><text:span text:style-name="T39">// (3) (&amp;, вызов, ==) * (n+1)</text:span></text:p>
      <text:p text:style-name="P49"><text:span text:style-name="T39"><text:s/>43 <text:s/>| <text:s text:c="3"/></text:span><text:span text:style-name="T34"><text:s text:c="8"/>count++; <text:s text:c="48"/></text:span><text:span text:style-name="T39">// (2) (инкремент) * n</text:span></text:p>
      <text:p text:style-name="P49"><text:span text:style-name="T39"><text:s/>44 <text:s/>| <text:s text:c="3"/></text:span><text:span text:style-name="T34"><text:s text:c="4"/>}</text:span></text:p>
      <text:p text:style-name="P49"><text:span text:style-name="T39"><text:s/>45 <text:s/>| <text:s text:c="3"/></text:span><text:span text:style-name="T34"><text:s text:c="4"/>fclose(file); <text:s text:c="47"/></text:span><text:span text:style-name="T39">// (1)</text:span></text:p>
      <text:p text:style-name="P49"><text:span text:style-name="T39"><text:s/>46 <text:s/>| <text:s text:c="3"/></text:span><text:span text:style-name="T34"><text:s text:c="4"/></text:span><text:span text:style-name="T35">return</text:span><text:span text:style-name="T34"> count; <text:s text:c="47"/></text:span><text:span text:style-name="T39">// (1)</text:span></text:p>
      <text:p text:style-name="P49"><text:span text:style-name="T39"><text:s/>47 <text:s/>| <text:s text:c="3"/></text:span><text:span text:style-name="T34">} </text:span></text:p>
      <text:p text:style-name="P50"><text:s/>48 <text:s/>| <text:s text:c="3"/>// Итоговая сложность countNums (успешное чтение): 2 + 1 + 1 + 0 + 3(n+1) + 2n + 1 + 1 = 5n + 9</text:p>
      <text:p text:style-name="P50"><text:s/>49 <text:s/>| <text:s text:c="3"/></text:p>
      <text:p text:style-name="P49"><text:span text:style-name="T39"><text:s/>50 <text:s/>| <text:s text:c="3"/></text:span><text:span text:style-name="T40">void</text:span><text:span text:style-name="T34"> insertionSort(</text:span><text:span text:style-name="T40">float</text:span><text:span text:style-name="T34"> array[], </text:span><text:span text:style-name="T40">int</text:span><text:span text:style-name="T34"> size) {</text:span></text:p>
      <text:p text:style-name="P49"><text:span text:style-name="T39"><text:s/>51 <text:s/>| <text:s text:c="3"/></text:span><text:span text:style-name="T34"><text:s text:c="4"/></text:span><text:span text:style-name="T35">for</text:span><text:span text:style-name="T34"> (</text:span><text:span text:style-name="T40">int</text:span><text:span text:style-name="T34"> i = 1; i &lt; size; i++) { <text:s text:c="28"/></text:span><text:span text:style-name="T39">// (1) + (n) + (2(n-1)) = 3n - 1</text:span></text:p>
      <text:p text:style-name="P49"><text:span text:style-name="T39"><text:s/>52 <text:s/>| <text:s text:c="3"/></text:span><text:span text:style-name="T34"><text:s text:c="8"/></text:span><text:span text:style-name="T40">int</text:span><text:span text:style-name="T34"> j = i - 1; <text:s text:c="42"/></text:span><text:span text:style-name="T39">// (2) (- и =) * (n-1)</text:span></text:p>
      <text:p text:style-name="P49"><text:span text:style-name="T39"><text:s/>53 <text:s/>| <text:s text:c="3"/></text:span><text:span text:style-name="T34"><text:s text:c="8"/></text:span><text:span text:style-name="T35">while</text:span><text:span text:style-name="T34"> (j &gt;= 0 &amp;&amp; array[j] &gt; array[j+1]) { <text:s text:c="15"/></text:span><text:span text:style-name="T39">// (6) (&gt;=, &amp;&amp;, [], [], +, &gt;)</text:span></text:p>
      <text:p text:style-name="P49"><text:span text:style-name="T39"><text:s/>54 <text:s/>| <text:s text:c="3"/></text:span><text:span text:style-name="T34"><text:s text:c="12"/></text:span><text:span text:style-name="T40">float</text:span><text:span text:style-name="T34"> tmp = array[j+1]; <text:s text:c="29"/></text:span><text:span text:style-name="T39">// (3) (+, [], =)</text:span></text:p>
      <text:p text:style-name="P49"><text:span text:style-name="T39"><text:s/>55 <text:s/>| <text:s text:c="3"/></text:span><text:span text:style-name="T34"><text:s text:c="12"/>array[j+1] = array[j]; <text:s text:c="30"/></text:span><text:span text:style-name="T39">// (4) (+, [], [], =)</text:span></text:p>
      <text:p text:style-name="P49"><text:span text:style-name="T39"><text:s/>56 <text:s/>| <text:s text:c="3"/></text:span><text:span text:style-name="T34"><text:s text:c="12"/>array[j] = tmp; <text:s text:c="37"/></text:span><text:span text:style-name="T39">// (2) ([], =)</text:span></text:p>
      <text:p text:style-name="P49"><text:span text:style-name="T39"><text:s/>57 <text:s/>| <text:s text:c="3"/></text:span><text:span text:style-name="T34"><text:s text:c="12"/>j--; <text:s text:c="48"/></text:span><text:span text:style-name="T39">// (2) (декремент)</text:span></text:p>
      <text:p text:style-name="P49"><text:span text:style-name="T39"><text:s/>58 <text:s/>| <text:s text:c="3"/></text:span><text:span text:style-name="T34"><text:s text:c="8"/>}</text:span></text:p>
      <text:p text:style-name="P49"><text:span text:style-name="T39"><text:s/>59 <text:s/>| <text:s text:c="3"/></text:span><text:span text:style-name="T34"><text:s text:c="8"/></text:span><text:span text:style-name="T39">// Сложность одного while в худшем случае: 6(i+1) + (3+4+2+2)*i = 17i + 6</text:span></text:p>
      <text:p text:style-name="P49"><text:span text:style-name="T39"><text:s/>60 <text:s/>| <text:s text:c="3"/></text:span><text:span text:style-name="T34"><text:s text:c="4"/>} </text:span></text:p>
      <text:p text:style-name="P49"><text:span text:style-name="T39"><text:s/>61 <text:s/>| <text:s text:c="3"/></text:span><text:span text:style-name="T34"><text:s text:c="4"/></text:span><text:span text:style-name="T39">// Все while: Сумма от i=1 до n-1 (17i + 6) = 17*(n(n-1)/2) + 6(n-1) = 8.5n^2 - 2.5n - 6</text:span></text:p>
      <text:p text:style-name="P49"><text:span text:style-name="T39"><text:s/>62 <text:s/>| <text:s text:c="3"/></text:span><text:span text:style-name="T34">} </text:span></text:p>
      <text:p text:style-name="P50"><text:s/>63 <text:s/>| <text:s text:c="3"/>// Итоговая сложность insertionSort: (3n - 1) + 2(n-1) + (8.5n^2 - 2.5n - 6) = 8.5n^2 + 2.5n - 9</text:p>
      <text:p text:style-name="P50"><text:s/>64 <text:s/>| <text:s text:c="3"/></text:p>
      <text:p text:style-name="P49"><text:span text:style-name="T39"><text:s/>65 <text:s/>| <text:s text:c="3"/></text:span><text:span text:style-name="T40">void</text:span><text:span text:style-name="T34"> bucketSort(</text:span><text:span text:style-name="T40">float</text:span><text:span text:style-name="T34"> array[], </text:span><text:span text:style-name="T40">int</text:span><text:span text:style-name="T34"> size) {</text:span></text:p>
      <text:p text:style-name="P49"><text:span text:style-name="T39"><text:s/>66 <text:s/>| <text:s text:c="3"/></text:span><text:span text:style-name="T34"><text:s text:c="4"/></text:span><text:span text:style-name="T35">if</text:span><text:span text:style-name="T34"> (size &lt;= 1) </text:span><text:span text:style-name="T35">return</text:span><text:span text:style-name="T34">; <text:s text:c="38"/></text:span><text:span text:style-name="T39">// (2) (&lt;=, return)</text:span></text:p>
      <text:p text:style-name="P50"><text:s/>67 <text:s/>| <text:s text:c="3"/></text:p>
      <text:p text:style-name="P49"><text:span text:style-name="T39"><text:s/>68 <text:s/>| <text:s text:c="3"/></text:span><text:span text:style-name="T34"><text:s text:c="4"/></text:span><text:span text:style-name="T40">float</text:span><text:span text:style-name="T34"> min = array[0], max = array[0]; <text:s text:c="23"/></text:span><text:span text:style-name="T39">// (4) ([], =,[], =)</text:span></text:p>
      <text:p text:style-name="P49"><text:span text:style-name="T39"><text:s/>69 <text:s/>| <text:s text:c="3"/></text:span><text:span text:style-name="T34"><text:s text:c="4"/></text:span><text:span text:style-name="T35">for</text:span><text:span text:style-name="T34"> (</text:span><text:span text:style-name="T40">int</text:span><text:span text:style-name="T34"> i = 1; i &lt; size; i++) { <text:s text:c="28"/></text:span><text:span text:style-name="T39">// (1) + (n) + (2(n-1)) = 3n - 1</text:span></text:p>
      <text:p text:style-name="P49"><text:span text:style-name="T39"><text:s/>70 <text:s/>| <text:s text:c="3"/></text:span><text:span text:style-name="T34"><text:s text:c="8"/></text:span><text:span text:style-name="T35">if</text:span><text:span text:style-name="T34"> (array[i] &lt; min) min = array[i]; <text:s text:c="21"/></text:span><text:span text:style-name="T39">// (4) ([], &lt;,[], =)</text:span></text:p>
      <text:p text:style-name="P49"><text:span text:style-name="T39"><text:s/>71 <text:s/>| <text:s text:c="3"/></text:span><text:span text:style-name="T34"><text:s text:c="8"/></text:span><text:span text:style-name="T35">if</text:span><text:span text:style-name="T34"> (array[i] &gt; max) max = array[i]; <text:s text:c="21"/></text:span><text:span text:style-name="T39">// (4) ([], &gt;,[], =)</text:span></text:p>
      <text:p text:style-name="P49"><text:span text:style-name="T39"><text:s/>72 <text:s/>| <text:s text:c="3"/></text:span><text:span text:style-name="T34"><text:s text:c="4"/>} </text:span><text:span text:style-name="T39">// Цикл: (3n - 1) + 8(n-1) = 11n - 9</text:span></text:p>
      <text:p text:style-name="P50"><text:s/>73 <text:s/>| <text:s text:c="3"/></text:p>
      <text:p text:style-name="P49"><text:span text:style-name="T39"><text:s/>74 <text:s/>| <text:s text:c="3"/></text:span><text:span text:style-name="T34"><text:s text:c="4"/></text:span><text:span text:style-name="T35">if</text:span><text:span text:style-name="T34"> (min == max) </text:span><text:span text:style-name="T35">return</text:span><text:span text:style-name="T34">; <text:s text:c="37"/></text:span><text:span text:style-name="T39">// (2) (==, return)</text:span></text:p>
      <text:p text:style-name="P50"><text:s/>75 <text:s/>| <text:s text:c="3"/></text:p>
      <text:p text:style-name="P49"><text:span text:style-name="T39"><text:s/>76 <text:s/>| <text:s text:c="3"/></text:span><text:span text:style-name="T34"><text:s text:c="4"/></text:span><text:span text:style-name="T40">int</text:span><text:span text:style-name="T34"> numBuckets = size; <text:s text:c="38"/></text:span><text:span text:style-name="T39">// (1)</text:span></text:p>
      <text:p text:style-name="P51"><text:span text:style-name="T39"><text:s/>77 <text:s/>| <text:s text:c="3"/></text:span><text:s text:c="4"/></text:p>
      <text:p text:style-name="P49"><text:span text:style-name="T39"><text:s/>78 <text:s/>| <text:s text:c="3"/></text:span><text:span text:style-name="T34"><text:s text:c="4"/></text:span><text:span text:style-name="T40">float</text:span><text:span text:style-name="T34"> **buckets = (</text:span><text:span text:style-name="T40">float</text:span><text:span text:style-name="T34">**)malloc(numBuckets*</text:span><text:span text:style-name="T35">sizeof</text:span><text:span text:style-name="T34">(</text:span><text:span text:style-name="T40">float</text:span><text:span text:style-name="T34">*));</text:span><text:span text:style-name="T39">// (5) (cast, malloc, *, sizeof, =)</text:span></text:p>
      <text:p text:style-name="P49"><text:span text:style-name="T39"><text:s/>79 <text:s/>| <text:s text:c="3"/></text:span><text:span text:style-name="T34"><text:s text:c="4"/></text:span><text:span text:style-name="T35">if</text:span><text:span text:style-name="T34"> (!buckets) { <text:s text:c="45"/></text:span><text:span text:style-name="T39">// (1)</text:span></text:p>
      <text:p text:style-name="P49"><text:span text:style-name="T39"><text:s/>80 <text:s/>| <text:s text:c="3"/></text:span><text:span text:style-name="T34"><text:s text:c="8"/>fprintf(stderr, </text:span><text:span text:style-name="T41">"Ошибка: не удалось выделить память для корзин\n"</text:span><text:span text:style-name="T34">); </text:span><text:span text:style-name="T39">// (1)</text:span></text:p>
      <text:p text:style-name="P49"><text:span text:style-name="T39"><text:s/>81 <text:s/>| <text:s text:c="3"/></text:span><text:span text:style-name="T34"><text:s text:c="8"/>exit(1); <text:s text:c="48"/></text:span><text:span text:style-name="T39">// (1)</text:span></text:p>
      <text:p text:style-name="P49"><text:span text:style-name="T39"><text:s/>82 <text:s/>| <text:s text:c="3"/></text:span><text:span text:style-name="T34"><text:s text:c="4"/>}</text:span></text:p>
      <text:p text:style-name="P49"><text:span text:style-name="T39"><text:s/>83 <text:s/>| <text:s text:c="3"/></text:span><text:span text:style-name="T34"><text:s text:c="4"/></text:span><text:span text:style-name="T35">for</text:span><text:span text:style-name="T34"> (</text:span><text:span text:style-name="T40">int</text:span><text:span text:style-name="T34"> i = 0; i &lt; numBuckets; i++) { <text:s text:c="22"/></text:span><text:span text:style-name="T39">// (1) + (n+1) + (2n) = 3n + 2</text:span></text:p>
      <text:p text:style-name="P49"><text:span text:style-name="T39"><text:s/>84 <text:s/>| <text:s text:c="3"/></text:span><text:span text:style-name="T34"><text:s text:c="8"/>buckets[i] = (</text:span><text:span text:style-name="T40">float</text:span><text:span text:style-name="T34">*)malloc(size*</text:span><text:span text:style-name="T35">sizeof</text:span><text:span text:style-name="T34">(</text:span><text:span text:style-name="T40">float</text:span><text:span text:style-name="T34">)); <text:s text:c="8"/></text:span><text:span text:style-name="T39">// (6) ([], cast, malloc, *, sizeof, =)</text:span></text:p>
      <text:p text:style-name="P49"><text:span text:style-name="T39"><text:s/>85 <text:s/>| <text:s text:c="3"/></text:span><text:span text:style-name="T34"><text:s text:c="8"/></text:span><text:span text:style-name="T35">if</text:span><text:span text:style-name="T34"> (!buckets[i]) { <text:s text:c="38"/></text:span><text:span text:style-name="T39">// (2) ([], !)</text:span></text:p>
      <text:p text:style-name="P49"><text:span text:style-name="T39"><text:s/>86 <text:s/>| <text:s text:c="3"/></text:span><text:span text:style-name="T34"><text:s text:c="12"/>fprintf(stderr, </text:span><text:span text:style-name="T41">"Ошибка: не удалось выделить память для корзины %d\n"</text:span><text:span text:style-name="T34">, i); </text:span><text:span text:style-name="T39">// (1)</text:span></text:p>
      <text:p text:style-name="P49"><text:span text:style-name="T39"><text:s/>87 <text:s/>| <text:s text:c="3"/></text:span><text:span text:style-name="T34"><text:s text:c="12"/>exit(1); <text:s text:c="44"/></text:span><text:span text:style-name="T39">// (1)</text:span></text:p>
      <text:p text:style-name="P49"><text:span text:style-name="T39"><text:s/>88 <text:s/>| <text:s text:c="3"/></text:span><text:span text:style-name="T34"><text:s text:c="8"/>}</text:span></text:p>
      <text:p text:style-name="P49"><text:span text:style-name="T39"><text:s/>89 <text:s/>| <text:s text:c="3"/></text:span><text:span text:style-name="T34"><text:s text:c="4"/>} </text:span><text:span text:style-name="T39">// Цикл: (3n + 2) + 8n = 11n + 2</text:span></text:p>
      <text:p text:style-name="P51"><text:span text:style-name="T39"><text:s/>90 <text:s/>| <text:s text:c="3"/></text:span><text:s text:c="4"/></text:p>
      <text:p text:style-name="P49"><text:span text:style-name="T39"><text:s/>91 <text:s/>| <text:s text:c="3"/></text:span><text:span text:style-name="T34"><text:s text:c="4"/></text:span><text:span text:style-name="T40">int</text:span><text:span text:style-name="T34"> *bucketSizes = (</text:span><text:span text:style-name="T40">int</text:span><text:span text:style-name="T34">*)calloc(numBuckets, </text:span><text:span text:style-name="T35">sizeof</text:span><text:span text:style-name="T34">(</text:span><text:span text:style-name="T40">int</text:span><text:span text:style-name="T34">)); <text:s text:c="3"/></text:span><text:span text:style-name="T39">// (4) (cast, calloc, sizeof, =)</text:span></text:p>
      <text:p text:style-name="P49"><text:span text:style-name="T39"><text:s/>92 <text:s/>| <text:s text:c="3"/></text:span><text:span text:style-name="T34"><text:s text:c="4"/></text:span><text:span text:style-name="T35">if</text:span><text:span text:style-name="T34"> (!bucketSizes) { <text:s text:c="41"/></text:span><text:span text:style-name="T39">// (1)</text:span></text:p>
      <text:p text:style-name="P49"><text:span text:style-name="T39"><text:s/>93 <text:s/>| <text:s text:c="3"/></text:span><text:span text:style-name="T34"><text:s text:c="8"/>fprintf(stderr, </text:span><text:span text:style-name="T41">"Ошибка: не удалось выделить память для размеров корзин\n"</text:span><text:span text:style-name="T34">); </text:span><text:span text:style-name="T39">// (1)</text:span></text:p>
      <text:p text:style-name="P49"><text:span text:style-name="T39"><text:s/>94 <text:s/>| <text:s text:c="3"/></text:span><text:span text:style-name="T34"><text:s text:c="8"/>exit(1); <text:s text:c="48"/></text:span><text:span text:style-name="T39">// (1)</text:span></text:p>
      <text:p text:style-name="P49"><text:span text:style-name="T39"><text:s/>95 <text:s/>| <text:s text:c="3"/></text:span><text:span text:style-name="T34"><text:s text:c="4"/>}</text:span></text:p>
      <text:p text:style-name="P50"><text:s/>96 <text:s/>| <text:s text:c="3"/></text:p>
      <text:p text:style-name="P49"><text:span text:style-name="T39"><text:s/>97 <text:s/>| <text:s text:c="3"/></text:span><text:span text:style-name="T34"><text:s text:c="4"/></text:span><text:span text:style-name="T35">for</text:span><text:span text:style-name="T34"> (</text:span><text:span text:style-name="T40">int</text:span><text:span text:style-name="T34"> i = 0; i &lt; size; i++) { <text:s text:c="28"/></text:span><text:span text:style-name="T39">// (1) + (n+1) + (2n) = 3n + 2</text:span></text:p>
      <text:p text:style-name="P49"><text:soft-page-break/><text:span text:style-name="T39"><text:s/>98 <text:s/>| <text:s text:c="3"/></text:span><text:span text:style-name="T34"><text:s text:c="8"/></text:span><text:span text:style-name="T40">int</text:span><text:span text:style-name="T34"> bucketInd = (</text:span><text:span text:style-name="T40">int</text:span><text:span text:style-name="T34">)((array[i] - min)*(numBuckets - 1) / (max - min)); </text:span><text:span text:style-name="T39">// (8) ([], -, -, *, -, /, cast, =)</text:span></text:p>
      <text:p text:style-name="P49"><text:span text:style-name="T39"><text:s/>99 <text:s/>| <text:s text:c="3"/></text:span><text:span text:style-name="T34"><text:s text:c="8"/>buckets[bucketInd][bucketSizes[bucketInd]] = array[i]; <text:s text:c="2"/></text:span><text:span text:style-name="T39">// (5) ([], [], [], [], =)</text:span></text:p>
      <text:p text:style-name="P49"><text:span text:style-name="T39">100 <text:s/>| <text:s text:c="3"/></text:span><text:span text:style-name="T34"><text:s text:c="8"/>bucketSizes[bucketInd]++; <text:s text:c="31"/></text:span><text:span text:style-name="T39">// (3) ([], ++)</text:span></text:p>
      <text:p text:style-name="P49"><text:span text:style-name="T39">101 <text:s/>| <text:s text:c="3"/></text:span><text:span text:style-name="T34"><text:s text:c="4"/>} </text:span><text:span text:style-name="T39">// Цикл: 3n + 2 + 8n + 5n + 3n = 19n + 2</text:span></text:p>
      <text:p text:style-name="P50">102 <text:s/>| <text:s text:c="3"/></text:p>
      <text:p text:style-name="P49"><text:span text:style-name="T39">103 <text:s/>| <text:s text:c="3"/></text:span><text:span text:style-name="T34"><text:s text:c="4"/></text:span><text:span text:style-name="T40">int</text:span><text:span text:style-name="T34"> ind = 0; <text:s text:c="48"/></text:span><text:span text:style-name="T39">// (1)</text:span></text:p>
      <text:p text:style-name="P49"><text:span text:style-name="T39">104 <text:s/>| <text:s text:c="3"/></text:span><text:span text:style-name="T34"><text:s text:c="4"/></text:span><text:span text:style-name="T35">for</text:span><text:span text:style-name="T34"> (</text:span><text:span text:style-name="T40">int</text:span><text:span text:style-name="T34"> i = 0; i &lt; numBuckets; i++) { <text:s text:c="22"/></text:span><text:span text:style-name="T39">// (1) + (n+1) + (2n) = 3n + 2</text:span></text:p>
      <text:p text:style-name="P49"><text:span text:style-name="T39">105 <text:s/>| <text:s text:c="3"/></text:span><text:span text:style-name="T34"><text:s text:c="8"/></text:span><text:span text:style-name="T35">if</text:span><text:span text:style-name="T34"> (bucketSizes[i] &gt; 0) { <text:s text:c="31"/></text:span><text:span text:style-name="T39">// (2) ([], &gt;)</text:span></text:p>
      <text:p text:style-name="P49"><text:span text:style-name="T39">106 <text:s/>| <text:s text:c="3"/></text:span><text:span text:style-name="T34"><text:s text:c="12"/>insertionSort(buckets[i], bucketSizes[i]); <text:s text:c="10"/></text:span><text:span text:style-name="T39">// (3) ([],[], вызов)</text:span></text:p>
      <text:p text:style-name="P49"><text:span text:style-name="T39">107 <text:s/>| <text:s text:c="3"/></text:span><text:span text:style-name="T34"><text:s text:c="12"/></text:span><text:span text:style-name="T35">for</text:span><text:span text:style-name="T34"> (</text:span><text:span text:style-name="T40">int</text:span><text:span text:style-name="T34"> j = 0; j &lt; bucketSizes[i]; j++) { <text:s text:c="10"/></text:span><text:span text:style-name="T39">// (1) + 2(k+1) + (2k) = 4k + 3 (где k = bucketSizes[i])</text:span></text:p>
      <text:p text:style-name="P49"><text:span text:style-name="T39">108 <text:s/>| <text:s text:c="3"/></text:span><text:span text:style-name="T34"><text:s text:c="16"/>array[ind++] = buckets[i][j]; <text:s text:c="19"/></text:span><text:span text:style-name="T39">// (6) (ind++,[], [],[], =)</text:span></text:p>
      <text:p text:style-name="P49"><text:span text:style-name="T39">109 <text:s/>| <text:s text:c="3"/></text:span><text:span text:style-name="T34"><text:s text:c="12"/>} </text:span><text:span text:style-name="T39">// Внутренний цикл: (4k + 3) + 6k = 10k + 3</text:span></text:p>
      <text:p text:style-name="P49"><text:span text:style-name="T39">110 <text:s/>| <text:s text:c="3"/></text:span><text:span text:style-name="T34"><text:s text:c="8"/>}</text:span></text:p>
      <text:p text:style-name="P49"><text:span text:style-name="T39">111 <text:s/>| <text:s text:c="3"/></text:span><text:span text:style-name="T34"><text:s text:c="8"/>free(buckets[i]); <text:s text:c="39"/></text:span><text:span text:style-name="T39">// (2) ([], вызов)</text:span></text:p>
      <text:p text:style-name="P49"><text:span text:style-name="T39">112 <text:s/>| <text:s text:c="3"/></text:span><text:span text:style-name="T34"><text:s text:c="4"/>} </text:span><text:span text:style-name="T39">// Внешний цикл в худшем случае (по 1 элементу в корзине): (3n + 2) + 2n + 3n + 1n + 4n + 2n + 6n + 2n = 23n + 2 + O(n^2)</text:span></text:p>
      <text:p text:style-name="P51"><text:span text:style-name="T39">113 <text:s/>| <text:s text:c="3"/></text:span><text:s text:c="4"/></text:p>
      <text:p text:style-name="P49"><text:span text:style-name="T39">114 <text:s/>| <text:s text:c="3"/></text:span><text:span text:style-name="T34"><text:s text:c="4"/>free(buckets); <text:s text:c="46"/></text:span><text:span text:style-name="T39">// (1)</text:span></text:p>
      <text:p text:style-name="P49"><text:span text:style-name="T39">115 <text:s/>| <text:s text:c="3"/></text:span><text:span text:style-name="T34"><text:s text:c="4"/>free(bucketSizes); <text:s text:c="42"/></text:span><text:span text:style-name="T39">// (1)</text:span></text:p>
      <text:p text:style-name="P49"><text:span text:style-name="T39">116 <text:s/>| <text:s text:c="3"/></text:span><text:span text:style-name="T34">} </text:span></text:p>
      <text:p text:style-name="P50">117 <text:s/>| <text:s text:c="3"/>// Итоговая сложность bucketSort: </text:p>
      <text:p text:style-name="P50">118 <text:s/>| <text:s text:c="3"/>// 2 + 4 + (11n - 9) + 2 + 1 + 5 + 1 + (11n + 2) + 4 + 1 + (19n + 2) + 1 + (23n + 2) + 1 + 1 = 64n + 20 + O(n^2)</text:p>
      <text:p text:style-name="P50">119 <text:s/>| <text:s text:c="3"/></text:p>
      <text:p text:style-name="P49"><text:span text:style-name="T39">120 <text:s/>| <text:s text:c="3"/></text:span><text:span text:style-name="T40">int</text:span><text:span text:style-name="T34"> main(</text:span><text:span text:style-name="T40">int</text:span><text:span text:style-name="T34"> argc, </text:span><text:span text:style-name="T40">char</text:span><text:span text:style-name="T34"> **argv) {</text:span></text:p>
      <text:p text:style-name="P50">121 <text:s/>| <text:s text:c="3"/></text:p>
      <text:p text:style-name="P49"><text:span text:style-name="T39">122 <text:s/>| <text:s text:c="3"/></text:span><text:span text:style-name="T34"><text:s text:c="4"/></text:span><text:span text:style-name="T35">static</text:span><text:span text:style-name="T34"> </text:span><text:span text:style-name="T35">struct</text:span><text:span text:style-name="T34"> </text:span><text:span text:style-name="T40">option</text:span><text:span text:style-name="T34"> longopts[] = { <text:s text:c="25"/></text:span><text:span text:style-name="T39">// (1)</text:span></text:p>
      <text:p text:style-name="P49"><text:span text:style-name="T39">123 <text:s/>| <text:s text:c="3"/></text:span><text:span text:style-name="T34"><text:s text:c="8"/>{</text:span><text:span text:style-name="T41">"version"</text:span><text:span text:style-name="T34">, no_argument, 0, </text:span><text:span text:style-name="T41">'v'</text:span><text:span text:style-name="T34">},</text:span></text:p>
      <text:p text:style-name="P49"><text:span text:style-name="T39">124 <text:s/>| <text:s text:c="3"/></text:span><text:span text:style-name="T34"><text:s text:c="8"/>{</text:span><text:span text:style-name="T41">"help"</text:span><text:span text:style-name="T34">, no_argument, 0, </text:span><text:span text:style-name="T41">'h'</text:span><text:span text:style-name="T34">},</text:span></text:p>
      <text:p text:style-name="P49"><text:span text:style-name="T39">125 <text:s/>| <text:s text:c="3"/></text:span><text:span text:style-name="T34"><text:s text:c="8"/>{</text:span><text:span text:style-name="T41">"static"</text:span><text:span text:style-name="T34">, required_argument, 0, </text:span><text:span text:style-name="T41">'s'</text:span><text:span text:style-name="T34">},</text:span></text:p>
      <text:p text:style-name="P49"><text:span text:style-name="T39">126 <text:s/>| <text:s text:c="3"/></text:span><text:span text:style-name="T34"><text:s text:c="8"/>{</text:span><text:span text:style-name="T41">"dynamic"</text:span><text:span text:style-name="T34">, no_argument, 0, </text:span><text:span text:style-name="T41">'d'</text:span><text:span text:style-name="T34">},</text:span></text:p>
      <text:p text:style-name="P49"><text:span text:style-name="T39">127 <text:s/>| <text:s text:c="3"/></text:span><text:span text:style-name="T34"><text:s text:c="8"/>{0, 0, 0, 0},</text:span></text:p>
      <text:p text:style-name="P49"><text:span text:style-name="T39">128 <text:s/>| <text:s text:c="3"/></text:span><text:span text:style-name="T34"><text:s text:c="4"/>};</text:span></text:p>
      <text:p text:style-name="P50">129 <text:s/>| <text:s text:c="3"/></text:p>
      <text:p text:style-name="P49"><text:span text:style-name="T39">130 <text:s/>| <text:s text:c="3"/></text:span><text:span text:style-name="T34"><text:s text:c="4"/></text:span><text:span text:style-name="T40">int</text:span><text:span text:style-name="T34"> size = 0; <text:s text:c="47"/></text:span><text:span text:style-name="T39">// (1)</text:span></text:p>
      <text:p text:style-name="P49"><text:span text:style-name="T39">131 <text:s/>| <text:s text:c="3"/></text:span><text:span text:style-name="T34"><text:s text:c="4"/></text:span><text:span text:style-name="T40">int</text:span><text:span text:style-name="T34"> isDynamic = -1; <text:s text:c="41"/></text:span><text:span text:style-name="T39">// (1)</text:span></text:p>
      <text:p text:style-name="P50">132 <text:s/>| <text:s text:c="3"/></text:p>
      <text:p text:style-name="P49"><text:span text:style-name="T39">133 <text:s/>| <text:s text:c="3"/></text:span><text:span text:style-name="T34"><text:s text:c="4"/></text:span><text:span text:style-name="T40">int</text:span><text:span text:style-name="T34"> opt; <text:s text:c="52"/></text:span><text:span text:style-name="T39">// (0)</text:span></text:p>
      <text:p text:style-name="P49"><text:span text:style-name="T39">134 <text:s/>| <text:s text:c="3"/></text:span><text:span text:style-name="T34"><text:s text:c="4"/></text:span><text:span text:style-name="T35">while</text:span><text:span text:style-name="T34"> ((opt = getopt_long(argc, argv, </text:span><text:span text:style-name="T41">"vhs:d"</text:span><text:span text:style-name="T34">, longopts, NULL)) != -1) { </text:span><text:span text:style-name="T39">// (3) (вызов, =, !=) * (m+1)</text:span></text:p>
      <text:p text:style-name="P49"><text:span text:style-name="T39">135 <text:s/>| <text:s text:c="3"/></text:span><text:span text:style-name="T34"><text:s text:c="8"/></text:span><text:span text:style-name="T35">if</text:span><text:span text:style-name="T34"> (opt == </text:span><text:span text:style-name="T41">'v'</text:span><text:span text:style-name="T34">) { <text:s text:c="39"/></text:span><text:span text:style-name="T39">// (1)</text:span></text:p>
      <text:p text:style-name="P49"><text:span text:style-name="T39">136 <text:s/>| <text:s text:c="3"/></text:span><text:span text:style-name="T34"><text:s text:c="12"/>printf(</text:span><text:span text:style-name="T41">"Карманная сортировка (Bucket Sort) v1.0\n"</text:span><text:span text:style-name="T34">); </text:span><text:span text:style-name="T39">// (1)</text:span></text:p>
      <text:p text:style-name="P49"><text:span text:style-name="T39">137 <text:s/>| <text:s text:c="3"/></text:span><text:span text:style-name="T34"><text:s text:c="12"/>printf(</text:span><text:span text:style-name="T41">"Информация об авторе:\nПахомов Владимир Юрьевич, гр. N3250, ИСУ 467036\n"</text:span><text:span text:style-name="T34">); </text:span><text:span text:style-name="T39">// (1)</text:span></text:p>
      <text:p text:style-name="P49"><text:span text:style-name="T39">138 <text:s/>| <text:s text:c="3"/></text:span><text:span text:style-name="T34"><text:s text:c="12"/></text:span><text:span text:style-name="T35">return</text:span><text:span text:style-name="T34"> 0; <text:s text:c="43"/></text:span><text:span text:style-name="T39">// (1)</text:span></text:p>
      <text:p text:style-name="P49"><text:span text:style-name="T39">139 <text:s/>| <text:s text:c="3"/></text:span><text:span text:style-name="T34"><text:s text:c="8"/>} </text:span><text:span text:style-name="T35">else</text:span><text:span text:style-name="T34"> </text:span><text:span text:style-name="T35">if</text:span><text:span text:style-name="T34"> (opt == </text:span><text:span text:style-name="T41">'h'</text:span><text:span text:style-name="T34">) { <text:s text:c="32"/></text:span><text:span text:style-name="T39">// (1)</text:span></text:p>
      <text:p text:style-name="P49"><text:span text:style-name="T39">140 <text:s/>| <text:s text:c="3"/></text:span><text:span text:style-name="T34"><text:s text:c="12"/>printf(</text:span><text:span text:style-name="T41">"Использование: ./lab1 [ОПЦИИ] &lt;имя_файла&gt;\n\n"</text:span><text:span text:style-name="T34">); </text:span><text:span text:style-name="T39">// (1)</text:span></text:p>
      <text:p text:style-name="P49"><text:span text:style-name="T39">141 <text:s/>| <text:s text:c="3"/></text:span><text:span text:style-name="T34"><text:s text:c="12"/>printf(</text:span><text:span text:style-name="T41">"Программа для сортировки чисел из файла методом карманной сортировки (Bucket Sort)\n\n"</text:span><text:span text:style-name="T34">); </text:span><text:span text:style-name="T39">// (1)</text:span></text:p>
      <text:p text:style-name="P49"><text:span text:style-name="T39">142 <text:s/>| <text:s text:c="3"/></text:span><text:span text:style-name="T34"><text:s text:c="12"/>printf(</text:span><text:span text:style-name="T41">"Опции:\n"</text:span><text:span text:style-name="T34">); <text:s text:c="33"/></text:span><text:span text:style-name="T39">// (1)</text:span></text:p>
      <text:p text:style-name="P49"><text:span text:style-name="T39">143 <text:s/>| <text:s text:c="3"/></text:span><text:span text:style-name="T34"><text:s text:c="12"/>printf(</text:span><text:span text:style-name="T41">" <text:s text:c="3"/>-s, --static=SIZE <text:s text:c="3"/>Использовать статический массив (VLA) заданного размера SIZE\n"</text:span><text:span text:style-name="T34">); </text:span><text:span text:style-name="T39">// (1)</text:span></text:p>
      <text:p text:style-name="P49"><text:span text:style-name="T39">144 <text:s/>| <text:s text:c="3"/></text:span><text:span text:style-name="T34"><text:s text:c="12"/>printf(</text:span><text:span text:style-name="T41">" <text:s text:c="3"/>-d, --dynamic <text:s text:c="7"/>Использовать динамический массив (автоопределение размера файла)\n"</text:span><text:span text:style-name="T34">); </text:span><text:span text:style-name="T39">// (1)</text:span></text:p>
      <text:p text:style-name="P49"><text:span text:style-name="T39">145 <text:s/>| <text:s text:c="3"/></text:span><text:span text:style-name="T34"><text:s text:c="12"/>printf(</text:span><text:span text:style-name="T41">" <text:s text:c="3"/>-h, --help <text:s text:c="10"/>Показать эту справку и выйти\n"</text:span><text:span text:style-name="T34">); </text:span><text:span text:style-name="T39">// (1)</text:span></text:p>
      <text:p text:style-name="P49"><text:span text:style-name="T39">146 <text:s/>| <text:s text:c="3"/></text:span><text:span text:style-name="T34"><text:s text:c="12"/>printf(</text:span><text:span text:style-name="T41">" <text:s text:c="3"/>-v, --version <text:s text:c="7"/>Показать информацию о версии и выйти\n\n"</text:span><text:span text:style-name="T34">); </text:span><text:span text:style-name="T39">// (1)</text:span></text:p>
      <text:p text:style-name="P49"><text:span text:style-name="T39">147 <text:s/>| <text:s text:c="3"/></text:span><text:span text:style-name="T34"><text:s text:c="12"/>printf(</text:span><text:span text:style-name="T41">"Примеры:\n"</text:span><text:span text:style-name="T34">); <text:s text:c="31"/></text:span><text:span text:style-name="T39">// (1)</text:span></text:p>
      <text:p text:style-name="P49"><text:span text:style-name="T39">148 <text:s/>| <text:s text:c="3"/></text:span><text:span text:style-name="T34"><text:s text:c="12"/>printf(</text:span><text:span text:style-name="T41">"./lab1 -s=100 input.txt\n"</text:span><text:span text:style-name="T34">); <text:s text:c="16"/></text:span><text:span text:style-name="T39">// (1)</text:span></text:p>
      <text:p text:style-name="P49"><text:span text:style-name="T39">149 <text:s/>| <text:s text:c="3"/></text:span><text:span text:style-name="T34"><text:s text:c="12"/>printf(</text:span><text:span text:style-name="T41">"./lab1 -d input.txt\n"</text:span><text:span text:style-name="T34">); <text:s text:c="20"/></text:span><text:span text:style-name="T39">// (1)</text:span></text:p>
      <text:p text:style-name="P49"><text:span text:style-name="T39">150 <text:s/>| <text:s text:c="3"/></text:span><text:span text:style-name="T34"><text:s text:c="12"/></text:span><text:span text:style-name="T35">return</text:span><text:span text:style-name="T34"> 0; <text:s text:c="43"/></text:span><text:span text:style-name="T39">// (1)</text:span></text:p>
      <text:p text:style-name="P49"><text:span text:style-name="T39">151 <text:s/>| <text:s text:c="3"/></text:span><text:span text:style-name="T34"><text:s text:c="8"/>}</text:span></text:p>
      <text:p text:style-name="P49"><text:span text:style-name="T39">152 <text:s/>| <text:s text:c="3"/></text:span><text:span text:style-name="T34"><text:s text:c="8"/></text:span><text:span text:style-name="T35">if</text:span><text:span text:style-name="T34"> (opt == </text:span><text:span text:style-name="T41">'s'</text:span><text:span text:style-name="T34">) { <text:s text:c="39"/></text:span><text:span text:style-name="T39">// (1)</text:span></text:p>
      <text:p text:style-name="P49"><text:span text:style-name="T39">153 <text:s/>| <text:s text:c="3"/></text:span><text:span text:style-name="T34"><text:s text:c="12"/></text:span><text:span text:style-name="T40">char</text:span><text:span text:style-name="T34"> *endptr; <text:s text:c="39"/></text:span><text:span text:style-name="T39">// (0)</text:span></text:p>
      <text:p text:style-name="P49"><text:span text:style-name="T39">154 <text:s/>| <text:s text:c="3"/></text:span><text:span text:style-name="T34"><text:s text:c="12"/></text:span><text:span text:style-name="T35">if</text:span><text:span text:style-name="T34"> (optarg[0] == </text:span><text:span text:style-name="T41">'='</text:span><text:span text:style-name="T34">) optarg++; <text:s text:c="21"/></text:span><text:span text:style-name="T39">// (2) ([], ==) + (2) (++) = 4</text:span></text:p>
      <text:p text:style-name="P49"><text:soft-page-break/><text:span text:style-name="T39">155 <text:s/>| <text:s text:c="3"/></text:span><text:span text:style-name="T34"><text:s text:c="12"/>size = strtol(optarg, &amp;endptr, 10); <text:s text:c="17"/></text:span><text:span text:style-name="T39">// (3) (&amp;, вызов, =)</text:span></text:p>
      <text:p text:style-name="P49"><text:span text:style-name="T39">156 <text:s/>| <text:s text:c="3"/></text:span><text:span text:style-name="T34"><text:s text:c="12"/></text:span><text:span text:style-name="T35">if</text:span><text:span text:style-name="T34"> (optarg == endptr || *endptr != </text:span><text:span text:style-name="T41">'\0'</text:span><text:span text:style-name="T34"> || size &lt; 0) { </text:span><text:span text:style-name="T39">// (6) (==, ||, *, !=, ||, &lt;)</text:span></text:p>
      <text:p text:style-name="P49"><text:span text:style-name="T39">157 <text:s/>| <text:s text:c="3"/></text:span><text:span text:style-name="T34"><text:s text:c="16"/>fprintf(stderr, </text:span><text:span text:style-name="T41">"Ошибка: некорректное значение опции -s: '%s'\n"</text:span><text:span text:style-name="T34">, optarg); </text:span><text:span text:style-name="T39">// (1)</text:span></text:p>
      <text:p text:style-name="P49"><text:span text:style-name="T39">158 <text:s/>| <text:s text:c="3"/></text:span><text:span text:style-name="T34"><text:s text:c="16"/></text:span><text:span text:style-name="T35">return</text:span><text:span text:style-name="T34"> 1; <text:s text:c="39"/></text:span><text:span text:style-name="T39">// (1)</text:span></text:p>
      <text:p text:style-name="P49"><text:span text:style-name="T39">159 <text:s/>| <text:s text:c="3"/></text:span><text:span text:style-name="T34"><text:s text:c="12"/>}</text:span></text:p>
      <text:p text:style-name="P49"><text:span text:style-name="T39">160 <text:s/>| <text:s text:c="3"/></text:span><text:span text:style-name="T34"><text:s text:c="12"/>isDynamic = 0; <text:s text:c="38"/></text:span><text:span text:style-name="T39">// (1)</text:span></text:p>
      <text:p text:style-name="P49"><text:span text:style-name="T39">161 <text:s/>| <text:s text:c="3"/></text:span><text:span text:style-name="T34"><text:s text:c="12"/></text:span><text:span text:style-name="T39">// Худшая ветка (s): 1(v) + 1(h) + 1(s) + 4 + 3 + 6 + 1 = 17</text:span></text:p>
      <text:p text:style-name="P49"><text:span text:style-name="T39">162 <text:s/>| <text:s text:c="3"/></text:span><text:span text:style-name="T34"><text:s text:c="8"/>} </text:span><text:span text:style-name="T35">else</text:span><text:span text:style-name="T34"> </text:span><text:span text:style-name="T35">if</text:span><text:span text:style-name="T34"> (opt == </text:span><text:span text:style-name="T41">'d'</text:span><text:span text:style-name="T34">) { <text:s text:c="32"/></text:span><text:span text:style-name="T39">// (1)</text:span></text:p>
      <text:p text:style-name="P49"><text:span text:style-name="T39">163 <text:s/>| <text:s text:c="3"/></text:span><text:span text:style-name="T34"><text:s text:c="12"/>isDynamic = 1; <text:s text:c="38"/></text:span><text:span text:style-name="T39">// (1)</text:span></text:p>
      <text:p text:style-name="P49"><text:span text:style-name="T39">164 <text:s/>| <text:s text:c="3"/></text:span><text:span text:style-name="T34"><text:s text:c="8"/>} </text:span><text:span text:style-name="T35">else</text:span><text:span text:style-name="T34"> {</text:span></text:p>
      <text:p text:style-name="P49"><text:span text:style-name="T39">165 <text:s/>| <text:s text:c="3"/></text:span><text:span text:style-name="T34"><text:s text:c="12"/>fprintf(stderr, </text:span><text:span text:style-name="T41">"Использование: %s[-s=size | -d] &lt;имя_файла&gt;\n"</text:span><text:span text:style-name="T34">, argv[0]); </text:span><text:span text:style-name="T39">// (2)</text:span></text:p>
      <text:p text:style-name="P49"><text:span text:style-name="T39">166 <text:s/>| <text:s text:c="3"/></text:span><text:span text:style-name="T34"><text:s text:c="12"/></text:span><text:span text:style-name="T35">return</text:span><text:span text:style-name="T34"> 1; <text:s text:c="43"/></text:span><text:span text:style-name="T39">// (1)</text:span></text:p>
      <text:p text:style-name="P49"><text:span text:style-name="T39">167 <text:s/>| <text:s text:c="3"/></text:span><text:span text:style-name="T34"><text:s text:c="8"/>}</text:span></text:p>
      <text:p text:style-name="P49"><text:span text:style-name="T39">168 <text:s/>| <text:s text:c="3"/></text:span><text:span text:style-name="T34"><text:s text:c="4"/>} </text:span><text:span text:style-name="T39">// Цикл while: 3(m+1) + 17m = 20m + 3</text:span></text:p>
      <text:p text:style-name="P50">169 <text:s/>| <text:s text:c="3"/></text:p>
      <text:p text:style-name="P49"><text:span text:style-name="T39">170 <text:s/>| <text:s text:c="3"/></text:span><text:span text:style-name="T34"><text:s text:c="4"/></text:span><text:span text:style-name="T35">if</text:span><text:span text:style-name="T34"> (optind &gt;= argc) { <text:s text:c="39"/></text:span><text:span text:style-name="T39">// (1)</text:span></text:p>
      <text:p text:style-name="P49"><text:span text:style-name="T39">171 <text:s/>| <text:s text:c="3"/></text:span><text:span text:style-name="T34"><text:s text:c="8"/>fprintf(stderr, </text:span><text:span text:style-name="T41">"Ошибка: не указано имя файла\n"</text:span><text:span text:style-name="T34">); <text:s text:c="6"/></text:span><text:span text:style-name="T39">// (1)</text:span></text:p>
      <text:p text:style-name="P49"><text:span text:style-name="T39">172 <text:s/>| <text:s text:c="3"/></text:span><text:span text:style-name="T34"><text:s text:c="8"/></text:span><text:span text:style-name="T35">return</text:span><text:span text:style-name="T34"> 1; <text:s text:c="47"/></text:span><text:span text:style-name="T39">// (1)</text:span></text:p>
      <text:p text:style-name="P49"><text:span text:style-name="T39">173 <text:s/>| <text:s text:c="3"/></text:span><text:span text:style-name="T34"><text:s text:c="4"/>}</text:span></text:p>
      <text:p text:style-name="P50">174 <text:s/>| <text:s text:c="3"/></text:p>
      <text:p text:style-name="P49"><text:span text:style-name="T39">175 <text:s/>| <text:s text:c="3"/></text:span><text:span text:style-name="T34"><text:s text:c="4"/></text:span><text:span text:style-name="T40">char</text:span><text:span text:style-name="T34"> *filename = argv[optind]; <text:s text:c="30"/></text:span><text:span text:style-name="T39">// (2) ([], =)</text:span></text:p>
      <text:p text:style-name="P50">176 <text:s/>| <text:s text:c="3"/></text:p>
      <text:p text:style-name="P49"><text:span text:style-name="T39">177 <text:s/>| <text:s text:c="3"/></text:span><text:span text:style-name="T34"><text:s text:c="4"/></text:span><text:span text:style-name="T35">if</text:span><text:span text:style-name="T34"> (isDynamic == 1) { <text:s text:c="39"/></text:span><text:span text:style-name="T39">// (1)</text:span></text:p>
      <text:p text:style-name="P49"><text:span text:style-name="T39">178 <text:s/>| <text:s text:c="3"/></text:span><text:span text:style-name="T34"><text:s text:c="8"/>size = countNums(filename); <text:s text:c="29"/></text:span><text:span text:style-name="T39">// (2) (вызов, =)</text:span></text:p>
      <text:p text:style-name="P49"><text:span text:style-name="T39">179 <text:s/>| <text:s text:c="3"/></text:span><text:span text:style-name="T34"><text:s text:c="8"/>printf(</text:span><text:span text:style-name="T41">"Используется динамический массив\n"</text:span><text:span text:style-name="T34">); <text:s text:c="11"/></text:span><text:span text:style-name="T39">// (1)</text:span></text:p>
      <text:p text:style-name="P50">180 <text:s/>| <text:s text:c="3"/></text:p>
      <text:p text:style-name="P49"><text:span text:style-name="T39">181 <text:s/>| <text:s text:c="3"/></text:span><text:span text:style-name="T34"><text:s text:c="8"/></text:span><text:span text:style-name="T40">float</text:span><text:span text:style-name="T34"> *dynamicArray = malloc(</text:span><text:span text:style-name="T35">sizeof</text:span><text:span text:style-name="T34">(</text:span><text:span text:style-name="T40">float</text:span><text:span text:style-name="T34">) * size); <text:s text:c="5"/></text:span><text:span text:style-name="T39">// (4) (sizeof, *, вызов, =)</text:span></text:p>
      <text:p text:style-name="P49"><text:span text:style-name="T39">182 <text:s/>| <text:s text:c="3"/></text:span><text:span text:style-name="T34"><text:s text:c="8"/></text:span><text:span text:style-name="T35">if</text:span><text:span text:style-name="T34"> (!dynamicArray) { <text:s text:c="36"/></text:span><text:span text:style-name="T39">// (1)</text:span></text:p>
      <text:p text:style-name="P49"><text:span text:style-name="T39">183 <text:s/>| <text:s text:c="3"/></text:span><text:span text:style-name="T34"><text:s text:c="12"/>fprintf(stderr, </text:span><text:span text:style-name="T41">"Ошибка выделения памяти для динамического массива: %s"</text:span><text:span text:style-name="T34">, strerror(errno)); </text:span><text:span text:style-name="T39">// (2)</text:span></text:p>
      <text:p text:style-name="P49"><text:span text:style-name="T39">184 <text:s/>| <text:s text:c="3"/></text:span><text:span text:style-name="T34"><text:s text:c="12"/></text:span><text:span text:style-name="T35">return</text:span><text:span text:style-name="T34"> 1; <text:s text:c="43"/></text:span><text:span text:style-name="T39">// (1)</text:span></text:p>
      <text:p text:style-name="P49"><text:span text:style-name="T39">185 <text:s/>| <text:s text:c="3"/></text:span><text:span text:style-name="T34"><text:s text:c="8"/>}</text:span></text:p>
      <text:p text:style-name="P50">186 <text:s/>| <text:s text:c="3"/></text:p>
      <text:p text:style-name="P49"><text:span text:style-name="T39">187 <text:s/>| <text:s text:c="3"/></text:span><text:span text:style-name="T34"><text:s text:c="8"/></text:span><text:span text:style-name="T40">int</text:span><text:span text:style-name="T34"> n = readFromFile(filename, dynamicArray, size); <text:s text:c="5"/></text:span><text:span text:style-name="T39">// (2) (вызов, =)</text:span></text:p>
      <text:p text:style-name="P50">188 <text:s/>| <text:s text:c="3"/></text:p>
      <text:p text:style-name="P49"><text:span text:style-name="T39">189 <text:s/>| <text:s text:c="3"/></text:span><text:span text:style-name="T34"><text:s text:c="8"/>printArray(</text:span><text:span text:style-name="T41">"\nИсходный массив из файла:\n"</text:span><text:span text:style-name="T34">, dynamicArray, n); </text:span><text:span text:style-name="T39">// (1)</text:span></text:p>
      <text:p text:style-name="P49"><text:span text:style-name="T39">190 <text:s/>| <text:s text:c="3"/></text:span><text:span text:style-name="T34"><text:s text:c="8"/>bucketSort(dynamicArray, n); <text:s text:c="33"/></text:span><text:span text:style-name="T39">// (1)</text:span></text:p>
      <text:p text:style-name="P49"><text:span text:style-name="T39">191 <text:s/>| <text:s text:c="3"/></text:span><text:span text:style-name="T34"><text:s text:c="8"/>printArray(</text:span><text:span text:style-name="T41">"\nОтсортированный массив:\n"</text:span><text:span text:style-name="T34">, dynamicArray, n); <text:s text:c="2"/></text:span><text:span text:style-name="T39">// (1)</text:span></text:p>
      <text:p text:style-name="P50">192 <text:s/>| <text:s text:c="3"/></text:p>
      <text:p text:style-name="P49"><text:span text:style-name="T39">193 <text:s/>| <text:s text:c="3"/></text:span><text:span text:style-name="T34"><text:s text:c="8"/>free(dynamicArray); <text:s text:c="37"/></text:span><text:span text:style-name="T39">// (1)</text:span></text:p>
      <text:p text:style-name="P49"><text:span text:style-name="T39">194 <text:s/>| <text:s text:c="3"/></text:span><text:span text:style-name="T34"><text:s text:c="4"/></text:span><text:span text:style-name="T39">// Итоговая сложность ветки if: 1 + 2 + 1 + 4 + 1 + 2 + 1 + 1 + 1 + 1 = 15</text:span></text:p>
      <text:p text:style-name="P49"><text:span text:style-name="T39">195 <text:s/>| <text:s text:c="3"/></text:span><text:span text:style-name="T34"><text:s text:c="4"/>} </text:span><text:span text:style-name="T35">else</text:span><text:span text:style-name="T34"> </text:span><text:span text:style-name="T35">if</text:span><text:span text:style-name="T34"> (isDynamic == 0) { <text:s text:c="32"/></text:span><text:span text:style-name="T39">// (1)</text:span></text:p>
      <text:p text:style-name="P49"><text:span text:style-name="T39">196 <text:s/>| <text:s text:c="3"/></text:span><text:span text:style-name="T34"><text:s text:c="8"/>printf(</text:span><text:span text:style-name="T41">"Используется статический массив размера %d\n"</text:span><text:span text:style-name="T34">, size); </text:span><text:span text:style-name="T39">// (1)</text:span></text:p>
      <text:p text:style-name="P50">197 <text:s/>| <text:s text:c="3"/></text:p>
      <text:p text:style-name="P49"><text:span text:style-name="T39">198 <text:s/>| <text:s text:c="3"/></text:span><text:span text:style-name="T34"><text:s text:c="8"/></text:span><text:span text:style-name="T40">float</text:span><text:span text:style-name="T34"> staticArray[size]; <text:s text:c="32"/></text:span><text:span text:style-name="T39">// (1)</text:span></text:p>
      <text:p text:style-name="P49"><text:span text:style-name="T39">199 <text:s/>| <text:s text:c="3"/></text:span><text:span text:style-name="T34"><text:s text:c="8"/></text:span><text:span text:style-name="T40">int</text:span><text:span text:style-name="T34"> n = readFromFile(filename, staticArray, size); <text:s text:c="6"/></text:span><text:span text:style-name="T39">// (2)</text:span></text:p>
      <text:p text:style-name="P50">200 <text:s/>| <text:s text:c="3"/></text:p>
      <text:p text:style-name="P49"><text:span text:style-name="T39">201 <text:s/>| <text:s text:c="3"/></text:span><text:span text:style-name="T34"><text:s text:c="8"/>printArray(</text:span><text:span text:style-name="T41">"\nИсходный массив из файла:\n"</text:span><text:span text:style-name="T34">, staticArray, n); </text:span><text:span text:style-name="T39">// (1)</text:span></text:p>
      <text:p text:style-name="P49"><text:span text:style-name="T39">202 <text:s/>| <text:s text:c="3"/></text:span><text:span text:style-name="T34"><text:s text:c="8"/>bucketSort(staticArray, n); <text:s text:c="33"/></text:span><text:span text:style-name="T39">// (1)</text:span></text:p>
      <text:p text:style-name="P49"><text:span text:style-name="T39">203 <text:s/>| <text:s text:c="3"/></text:span><text:span text:style-name="T34"><text:s text:c="8"/>printArray(</text:span><text:span text:style-name="T41">"\nОтсортированный массив:\n"</text:span><text:span text:style-name="T34">, staticArray, n); <text:s text:c="2"/></text:span><text:span text:style-name="T39">// (1)</text:span></text:p>
      <text:p text:style-name="P49"><text:span text:style-name="T39">204 <text:s/>| <text:s text:c="3"/></text:span><text:span text:style-name="T34"><text:s text:c="4"/>} </text:span><text:span text:style-name="T35">else</text:span><text:span text:style-name="T34"> {</text:span></text:p>
      <text:p text:style-name="P49"><text:span text:style-name="T39">205 <text:s/>| <text:s text:c="3"/></text:span><text:span text:style-name="T34"><text:s text:c="8"/>fprintf(stderr, </text:span><text:span text:style-name="T41">"Выберите режим: --static=SIZE или --dynamic\n"</text:span><text:span text:style-name="T34">); </text:span><text:span text:style-name="T39">// (1)</text:span></text:p>
      <text:p text:style-name="P49"><text:span text:style-name="T39">206 <text:s/>| <text:s text:c="3"/></text:span><text:span text:style-name="T34"><text:s text:c="8"/></text:span><text:span text:style-name="T35">return</text:span><text:span text:style-name="T34"> 1; <text:s text:c="47"/></text:span><text:span text:style-name="T39">// (1)</text:span></text:p>
      <text:p text:style-name="P49"><text:span text:style-name="T39">207 <text:s/>| <text:s text:c="3"/></text:span><text:span text:style-name="T34"><text:s text:c="4"/>}</text:span></text:p>
      <text:p text:style-name="P51"><text:span text:style-name="T39">208 <text:s/>| <text:s text:c="3"/></text:span><text:s text:c="4"/></text:p>
      <text:p text:style-name="P49"><text:span text:style-name="T39">209 <text:s/>| <text:s text:c="3"/></text:span><text:span text:style-name="T34"><text:s text:c="4"/></text:span><text:span text:style-name="T35">return</text:span><text:span text:style-name="T34"> 0; <text:s text:c="51"/></text:span><text:span text:style-name="T39">// (1)</text:span></text:p>
      <text:p text:style-name="P51"><text:span text:style-name="T39">210 <text:s/>| <text:s text:c="3"/></text:span>}</text:p>
      <text:p text:style-name="P50">211 <text:s/>| <text:s text:c="3"/>// Итоговая сложность main до вызова функций: </text:p>
      <text:p text:style-name="P50">212 <text:s/>| <text:s text:c="3"/>// 3 (инициализация) + (20m + 3) (цикл) + 1 (if) + 2 (filename) + 15 (ветка if) + 1 (return) = 20m + 25</text:p>
      <text:p text:style-name="P50">213 <text:s/>| <text:s text:c="3"/></text:p>
      <text:p text:style-name="P50">214 <text:s/>| <text:s text:c="3"/>// ОБЩАЯ СЛОЖНОСТЬ ПРОГРАММЫ (Худший случай - динамический массив):</text:p>
      <text:p text:style-name="P50">215 <text:s/>| <text:s text:c="3"/>// T(m, n) = T_main + T_countNums + T_readFromFile + 2 * T_printArray + T_bucketSort</text:p>
      <text:p text:style-name="P50">216 <text:s/>| <text:s text:c="3"/>// T(m, n) = (20m + 25) + (5n + 9) + (8n + 12) + 2*(5n + 5) + (64n + 20 + O(n^2))</text:p>
      <text:p text:style-name="P50">217 <text:s/>| <text:s text:c="3"/>// T(m, n) = 20m + 87n + 76 + O(n^2)</text:p>
      <text:p text:style-name="P50">218 <text:s/>| <text:s text:c="3"/>// Асимптотическая сложность: O(m + n^2)</text:p>
      <text:p text:style-name="P52"/>
      <text:h text:style-name="P53" text:outline-level="1"><text:bookmark-start text:name="__RefHeading___Toc143_2058273410 Copy 1 Copy 2 Copy 6"/><text:soft-page-break/><text:span text:style-name="T27">З</text:span><text:span text:style-name="T7">АКЛЮЧЕНИЕ</text:span><text:bookmark-end text:name="__RefHeading___Toc143_2058273410 Copy 1 Copy 2 Copy 6"/></text:h>
      <text:p text:style-name="P54"><text:span text:style-name="T42">В ходе выполнения лабораторной работы была разработана программа на языке С</text:span><text:span text:style-name="T43"> </text:span><text:span text:style-name="T42">для сортировки последовательности чисел </text:span><text:span text:style-name="T43">с помощью алгоритма распределения</text:span><text:span text:style-name="T44"> (карманная сортировка)</text:span><text:span text:style-name="T42">. Для</text:span><text:span text:style-name="T43"> </text:span><text:span text:style-name="T42">решения задачи также был реализован алгоритм </text:span><text:span text:style-name="T43">сортировки вставками</text:span><text:span text:style-name="T42">. </text:span>Числа считывались из файла и сохранялись в статическом или динамическом массиве по выбору пользователя<text:span text:style-name="T44">.</text:span></text:p>
      <text:p text:style-name="P55">Программа разрабатывалась в среде <text:span text:style-name="T43">VS Code</text:span><text:span text:style-name="T45">, компилировалась с</text:span> помощью <text:span text:style-name="T43">gcc </text:span><text:span text:style-name="T45">и запускалась </text:span><text:span text:style-name="T46">в ОС</text:span><text:span text:style-name="T43"> Arch Linux</text:span>.</text:p>
      <text:p text:style-name="P55">В конце работы была оценена сложность алгоритма путём подсчёта всех<text:span text:style-name="T43"> </text:span>элементарных операций, выполняющихся в программе.<text:span text:style-name="T47"> </text:span>Тестирование <text:span text:style-name="T46">алгоритма </text:span>показало <text:span text:style-name="T48">его</text:span> корректную работу при различных входных<text:span text:style-name="T43"> </text:span>данных.</text:p>
      <text:p text:style-name="P55">Выполнение работы позволило закрепить навыки разработки алгоритмов<text:span text:style-name="T43"> </text:span>сортировки, а также углубить знания в области структур данных.<text:bookmark-start text:name="__RefHeading___Toc143_2058273410 Copy 1 Copy 2 Copy 5"/></text:p>
      <text:p text:style-name="P56"><text:bookmark-end text:name="__RefHeading___Toc143_2058273410 Copy 1 Copy 2 Copy 5"/></text:p>
      <text:h text:style-name="P57" text:outline-level="1"><text:bookmark-start text:name="__RefHeading___Toc143_2058273410 Copy 1 Copy 2 Copy 7"/><draw:frame draw:style-name="fr5" draw:name="Image4" text:anchor-type="char" svg:x="3.478cm" svg:y="0.766cm" svg:width="11.053cm" svg:height="22.137cm" draw:z-index="7"><draw:image xlink:href="Pictures/10000001000003EB000007D9DFDA09CB.png" xlink:type="simple" xlink:show="embed" xlink:actuate="onLoad" draw:mime-type="image/png"/></draw:frame><text:span text:style-name="T27">П</text:span><text:span text:style-name="T7">РИЛОЖЕНИЕ А</text:span><text:bookmark-end text:name="__RefHeading___Toc143_2058273410 Copy 1 Copy 2 Copy 7"/></text:h>
      <text:h text:style-name="P58" text:outline-level="1"/>
      <text:h text:style-name="P59" text:outline-level="1"><text:bookmark-start text:name="__RefHeading___Toc143_2058273410 Copy 1 Copy 1"/><draw:frame draw:style-name="fr6" draw:name="Image5" text:anchor-type="char" svg:y="0.004cm" svg:width="14.882cm" svg:height="22.916cm" draw:z-index="8"><draw:image xlink:href="Pictures/10000001000005A8000008B691D0C1C2.png" xlink:type="simple" xlink:show="embed" xlink:actuate="onLoad" draw:mime-type="image/png"/></draw:frame><text:bookmark-end text:name="__RefHeading___Toc143_2058273410 Copy 1 Copy 1"/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 style:writing-mode-automatic="false"/>
      <style:text-properties style:font-name="Liberation Mono" fo:font-family="'Liberation Mono'" style:font-family-generic="modern" style:font-pitch="fixed" fo:font-size="8pt" officeooo:rsid="0096f977" style:font-size-asian="8pt" style:font-size-complex="8pt"/>
    </style:style>
    <style:style style:name="code" style:family="paragraph" style:parent-style-name="Code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14</text:page-number><text:bookmark-end text:name="PageNumWizard_FOOTER_Landscape19"/></text:p>
      </style:footer>
    </style:master-page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4-25T01:54:35.320793746</dc:date>
    <meta:editing-duration>P1DT15H2M24S</meta:editing-duration>
    <meta:editing-cycles>124</meta:editing-cycles>
    <meta:generator>LibreOffice/26.2.2.2$Linux_X86_64 LibreOffice_project/620$Build-2</meta:generator>
    <meta:print-date>2026-04-11T12:48:32.343344354</meta:print-date>
    <meta:printed-by>PDF files</meta:printed-by>
    <meta:document-statistic meta:table-count="1" meta:image-count="5" meta:object-count="0" meta:page-count="14" meta:paragraph-count="344" meta:word-count="2567" meta:character-count="18873" meta:non-whitespace-character-count="11162"/>
  </office:meta>
</office:document-meta>
</file>