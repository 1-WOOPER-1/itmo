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1000006B672ABB0BF.png" manifest:media-type="image/png"/>
  <manifest:file-entry manifest:full-path="Pictures/100000010000076C000001CFB0B8F4B3.png" manifest:media-type="image/png"/>
  <manifest:file-entry manifest:full-path="Pictures/10000001000000A40000001C9B22A815.png" manifest:media-type="image/png"/>
  <manifest:file-entry manifest:full-path="Pictures/10000001000003A6000006B8B4AFBB5F.png" manifest:media-type="image/png"/>
  <manifest:file-entry manifest:full-path="Pictures/10000001000002BE0000004EAC698A69.png" manifest:media-type="image/png"/>
  <manifest:file-entry manifest:full-path="Pictures/10008A7A000010F0000002EA26FF903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91cm" table:align="margins"/>
    </style:style>
    <style:style style:name="Table1.A" style:family="table-column">
      <style:table-column-properties style:column-width="4.147cm" style:rel-column-width="16383*"/>
    </style:style>
    <style:style style:name="Table1.D" style:family="table-column">
      <style:table-column-properties style:column-width="4.149cm" style:rel-column-width="16386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ab83db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1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f758d" officeooo:paragraph-rsid="000ca6c1"/>
    </style:style>
    <style:style style:name="P13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4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5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0cm" fo:margin-right="0.9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ca6c1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1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9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21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2680d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0f2314" officeooo:paragraph-rsid="002680d2"/>
    </style:style>
    <style:style style:name="P2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paragraph-rsid="004b6835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ac9f4c" officeooo:paragraph-rsid="00ac9f4c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19963"/>
    </style:style>
    <style:style style:name="P28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19963" officeooo:paragraph-rsid="00919963"/>
    </style:style>
    <style:style style:name="P29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paragraph-rsid="00935d7a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935d7a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935d7a" officeooo:paragraph-rsid="00935d7a"/>
    </style:style>
    <style:style style:name="P33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28636d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28636d" officeooo:paragraph-rsid="0028636d"/>
    </style:style>
    <style:style style:name="P35" style:family="paragraph" style:parent-style-name="Таблица">
      <style:paragraph-properties fo:keep-with-next="always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8636d" officeooo:paragraph-rsid="0028636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ae9cd6" officeooo:paragraph-rsid="00ae9cd6"/>
    </style:style>
    <style:style style:name="P38" style:family="paragraph" style:parent-style-name="Table_20_Contents">
      <style:paragraph-properties fo:text-align="center" style:justify-single-word="false"/>
      <style:text-properties officeooo:rsid="00b25be6" officeooo:paragraph-rsid="00b28c20"/>
    </style:style>
    <style:style style:name="P39" style:family="paragraph" style:parent-style-name="Table_20_Contents">
      <style:paragraph-properties fo:text-align="center" style:justify-single-word="false"/>
      <style:text-properties officeooo:rsid="0093bfe0" officeooo:paragraph-rsid="0093bfe0"/>
    </style:style>
    <style:style style:name="P40" style:family="paragraph" style:parent-style-name="Table_20_Contents">
      <style:paragraph-properties fo:text-align="center" style:justify-single-word="false"/>
      <style:text-properties officeooo:rsid="00b091d4" officeooo:paragraph-rsid="00b091d4"/>
    </style:style>
    <style:style style:name="P41" style:family="paragraph" style:parent-style-name="Table_20_Contents">
      <style:paragraph-properties fo:text-align="center" style:justify-single-word="false"/>
      <style:text-properties officeooo:rsid="00b25be6" officeooo:paragraph-rsid="00b25be6"/>
    </style:style>
    <style:style style:name="P42" style:family="paragraph" style:parent-style-name="Table_20_Contents">
      <style:paragraph-properties fo:text-align="center" style:justify-single-word="false"/>
      <style:text-properties officeooo:rsid="00b25be6" officeooo:paragraph-rsid="00c70b59"/>
    </style:style>
    <style:style style:name="P43" style:family="paragraph" style:parent-style-name="Table_20_Contents">
      <style:paragraph-properties fo:text-align="center" style:justify-single-word="false"/>
      <style:text-properties officeooo:rsid="00b28c20" officeooo:paragraph-rsid="00b28c20"/>
    </style:style>
    <style:style style:name="P44" style:family="paragraph" style:parent-style-name="Table_20_Contents">
      <style:paragraph-properties fo:text-align="center" style:justify-single-word="false"/>
      <style:text-properties officeooo:rsid="00b29ed1" officeooo:paragraph-rsid="00b29ed1"/>
    </style:style>
    <style:style style:name="P45" style:family="paragraph" style:parent-style-name="Table_20_Contents">
      <style:paragraph-properties fo:text-align="center" style:justify-single-word="false"/>
      <style:text-properties officeooo:rsid="00b3fa66" officeooo:paragraph-rsid="00b3fa66"/>
    </style:style>
    <style:style style:name="P46" style:family="paragraph" style:parent-style-name="Table_20_Contents">
      <style:paragraph-properties fo:text-align="center" style:justify-single-word="false"/>
      <style:text-properties officeooo:rsid="00a722a7" officeooo:paragraph-rsid="00a722a7"/>
    </style:style>
    <style:style style:name="P47" style:family="paragraph" style:parent-style-name="Table_20_Contents">
      <style:paragraph-properties fo:text-align="center" style:justify-single-word="false"/>
      <style:text-properties officeooo:rsid="0093cfa2" officeooo:paragraph-rsid="0093cfa2"/>
    </style:style>
    <style:style style:name="P48" style:family="paragraph" style:parent-style-name="Table_20_Contents">
      <style:paragraph-properties fo:text-align="center" style:justify-single-word="false"/>
      <style:text-properties officeooo:rsid="00b6a1f3" officeooo:paragraph-rsid="00b6a1f3"/>
    </style:style>
    <style:style style:name="P49" style:family="paragraph" style:parent-style-name="Table_20_Contents">
      <style:paragraph-properties fo:text-align="center" style:justify-single-word="false"/>
      <style:text-properties officeooo:rsid="0093bfe0" officeooo:paragraph-rsid="00b6a1f3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28636d"/>
    </style:style>
    <style:style style:name="P5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a877b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a877b" officeooo:paragraph-rsid="003a877b"/>
    </style:style>
    <style:style style:name="P53" style:family="paragraph" style:parent-style-name="Text_20_body" style:list-style-name="" style:master-page-name="">
      <style:paragraph-properties fo:margin-top="0cm" fo:margin-bottom="0.25cm" style:contextual-spacing="false" fo:line-height="150%" fo:text-align="center" style:justify-single-word="false" style:page-number="auto" fo:break-before="auto" fo:break-after="auto"/>
      <style:text-properties officeooo:rsid="002680d2" officeooo:paragraph-rsid="003a877b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3a877b"/>
    </style:style>
    <style:style style:name="P55" style:family="paragraph" style:parent-style-name="Рисунок">
      <style:paragraph-properties fo:text-align="center" style:justify-single-word="false"/>
    </style:style>
    <style:style style:name="P56" style:family="paragraph" style:parent-style-name="Рисунок">
      <style:paragraph-properties fo:text-align="center" style:justify-single-word="false"/>
      <style:text-properties officeooo:paragraph-rsid="00c3ec24"/>
    </style:style>
    <style:style style:name="P57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c4608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96f977" officeooo:paragraph-rsid="0096f977"/>
    </style:style>
    <style:style style:name="P59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0" style:family="paragraph" style:parent-style-name="Code">
      <style:paragraph-properties ch2_options="{'Style': 'vs', 'Language': 'Makefile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000" loext:opacity="100%" fo:font-size="8pt" fo:language="zxx" fo:country="none" fo:font-style="normal" style:text-underline-style="none" fo:font-weight="normal" fo:background-color="transparen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96f977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3c4608"/>
    </style:style>
    <style:style style:name="P63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style:use-window-font-color="true" loext:opacity="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64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8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65" style:family="paragraph" style:parent-style-name="code">
      <style:paragraph-properties ch2_options="{'Style': 'vs', 'Language': 'C', 'UseCharStyles': 0, 'LineNumberRatio': 100, 'LineNumberStart': 1, 'MasterCharStyle': '', 'ShowLineNumbers': 1, 'ColourizeBackground': 0, 'LineNumberSeparator': '  |    ', 'LineNumberPaddingSymbol': '', 'StoreOptionsWithSnippet': 1}" fo:line-height="100%" fo:text-align="left" style:justify-single-word="false" fo:text-indent="0cm" style:auto-text-indent="false"/>
      <style:text-properties fo:color="#000000" loext:opacity="100%" style:font-name="Liberation Mono" fo:font-size="8pt" fo:language="zxx" fo:country="none" fo:font-style="normal" style:text-underline-style="none" fo:font-weight="normal" officeooo:rsid="003c4608" fo:background-color="transparent" style:font-size-asian="8pt" style:font-size-complex="8p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fo:color="#008000" loext:opacity="100%" fo:font-style="normal" style:text-underline-style="none" fo:font-weight="normal" officeooo:rsid="003c4608" officeooo:paragraph-rsid="003c4608"/>
    </style:style>
    <style:style style:name="P67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3ecf82" officeooo:paragraph-rsid="003ecf82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paragraph-rsid="0044e4e9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c001ea"/>
    </style:style>
    <style:style style:name="P70" style:family="paragraph" style:parent-style-name="Text_20_body" style:list-style-name="" style:master-page-name="Landscape">
      <style:paragraph-properties fo:margin-top="0cm" fo:margin-bottom="0.25cm" style:contextual-spacing="false" fo:line-height="150%" fo:text-align="center" style:justify-single-word="false" style:page-number="auto"/>
      <style:text-properties officeooo:rsid="003ecf82" officeooo:paragraph-rsid="003ecf82"/>
    </style:style>
    <style:style style:name="P7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3ecf82" officeooo:paragraph-rsid="003ecf82" style:font-weight-asian="bold" style:font-weight-complex="bold"/>
    </style:style>
    <style:style style:name="P72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3ecf82" officeooo:paragraph-rsid="003ecf82" style:font-weight-asian="bold" style:font-weight-complex="bold"/>
    </style:style>
    <style:style style:name="P73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28636d" officeooo:paragraph-rsid="003ecf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58d"/>
    </style:style>
    <style:style style:name="T3" style:family="text">
      <style:text-properties officeooo:rsid="00394161"/>
    </style:style>
    <style:style style:name="T4" style:family="text">
      <style:text-properties officeooo:rsid="000ca6c1"/>
    </style:style>
    <style:style style:name="T5" style:family="text">
      <style:text-properties officeooo:rsid="00ab83db"/>
    </style:style>
    <style:style style:name="T6" style:family="text">
      <style:text-properties officeooo:rsid="00910ddb"/>
    </style:style>
    <style:style style:name="T7" style:family="text">
      <style:text-properties officeooo:rsid="0016960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919963"/>
    </style:style>
    <style:style style:name="T10" style:family="text">
      <style:text-properties officeooo:rsid="00a1ba0b"/>
    </style:style>
    <style:style style:name="T11" style:family="text">
      <style:text-properties officeooo:rsid="00be26de"/>
    </style:style>
    <style:style style:name="T12" style:family="text">
      <style:text-properties fo:font-weight="bold" officeooo:rsid="000f2314" style:font-weight-asian="bold" style:font-weight-complex="bold"/>
    </style:style>
    <style:style style:name="T13" style:family="text">
      <style:text-properties fo:font-weight="bold" officeooo:rsid="004c1b85" style:font-weight-asian="bold" style:font-weight-complex="bold"/>
    </style:style>
    <style:style style:name="T14" style:family="text">
      <style:text-properties fo:font-weight="bold" officeooo:rsid="00910ddb" style:font-weight-asian="bold" style:font-weight-complex="bold"/>
    </style:style>
    <style:style style:name="T15" style:family="text">
      <style:text-properties officeooo:rsid="00ac9f4c"/>
    </style:style>
    <style:style style:name="T16" style:family="text">
      <style:text-properties officeooo:rsid="00935d7a"/>
    </style:style>
    <style:style style:name="T17" style:family="text">
      <style:text-properties officeooo:rsid="009cce28"/>
    </style:style>
    <style:style style:name="T18" style:family="text">
      <style:text-properties officeooo:rsid="00c273ea"/>
    </style:style>
    <style:style style:name="T19" style:family="text">
      <style:text-properties fo:font-weight="bold" officeooo:rsid="004b6835" style:font-weight-asian="bold" style:font-weight-complex="bold"/>
    </style:style>
    <style:style style:name="T20" style:family="text">
      <style:text-properties fo:font-weight="bold" officeooo:rsid="0028636d" style:font-weight-asian="bold" style:font-weight-complex="bold"/>
    </style:style>
    <style:style style:name="T21" style:family="text">
      <style:text-properties officeooo:rsid="0079b2f7"/>
    </style:style>
    <style:style style:name="T22" style:family="text">
      <style:text-properties officeooo:rsid="00b28c20"/>
    </style:style>
    <style:style style:name="T23" style:family="text">
      <style:text-properties officeooo:rsid="00c70b59"/>
    </style:style>
    <style:style style:name="T24" style:family="text">
      <style:text-properties officeooo:rsid="00a4dcf4"/>
    </style:style>
    <style:style style:name="T25" style:family="text">
      <style:text-properties officeooo:rsid="00a89256"/>
    </style:style>
    <style:style style:name="T26" style:family="text">
      <style:text-properties officeooo:rsid="00c9ebee"/>
    </style:style>
    <style:style style:name="T27" style:family="text">
      <style:text-properties style:text-position="super 58%" officeooo:rsid="00c9ebee"/>
    </style:style>
    <style:style style:name="T28" style:family="text">
      <style:text-properties style:text-position="0% 100%" officeooo:rsid="00c9ebee"/>
    </style:style>
    <style:style style:name="T29" style:family="text">
      <style:text-properties officeooo:rsid="00b091d4"/>
    </style:style>
    <style:style style:name="T30" style:family="text">
      <style:text-properties officeooo:rsid="009f3a8d"/>
    </style:style>
    <style:style style:name="T31" style:family="text">
      <style:text-properties officeooo:rsid="00b81e3d"/>
    </style:style>
    <style:style style:name="T32" style:family="text">
      <style:text-properties fo:font-weight="bold" officeooo:rsid="003a877b" style:font-weight-asian="bold" style:font-weight-complex="bold"/>
    </style:style>
    <style:style style:name="T33" style:family="text">
      <style:text-properties fo:font-weight="bold" officeooo:rsid="00a1ba0b" style:font-weight-asian="bold" style:font-weight-complex="bold"/>
    </style:style>
    <style:style style:name="T34" style:family="text">
      <style:text-properties officeooo:rsid="008d1351"/>
    </style:style>
    <style:style style:name="T35" style:family="text">
      <style:text-properties officeooo:rsid="00c3ec24"/>
    </style:style>
    <style:style style:name="T36" style:family="text">
      <style:text-properties fo:font-weight="bold" officeooo:rsid="003c4608" style:font-weight-asian="bold" style:font-weight-complex="bold"/>
    </style:style>
    <style:style style:name="T37" style:family="text">
      <style:text-properties officeooo:rsid="0098e618"/>
    </style:style>
    <style:style style:name="T38" style:family="text">
      <style:text-properties fo:color="#008000" loext:opacity="100%" fo:font-size="8pt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officeooo:rsid="00b98927"/>
    </style:style>
    <style:style style:name="T41" style:family="text">
      <style:text-properties fo:color="#0000ff" loext:opacity="100%"/>
    </style:style>
    <style:style style:name="T42" style:family="text">
      <style:text-properties officeooo:rsid="00bb1647"/>
    </style:style>
    <style:style style:name="T43" style:family="text">
      <style:text-properties fo:color="#008000" loext:opacity="100%"/>
    </style:style>
    <style:style style:name="T44" style:family="text">
      <style:text-properties fo:color="#2b91af" loext:opacity="100%"/>
    </style:style>
    <style:style style:name="T45" style:family="text">
      <style:text-properties fo:color="#a31515" loext:opacity="100%"/>
    </style:style>
    <style:style style:name="T46" style:family="text">
      <style:text-properties officeooo:rsid="0028636d"/>
    </style:style>
    <style:style style:name="T47" style:family="text">
      <style:text-properties officeooo:rsid="0099743d"/>
    </style:style>
    <style:style style:name="T48" style:family="text">
      <style:text-properties officeooo:rsid="00a61a93"/>
    </style:style>
    <style:style style:name="T49" style:family="text">
      <style:text-properties officeooo:rsid="00c1f7ff"/>
    </style:style>
    <style:style style:name="T50" style:family="text">
      <style:text-properties officeooo:rsid="00b2fb3a"/>
    </style:style>
    <style:style style:name="T51" style:family="text">
      <style:text-properties officeooo:rsid="00b37be3"/>
    </style:style>
    <style:style style:name="T52" style:family="text">
      <style:text-properties officeooo:rsid="009ba42a"/>
    </style:style>
    <style:style style:name="T53" style:family="text">
      <style:text-properties officeooo:rsid="00b571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19cm, 0cm, 3.80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5"/>
      <text:p text:style-name="P5"/>
      <text:p text:style-name="P6">Факультет безопасности информационных технологий</text:p>
      <text:p text:style-name="P6"/>
      <text:p text:style-name="P6">Дисциплина:</text:p>
      <text:p text:style-name="P6">«<text:span text:style-name="T2">Алгоритмы и структуры данных</text:span>»</text:p>
      <text:p text:style-name="P6"/>
      <text:p text:style-name="P6"/>
      <text:p text:style-name="P6">ОТЧ<text:span text:style-name="T3">Ё</text:span>Т ПО ЛАБОРАТОРНОЙ РАБОТЕ <text:span text:style-name="T4">№</text:span><text:span text:style-name="T5">2</text:span></text:p>
      <text:p text:style-name="P7">«<text:span text:style-name="T6">Сортировка распределением (карманная сортировка)</text:span></text:p>
      <text:p text:style-name="P7"><text:span text:style-name="T5">в кольцевой очереди на базе связного списка</text:span>»</text:p>
      <text:p text:style-name="P6"/>
      <text:p text:style-name="P8">Выполнил:</text:p>
      <text:p text:style-name="P8">Пахомов Владимир Юрьевич, студент группы N3250</text:p>
      <text:p text:style-name="P8"/>
      <text:p text:style-name="P9"/>
      <text:p text:style-name="P10">________________</text:p>
      <text:p text:style-name="P11">(подпись)</text:p>
      <text:p text:style-name="P8"/>
      <text:p text:style-name="P8">Проверил:</text:p>
      <text:p text:style-name="P12">Ерофеев Сергей Анатольевич</text:p>
      <text:p text:style-name="P13"/>
      <text:p text:style-name="P13"/>
      <text:p text:style-name="P14">_____________________</text:p>
      <text:p text:style-name="P15">(отметка о выполнении)</text:p>
      <text:p text:style-name="P14"/>
      <text:p text:style-name="P14"/>
      <text:p text:style-name="P14">________________</text:p>
      <text:p text:style-name="P16">(подпись)</text:p>
      <text:p text:style-name="P17"/>
      <text:p text:style-name="P17"/>
      <text:p text:style-name="P17"/>
      <text:p text:style-name="P18">Санкт-Петербург</text:p>
      <text:p text:style-name="P18">202<text:span text:style-name="T7">6</text:span>.</text:p>
      <text:h text:style-name="P19" text:outline-level="1"><text:bookmark-start text:name="__RefHeading___Toc80_2058273410"/>СОДЕРЖАНИЕ<text:bookmark-end text:name="__RefHeading___Toc80_2058273410"/></text:h>
      <text:p text:style-name="P20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80_2058273410" office:name="СОДЕРЖАНИЕ" text:style-name="Index_20_Link" text:visited-style-name="Index_20_Link">СОДЕРЖАНИЕ<text:tab/>2</text:a></text:p>
          <text:p text:style-name="P21"><text:a xlink:type="simple" xlink:href="#__RefHeading___Toc82_2058273410" office:name="ВВЕДЕНИЕ" text:style-name="Index_20_Link" text:visited-style-name="Index_20_Link">ВВЕДЕНИЕ<text:tab/>3</text:a></text:p>
          <text:p text:style-name="P21"><text:a xlink:type="simple" xlink:href="#__RefHeading___Toc143_2058273410%20Copy%201%20Copy%203" office:name="1. АЛГОРИТМ СОРТИРОВКИ" text:style-name="Index_20_Link" text:visited-style-name="Index_20_Link">1. АЛГОРИТМ СОРТИРОВКИ<text:tab/>4</text:a></text:p>
          <text:p text:style-name="P21"><text:a xlink:type="simple" xlink:href="#__RefHeading___Toc143_2058273410%20Copy%201" office:name="2. ОПИСАНИЕ ИСПОЛЬЗУЕМЫХ ПЕРЕМЕННЫХ" text:style-name="Index_20_Link" text:visited-style-name="Index_20_Link">2. ОПИСАНИЕ ИСПОЛЬЗУЕМЫХ ПЕРЕМЕННЫХ<text:tab/>5</text:a></text:p>
          <text:p text:style-name="P21"><text:a xlink:type="simple" xlink:href="#__RefHeading___Toc143_2058273410%20Copy%201%20Copy%202" office:name="3. БЛОК-СХЕМА АЛГОРИТМА" text:style-name="Index_20_Link" text:visited-style-name="Index_20_Link">3. БЛОК-СХЕМА АЛГОРИТМА<text:tab/>7</text:a></text:p>
          <text:p text:style-name="P21"><text:a xlink:type="simple" xlink:href="#__RefHeading___Toc143_2058273410%20Copy%201%20Copy%202%20Copy%201" office:name="4. ТЕСТИРОВАНИЕ АЛГОРИТМА" text:style-name="Index_20_Link" text:visited-style-name="Index_20_Link">4. ТЕСТИРОВАНИЕ АЛГОРИТМА<text:tab/>7</text:a></text:p>
          <text:p text:style-name="P21"><text:a xlink:type="simple" xlink:href="#__RefHeading___Toc143_2058273410%20Copy%201%20Copy%202%20Copy%202" office:name="5. ИСХОДНЫЙ КОД АЛГОРИТМА" text:style-name="Index_20_Link" text:visited-style-name="Index_20_Link">5. ИСХОДНЫЙ КОД АЛГОРИТМА<text:tab/>8</text:a></text:p>
          <text:p text:style-name="P21"><text:a xlink:type="simple" xlink:href="#__RefHeading___Toc143_2058273410%20Copy%201%20Copy%202%20Copy%206" office:name="ЗАКЛЮЧЕНИЕ" text:style-name="Index_20_Link" text:visited-style-name="Index_20_Link">ЗАКЛЮЧЕНИЕ<text:tab/>12</text:a></text:p>
          <text:p text:style-name="P21"><text:a xlink:type="simple" xlink:href="#__RefHeading___Toc143_2058273410%20Copy%201%20Copy%202%20Copy%207" office:name="ПРИЛОЖЕНИЕ А" text:style-name="Index_20_Link" text:visited-style-name="Index_20_Link">ПРИЛОЖЕНИЕ А<text:tab/>13</text:a></text:p>
        </text:index-body>
      </text:table-of-content>
      <text:p text:style-name="P20"/>
      <text:h text:style-name="P22" text:outline-level="1"><text:bookmark-start text:name="__RefHeading___Toc82_2058273410"/>ВВЕДЕНИЕ<text:bookmark-end text:name="__RefHeading___Toc82_2058273410"/></text:h>
      <text:p text:style-name="P23"><text:span text:style-name="T8">Цель работы</text:span> — разработать программу сортировки <text:span text:style-name="T6">распределением (карманной сортировки) </text:span>последовательности вещественных чисел,<text:span text:style-name="T6"> </text:span>которая <text:span text:style-name="T9">будет </text:span>хранит<text:span text:style-name="T10">ь</text:span>ся в <text:span text:style-name="T5">кольцевой очереди, построенной на базе связного списка</text:span>, определить сложность <text:span text:style-name="T11">алгоритма</text:span> путём подсчёта количества<text:span text:style-name="T6"> </text:span>элементарных операций, выполняемых в программе.</text:p>
      <text:p text:style-name="P24"/>
      <text:h text:style-name="P25" text:outline-level="1"><text:bookmark-start text:name="__RefHeading___Toc143_2058273410 Copy 1 Copy 3"/><text:span text:style-name="T12">1. </text:span><text:span text:style-name="T13">АЛГОРИТМ </text:span><text:span text:style-name="T14">СОРТИРОВКИ</text:span><text:bookmark-end text:name="__RefHeading___Toc143_2058273410 Copy 1 Copy 3"/></text:h>
      <text:p text:style-name="P26">Программа получает на вход название файла, в котором хранятся исходные числа для сортировки. Числа читаются из файла и записываются в кольцевую очередь.</text:p>
      <text:p text:style-name="P27">Далее происходит сортировка <text:span text:style-name="T15">очереди</text:span> по следующему алгоритму:</text:p>
      <text:list text:style-name="L1">
        <text:list-item>
          <text:p text:style-name="P28">Создаются карманы<text:span text:style-name="T15"> (тоже отдельные очереди)</text:span>, количество карманов равно количеству элементов в <text:span text:style-name="T15">очереди</text:span>;</text:p>
        </text:list-item>
        <text:list-item>
          <text:p text:style-name="P29"><text:span text:style-name="T9">Далее элементы распределяются по карманам. </text:span><text:span text:style-name="T16">Для начала определяются максимальный (max) и минимальный (min) элементы </text:span><text:span text:style-name="T15">очереди</text:span><text:span text:style-name="T16">. </text:span><text:span text:style-name="T9">Индекс нужного кармана для каждого элемента определяется по формуле:</text:span><text:span text:style-name="T16"> </text:span><draw:frame text:anchor-type="as-char" svg:y="-0.58cm" draw:z-index="1" draw:name="Shape1" draw:style-name="gr1" draw:text-style-name="P30" svg:width="5.204cm" svg:height="0.893cm"><draw:image xlink:href="Pictures/10008A7A000010F0000002EA26FF9035.svg" xlink:type="simple" xlink:show="embed" xlink:actuate="onLoad" draw:mime-type="image/svg+xml"><text:p/></draw:image><draw:image xlink:href="Pictures/10000001000000A40000001C9B22A815.png" xlink:type="simple" xlink:show="embed" xlink:actuate="onLoad" draw:mime-type="image/png"/><svg:title>TexMaths</svg:title><svg:desc>12§display§\frac{(x - min) \cdot (len(queue) - 1)}{max- min}§svg§600§FALSE§</svg:desc></draw:frame><text:span text:style-name="T15">.</text:span></text:p>
        </text:list-item>
        <text:list-item>
          <text:p text:style-name="P31">Каждый заполненный карман сортируется с помощью сортировки <text:span text:style-name="T17">в</text:span>ставками;</text:p>
        </text:list-item>
        <text:list-item>
          <text:p text:style-name="P31">Содержимое карманов последовательно <text:span text:style-name="T15">сливается в одну кольцевую очередь</text:span>.</text:p>
        </text:list-item>
      </text:list>
      <text:p text:style-name="P32"><text:span text:style-name="T18">В результате </text:span>получаем отсортиров<text:span text:style-name="T15">анную очередь </text:span>и <text:span text:style-name="T18">печатаем</text:span> <text:span text:style-name="T15">ее </text:span>в стандартный поток вывода.</text:p>
      <text:h text:style-name="P33" text:outline-level="1"><text:bookmark-start text:name="__RefHeading___Toc143_2058273410 Copy 1"/><text:span text:style-name="T19">2</text:span><text:span text:style-name="T12">. </text:span><text:span text:style-name="T20">ОПИСАНИЕ ИСПОЛЬЗУЕМЫХ ПЕРЕМЕННЫХ</text:span><text:bookmark-end text:name="__RefHeading___Toc143_2058273410 Copy 1"/></text:h>
      <text:p text:style-name="P34">Ниже представлена таблица с описанием использованных переменных<text:span text:style-name="T21">.</text:span></text:p>
      <text:p text:style-name="P35">Таблица <text:sequence text:ref-name="refТаблица0" text:name="Таблица" text:formula="ooow:Таблица+1" style:num-format="1">1</text:sequence><text:span text:style-name="T11"><text:s/></text:span>— Используемые переменные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6">Название</text:p>
          </table:table-cell>
          <table:table-cell table:style-name="Table1.A1" office:value-type="string">
            <text:p text:style-name="P36">Тип</text:p>
          </table:table-cell>
          <table:table-cell table:style-name="Table1.A1" office:value-type="string">
            <text:p text:style-name="P36">Границы типа</text:p>
          </table:table-cell>
          <table:table-cell table:style-name="Table1.D1" office:value-type="string">
            <text:p text:style-name="P36">Назначение</text:p>
          </table:table-cell>
        </table:table-row>
        <table:table-row>
          <table:table-cell table:style-name="Table1.A2" office:value-type="string">
            <text:p text:style-name="P37">value</text:p>
          </table:table-cell>
          <table:table-cell table:style-name="Table1.A2" office:value-type="string">
            <text:p text:style-name="P37">float</text:p>
          </table:table-cell>
          <table:table-cell table:style-name="Table1.A2" office:value-type="string">
            <text:p text:style-name="P38"><text:span text:style-name="T22">от </text:span><text:span text:style-name="T23">-</text:span>3,4E<text:span text:style-name="T23">+</text:span>38 до 3,4E+38</text:p>
          </table:table-cell>
          <table:table-cell table:style-name="Table1.D2" office:value-type="string">
            <text:p text:style-name="P37">Значение узла очереди</text:p>
          </table:table-cell>
        </table:table-row>
        <table:table-row>
          <table:table-cell table:style-name="Table1.A2" office:value-type="string">
            <text:p text:style-name="P37">next</text:p>
          </table:table-cell>
          <table:table-cell table:style-name="Table1.A2" office:value-type="string">
            <text:p text:style-name="P37">struct Node*</text:p>
          </table:table-cell>
          <table:table-cell table:style-name="Table1.A2" office:value-type="string">
            <text:p text:style-name="P37">-</text:p>
          </table:table-cell>
          <table:table-cell table:style-name="Table1.D2" office:value-type="string">
            <text:p text:style-name="P37">Указатель на следующий узел очереди</text:p>
          </table:table-cell>
        </table:table-row>
        <table:table-row>
          <table:table-cell table:style-name="Table1.A2" office:value-type="string">
            <text:p text:style-name="P37">head</text:p>
          </table:table-cell>
          <table:table-cell table:style-name="Table1.A2" office:value-type="string">
            <text:p text:style-name="P37">struct Node*</text:p>
          </table:table-cell>
          <table:table-cell table:style-name="Table1.A2" office:value-type="string">
            <text:p text:style-name="P37">-</text:p>
          </table:table-cell>
          <table:table-cell table:style-name="Table1.D2" office:value-type="string">
            <text:p text:style-name="P37">Указатель на начальный узел очереди</text:p>
          </table:table-cell>
        </table:table-row>
        <table:table-row>
          <table:table-cell table:style-name="Table1.A2" office:value-type="string">
            <text:p text:style-name="P37">tail</text:p>
          </table:table-cell>
          <table:table-cell table:style-name="Table1.A2" office:value-type="string">
            <text:p text:style-name="P37">struct Node*</text:p>
          </table:table-cell>
          <table:table-cell table:style-name="Table1.A2" office:value-type="string">
            <text:p text:style-name="P37">-</text:p>
          </table:table-cell>
          <table:table-cell table:style-name="Table1.D2" office:value-type="string">
            <text:p text:style-name="P37">Указатель на конечный узел очереди</text:p>
          </table:table-cell>
        </table:table-row>
        <table:table-row>
          <table:table-cell table:style-name="Table1.A2" office:value-type="string">
            <text:p text:style-name="P39">size</text:p>
          </table:table-cell>
          <table:table-cell table:style-name="Table1.A2" office:value-type="string">
            <text:p text:style-name="P40">size_t</text:p>
          </table:table-cell>
          <table:table-cell table:style-name="Table1.A2" office:value-type="string">
            <text:p text:style-name="P39">от <text:span text:style-name="T24">0</text:span> до<text:span text:style-name="T25"> </text:span><text:span text:style-name="T26">2</text:span><text:span text:style-name="T27">64</text:span><text:span text:style-name="T28"> - 1</text:span></text:p>
          </table:table-cell>
          <table:table-cell table:style-name="Table1.D2" office:value-type="string">
            <text:p text:style-name="P39">Размер <text:span text:style-name="T29">очереди</text:span></text:p>
          </table:table-cell>
        </table:table-row>
        <table:table-row>
          <table:table-cell table:style-name="Table1.A2" office:value-type="string">
            <text:p text:style-name="P40">node</text:p>
          </table:table-cell>
          <table:table-cell table:style-name="Table1.A2" office:value-type="string">
            <text:p text:style-name="P40">struct Node*</text:p>
          </table:table-cell>
          <table:table-cell table:style-name="Table1.A2" office:value-type="string">
            <text:p text:style-name="P40">-</text:p>
          </table:table-cell>
          <table:table-cell table:style-name="Table1.D2" office:value-type="string">
            <text:p text:style-name="P40">Указатель на узел очереди</text:p>
          </table:table-cell>
        </table:table-row>
        <table:table-row>
          <table:table-cell table:style-name="Table1.A2" office:value-type="string">
            <text:p text:style-name="P40">oldHead</text:p>
          </table:table-cell>
          <table:table-cell table:style-name="Table1.A2" office:value-type="string">
            <text:p text:style-name="P40">struct Node*</text:p>
          </table:table-cell>
          <table:table-cell table:style-name="Table1.A2" office:value-type="string">
            <text:p text:style-name="P40">-</text:p>
          </table:table-cell>
          <table:table-cell table:style-name="Table1.D2" office:value-type="string">
            <text:p text:style-name="P40">Указатель на удаляемый узел</text:p>
          </table:table-cell>
        </table:table-row>
        <table:table-row>
          <table:table-cell table:style-name="Table1.A2" office:value-type="string">
            <text:p text:style-name="P41">cur</text:p>
          </table:table-cell>
          <table:table-cell table:style-name="Table1.A2" office:value-type="string">
            <text:p text:style-name="P41">struct Node*</text:p>
          </table:table-cell>
          <table:table-cell table:style-name="Table1.A2" office:value-type="string">
            <text:p text:style-name="P41">-</text:p>
          </table:table-cell>
          <table:table-cell table:style-name="Table1.D2" office:value-type="string">
            <text:p text:style-name="P41">Указатель на текущий узел</text:p>
          </table:table-cell>
        </table:table-row>
        <table:table-row>
          <table:table-cell table:style-name="Table1.A2" office:value-type="string">
            <text:p text:style-name="P41">sortedHead</text:p>
          </table:table-cell>
          <table:table-cell table:style-name="Table1.A2" office:value-type="string">
            <text:p text:style-name="P41">struct Node*</text:p>
          </table:table-cell>
          <table:table-cell table:style-name="Table1.A2" office:value-type="string">
            <text:p text:style-name="P41">-</text:p>
          </table:table-cell>
          <table:table-cell table:style-name="Table1.D2" office:value-type="string">
            <text:p text:style-name="P41">Указатель на начальный узел отсортированной части очереди</text:p>
          </table:table-cell>
        </table:table-row>
        <table:table-row>
          <table:table-cell table:style-name="Table1.A2" office:value-type="string">
            <text:p text:style-name="P41">sortedTail</text:p>
          </table:table-cell>
          <table:table-cell table:style-name="Table1.A2" office:value-type="string">
            <text:p text:style-name="P41">struct Node*</text:p>
          </table:table-cell>
          <table:table-cell table:style-name="Table1.A2" office:value-type="string">
            <text:p text:style-name="P41">-</text:p>
          </table:table-cell>
          <table:table-cell table:style-name="Table1.D2" office:value-type="string">
            <text:p text:style-name="P41">Указатель на конечный узел отсортированный части очереди</text:p>
          </table:table-cell>
        </table:table-row>
        <table:table-row>
          <table:table-cell table:style-name="Table1.A2" office:value-type="string">
            <text:p text:style-name="P41">unsorted</text:p>
          </table:table-cell>
          <table:table-cell table:style-name="Table1.A2" office:value-type="string">
            <text:p text:style-name="P41">struct Node*</text:p>
          </table:table-cell>
          <table:table-cell table:style-name="Table1.A2" office:value-type="string">
            <text:p text:style-name="P41">-</text:p>
          </table:table-cell>
          <table:table-cell table:style-name="Table1.D2" office:value-type="string">
            <text:p text:style-name="P41">Указатель на неотсортированный узел</text:p>
          </table:table-cell>
        </table:table-row>
        <table:table-row>
          <table:table-cell table:style-name="Table1.A2" office:value-type="string">
            <text:p text:style-name="P41">min</text:p>
          </table:table-cell>
          <table:table-cell table:style-name="Table1.A2" office:value-type="string">
            <text:p text:style-name="P41">float</text:p>
          </table:table-cell>
          <table:table-cell table:style-name="Table1.A2" office:value-type="string">
            <text:p text:style-name="P42"><text:span text:style-name="T22">от </text:span><text:span text:style-name="T23">-</text:span>3,4E<text:span text:style-name="T23">+</text:span>38 до 3,4E+38</text:p>
          </table:table-cell>
          <table:table-cell table:style-name="Table1.D2" office:value-type="string">
            <text:p text:style-name="P41">Минимальный элемент очереди</text:p>
          </table:table-cell>
        </table:table-row>
        <table:table-row>
          <table:table-cell table:style-name="Table1.A2" office:value-type="string">
            <text:p text:style-name="P41">max</text:p>
          </table:table-cell>
          <table:table-cell table:style-name="Table1.A2" office:value-type="string">
            <text:p text:style-name="P41">float</text:p>
          </table:table-cell>
          <table:table-cell table:style-name="Table1.A2" office:value-type="string">
            <text:p text:style-name="P42"><text:span text:style-name="T22">от </text:span><text:span text:style-name="T23">-</text:span>3,4E<text:span text:style-name="T23">+</text:span>38 до 3,4E+38</text:p>
          </table:table-cell>
          <table:table-cell table:style-name="Table1.D2" office:value-type="string">
            <text:p text:style-name="P41">Максимальный элемент очереди</text:p>
          </table:table-cell>
        </table:table-row>
        <table:table-row>
          <table:table-cell table:style-name="Table1.A2" office:value-type="string">
            <text:p text:style-name="P43">numBuckets</text:p>
          </table:table-cell>
          <table:table-cell table:style-name="Table1.A2" office:value-type="string">
            <text:p text:style-name="P43">int</text:p>
          </table:table-cell>
          <table:table-cell table:style-name="Table1.A2" office:value-type="string">
            <text:p text:style-name="P43">от 0 до 2147483647</text:p>
          </table:table-cell>
          <table:table-cell table:style-name="Table1.D2" office:value-type="string">
            <text:p text:style-name="P43">Количество карманов <text:soft-page-break/>для сортировки</text:p>
          </table:table-cell>
        </table:table-row>
        <table:table-row>
          <table:table-cell table:style-name="Table1.A2" office:value-type="string">
            <text:p text:style-name="P43">buckets</text:p>
          </table:table-cell>
          <table:table-cell table:style-name="Table1.A2" office:value-type="string">
            <text:p text:style-name="P43">struct RingQueue*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3">Указатель на выделенную память для карманов</text:p>
          </table:table-cell>
        </table:table-row>
        <table:table-row>
          <table:table-cell table:style-name="Table1.A2" office:value-type="string">
            <text:p text:style-name="P43">ind</text:p>
          </table:table-cell>
          <table:table-cell table:style-name="Table1.A2" office:value-type="string">
            <text:p text:style-name="P43">int</text:p>
          </table:table-cell>
          <table:table-cell table:style-name="Table1.A2" office:value-type="string">
            <text:p text:style-name="P43">от 0 до 2147483647</text:p>
          </table:table-cell>
          <table:table-cell table:style-name="Table1.D2" office:value-type="string">
            <text:p text:style-name="P43">Индекс кармана для элемента очереди</text:p>
          </table:table-cell>
        </table:table-row>
        <table:table-row>
          <table:table-cell table:style-name="Table1.A2" office:value-type="string">
            <text:p text:style-name="P43">val</text:p>
          </table:table-cell>
          <table:table-cell table:style-name="Table1.A2" office:value-type="string">
            <text:p text:style-name="P43">float</text:p>
          </table:table-cell>
          <table:table-cell table:style-name="Table1.A2" office:value-type="string">
            <text:p text:style-name="P42"><text:span text:style-name="T22">от </text:span><text:span text:style-name="T23">-</text:span>3,4E<text:span text:style-name="T23">+</text:span>38 до 3,4E+38</text:p>
          </table:table-cell>
          <table:table-cell table:style-name="Table1.D2" office:value-type="string">
            <text:p text:style-name="P43">Значение удаленного элемента из очереди</text:p>
          </table:table-cell>
        </table:table-row>
        <table:table-row>
          <table:table-cell table:style-name="Table1.A2" office:value-type="string">
            <text:p text:style-name="P44">file</text:p>
          </table:table-cell>
          <table:table-cell table:style-name="Table1.A2" office:value-type="string">
            <text:p text:style-name="P44">FILE*</text:p>
          </table:table-cell>
          <table:table-cell table:style-name="Table1.A2" office:value-type="string">
            <text:p text:style-name="P44">-</text:p>
          </table:table-cell>
          <table:table-cell table:style-name="Table1.D2" office:value-type="string">
            <text:p text:style-name="P44">Указатель на файловый поток для чтения</text:p>
          </table:table-cell>
        </table:table-row>
        <table:table-row>
          <table:table-cell table:style-name="Table1.A2" office:value-type="string">
            <text:p text:style-name="P45">tmp</text:p>
          </table:table-cell>
          <table:table-cell table:style-name="Table1.A2" office:value-type="string">
            <text:p text:style-name="P45">float</text:p>
          </table:table-cell>
          <table:table-cell table:style-name="Table1.A2" office:value-type="string">
            <text:p text:style-name="P42"><text:span text:style-name="T22">от </text:span><text:span text:style-name="T23">-</text:span>3,4E<text:span text:style-name="T23">+</text:span>38 до 3,4E+38</text:p>
          </table:table-cell>
          <table:table-cell table:style-name="Table1.D2" office:value-type="string">
            <text:p text:style-name="P45">Переменная для хранения прочитанного числа из файла</text:p>
          </table:table-cell>
        </table:table-row>
        <table:table-row>
          <table:table-cell table:style-name="Table1.A2" office:value-type="string">
            <text:p text:style-name="P39">argc</text:p>
          </table:table-cell>
          <table:table-cell table:style-name="Table1.A2" office:value-type="string">
            <text:p text:style-name="P39">int</text:p>
          </table:table-cell>
          <table:table-cell table:style-name="Table1.A2" office:value-type="string">
            <text:p text:style-name="P39">от <text:span text:style-name="T24">1</text:span> до<text:span text:style-name="T25"> </text:span>2147483647</text:p>
          </table:table-cell>
          <table:table-cell table:style-name="Table1.D2" office:value-type="string">
            <text:p text:style-name="P39">Хранит количество аргументов при запуске программы</text:p>
          </table:table-cell>
        </table:table-row>
        <table:table-row>
          <table:table-cell table:style-name="Table1.A2" office:value-type="string">
            <text:p text:style-name="P39">argv[]</text:p>
          </table:table-cell>
          <table:table-cell table:style-name="Table1.A2" office:value-type="string">
            <text:p text:style-name="P39">char**</text:p>
          </table:table-cell>
          <table:table-cell table:style-name="Table1.A2" office:value-type="string">
            <text:p text:style-name="P46">адрес памяти</text:p>
          </table:table-cell>
          <table:table-cell table:style-name="Table1.D2" office:value-type="string">
            <text:p text:style-name="P39">Массив переданных аргументов</text:p>
          </table:table-cell>
        </table:table-row>
        <table:table-row>
          <table:table-cell table:style-name="Table1.A2" office:value-type="string">
            <text:p text:style-name="P47">filename</text:p>
          </table:table-cell>
          <table:table-cell table:style-name="Table1.A2" office:value-type="string">
            <text:p text:style-name="P47">char<text:span text:style-name="T30">*</text:span></text:p>
          </table:table-cell>
          <table:table-cell table:style-name="Table1.A2" office:value-type="string">
            <text:p text:style-name="P46">адрес памяти</text:p>
          </table:table-cell>
          <table:table-cell table:style-name="Table1.D2" office:value-type="string">
            <text:p text:style-name="P47">Ссылается на имя файла</text:p>
          </table:table-cell>
        </table:table-row>
        <table:table-row>
          <table:table-cell table:style-name="Table1.A2" office:value-type="string">
            <text:p text:style-name="P45">q</text:p>
          </table:table-cell>
          <table:table-cell table:style-name="Table1.A2" office:value-type="string">
            <text:p text:style-name="P45">struct RingQueue*</text:p>
          </table:table-cell>
          <table:table-cell table:style-name="Table1.A2" office:value-type="string">
            <text:p text:style-name="P45">-</text:p>
          </table:table-cell>
          <table:table-cell table:style-name="Table1.D2" office:value-type="string">
            <text:p text:style-name="P45">Указатель на кольцевую очередь</text:p>
          </table:table-cell>
        </table:table-row>
        <table:table-row>
          <table:table-cell table:style-name="Table1.A2" office:value-type="string">
            <text:p text:style-name="P48">i</text:p>
          </table:table-cell>
          <table:table-cell table:style-name="Table1.A2" office:value-type="string">
            <text:p text:style-name="P48">int</text:p>
          </table:table-cell>
          <table:table-cell table:style-name="Table1.A2" office:value-type="string">
            <text:p text:style-name="P49">от <text:span text:style-name="T31">0</text:span> до<text:span text:style-name="T25"> </text:span>2147483647</text:p>
          </table:table-cell>
          <table:table-cell table:style-name="Table1.D2" office:value-type="string">
            <text:p text:style-name="P48">Переменная для итерации циклов</text:p>
          </table:table-cell>
        </table:table-row>
      </table:table>
      <text:p text:style-name="P50"/>
      <text:p text:style-name="P50"/>
      <text:p text:style-name="P50"/>
      <text:h text:style-name="P51" text:outline-level="1"><text:bookmark-start text:name="__RefHeading___Toc143_2058273410 Copy 1 Copy 2"/><text:span text:style-name="T19">3</text:span><text:span text:style-name="T12">. </text:span><text:span text:style-name="T32">БЛОК</text:span><text:span text:style-name="T33">-</text:span><text:span text:style-name="T32">СХЕМА АЛГОРИТМА</text:span><text:bookmark-end text:name="__RefHeading___Toc143_2058273410 Copy 1 Copy 2"/></text:h>
      <text:p text:style-name="P52">Блок<text:span text:style-name="T10">-</text:span>схема алгоритма представлена в Приложении А.</text:p>
      <text:p text:style-name="P52"/>
      <text:h text:style-name="P53" text:outline-level="1"><text:bookmark-start text:name="__RefHeading___Toc143_2058273410 Copy 1 Copy 2 Copy 1"/><text:span text:style-name="T19">4</text:span><text:span text:style-name="T12">. </text:span><text:span text:style-name="T32">ТЕСТИРОВАНИЕ АЛГОРИТМА</text:span><text:bookmark-end text:name="__RefHeading___Toc143_2058273410 Copy 1 Copy 2 Copy 1"/></text:h>
      <text:p text:style-name="P54"><draw:frame draw:style-name="fr1" draw:name="Frame1" text:anchor-type="paragraph" svg:x="0cm" svg:y="0.323cm" svg:width="16.591cm" draw:z-index="0"><draw:text-box fo:min-height="3.582cm"><text:p text:style-name="P55"><draw:frame draw:style-name="fr2" draw:name="Image1" text:anchor-type="char" svg:width="16.591cm" svg:height="4.039cm" draw:z-index="2"><draw:image xlink:href="Pictures/100000010000076C000001CFB0B8F4B3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pan text:style-name="T34"><text:s/></text:span>— Результат успешной работы алгоритма </text:p></draw:text-box></draw:frame></text:p>
      <text:p text:style-name="P54"><draw:frame draw:style-name="fr3" draw:name="Frame2" text:anchor-type="char" svg:width="16.591cm" draw:z-index="3"><draw:text-box fo:min-height="1.843cm"><text:p text:style-name="P56"><draw:frame draw:style-name="fr4" draw:name="Image2" text:anchor-type="paragraph" svg:x="0.723cm" svg:y="0.212cm" svg:width="9.456cm" style:rel-width="57%" svg:height="1.048cm" style:rel-height="scale" draw:z-index="4"><draw:image xlink:href="Pictures/10000001000002BE0000004EAC698A69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pan text:style-name="T35"><text:s/>—</text:span> Результат работы алгоритма при неуказанном входном файле</text:p></draw:text-box></draw:frame></text:p>
      <text:h text:style-name="P57" text:outline-level="1"><text:bookmark-start text:name="__RefHeading___Toc143_2058273410 Copy 1 Copy 2 Copy 2"/><text:span text:style-name="T19">5</text:span><text:span text:style-name="T12">. </text:span><text:span text:style-name="T36">ИСХОДНЫЙ КОД АЛГОРИТМА</text:span><text:bookmark-end text:name="__RefHeading___Toc143_2058273410 Copy 1 Copy 2 Copy 2"/></text:h>
      <text:p text:style-name="P58">Программа написана на языке C, <text:span text:style-name="T37">для компиляции </text:span>использовался компилятор gcc.</text:p>
      <text:p text:style-name="P58">Исходный код Makefile:</text:p>
      <text:p text:style-name="P59"><text:span text:style-name="T38"><text:s/>1 <text:s/>| <text:s text:c="3"/></text:span><text:span text:style-name="T39">CC = gcc</text:span></text:p>
      <text:p text:style-name="P59"><text:span text:style-name="T38"><text:s/>2 <text:s/>| <text:s text:c="3"/></text:span><text:span text:style-name="T39">CFLAGS = -O3 -Wall -Wextra -Werror -fanalyzer</text:span></text:p>
      <text:p text:style-name="P59"><text:span text:style-name="T38"><text:s/>3 <text:s/>| <text:s text:c="3"/></text:span><text:span text:style-name="T39">TARGET = lab</text:span><text:span text:style-name="T40">2</text:span></text:p>
      <text:p text:style-name="P60"><text:s/>4 <text:s/>| <text:s text:c="3"/></text:p>
      <text:p text:style-name="P59"><text:span text:style-name="T38"><text:s/>5 <text:s/>| <text:s text:c="3"/></text:span><text:span text:style-name="T39">all: </text:span><text:span text:style-name="T41">$(</text:span><text:span text:style-name="T39">TARGET</text:span><text:span text:style-name="T41">)</text:span></text:p>
      <text:p text:style-name="P60"><text:s/>6 <text:s/>| <text:s text:c="3"/></text:p>
      <text:p text:style-name="P59"><text:span text:style-name="T38"><text:s/>7 <text:s/>| <text:s text:c="3"/></text:span><text:span text:style-name="T39">$(TARGET): lab</text:span><text:span text:style-name="T40">2</text:span><text:span text:style-name="T39">.c</text:span></text:p>
      <text:p text:style-name="P59"><text:span text:style-name="T38"><text:s/>8 <text:s/>| <text:s text:c="3"/></text:span><text:span text:style-name="T39"><text:tab/></text:span><text:span text:style-name="T41">$(</text:span><text:span text:style-name="T39">CC</text:span><text:span text:style-name="T41">)</text:span><text:span text:style-name="T39"> </text:span><text:span text:style-name="T41">$(</text:span><text:span text:style-name="T39">CFLAGS</text:span><text:span text:style-name="T41">)</text:span><text:span text:style-name="T39"> </text:span><text:span text:style-name="T41">$(</text:span><text:span text:style-name="T39">TARGET</text:span><text:span text:style-name="T41">)</text:span><text:span text:style-name="T39">.c -o </text:span><text:span text:style-name="T41">$(</text:span><text:span text:style-name="T39">TARGET</text:span><text:span text:style-name="T41">)</text:span></text:p>
      <text:p text:style-name="P60"><text:s/>9 <text:s/>| <text:s text:c="3"/></text:p>
      <text:p text:style-name="P59"><text:span text:style-name="T38">10 <text:s/>| <text:s text:c="3"/></text:span><text:span text:style-name="T39">clean:</text:span></text:p>
      <text:p text:style-name="P59"><text:span text:style-name="T38">11 <text:s/>| <text:s text:c="3"/></text:span><text:span text:style-name="T39"><text:tab/>rm -f </text:span><text:span text:style-name="T41">$(</text:span><text:span text:style-name="T39">TARGET</text:span><text:span text:style-name="T41">)</text:span></text:p>
      <text:p text:style-name="P61"/>
      <text:p text:style-name="P62"/>
      <text:p text:style-name="P58">Исходный код lab<text:span text:style-name="T42">2</text:span>.c:</text:p>
      <text:p text:style-name="P63"><text:span text:style-name="T43"><text:s text:c="2"/>1 <text:s/>| <text:s text:c="3"/></text:span><text:span text:style-name="T41">#include</text:span><text:span text:style-name="T39"> </text:span><text:span text:style-name="T43">&lt;stdio.h&gt;</text:span></text:p>
      <text:p text:style-name="P63"><text:span text:style-name="T43"><text:s text:c="2"/>2 <text:s/>| <text:s text:c="3"/></text:span><text:span text:style-name="T41">#include</text:span><text:span text:style-name="T39"> </text:span><text:span text:style-name="T43">&lt;stdlib.h&gt;</text:span></text:p>
      <text:p text:style-name="P63"><text:span text:style-name="T43"><text:s text:c="2"/>3 <text:s/>| <text:s text:c="3"/></text:span><text:span text:style-name="T41">#include</text:span><text:span text:style-name="T39"> </text:span><text:span text:style-name="T43">"stddef.h"</text:span></text:p>
      <text:p text:style-name="P63"><text:span text:style-name="T43"><text:s text:c="2"/>4 <text:s/>| <text:s text:c="3"/></text:span><text:span text:style-name="T41">#include</text:span><text:span text:style-name="T39"> </text:span><text:span text:style-name="T43">"stdbool.h"</text:span></text:p>
      <text:p text:style-name="P64"><text:s text:c="2"/>5 <text:s/>| <text:s text:c="3"/></text:p>
      <text:p text:style-name="P63"><text:span text:style-name="T43"><text:s text:c="2"/>6 <text:s/>| <text:s text:c="3"/></text:span><text:span text:style-name="T41">typedef</text:span><text:span text:style-name="T39"> </text:span><text:span text:style-name="T41">struct</text:span><text:span text:style-name="T39"> </text:span><text:span text:style-name="T44">Node</text:span><text:span text:style-name="T39"> {</text:span></text:p>
      <text:p text:style-name="P63"><text:span text:style-name="T43"><text:s text:c="2"/>7 <text:s/>| <text:s text:c="3"/></text:span><text:span text:style-name="T39"><text:s text:c="4"/></text:span><text:span text:style-name="T44">float</text:span><text:span text:style-name="T39"> value;</text:span></text:p>
      <text:p text:style-name="P63"><text:span text:style-name="T43"><text:s text:c="2"/>8 <text:s/>| <text:s text:c="3"/></text:span><text:span text:style-name="T39"><text:s text:c="4"/></text:span><text:span text:style-name="T41">struct</text:span><text:span text:style-name="T39"> </text:span><text:span text:style-name="T44">Node</text:span><text:span text:style-name="T39"> *next;</text:span></text:p>
      <text:p text:style-name="P63"><text:span text:style-name="T43"><text:s text:c="2"/>9 <text:s/>| <text:s text:c="3"/></text:span><text:span text:style-name="T39">} Node;</text:span></text:p>
      <text:p text:style-name="P64"><text:s/>10 <text:s/>| <text:s text:c="3"/></text:p>
      <text:p text:style-name="P63"><text:span text:style-name="T43"><text:s/>11 <text:s/>| <text:s text:c="3"/></text:span><text:span text:style-name="T41">typedef</text:span><text:span text:style-name="T39"> </text:span><text:span text:style-name="T41">struct</text:span><text:span text:style-name="T39"> </text:span><text:span text:style-name="T44">RingQueue</text:span><text:span text:style-name="T39"> {</text:span></text:p>
      <text:p text:style-name="P63"><text:span text:style-name="T43"><text:s/>12 <text:s/>| <text:s text:c="3"/></text:span><text:span text:style-name="T39"><text:s text:c="4"/></text:span><text:span text:style-name="T41">struct</text:span><text:span text:style-name="T39"> </text:span><text:span text:style-name="T44">Node</text:span><text:span text:style-name="T39"> *head;</text:span></text:p>
      <text:p text:style-name="P63"><text:span text:style-name="T43"><text:s/>13 <text:s/>| <text:s text:c="3"/></text:span><text:span text:style-name="T39"><text:s text:c="4"/></text:span><text:span text:style-name="T41">struct</text:span><text:span text:style-name="T39"> </text:span><text:span text:style-name="T44">Node</text:span><text:span text:style-name="T39"> *tail;</text:span></text:p>
      <text:p text:style-name="P63"><text:span text:style-name="T43"><text:s/>14 <text:s/>| <text:s text:c="3"/></text:span><text:span text:style-name="T39"><text:s text:c="4"/></text:span><text:span text:style-name="T44">size_t</text:span><text:span text:style-name="T39"> size;</text:span></text:p>
      <text:p text:style-name="P63"><text:span text:style-name="T43"><text:s/>15 <text:s/>| <text:s text:c="3"/></text:span><text:span text:style-name="T39">} RingQueue;</text:span></text:p>
      <text:p text:style-name="P64"><text:s/>16 <text:s/>| <text:s text:c="3"/></text:p>
      <text:p text:style-name="P63"><text:span text:style-name="T43"><text:s/>17 <text:s/>| <text:s text:c="3"/></text:span><text:span text:style-name="T44">void</text:span><text:span text:style-name="T39"> init(RingQueue *q) {</text:span></text:p>
      <text:p text:style-name="P63"><text:span text:style-name="T43"><text:s/>18 <text:s/>| <text:s text:c="3"/></text:span><text:span text:style-name="T39"><text:s text:c="4"/>q-&gt;head = q-&gt;tail = NULL; <text:s text:c="25"/></text:span><text:span text:style-name="T43">// (6)</text:span></text:p>
      <text:p text:style-name="P63"><text:span text:style-name="T43"><text:s/>19 <text:s/>| <text:s text:c="3"/></text:span><text:span text:style-name="T39"><text:s text:c="4"/>q-&gt;size = 0; <text:s text:c="38"/></text:span><text:span text:style-name="T43">// (3)</text:span></text:p>
      <text:p text:style-name="P65"><text:span text:style-name="T43"><text:s/>20 <text:s/>| <text:s text:c="3"/></text:span>}</text:p>
      <text:p text:style-name="P64"><text:s/>21 <text:s/>| <text:s text:c="3"/>// Итоговая сложность init: 6 + 3 = 9</text:p>
      <text:p text:style-name="P64"><text:s/>22 <text:s/>| <text:s text:c="3"/></text:p>
      <text:p text:style-name="P63"><text:span text:style-name="T43"><text:s/>23 <text:s/>| <text:s text:c="3"/></text:span><text:span text:style-name="T44">void</text:span><text:span text:style-name="T39"> enQueue(RingQueue *q, </text:span><text:span text:style-name="T44">float</text:span><text:span text:style-name="T39"> value) {</text:span></text:p>
      <text:p text:style-name="P63"><text:span text:style-name="T43"><text:s/>24 <text:s/>| <text:s text:c="3"/></text:span><text:span text:style-name="T39"><text:s text:c="4"/>Node *node = malloc(</text:span><text:span text:style-name="T41">sizeof</text:span><text:span text:style-name="T39">(Node)); <text:s text:c="16"/></text:span><text:span text:style-name="T43">// (3)</text:span></text:p>
      <text:p text:style-name="P63"><text:span text:style-name="T43"><text:s/>25 <text:s/>| <text:s text:c="3"/></text:span><text:span text:style-name="T39"><text:s text:c="4"/></text:span><text:span text:style-name="T41">if</text:span><text:span text:style-name="T39"> (!node) { <text:s text:c="38"/></text:span><text:span text:style-name="T43">// (2)</text:span></text:p>
      <text:p text:style-name="P63"><text:span text:style-name="T43"><text:s/>26 <text:s/>| <text:s text:c="3"/></text:span><text:span text:style-name="T39"><text:s text:c="8"/>fprintf(stderr, </text:span><text:span text:style-name="T45">"Ошибка: не удалось выделить память для узла кольцевой очереди.\n"</text:span><text:span text:style-name="T39">);</text:span></text:p>
      <text:p text:style-name="P63"><text:span text:style-name="T43"><text:s/>27 <text:s/>| <text:s text:c="3"/></text:span><text:span text:style-name="T39"><text:s text:c="8"/>exit(1);</text:span></text:p>
      <text:p text:style-name="P63"><text:span text:style-name="T43"><text:s/>28 <text:s/>| <text:s text:c="3"/></text:span><text:span text:style-name="T39"><text:s text:c="4"/>}</text:span></text:p>
      <text:p text:style-name="P63"><text:span text:style-name="T43"><text:s/>29 <text:s/>| <text:s text:c="3"/></text:span><text:span text:style-name="T39"><text:s text:c="4"/>node-&gt;value = value; <text:s text:c="30"/></text:span><text:span text:style-name="T43">// (3)</text:span></text:p>
      <text:p text:style-name="P64"><text:s/>30 <text:s/>| <text:s text:c="3"/></text:p>
      <text:p text:style-name="P63"><text:span text:style-name="T43"><text:s/>31 <text:s/>| <text:s text:c="3"/></text:span><text:span text:style-name="T39"><text:s text:c="4"/></text:span><text:span text:style-name="T41">if</text:span><text:span text:style-name="T39"> (q-&gt;size == 0) { <text:s text:c="31"/></text:span><text:span text:style-name="T43">// (3)</text:span></text:p>
      <text:p text:style-name="P63"><text:span text:style-name="T43"><text:s/>32 <text:s/>| <text:s text:c="3"/></text:span><text:span text:style-name="T39"><text:s text:c="8"/>node-&gt;next = node; <text:s text:c="28"/></text:span><text:span text:style-name="T43">// (3)</text:span></text:p>
      <text:p text:style-name="P63"><text:span text:style-name="T43"><text:s/>33 <text:s/>| <text:s text:c="3"/></text:span><text:span text:style-name="T39"><text:s text:c="8"/>q-&gt;head = node; <text:s text:c="31"/></text:span><text:span text:style-name="T43">// (3)</text:span></text:p>
      <text:p text:style-name="P63"><text:span text:style-name="T43"><text:s/>34 <text:s/>| <text:s text:c="3"/></text:span><text:span text:style-name="T39"><text:s text:c="8"/>q-&gt;tail = node; <text:s text:c="31"/></text:span><text:span text:style-name="T43">// (3)</text:span></text:p>
      <text:p text:style-name="P63"><text:span text:style-name="T43"><text:s/>35 <text:s/>| <text:s text:c="3"/></text:span><text:span text:style-name="T39"><text:s text:c="4"/>} </text:span><text:span text:style-name="T41">else</text:span><text:span text:style-name="T39"> {</text:span></text:p>
      <text:p text:style-name="P63"><text:span text:style-name="T43"><text:s/>36 <text:s/>| <text:s text:c="3"/></text:span><text:span text:style-name="T39"><text:s text:c="8"/>node-&gt;next = q-&gt;head; <text:s text:c="25"/></text:span><text:span text:style-name="T43">// (5)</text:span></text:p>
      <text:p text:style-name="P63"><text:span text:style-name="T43"><text:s/>37 <text:s/>| <text:s text:c="3"/></text:span><text:span text:style-name="T39"><text:s text:c="8"/>q-&gt;tail-&gt;next = node; <text:s text:c="25"/></text:span><text:span text:style-name="T43">// (5)</text:span></text:p>
      <text:p text:style-name="P63"><text:span text:style-name="T43"><text:s/>38 <text:s/>| <text:s text:c="3"/></text:span><text:span text:style-name="T39"><text:s text:c="8"/>q-&gt;tail = node; <text:s text:c="31"/></text:span><text:span text:style-name="T43">// (3)</text:span></text:p>
      <text:p text:style-name="P63"><text:span text:style-name="T43"><text:s/>39 <text:s/>| <text:s text:c="3"/></text:span><text:span text:style-name="T39"><text:s text:c="4"/>}</text:span></text:p>
      <text:p text:style-name="P64"><text:s/>40 <text:s/>| <text:s text:c="3"/></text:p>
      <text:p text:style-name="P63"><text:span text:style-name="T43"><text:s/>41 <text:s/>| <text:s text:c="3"/></text:span><text:span text:style-name="T39"><text:s text:c="4"/>q-&gt;size++; <text:s text:c="40"/></text:span><text:span text:style-name="T43">// (4)</text:span></text:p>
      <text:p text:style-name="P65"><text:span text:style-name="T43"><text:s/>42 <text:s/>| <text:s text:c="3"/></text:span>}</text:p>
      <text:p text:style-name="P64"><text:s/>43 <text:s/>| <text:s text:c="3"/>// Итоговая сложность enQueue (худший случай - ветка else): 3 + 2 + 3 + 3 + 5 + 5 + 3 + 4 = 28</text:p>
      <text:p text:style-name="P64"><text:s/>44 <text:s/>| <text:s text:c="3"/></text:p>
      <text:p text:style-name="P63"><text:soft-page-break/><text:span text:style-name="T43"><text:s/>45 <text:s/>| <text:s text:c="3"/></text:span><text:span text:style-name="T44">bool</text:span><text:span text:style-name="T39"> deQueue(RingQueue *q, </text:span><text:span text:style-name="T44">float</text:span><text:span text:style-name="T39"> *out) {</text:span></text:p>
      <text:p text:style-name="P63"><text:span text:style-name="T43"><text:s/>46 <text:s/>| <text:s text:c="3"/></text:span><text:span text:style-name="T39"><text:s text:c="4"/></text:span><text:span text:style-name="T41">if</text:span><text:span text:style-name="T39"> (q-&gt;size == 0) </text:span><text:span text:style-name="T41">return</text:span><text:span text:style-name="T39"> false; <text:s text:c="19"/></text:span><text:span text:style-name="T43">// (4)</text:span></text:p>
      <text:p text:style-name="P63"><text:span text:style-name="T43"><text:s/>47 <text:s/>| <text:s text:c="3"/></text:span><text:span text:style-name="T39"><text:s text:c="4"/>Node *oldHead = q-&gt;head; <text:s text:c="26"/></text:span><text:span text:style-name="T43">// (3)</text:span></text:p>
      <text:p text:style-name="P63"><text:span text:style-name="T43"><text:s/>48 <text:s/>| <text:s text:c="3"/></text:span><text:span text:style-name="T39"><text:s text:c="4"/>*out = oldHead-&gt;value; <text:s text:c="28"/></text:span><text:span text:style-name="T43">// (4)</text:span></text:p>
      <text:p text:style-name="P64"><text:s/>49 <text:s/>| <text:s text:c="3"/></text:p>
      <text:p text:style-name="P63"><text:span text:style-name="T43"><text:s/>50 <text:s/>| <text:s text:c="3"/></text:span><text:span text:style-name="T39"><text:s text:c="4"/></text:span><text:span text:style-name="T41">if</text:span><text:span text:style-name="T39"> (q-&gt;size == 1) { <text:s text:c="31"/></text:span><text:span text:style-name="T43">// (3)</text:span></text:p>
      <text:p text:style-name="P63"><text:span text:style-name="T43"><text:s/>51 <text:s/>| <text:s text:c="3"/></text:span><text:span text:style-name="T39"><text:s text:c="8"/>q-&gt;head = q-&gt;tail = NULL; <text:s text:c="21"/></text:span><text:span text:style-name="T43">// (6)</text:span></text:p>
      <text:p text:style-name="P63"><text:span text:style-name="T43"><text:s/>52 <text:s/>| <text:s text:c="3"/></text:span><text:span text:style-name="T39"><text:s text:c="4"/>} </text:span><text:span text:style-name="T41">else</text:span><text:span text:style-name="T39"> {</text:span></text:p>
      <text:p text:style-name="P63"><text:span text:style-name="T43"><text:s/>53 <text:s/>| <text:s text:c="3"/></text:span><text:span text:style-name="T39"><text:s text:c="8"/>q-&gt;head = oldHead-&gt;next; <text:s text:c="22"/></text:span><text:span text:style-name="T43">// (5)</text:span></text:p>
      <text:p text:style-name="P63"><text:span text:style-name="T43"><text:s/>54 <text:s/>| <text:s text:c="3"/></text:span><text:span text:style-name="T39"><text:s text:c="8"/>q-&gt;tail-&gt;next = q-&gt;head; <text:s text:c="22"/></text:span><text:span text:style-name="T43">// (7)</text:span></text:p>
      <text:p text:style-name="P63"><text:span text:style-name="T43"><text:s/>55 <text:s/>| <text:s text:c="3"/></text:span><text:span text:style-name="T39"><text:s text:c="4"/>}</text:span></text:p>
      <text:p text:style-name="P64"><text:s/>56 <text:s/>| <text:s text:c="3"/></text:p>
      <text:p text:style-name="P63"><text:span text:style-name="T43"><text:s/>57 <text:s/>| <text:s text:c="3"/></text:span><text:span text:style-name="T39"><text:s text:c="4"/>free(oldHead); <text:s text:c="36"/></text:span><text:span text:style-name="T43">// (1)</text:span></text:p>
      <text:p text:style-name="P63"><text:span text:style-name="T43"><text:s/>58 <text:s/>| <text:s text:c="3"/></text:span><text:span text:style-name="T39"><text:s text:c="4"/>q-&gt;size--; <text:s text:c="40"/></text:span><text:span text:style-name="T43">// (4)</text:span></text:p>
      <text:p text:style-name="P63"><text:span text:style-name="T43"><text:s/>59 <text:s/>| <text:s text:c="3"/></text:span><text:span text:style-name="T39"><text:s text:c="4"/></text:span><text:span text:style-name="T41">return</text:span><text:span text:style-name="T39"> true; <text:s text:c="38"/></text:span><text:span text:style-name="T43">// (1)</text:span></text:p>
      <text:p text:style-name="P65"><text:span text:style-name="T43"><text:s/>60 <text:s/>| <text:s text:c="3"/></text:span>}</text:p>
      <text:p text:style-name="P64"><text:s/>61 <text:s/>| <text:s text:c="3"/>// Итоговая сложность deQueue (худший случай - ветка else): 4 + 3 + 4 + 3 + 5 + 7 + 1 + 4 + 1 = 32</text:p>
      <text:p text:style-name="P64"><text:s/>62 <text:s/>| <text:s text:c="3"/></text:p>
      <text:p text:style-name="P63"><text:span text:style-name="T43"><text:s/>63 <text:s/>| <text:s text:c="3"/></text:span><text:span text:style-name="T44">void</text:span><text:span text:style-name="T39"> printQ(RingQueue *q) {</text:span></text:p>
      <text:p text:style-name="P63"><text:span text:style-name="T43"><text:s/>64 <text:s/>| <text:s text:c="3"/></text:span><text:span text:style-name="T39"><text:s text:c="4"/></text:span><text:span text:style-name="T41">if</text:span><text:span text:style-name="T39"> (q-&gt;size == 0) { <text:s text:c="31"/></text:span><text:span text:style-name="T43">// (3)</text:span></text:p>
      <text:p text:style-name="P63"><text:span text:style-name="T43"><text:s/>65 <text:s/>| <text:s text:c="3"/></text:span><text:span text:style-name="T39"><text:s text:c="8"/>printf(</text:span><text:span text:style-name="T45">"[ пусто ]\n"</text:span><text:span text:style-name="T39">);</text:span></text:p>
      <text:p text:style-name="P63"><text:span text:style-name="T43"><text:s/>66 <text:s/>| <text:s text:c="3"/></text:span><text:span text:style-name="T39"><text:s text:c="8"/></text:span><text:span text:style-name="T41">return</text:span><text:span text:style-name="T39">;</text:span></text:p>
      <text:p text:style-name="P63"><text:span text:style-name="T43"><text:s/>67 <text:s/>| <text:s text:c="3"/></text:span><text:span text:style-name="T39"><text:s text:c="4"/>}</text:span></text:p>
      <text:p text:style-name="P64"><text:s/>68 <text:s/>| <text:s text:c="3"/></text:p>
      <text:p text:style-name="P63"><text:span text:style-name="T43"><text:s/>69 <text:s/>| <text:s text:c="3"/></text:span><text:span text:style-name="T39"><text:s text:c="4"/>Node *cur = q-&gt;head; <text:s text:c="30"/></text:span><text:span text:style-name="T43">// (3)</text:span></text:p>
      <text:p text:style-name="P63"><text:span text:style-name="T43"><text:s/>70 <text:s/>| <text:s text:c="3"/></text:span><text:span text:style-name="T39"><text:s text:c="4"/>printf(</text:span><text:span text:style-name="T45">"[ "</text:span><text:span text:style-name="T39">); <text:s text:c="37"/></text:span><text:span text:style-name="T43">// (1)</text:span></text:p>
      <text:p text:style-name="P63"><text:span text:style-name="T43"><text:s/>71 <text:s/>| <text:s text:c="3"/></text:span><text:span text:style-name="T39"><text:s text:c="4"/></text:span><text:span text:style-name="T41">for</text:span><text:span text:style-name="T39"> (</text:span><text:span text:style-name="T44">size_t</text:span><text:span text:style-name="T39"> i = 0; i &lt; q-&gt;size; i++) { <text:s text:c="12"/></text:span><text:span text:style-name="T43">// (1) + (3)*(n+1) + (2)*(n) = 5n + 4</text:span></text:p>
      <text:p text:style-name="P63"><text:span text:style-name="T43"><text:s/>72 <text:s/>| <text:s text:c="3"/></text:span><text:span text:style-name="T39"><text:s text:c="8"/>printf(</text:span><text:span text:style-name="T45">"%f "</text:span><text:span text:style-name="T39">, cur-&gt;value); <text:s text:c="20"/></text:span><text:span text:style-name="T43">// (3)</text:span></text:p>
      <text:p text:style-name="P63"><text:span text:style-name="T43"><text:s/>73 <text:s/>| <text:s text:c="3"/></text:span><text:span text:style-name="T39"><text:s text:c="8"/></text:span><text:span text:style-name="T41">if</text:span><text:span text:style-name="T39"> (i + 1 &lt; q-&gt;size) printf(</text:span><text:span text:style-name="T45">"-&gt; "</text:span><text:span text:style-name="T39">); <text:s text:c="11"/></text:span><text:span text:style-name="T43">// (5)</text:span></text:p>
      <text:p text:style-name="P63"><text:span text:style-name="T43"><text:s/>74 <text:s/>| <text:s text:c="3"/></text:span><text:span text:style-name="T39"><text:s text:c="8"/>cur = cur-&gt;next; <text:s text:c="30"/></text:span><text:span text:style-name="T43">// (3)</text:span></text:p>
      <text:p text:style-name="P63"><text:span text:style-name="T43"><text:s/>75 <text:s/>| <text:s text:c="3"/></text:span><text:span text:style-name="T39"><text:s text:c="4"/>} </text:span><text:span text:style-name="T43">// Тело цикла: 3 + 5 + 3 = 11. Итого цикл: 5n + 4 + 11n = 16n + 4</text:span></text:p>
      <text:p text:style-name="P63"><text:span text:style-name="T43"><text:s/>76 <text:s/>| <text:s text:c="3"/></text:span><text:span text:style-name="T39"><text:s text:c="4"/>printf(</text:span><text:span text:style-name="T45">" ] (size=%zu)\n"</text:span><text:span text:style-name="T39">, q-&gt;size); <text:s text:c="15"/></text:span><text:span text:style-name="T43">// (3)</text:span></text:p>
      <text:p text:style-name="P65"><text:span text:style-name="T43"><text:s/>77 <text:s/>| <text:s text:c="3"/></text:span>}</text:p>
      <text:p text:style-name="P64"><text:s/>78 <text:s/>| <text:s text:c="3"/>// Итоговая сложность printQ: 3 + 3 + 1 + (16n + 4) + 3 = 16n + 14</text:p>
      <text:p text:style-name="P64"><text:s/>79 <text:s/>| <text:s text:c="3"/></text:p>
      <text:p text:style-name="P63"><text:span text:style-name="T43"><text:s/>80 <text:s/>| <text:s text:c="3"/></text:span><text:span text:style-name="T44">void</text:span><text:span text:style-name="T39"> insertionSort(RingQueue *q) {</text:span></text:p>
      <text:p text:style-name="P63"><text:span text:style-name="T43"><text:s/>81 <text:s/>| <text:s text:c="3"/></text:span><text:span text:style-name="T39"><text:s text:c="4"/></text:span><text:span text:style-name="T44">size_t</text:span><text:span text:style-name="T39"> n = q-&gt;size; <text:s text:c="31"/></text:span><text:span text:style-name="T43">// (3)</text:span></text:p>
      <text:p text:style-name="P63"><text:span text:style-name="T43"><text:s/>82 <text:s/>| <text:s text:c="3"/></text:span><text:span text:style-name="T39"><text:s text:c="4"/></text:span><text:span text:style-name="T41">if</text:span><text:span text:style-name="T39"> (n &lt;= 1) </text:span><text:span text:style-name="T41">return</text:span><text:span text:style-name="T39">; <text:s text:c="31"/></text:span><text:span text:style-name="T43">// (2)</text:span></text:p>
      <text:p text:style-name="P64"><text:s/>83 <text:s/>| <text:s text:c="3"/></text:p>
      <text:p text:style-name="P63"><text:span text:style-name="T43"><text:s/>84 <text:s/>| <text:s text:c="3"/></text:span><text:span text:style-name="T39"><text:s text:c="4"/>Node *sortedHead = q-&gt;head; <text:s text:c="23"/></text:span><text:span text:style-name="T43">// (3)</text:span></text:p>
      <text:p text:style-name="P63"><text:span text:style-name="T43"><text:s/>85 <text:s/>| <text:s text:c="3"/></text:span><text:span text:style-name="T39"><text:s text:c="4"/>Node *sortedTail = q-&gt;head; <text:s text:c="23"/></text:span><text:span text:style-name="T43">// (3)</text:span></text:p>
      <text:p text:style-name="P63"><text:span text:style-name="T43"><text:s/>86 <text:s/>| <text:s text:c="3"/></text:span><text:span text:style-name="T39"><text:s text:c="4"/>Node *unsorted = q-&gt;head-&gt;next; <text:s text:c="19"/></text:span><text:span text:style-name="T43">// (5)</text:span></text:p>
      <text:p text:style-name="P64"><text:s/>87 <text:s/>| <text:s text:c="3"/></text:p>
      <text:p text:style-name="P63"><text:span text:style-name="T43"><text:s/>88 <text:s/>| <text:s text:c="3"/></text:span><text:span text:style-name="T39"><text:s text:c="4"/>sortedHead-&gt;next = sortedHead; <text:s text:c="20"/></text:span><text:span text:style-name="T43">// (3)</text:span></text:p>
      <text:p text:style-name="P65"><text:span text:style-name="T43"><text:s/>89 <text:s/>| <text:s text:c="3"/></text:span><text:s text:c="4"/></text:p>
      <text:p text:style-name="P63"><text:span text:style-name="T43"><text:s/>90 <text:s/>| <text:s text:c="3"/></text:span><text:span text:style-name="T39"><text:s text:c="4"/></text:span><text:span text:style-name="T41">for</text:span><text:span text:style-name="T39"> (</text:span><text:span text:style-name="T44">size_t</text:span><text:span text:style-name="T39"> i = 1; i &lt; n; i++) { <text:s text:c="18"/></text:span><text:span text:style-name="T43">// (1) + (1)*(n) + (2)*(n-1) = 3n - 1</text:span></text:p>
      <text:p text:style-name="P63"><text:span text:style-name="T43"><text:s/>91 <text:s/>| <text:s text:c="3"/></text:span><text:span text:style-name="T39"><text:s text:c="8"/>Node *cur = unsorted; <text:s text:c="25"/></text:span><text:span text:style-name="T43">// (1)</text:span></text:p>
      <text:p text:style-name="P63"><text:span text:style-name="T43"><text:s/>92 <text:s/>| <text:s text:c="3"/></text:span><text:span text:style-name="T39"><text:s text:c="8"/>unsorted = cur-&gt;next; <text:s text:c="25"/></text:span><text:span text:style-name="T43">// (3)</text:span></text:p>
      <text:p text:style-name="P64"><text:s/>93 <text:s/>| <text:s text:c="3"/></text:p>
      <text:p text:style-name="P63"><text:span text:style-name="T43"><text:s/>94 <text:s/>| <text:s text:c="3"/></text:span><text:span text:style-name="T39"><text:s text:c="8"/></text:span><text:span text:style-name="T41">if</text:span><text:span text:style-name="T39"> (cur-&gt;value &lt;= sortedHead-&gt;value) { <text:s text:c="8"/></text:span><text:span text:style-name="T43">// (5)</text:span></text:p>
      <text:p text:style-name="P63"><text:span text:style-name="T43"><text:s/>95 <text:s/>| <text:s text:c="3"/></text:span><text:span text:style-name="T39"><text:s text:c="12"/>cur-&gt;next = sortedHead; <text:s text:c="19"/></text:span><text:span text:style-name="T43">// (3)</text:span></text:p>
      <text:p text:style-name="P63"><text:span text:style-name="T43"><text:s/>96 <text:s/>| <text:s text:c="3"/></text:span><text:span text:style-name="T39"><text:s text:c="12"/>sortedTail-&gt;next = cur; <text:s text:c="19"/></text:span><text:span text:style-name="T43">// (3)</text:span></text:p>
      <text:p text:style-name="P63"><text:span text:style-name="T43"><text:s/>97 <text:s/>| <text:s text:c="3"/></text:span><text:span text:style-name="T39"><text:s text:c="12"/>sortedHead = cur; <text:s text:c="25"/></text:span><text:span text:style-name="T43">// (1)</text:span></text:p>
      <text:p text:style-name="P63"><text:span text:style-name="T43"><text:s/>98 <text:s/>| <text:s text:c="3"/></text:span><text:span text:style-name="T39"><text:s text:c="8"/>} </text:span><text:span text:style-name="T41">else</text:span><text:span text:style-name="T39"> </text:span><text:span text:style-name="T41">if</text:span><text:span text:style-name="T39"> (cur-&gt;value &gt;= sortedTail-&gt;value) { <text:s/></text:span><text:span text:style-name="T43">// (5)</text:span></text:p>
      <text:p text:style-name="P63"><text:span text:style-name="T43"><text:s/>99 <text:s/>| <text:s text:c="3"/></text:span><text:span text:style-name="T39"><text:s text:c="12"/>cur-&gt;next = sortedHead; <text:s text:c="19"/></text:span><text:span text:style-name="T43">// (3)</text:span></text:p>
      <text:p text:style-name="P63"><text:span text:style-name="T43">100 <text:s/>| <text:s text:c="3"/></text:span><text:span text:style-name="T39"><text:s text:c="12"/>sortedTail-&gt;next = cur; <text:s text:c="19"/></text:span><text:span text:style-name="T43">// (3)</text:span></text:p>
      <text:p text:style-name="P63"><text:span text:style-name="T43">101 <text:s/>| <text:s text:c="3"/></text:span><text:span text:style-name="T39"><text:s text:c="12"/>sortedTail = cur; <text:s text:c="25"/></text:span><text:span text:style-name="T43">// (1)</text:span></text:p>
      <text:p text:style-name="P63"><text:span text:style-name="T43">102 <text:s/>| <text:s text:c="3"/></text:span><text:span text:style-name="T39"><text:s text:c="8"/>} </text:span><text:span text:style-name="T41">else</text:span><text:span text:style-name="T39"> {</text:span></text:p>
      <text:p text:style-name="P63"><text:span text:style-name="T43">103 <text:s/>| <text:s text:c="3"/></text:span><text:span text:style-name="T39"><text:s text:c="12"/>Node *prev = sortedHead; <text:s text:c="18"/></text:span><text:span text:style-name="T43">// (1)</text:span></text:p>
      <text:p text:style-name="P63"><text:span text:style-name="T43">104 <text:s/>| <text:s text:c="3"/></text:span><text:span text:style-name="T39"><text:s text:c="12"/></text:span><text:span text:style-name="T41">while</text:span><text:span text:style-name="T39"> (prev-&gt;next != sortedHead &amp;&amp; prev-&gt;next-&gt;value &lt;= cur-&gt;value) { </text:span><text:span text:style-name="T43">// (11)</text:span></text:p>
      <text:p text:style-name="P63"><text:span text:style-name="T43">105 <text:s/>| <text:s text:c="3"/></text:span><text:span text:style-name="T39"><text:s text:c="16"/>prev = prev-&gt;next; <text:s text:c="20"/></text:span><text:span text:style-name="T43">// (3)</text:span></text:p>
      <text:p text:style-name="P63"><text:span text:style-name="T43">106 <text:s/>| <text:s text:c="3"/></text:span><text:span text:style-name="T39"><text:s text:c="12"/>} </text:span><text:span text:style-name="T43">// Худший случай while (проход i элементов): 11*(i+1) + 3*i = 14i + 11</text:span></text:p>
      <text:p text:style-name="P63"><text:span text:style-name="T43">107 <text:s/>| <text:s text:c="3"/></text:span><text:span text:style-name="T39"><text:s text:c="12"/>cur-&gt;next = prev-&gt;next; <text:s text:c="19"/></text:span><text:span text:style-name="T43">// (5)</text:span></text:p>
      <text:p text:style-name="P63"><text:span text:style-name="T43">108 <text:s/>| <text:s text:c="3"/></text:span><text:span text:style-name="T39"><text:s text:c="12"/>prev-&gt;next = cur; <text:s text:c="25"/></text:span><text:span text:style-name="T43">// (3)</text:span></text:p>
      <text:p text:style-name="P63"><text:span text:style-name="T43">109 <text:s/>| <text:s text:c="3"/></text:span><text:span text:style-name="T39"><text:s text:c="8"/>} </text:span><text:span text:style-name="T43">// Худший случай ветки else: 1 + (14i + 11) + 5 + 3 = 14i + 20</text:span></text:p>
      <text:p text:style-name="P63"><text:span text:style-name="T43">110 <text:s/>| <text:s text:c="3"/></text:span><text:span text:style-name="T39"><text:s text:c="4"/>} </text:span><text:span text:style-name="T43">// Тело цикла (худший случай): 1 + 3 + 5 + 5 + (14i + 20) = 14i + 34</text:span></text:p>
      <text:p text:style-name="P63"><text:span text:style-name="T43">111 <text:s/>| <text:s text:c="3"/></text:span><text:span text:style-name="T39"><text:s text:c="6"/></text:span><text:span text:style-name="T43">// Сумма от i=1 до n-1 для (14i + 34) = 14*(n(n-1)/2) + 34(n-1) = 7n^2 + 27n - 34</text:span></text:p>
      <text:p text:style-name="P63"><text:soft-page-break/><text:span text:style-name="T43">112 <text:s/>| <text:s text:c="3"/></text:span><text:span text:style-name="T39"><text:s text:c="6"/></text:span><text:span text:style-name="T43">// Весь цикл: (3n - 1) + (7n^2 + 27n - 34) = 7n^2 + 30n - 35</text:span></text:p>
      <text:p text:style-name="P63"><text:span text:style-name="T43">113 <text:s/>| <text:s text:c="3"/></text:span><text:span text:style-name="T39"><text:s text:c="4"/>q-&gt;head = sortedHead; <text:s text:c="29"/></text:span><text:span text:style-name="T43">// (3)</text:span></text:p>
      <text:p text:style-name="P63"><text:span text:style-name="T43">114 <text:s/>| <text:s text:c="3"/></text:span><text:span text:style-name="T39"><text:s text:c="4"/>q-&gt;tail = sortedTail; <text:s text:c="29"/></text:span><text:span text:style-name="T43">// (3)</text:span></text:p>
      <text:p text:style-name="P65"><text:span text:style-name="T43">115 <text:s/>| <text:s text:c="3"/></text:span>}</text:p>
      <text:p text:style-name="P64">116 <text:s/>| <text:s text:c="3"/>// Итоговая сложность insertionSort: 3 + 2 + 3 + 3 + 5 + 3 + (7n^2 + 30n - 35) + 3 + 3 = 7n^2 + 30n - 10</text:p>
      <text:p text:style-name="P64">117 <text:s/>| <text:s text:c="3"/></text:p>
      <text:p text:style-name="P63"><text:span text:style-name="T43">118 <text:s/>| <text:s text:c="3"/></text:span><text:span text:style-name="T44">void</text:span><text:span text:style-name="T39"> bucketSort(RingQueue *q) {</text:span></text:p>
      <text:p text:style-name="P63"><text:span text:style-name="T43">119 <text:s/>| <text:s text:c="3"/></text:span><text:span text:style-name="T39"><text:s text:c="4"/></text:span><text:span text:style-name="T44">size_t</text:span><text:span text:style-name="T39"> n = q-&gt;size; <text:s text:c="31"/></text:span><text:span text:style-name="T43">// (3)</text:span></text:p>
      <text:p text:style-name="P63"><text:span text:style-name="T43">120 <text:s/>| <text:s text:c="3"/></text:span><text:span text:style-name="T39"><text:s text:c="4"/></text:span><text:span text:style-name="T41">if</text:span><text:span text:style-name="T39"> (n &lt;= 1) </text:span><text:span text:style-name="T41">return</text:span><text:span text:style-name="T39">; <text:s text:c="31"/></text:span><text:span text:style-name="T43">// (2)</text:span></text:p>
      <text:p text:style-name="P64">121 <text:s/>| <text:s text:c="3"/></text:p>
      <text:p text:style-name="P63"><text:span text:style-name="T43">122 <text:s/>| <text:s text:c="3"/></text:span><text:span text:style-name="T39"><text:s text:c="4"/></text:span><text:span text:style-name="T44">float</text:span><text:span text:style-name="T39"> min = q-&gt;head-&gt;value, max = q-&gt;head-&gt;value; <text:s/></text:span><text:span text:style-name="T43">// (10)</text:span></text:p>
      <text:p text:style-name="P63"><text:span text:style-name="T43">123 <text:s/>| <text:s text:c="3"/></text:span><text:span text:style-name="T39"><text:s text:c="4"/>Node *cur = q-&gt;head-&gt;next; <text:s text:c="24"/></text:span><text:span text:style-name="T43">// (5)</text:span></text:p>
      <text:p text:style-name="P63"><text:span text:style-name="T43">124 <text:s/>| <text:s text:c="3"/></text:span><text:span text:style-name="T39"><text:s text:c="4"/></text:span><text:span text:style-name="T41">for</text:span><text:span text:style-name="T39"> (</text:span><text:span text:style-name="T44">size_t</text:span><text:span text:style-name="T39"> i = 1; i &lt; n; i++) { <text:s text:c="18"/></text:span><text:span text:style-name="T43">// (1) + (1)*(n) + (2)*(n-1) = 3n - 1</text:span></text:p>
      <text:p text:style-name="P63"><text:span text:style-name="T43">125 <text:s/>| <text:s text:c="3"/></text:span><text:span text:style-name="T39"><text:s text:c="8"/></text:span><text:span text:style-name="T41">if</text:span><text:span text:style-name="T39"> (cur-&gt;value &lt; min) min = cur-&gt;value; <text:s text:c="7"/></text:span><text:span text:style-name="T43">// (6)</text:span></text:p>
      <text:p text:style-name="P63"><text:span text:style-name="T43">126 <text:s/>| <text:s text:c="3"/></text:span><text:span text:style-name="T39"><text:s text:c="8"/></text:span><text:span text:style-name="T41">if</text:span><text:span text:style-name="T39"> (cur-&gt;value &gt; max) max = cur-&gt;value; <text:s text:c="7"/></text:span><text:span text:style-name="T43">// (6)</text:span></text:p>
      <text:p text:style-name="P63"><text:span text:style-name="T43">127 <text:s/>| <text:s text:c="3"/></text:span><text:span text:style-name="T39"><text:s text:c="8"/>cur = cur-&gt;next; <text:s text:c="30"/></text:span><text:span text:style-name="T43">// (3)</text:span></text:p>
      <text:p text:style-name="P63"><text:span text:style-name="T43">128 <text:s/>| <text:s text:c="3"/></text:span><text:span text:style-name="T39"><text:s text:c="4"/>} </text:span><text:span text:style-name="T43">// Цикл 1: (3n - 1) + 15(n-1) = 18n - 16</text:span></text:p>
      <text:p text:style-name="P65"><text:span text:style-name="T43">129 <text:s/>| <text:s text:c="3"/></text:span><text:s text:c="4"/></text:p>
      <text:p text:style-name="P63"><text:span text:style-name="T43">130 <text:s/>| <text:s text:c="3"/></text:span><text:span text:style-name="T39"><text:s text:c="4"/></text:span><text:span text:style-name="T41">if</text:span><text:span text:style-name="T39"> (min == max) </text:span><text:span text:style-name="T41">return</text:span><text:span text:style-name="T39">; <text:s text:c="27"/></text:span><text:span text:style-name="T43">// (2)</text:span></text:p>
      <text:p text:style-name="P64">131 <text:s/>| <text:s text:c="3"/></text:p>
      <text:p text:style-name="P63"><text:span text:style-name="T43">132 <text:s/>| <text:s text:c="3"/></text:span><text:span text:style-name="T39"><text:s text:c="4"/></text:span><text:span text:style-name="T44">int</text:span><text:span text:style-name="T39"> numBuckets = (</text:span><text:span text:style-name="T44">int</text:span><text:span text:style-name="T39">)n; <text:s text:c="26"/></text:span><text:span text:style-name="T43">// (2)</text:span></text:p>
      <text:p text:style-name="P63"><text:span text:style-name="T43">133 <text:s/>| <text:s text:c="3"/></text:span><text:span text:style-name="T39"><text:s text:c="4"/>RingQueue *buckets = malloc(numBuckets * </text:span><text:span text:style-name="T41">sizeof</text:span><text:span text:style-name="T39">(RingQueue)); </text:span><text:span text:style-name="T43">// (4)</text:span></text:p>
      <text:p text:style-name="P63"><text:span text:style-name="T43">134 <text:s/>| <text:s text:c="3"/></text:span><text:span text:style-name="T39"><text:s text:c="4"/></text:span><text:span text:style-name="T41">if</text:span><text:span text:style-name="T39"> (!buckets) <text:s/>{ <text:s text:c="34"/></text:span><text:span text:style-name="T43">// (2)</text:span></text:p>
      <text:p text:style-name="P63"><text:span text:style-name="T43">135 <text:s/>| <text:s text:c="3"/></text:span><text:span text:style-name="T39"><text:s text:c="8"/>fprintf(stderr, </text:span><text:span text:style-name="T45">"Ошибка: не удалось выделить память для корзин\n"</text:span><text:span text:style-name="T39">); exit(1);</text:span></text:p>
      <text:p text:style-name="P63"><text:span text:style-name="T43">136 <text:s/>| <text:s text:c="3"/></text:span><text:span text:style-name="T39"><text:s text:c="4"/>}</text:span></text:p>
      <text:p text:style-name="P63"><text:span text:style-name="T43">137 <text:s/>| <text:s text:c="3"/></text:span><text:span text:style-name="T39"><text:s text:c="4"/></text:span><text:span text:style-name="T41">for</text:span><text:span text:style-name="T39"> (</text:span><text:span text:style-name="T44">int</text:span><text:span text:style-name="T39"> i = 0; i &lt; numBuckets; i++) <text:s text:c="14"/></text:span><text:span text:style-name="T43">// (1) + (n+1) + 2n = 3n + 2</text:span></text:p>
      <text:p text:style-name="P63"><text:span text:style-name="T43">138 <text:s/>| <text:s text:c="3"/></text:span><text:span text:style-name="T39"><text:s text:c="8"/>init(&amp;buckets[i]); <text:s text:c="28"/></text:span><text:span text:style-name="T43">// (12)</text:span></text:p>
      <text:p text:style-name="P63"><text:span text:style-name="T43">139 <text:s/>| <text:s text:c="3"/></text:span><text:span text:style-name="T39"><text:s text:c="4"/></text:span><text:span text:style-name="T43">// Цикл 2: (3n + 2) + 12n = 15n + 2</text:span></text:p>
      <text:p text:style-name="P64">140 <text:s/>| <text:s text:c="3"/></text:p>
      <text:p text:style-name="P63"><text:span text:style-name="T43">141 <text:s/>| <text:s text:c="3"/></text:span><text:span text:style-name="T39"><text:s text:c="4"/></text:span><text:span text:style-name="T41">while</text:span><text:span text:style-name="T39"> (q-&gt;size != 0) { <text:s text:c="28"/></text:span><text:span text:style-name="T43">// (3) * (n+1) = 3n + 3</text:span></text:p>
      <text:p text:style-name="P63"><text:span text:style-name="T43">142 <text:s/>| <text:s text:c="3"/></text:span><text:span text:style-name="T39"><text:s text:c="8"/></text:span><text:span text:style-name="T44">float</text:span><text:span text:style-name="T39"> val; <text:s text:c="36"/></text:span><text:span text:style-name="T43">// (0)</text:span></text:p>
      <text:p text:style-name="P63"><text:span text:style-name="T43">143 <text:s/>| <text:s text:c="3"/></text:span><text:span text:style-name="T39"><text:s text:c="8"/>deQueue(q, &amp;val); <text:s text:c="29"/></text:span><text:span text:style-name="T43">// (34)</text:span></text:p>
      <text:p text:style-name="P63"><text:span text:style-name="T43">144 <text:s/>| <text:s text:c="3"/></text:span><text:span text:style-name="T39"><text:s text:c="8"/></text:span><text:span text:style-name="T44">int</text:span><text:span text:style-name="T39"> ind = (</text:span><text:span text:style-name="T44">int</text:span><text:span text:style-name="T39">)((val - min) * (numBuckets - 1) / (max - min)); </text:span><text:span text:style-name="T43">// (7)</text:span></text:p>
      <text:p text:style-name="P63"><text:span text:style-name="T43">145 <text:s/>| <text:s text:c="3"/></text:span><text:span text:style-name="T39"><text:s text:c="8"/>enQueue(&amp;buckets[ind], val); <text:s text:c="18"/></text:span><text:span text:style-name="T43">// (31)</text:span></text:p>
      <text:p text:style-name="P63"><text:span text:style-name="T43">146 <text:s/>| <text:s text:c="3"/></text:span><text:span text:style-name="T39"><text:s text:c="4"/>} </text:span><text:span text:style-name="T43">// Цикл 3: 3n + 3 + n*(34 + 7 + 31) = 75n + 3</text:span></text:p>
      <text:p text:style-name="P64">147 <text:s/>| <text:s text:c="3"/></text:p>
      <text:p text:style-name="P63"><text:span text:style-name="T43">148 <text:s/>| <text:s text:c="3"/></text:span><text:span text:style-name="T39"><text:s text:c="4"/></text:span><text:span text:style-name="T41">for</text:span><text:span text:style-name="T39"> (</text:span><text:span text:style-name="T44">int</text:span><text:span text:style-name="T39"> i = 0; i &lt; numBuckets; i++) { <text:s text:c="12"/></text:span><text:span text:style-name="T43">// (1) + (n+1) + 2n = 3n + 2</text:span></text:p>
      <text:p text:style-name="P63"><text:span text:style-name="T43">149 <text:s/>| <text:s text:c="3"/></text:span><text:span text:style-name="T39"><text:s text:c="8"/></text:span><text:span text:style-name="T41">if</text:span><text:span text:style-name="T39"> (buckets[i].size == 0) </text:span><text:span text:style-name="T41">continue</text:span><text:span text:style-name="T39">; <text:s text:c="11"/></text:span><text:span text:style-name="T43">// (4)</text:span></text:p>
      <text:p text:style-name="P63"><text:span text:style-name="T43">150 <text:s/>| <text:s text:c="3"/></text:span><text:span text:style-name="T39"><text:s text:c="8"/>insertionSort(&amp;buckets[i]); <text:s text:c="19"/></text:span><text:span text:style-name="T43">// (3) + insertionSort(7k^2 + 30k - 10)</text:span></text:p>
      <text:p text:style-name="P63"><text:span text:style-name="T43">151 <text:s/>| <text:s text:c="3"/></text:span><text:span text:style-name="T39"><text:s text:c="8"/></text:span><text:span text:style-name="T44">float</text:span><text:span text:style-name="T39"> val; <text:s text:c="36"/></text:span><text:span text:style-name="T43">// (0)</text:span></text:p>
      <text:p text:style-name="P63"><text:span text:style-name="T43">152 <text:s/>| <text:s text:c="3"/></text:span><text:span text:style-name="T39"><text:s text:c="8"/></text:span><text:span text:style-name="T41">while</text:span><text:span text:style-name="T39"> (buckets[i].size != 0) { <text:s text:c="16"/></text:span><text:span text:style-name="T43">// (3) * (k+1)</text:span></text:p>
      <text:p text:style-name="P63"><text:span text:style-name="T43">153 <text:s/>| <text:s text:c="3"/></text:span><text:span text:style-name="T39"><text:s text:c="12"/></text:span><text:span text:style-name="T41">if</text:span><text:span text:style-name="T39"> (deQueue(&amp;buckets[i], &amp;val)) { <text:s text:c="9"/></text:span><text:span text:style-name="T43">// (37)</text:span></text:p>
      <text:p text:style-name="P63"><text:span text:style-name="T43">154 <text:s/>| <text:s text:c="3"/></text:span><text:span text:style-name="T39"><text:s text:c="16"/>enQueue(q, val); <text:s text:c="22"/></text:span><text:span text:style-name="T43">// (29)</text:span></text:p>
      <text:p text:style-name="P63"><text:span text:style-name="T43">155 <text:s/>| <text:s text:c="3"/></text:span><text:span text:style-name="T39"><text:s text:c="12"/>}</text:span></text:p>
      <text:p text:style-name="P63"><text:span text:style-name="T43">156 <text:s/>| <text:s text:c="3"/></text:span><text:span text:style-name="T39"><text:s text:c="8"/>} </text:span><text:span text:style-name="T43">// Внутренний while для k элементов: 3(k+1) + k*(37 + 29) = 69k + 3</text:span></text:p>
      <text:p text:style-name="P63"><text:span text:style-name="T43">157 <text:s/>| <text:s text:c="3"/></text:span><text:span text:style-name="T39"><text:s text:c="4"/>} </text:span><text:span text:style-name="T43">// Худший случай цикла 4 (все n элементов в одной корзине, остальные n-1 пустые):</text:span></text:p>
      <text:p text:style-name="P63"><text:span text:style-name="T43">158 <text:s/>| <text:s text:c="3"/></text:span><text:span text:style-name="T39"><text:s text:c="6"/></text:span><text:span text:style-name="T43">// Пустые корзины: (n-1) * 4 = 4n - 4</text:span></text:p>
      <text:p text:style-name="P63"><text:span text:style-name="T43">159 <text:s/>| <text:s text:c="3"/></text:span><text:span text:style-name="T39"><text:s text:c="6"/></text:span><text:span text:style-name="T43">// Полная корзина: 3 (if) + (7n^2 + 30n - 7) + (69n + 3) = 7n^2 + 99n - 1</text:span></text:p>
      <text:p text:style-name="P63"><text:span text:style-name="T43">160 <text:s/>| <text:s text:c="3"/></text:span><text:span text:style-name="T39"><text:s text:c="6"/></text:span><text:span text:style-name="T43">// Весь цикл 4: (3n + 2) + (4n - 4) + (7n^2 + 99n - 1) = 7n^2 + 106n - 3</text:span></text:p>
      <text:p text:style-name="P65"><text:span text:style-name="T43">161 <text:s/>| <text:s text:c="3"/></text:span><text:s text:c="6"/></text:p>
      <text:p text:style-name="P63"><text:span text:style-name="T43">162 <text:s/>| <text:s text:c="3"/></text:span><text:span text:style-name="T39"><text:s text:c="4"/>free(buckets); <text:s text:c="36"/></text:span><text:span text:style-name="T43">// (1)</text:span></text:p>
      <text:p text:style-name="P65"><text:span text:style-name="T43">163 <text:s/>| <text:s text:c="3"/></text:span>}</text:p>
      <text:p text:style-name="P64">164 <text:s/>| <text:s text:c="3"/>// Итоговая сложность bucketSort: </text:p>
      <text:p text:style-name="P64">165 <text:s/>| <text:s text:c="3"/>// 3 + 2 + 10 + 5 + (18n - 16) + 2 + 2 + 4 + 2 + (15n + 2) + (75n + 3) + (7n^2 + 106n - 3) + 1 = 7n^2 + 214n + 17</text:p>
      <text:p text:style-name="P64">166 <text:s/>| <text:s text:c="3"/></text:p>
      <text:p text:style-name="P63"><text:span text:style-name="T43">167 <text:s/>| <text:s text:c="3"/></text:span><text:span text:style-name="T44">void</text:span><text:span text:style-name="T39"> readFromFile(</text:span><text:span text:style-name="T44">char</text:span><text:span text:style-name="T39"> *filename, RingQueue *q) {</text:span></text:p>
      <text:p text:style-name="P63"><text:span text:style-name="T43">168 <text:s/>| <text:s text:c="3"/></text:span><text:span text:style-name="T39"><text:s text:c="4"/></text:span><text:span text:style-name="T44">FILE</text:span><text:span text:style-name="T39"> *file = fopen(filename, </text:span><text:span text:style-name="T45">"r"</text:span><text:span text:style-name="T39">); <text:s text:c="16"/></text:span><text:span text:style-name="T43">// (2)</text:span></text:p>
      <text:p text:style-name="P63"><text:span text:style-name="T43">169 <text:s/>| <text:s text:c="3"/></text:span><text:span text:style-name="T39"><text:s text:c="4"/></text:span><text:span text:style-name="T41">if</text:span><text:span text:style-name="T39"> (!file) { <text:s text:c="38"/></text:span><text:span text:style-name="T43">// (2)</text:span></text:p>
      <text:p text:style-name="P63"><text:span text:style-name="T43">170 <text:s/>| <text:s text:c="3"/></text:span><text:span text:style-name="T39"><text:s text:c="8"/>fprintf(stderr, </text:span><text:span text:style-name="T45">"Ошибка: не удалось открыть файл %s\n"</text:span><text:span text:style-name="T39">, filename);</text:span></text:p>
      <text:p text:style-name="P63"><text:span text:style-name="T43">171 <text:s/>| <text:s text:c="3"/></text:span><text:span text:style-name="T39"><text:s text:c="8"/>exit(1);</text:span></text:p>
      <text:p text:style-name="P63"><text:span text:style-name="T43">172 <text:s/>| <text:s text:c="3"/></text:span><text:span text:style-name="T39"><text:s text:c="4"/>}</text:span></text:p>
      <text:p text:style-name="P64">173 <text:s/>| <text:s text:c="3"/></text:p>
      <text:p text:style-name="P63"><text:span text:style-name="T43">174 <text:s/>| <text:s text:c="3"/></text:span><text:span text:style-name="T39"><text:s text:c="4"/></text:span><text:span text:style-name="T44">float</text:span><text:span text:style-name="T39"> tmp; <text:s text:c="40"/></text:span><text:span text:style-name="T43">// (0)</text:span></text:p>
      <text:p text:style-name="P63"><text:span text:style-name="T43">175 <text:s/>| <text:s text:c="3"/></text:span><text:span text:style-name="T39"><text:s text:c="4"/></text:span><text:span text:style-name="T41">while</text:span><text:span text:style-name="T39"> (fscanf(file, </text:span><text:span text:style-name="T45">"%f"</text:span><text:span text:style-name="T39">, &amp;tmp) == 1) { <text:s text:c="11"/></text:span><text:span text:style-name="T43">// (3) * (n+1) = 3n + 3</text:span></text:p>
      <text:p text:style-name="P63"><text:span text:style-name="T43">176 <text:s/>| <text:s text:c="3"/></text:span><text:span text:style-name="T39"><text:s text:c="8"/>enQueue(q, tmp); <text:s text:c="30"/></text:span><text:span text:style-name="T43">// (29)</text:span></text:p>
      <text:p text:style-name="P63"><text:span text:style-name="T43">177 <text:s/>| <text:s text:c="3"/></text:span><text:span text:style-name="T39"><text:s text:c="4"/>} </text:span><text:span text:style-name="T43">// Цикл: 3n + 3 + 29n = 32n + 3</text:span></text:p>
      <text:p text:style-name="P65"><text:span text:style-name="T43">178 <text:s/>| <text:s text:c="3"/></text:span><text:s text:c="4"/></text:p>
      <text:p text:style-name="P63"><text:soft-page-break/><text:span text:style-name="T43">179 <text:s/>| <text:s text:c="3"/></text:span><text:span text:style-name="T39"><text:s text:c="4"/>fclose(file); <text:s text:c="37"/></text:span><text:span text:style-name="T43">// (1)</text:span></text:p>
      <text:p text:style-name="P65"><text:span text:style-name="T43">180 <text:s/>| <text:s text:c="3"/></text:span>}</text:p>
      <text:p text:style-name="P64">181 <text:s/>| <text:s text:c="3"/>// Итоговая сложность readFromFile: 2 + 2 + (32n + 3) + 1 = 32n + 8</text:p>
      <text:p text:style-name="P64">182 <text:s/>| <text:s text:c="3"/></text:p>
      <text:p text:style-name="P63"><text:span text:style-name="T43">183 <text:s/>| <text:s text:c="3"/></text:span><text:span text:style-name="T44">int</text:span><text:span text:style-name="T39"> main(</text:span><text:span text:style-name="T44">int</text:span><text:span text:style-name="T39"> argc, </text:span><text:span text:style-name="T44">char</text:span><text:span text:style-name="T39"> **argv) {</text:span></text:p>
      <text:p text:style-name="P63"><text:span text:style-name="T43">184 <text:s/>| <text:s text:c="3"/></text:span><text:span text:style-name="T39"><text:s text:c="4"/></text:span><text:span text:style-name="T41">if</text:span><text:span text:style-name="T39"> (argc == 2) { <text:s text:c="34"/></text:span><text:span text:style-name="T43">// (1)</text:span></text:p>
      <text:p text:style-name="P63"><text:span text:style-name="T43">185 <text:s/>| <text:s text:c="3"/></text:span><text:span text:style-name="T39"><text:s text:c="8"/></text:span><text:span text:style-name="T44">char</text:span><text:span text:style-name="T39"> *filename = argv[1]; <text:s text:c="21"/></text:span><text:span text:style-name="T43">// (2)</text:span></text:p>
      <text:p text:style-name="P63"><text:span text:style-name="T43">186 <text:s/>| <text:s text:c="3"/></text:span><text:span text:style-name="T39"><text:s text:c="8"/>RingQueue q; <text:s text:c="34"/></text:span><text:span text:style-name="T43">// (0)</text:span></text:p>
      <text:p text:style-name="P63"><text:span text:style-name="T43">187 <text:s/>| <text:s text:c="3"/></text:span><text:span text:style-name="T39"><text:s text:c="8"/>init(&amp;q); <text:s text:c="37"/></text:span><text:span text:style-name="T43">// (11)</text:span></text:p>
      <text:p text:style-name="P63"><text:span text:style-name="T43">188 <text:s/>| <text:s text:c="3"/></text:span><text:span text:style-name="T39"><text:s text:c="8"/>readFromFile(filename, &amp;q); <text:s text:c="19"/></text:span><text:span text:style-name="T43">// (32n + 10)</text:span></text:p>
      <text:p text:style-name="P64">189 <text:s/>| <text:s text:c="3"/></text:p>
      <text:p text:style-name="P63"><text:span text:style-name="T43">190 <text:s/>| <text:s text:c="3"/></text:span><text:span text:style-name="T39"><text:s text:c="8"/>printf(</text:span><text:span text:style-name="T45">"Исходные данные из файла:\n"</text:span><text:span text:style-name="T39">); <text:s text:c="8"/></text:span><text:span text:style-name="T43">// (1)</text:span></text:p>
      <text:p text:style-name="P63"><text:span text:style-name="T43">191 <text:s/>| <text:s text:c="3"/></text:span><text:span text:style-name="T39"><text:s text:c="8"/>printQ(&amp;q); <text:s text:c="35"/></text:span><text:span text:style-name="T43">// (16n + 16)</text:span></text:p>
      <text:p text:style-name="P63"><text:span text:style-name="T43">192 <text:s/>| <text:s text:c="3"/></text:span><text:span text:style-name="T39"><text:s text:c="8"/>bucketSort(&amp;q); <text:s text:c="31"/></text:span><text:span text:style-name="T43">// (7n^2 + 214n + 19)</text:span></text:p>
      <text:p text:style-name="P63"><text:span text:style-name="T43">193 <text:s/>| <text:s text:c="3"/></text:span><text:span text:style-name="T39"><text:s text:c="8"/>printf(</text:span><text:span text:style-name="T45">"Отсортированные данные:\n"</text:span><text:span text:style-name="T39">); <text:s text:c="10"/></text:span><text:span text:style-name="T43">// (1)</text:span></text:p>
      <text:p text:style-name="P63"><text:span text:style-name="T43">194 <text:s/>| <text:s text:c="3"/></text:span><text:span text:style-name="T39"><text:s text:c="8"/>printQ(&amp;q); <text:s text:c="35"/></text:span><text:span text:style-name="T43">// (16n + 16)</text:span></text:p>
      <text:p text:style-name="P64">195 <text:s/>| <text:s text:c="3"/></text:p>
      <text:p text:style-name="P63"><text:span text:style-name="T43">196 <text:s/>| <text:s text:c="3"/></text:span><text:span text:style-name="T39"><text:s text:c="4"/>} </text:span><text:span text:style-name="T41">else</text:span><text:span text:style-name="T39"> {</text:span></text:p>
      <text:p text:style-name="P63"><text:span text:style-name="T43">197 <text:s/>| <text:s text:c="3"/></text:span><text:span text:style-name="T39"><text:s text:c="8"/>fprintf(stderr, </text:span><text:span text:style-name="T45">"Использование: %s &lt;имя_файла&gt;\n"</text:span><text:span text:style-name="T39">, argv[0]);</text:span></text:p>
      <text:p text:style-name="P63"><text:span text:style-name="T43">198 <text:s/>| <text:s text:c="3"/></text:span><text:span text:style-name="T39"><text:s text:c="4"/>}</text:span></text:p>
      <text:p text:style-name="P64">199 <text:s/>| <text:s text:c="3"/></text:p>
      <text:p text:style-name="P63"><text:span text:style-name="T43">200 <text:s/>| <text:s text:c="3"/></text:span><text:span text:style-name="T39"><text:s text:c="4"/></text:span><text:span text:style-name="T41">return</text:span><text:span text:style-name="T39"> 0; <text:s text:c="41"/></text:span><text:span text:style-name="T43">// (1)</text:span></text:p>
      <text:p text:style-name="P65"><text:span text:style-name="T43">201 <text:s/>| <text:s text:c="3"/></text:span>}</text:p>
      <text:p text:style-name="P64">202 <text:s/>| <text:s text:c="3"/>// Итоговая сложность main (и всей программы в худшем случае):</text:p>
      <text:p text:style-name="P64">203 <text:s/>| <text:s text:c="3"/>// 1 + 2 + 11 + (32n + 10) + 1 + (16n + 16) + (7n^2 + 214n + 19) + 1 + (16n + 16) + 1 = 7n^2 + 278n + 78</text:p>
      <text:p text:style-name="P66"/>
      <text:p text:style-name="P62"/>
      <text:p text:style-name="P54"/>
      <text:p text:style-name="P54"/>
      <text:h text:style-name="P67" text:outline-level="1"><text:bookmark-start text:name="__RefHeading___Toc143_2058273410 Copy 1 Copy 2 Copy 6"/><text:span text:style-name="T32">З</text:span><text:span text:style-name="T8">АКЛЮЧЕНИЕ</text:span><text:bookmark-end text:name="__RefHeading___Toc143_2058273410 Copy 1 Copy 2 Copy 6"/></text:h>
      <text:p text:style-name="P68"><text:span text:style-name="T46">В ходе выполнения лабораторной работы была разработана программа на языке С</text:span><text:span text:style-name="T47"> </text:span><text:span text:style-name="T46">для сортировки последовательности чисел </text:span><text:span text:style-name="T47">с помощью алгоритма распределения</text:span><text:span text:style-name="T48"> (карманная сортировка)</text:span><text:span text:style-name="T42">, использующ</text:span><text:span text:style-name="T49">его</text:span><text:span text:style-name="T42"> кольцевую очередь, построенную на базе связного списка</text:span><text:span text:style-name="T46">. Для</text:span><text:span text:style-name="T47"> </text:span><text:span text:style-name="T46">решения задачи также был реализован алгоритм </text:span><text:span text:style-name="T47">сортировки вставками</text:span><text:span text:style-name="T46">. </text:span>Числа считывались из файла <text:span text:style-name="T42">и хранились в кольцевой очереди.</text:span></text:p>
      <text:p text:style-name="P69">Программа разрабатывалась в среде <text:span text:style-name="T47">VS Code</text:span><text:span text:style-name="T50">, компилировалась с</text:span> помощью <text:span text:style-name="T47">gcc </text:span><text:span text:style-name="T50">и запускалась </text:span><text:span text:style-name="T51">в ОС</text:span><text:span text:style-name="T47"> Arch Linux</text:span>.</text:p>
      <text:p text:style-name="P69">В конце работы была оценена сложность алгоритма путём подсчёта всех<text:span text:style-name="T47"> </text:span>элементарных операций, выполняющихся в программе.<text:span text:style-name="T52"> </text:span>Тестирование <text:span text:style-name="T51">алгоритма </text:span>показало <text:span text:style-name="T53">его</text:span> корректную работу при различных входных<text:span text:style-name="T47"> </text:span>данных.</text:p>
      <text:p text:style-name="P69">Выполнение работы позволило закрепить навыки разработки алгоритмов<text:span text:style-name="T47"> </text:span>сортировки, а также углубить знания в области структур данных.</text:p>
      <text:h text:style-name="P70" text:outline-level="1"><text:bookmark-start text:name="__RefHeading___Toc143_2058273410 Copy 1 Copy 2 Copy 7"/><text:span text:style-name="T32">П</text:span><text:span text:style-name="T8">РИЛОЖЕНИЕ А</text:span><text:bookmark-end text:name="__RefHeading___Toc143_2058273410 Copy 1 Copy 2 Copy 7"/></text:h>
      <text:h text:style-name="P71" text:outline-level="1"><draw:frame draw:style-name="fr5" draw:name="Image4" text:anchor-type="paragraph" svg:x="2.923cm" svg:y="-0.095cm" svg:width="12.67cm" svg:height="21.664cm" draw:z-index="6"><draw:image xlink:href="Pictures/10000001000003F1000006B672ABB0BF.png" xlink:type="simple" xlink:show="embed" xlink:actuate="onLoad" draw:mime-type="image/png"/></draw:frame></text:h>
      <text:h text:style-name="P72" text:outline-level="1"><draw:frame draw:style-name="fr6" draw:name="Image3" text:anchor-type="paragraph" svg:x="2.644cm" svg:y="-0.072cm" svg:width="13.042cm" svg:height="19.778cm" draw:z-index="5"><draw:image xlink:href="Pictures/10000001000003A6000006B8B4AFBB5F.png" xlink:type="simple" xlink:show="embed" xlink:actuate="onLoad" draw:mime-type="image/png"/></draw:frame></text:h>
      <text:h text:style-name="P73" text:outline-level="1"><text:bookmark text:name="__RefHeading___Toc143_2058273410 Copy 1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 style:writing-mode-automatic="false"/>
      <style:text-properties style:font-name="Liberation Mono" fo:font-family="'Liberation Mono'" style:font-family-generic="modern" style:font-pitch="fixed" fo:font-size="8pt" officeooo:rsid="0096f977" style:font-size-asian="8pt" style:font-size-complex="8pt"/>
    </style:style>
    <style:style style:name="code" style:family="paragraph" style:parent-style-name="Code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14</text:page-number><text:bookmark-end text:name="PageNumWizard_FOOTER_Landscape19"/></text:p>
      </style:foot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02T12:34:25.400230447</dc:date>
    <meta:editing-duration>P1DT17H11M10S</meta:editing-duration>
    <meta:editing-cycles>139</meta:editing-cycles>
    <meta:generator>LibreOffice/26.2.2.2$Linux_X86_64 LibreOffice_project/620$Build-2</meta:generator>
    <meta:print-date>2026-05-02T12:31:18.855102983</meta:print-date>
    <meta:printed-by>PDF files</meta:printed-by>
    <meta:document-statistic meta:table-count="1" meta:image-count="4" meta:object-count="0" meta:page-count="14" meta:paragraph-count="376" meta:word-count="2360" meta:character-count="16066" meta:non-whitespace-character-count="9789"/>
  </office:meta>
</office:document-meta>
</file>