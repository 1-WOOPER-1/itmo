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BCC000013CE23012AB9.png" manifest:media-type="image/png"/>
  <manifest:file-entry manifest:full-path="Pictures/1000000100000A9600001162BFDB75FE.png" manifest:media-type="image/png"/>
  <manifest:file-entry manifest:full-path="Pictures/10000001000009AC000011602C0EC2D5.png" manifest:media-type="image/png"/>
  <manifest:file-entry manifest:full-path="Pictures/1000000100000E880000116238371F98.png" manifest:media-type="image/png"/>
  <manifest:file-entry manifest:full-path="Pictures/100000010000037D00000091C276CFF2.png" manifest:media-type="image/png"/>
  <manifest:file-entry manifest:full-path="Pictures/100000010000076B000002D6452418D4.png" manifest:media-type="image/png"/>
  <manifest:file-entry manifest:full-path="Pictures/10000001000000E30000001D95159B00.png" manifest:media-type="image/png"/>
  <manifest:file-entry manifest:full-path="Pictures/1000B47200001776000003059D220BC4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09cm" table:align="margins"/>
    </style:style>
    <style:style style:name="Table1.A" style:family="table-column">
      <style:table-column-properties style:column-width="2.775cm" style:rel-column-width="10639*"/>
    </style:style>
    <style:style style:name="Table1.B" style:family="table-column">
      <style:table-column-properties style:column-width="3.815cm" style:rel-column-width="14631*"/>
    </style:style>
    <style:style style:name="Table1.C" style:family="table-column">
      <style:table-column-properties style:column-width="4.831cm" style:rel-column-width="18526*"/>
    </style:style>
    <style:style style:name="Table1.D" style:family="table-column">
      <style:table-column-properties style:column-width="5.669cm" style:rel-column-width="21739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style:vertical-align="middle" fo:padding="0.097cm" fo:border="0.5pt solid #000000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First_20_Page">
      <style:paragraph-properties fo:margin-top="0cm" fo:margin-bottom="0cm" style:contextual-spacing="false" fo:line-height="100%" fo:text-align="center" style:justify-single-word="false" style:page-number="auto"/>
      <style:text-properties fo:font-weight="bold" officeooo:paragraph-rsid="000d823a" style:font-weight-asian="bold" style:font-weight-complex="bold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paragraph-rsid="000d823a"/>
    </style:style>
    <style:style style:name="P3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4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ext_20_body">
      <style:paragraph-properties fo:margin-top="0cm" fo:margin-bottom="0cm" style:contextual-spacing="false" fo:line-height="150%" fo:text-align="center" style:justify-single-word="false"/>
    </style:style>
    <style:style style:name="P7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paragraph-rsid="00dd73d1"/>
    </style:style>
    <style:style style:name="P8" style:family="paragraph" style:parent-style-name="Text_20_body">
      <style:paragraph-properties fo:margin-top="0cm" fo:margin-bottom="0cm" style:contextual-spacing="false" fo:line-height="150%" fo:text-align="right" style:justify-single-word="false"/>
      <style:text-properties officeooo:paragraph-rsid="000ca6c1"/>
    </style:style>
    <style:style style:name="P9" style:family="paragraph" style:parent-style-name="Text_20_body">
      <style:paragraph-properties fo:margin-top="0cm" fo:margin-bottom="0cm" style:contextual-spacing="false" fo:line-height="150%" fo:text-align="right" style:justify-single-word="false"/>
      <style:text-properties officeooo:rsid="004a596f" officeooo:paragraph-rsid="004a596f"/>
    </style:style>
    <style:style style:name="P10" style:family="paragraph" style:parent-style-name="Text_20_body">
      <style:paragraph-properties fo:margin-top="0cm" fo:margin-bottom="0cm" style:contextual-spacing="false" fo:line-height="100%" fo:text-align="right" style:justify-single-word="false"/>
      <style:text-properties officeooo:rsid="000ca6c1" officeooo:paragraph-rsid="000d823a"/>
    </style:style>
    <style:style style:name="P11" style:family="paragraph" style:parent-style-name="Text_20_body" style:master-page-name="">
      <loext:graphic-properties draw:fill="none"/>
      <style:paragraph-properties fo:margin-left="0cm" fo:margin-right="1cm" fo:margin-top="0cm" fo:margin-bottom="0cm" style:contextual-spacing="false" fo:line-height="100%" fo:text-align="right" style:justify-single-word="false" fo:text-indent="0cm" style:auto-text-indent="false" style:page-number="auto" fo:background-color="transparent"/>
      <style:text-properties fo:font-size="10pt" officeooo:paragraph-rsid="000d823a" style:font-size-asian="10pt" style:font-size-complex="10pt"/>
    </style:style>
    <style:style style:name="P12" style:family="paragraph" style:parent-style-name="Text_20_body">
      <style:paragraph-properties fo:margin-top="0cm" fo:margin-bottom="0cm" style:contextual-spacing="false" fo:line-height="150%" fo:text-align="right" style:justify-single-word="false"/>
      <style:text-properties officeooo:rsid="001f758d" officeooo:paragraph-rsid="000ca6c1"/>
    </style:style>
    <style:style style:name="P13" style:family="paragraph" style:parent-style-name="Text_20_body">
      <style:paragraph-properties fo:margin-top="0cm" fo:margin-bottom="0cm" style:contextual-spacing="false" fo:line-height="150%" fo:text-align="right" style:justify-single-word="false"/>
      <style:text-properties officeooo:rsid="000ca6c1" officeooo:paragraph-rsid="000ca6c1"/>
    </style:style>
    <style:style style:name="P14" style:family="paragraph" style:parent-style-name="Text_20_body">
      <style:paragraph-properties fo:margin-top="0cm" fo:margin-bottom="0cm" style:contextual-spacing="false" fo:line-height="100%" fo:text-align="right" style:justify-single-word="false"/>
      <style:text-properties officeooo:rsid="000ca6c1" officeooo:paragraph-rsid="000ca6c1"/>
    </style:style>
    <style:style style:name="P15" style:family="paragraph" style:parent-style-name="Text_20_body" style:master-page-name="">
      <loext:graphic-properties draw:fill="none"/>
      <style:paragraph-properties fo:margin-left="0cm" fo:margin-right="0.3cm" fo:margin-top="0cm" fo:margin-bottom="0cm" style:contextual-spacing="false" fo:line-height="100%" fo:text-align="right" style:justify-single-word="false" fo:text-indent="0cm" style:auto-text-indent="false" style:page-number="auto" fo:background-color="transparent"/>
      <style:text-properties fo:font-size="10pt" officeooo:paragraph-rsid="000d823a" style:font-size-asian="10pt" style:font-size-complex="10pt"/>
    </style:style>
    <style:style style:name="P16" style:family="paragraph" style:parent-style-name="Text_20_body" style:master-page-name="">
      <loext:graphic-properties draw:fill="none"/>
      <style:paragraph-properties fo:margin-left="0cm" fo:margin-right="0.9cm" fo:margin-top="0cm" fo:margin-bottom="0cm" style:contextual-spacing="false" fo:line-height="100%" fo:text-align="right" style:justify-single-word="false" fo:text-indent="0cm" style:auto-text-indent="false" style:page-number="auto" fo:background-color="transparent"/>
      <style:text-properties fo:font-size="10pt" officeooo:paragraph-rsid="000ca6c1" style:font-size-asian="10pt" style:font-size-complex="10pt"/>
    </style:style>
    <style:style style:name="P17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officeooo:paragraph-rsid="000d823a"/>
    </style:style>
    <style:style style:name="P18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officeooo:paragraph-rsid="00394161"/>
    </style:style>
    <style:style style:name="P19" style:family="paragraph" style:parent-style-name="Text_20_body" style:list-style-name="" style:master-page-name="">
      <style:paragraph-properties fo:margin-top="0cm" fo:margin-bottom="0cm" style:contextual-spacing="false" fo:line-height="150%" fo:text-align="center" style:justify-single-word="false" style:page-number="auto" fo:break-before="page"/>
      <style:text-properties fo:font-weight="bold" officeooo:rsid="000f2314" officeooo:paragraph-rsid="000f2314" style:font-weight-asian="bold" style:font-weight-complex="bold"/>
    </style:style>
    <style:style style:name="P20" style:family="paragraph" style:parent-style-name="Text_20_body">
      <style:paragraph-properties fo:margin-top="0cm" fo:margin-bottom="0cm" style:contextual-spacing="false" fo:line-height="150%" fo:text-align="left" style:justify-single-word="false"/>
      <style:text-properties officeooo:paragraph-rsid="000d823a"/>
    </style:style>
    <style:style style:name="P21" style:family="paragraph" style:parent-style-name="Contents_20_1">
      <style:paragraph-properties fo:line-height="150%">
        <style:tab-stops>
          <style:tab-stop style:position="17.089cm" style:type="right" style:leader-style="dotted" style:leader-text="."/>
        </style:tab-stops>
      </style:paragraph-properties>
    </style:style>
    <style:style style:name="P22" style:family="paragraph" style:parent-style-name="Text_20_body" style:list-style-name="">
      <style:paragraph-properties fo:margin-top="0cm" fo:margin-bottom="0.25cm" style:contextual-spacing="false" fo:line-height="150%" fo:text-align="center" style:justify-single-word="false" fo:break-before="page"/>
      <style:text-properties fo:font-weight="bold" officeooo:rsid="000f2314" officeooo:paragraph-rsid="000f2314" style:font-weight-asian="bold" style:font-weight-complex="bold"/>
    </style:style>
    <style:style style:name="P23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style:page-number="auto" fo:background-color="transparent"/>
      <style:text-properties officeooo:rsid="000f2314" officeooo:paragraph-rsid="00da7f6d"/>
    </style:style>
    <style:style style:name="P24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0f2314" officeooo:paragraph-rsid="002680d2"/>
    </style:style>
    <style:style style:name="P25" style:family="paragraph" style:parent-style-name="Text_20_body" style:list-style-name="">
      <style:paragraph-properties fo:margin-top="0cm" fo:margin-bottom="0.25cm" style:contextual-spacing="false" fo:line-height="150%" fo:text-align="center" style:justify-single-word="false" fo:break-before="page"/>
      <style:text-properties officeooo:paragraph-rsid="004b6835"/>
    </style:style>
    <style:style style:name="P2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3cm" style:auto-text-indent="false" fo:background-color="transparent"/>
      <style:text-properties officeooo:rsid="00935d7a" officeooo:paragraph-rsid="00ac9f4c"/>
    </style:style>
    <style:style style:name="P27" style:family="paragraph" style:parent-style-name="Text_20_body" style:list-style-name="L1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3cm" style:auto-text-indent="false" fo:background-color="transparent"/>
      <style:text-properties officeooo:rsid="00935d7a" officeooo:paragraph-rsid="00ac9f4c"/>
    </style:style>
    <style:style style:name="P28" style:family="paragraph" style:parent-style-name="Text_20_body" style:list-style-name="L1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3cm" style:auto-text-indent="false" fo:background-color="transparent"/>
      <style:text-properties officeooo:paragraph-rsid="00ac9f4c"/>
    </style:style>
    <style:style style:name="P2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3cm" style:auto-text-indent="false" fo:background-color="transparent"/>
      <style:text-properties officeooo:rsid="00935d7a" officeooo:paragraph-rsid="00da7f6d"/>
    </style:style>
    <style:style style:name="P31" style:family="paragraph" style:parent-style-name="Text_20_body" style:list-style-name="L2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3cm" style:auto-text-indent="false" fo:background-color="transparent"/>
      <style:text-properties officeooo:rsid="00935d7a" officeooo:paragraph-rsid="00ac9f4c"/>
    </style:style>
    <style:style style:name="P32" style:family="paragraph" style:parent-style-name="Text_20_body" style:list-style-name="">
      <style:paragraph-properties fo:margin-top="0cm" fo:margin-bottom="0.25cm" style:contextual-spacing="false" fo:line-height="150%" fo:text-align="center" style:justify-single-word="false" fo:break-before="page"/>
      <style:text-properties officeooo:rsid="002680d2" officeooo:paragraph-rsid="0028636d"/>
    </style:style>
    <style:style style:name="P33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fo:background-color="transparent"/>
      <style:text-properties officeooo:rsid="0028636d" officeooo:paragraph-rsid="0028636d"/>
    </style:style>
    <style:style style:name="P34" style:family="paragraph" style:parent-style-name="Таблица">
      <style:paragraph-properties fo:keep-with-next="always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28636d" officeooo:paragraph-rsid="0028636d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officeooo:rsid="00ae9cd6" officeooo:paragraph-rsid="00ae9cd6"/>
    </style:style>
    <style:style style:name="P37" style:family="paragraph" style:parent-style-name="Table_20_Contents">
      <style:paragraph-properties fo:text-align="center" style:justify-single-word="false"/>
      <style:text-properties officeooo:rsid="00b25be6" officeooo:paragraph-rsid="00b28c20"/>
    </style:style>
    <style:style style:name="P38" style:family="paragraph" style:parent-style-name="Table_20_Contents">
      <style:paragraph-properties fo:text-align="left" style:justify-single-word="false"/>
      <style:text-properties officeooo:rsid="00ae9cd6" officeooo:paragraph-rsid="00ae9cd6"/>
    </style:style>
    <style:style style:name="P39" style:family="paragraph" style:parent-style-name="Table_20_Contents">
      <style:paragraph-properties fo:text-align="center" style:justify-single-word="false"/>
      <style:text-properties officeooo:rsid="0093bfe0" officeooo:paragraph-rsid="0093bfe0"/>
    </style:style>
    <style:style style:name="P40" style:family="paragraph" style:parent-style-name="Table_20_Contents">
      <style:paragraph-properties fo:text-align="center" style:justify-single-word="false"/>
      <style:text-properties officeooo:rsid="00b091d4" officeooo:paragraph-rsid="00b091d4"/>
    </style:style>
    <style:style style:name="P41" style:family="paragraph" style:parent-style-name="Table_20_Contents">
      <style:paragraph-properties fo:text-align="left" style:justify-single-word="false"/>
      <style:text-properties officeooo:rsid="0093bfe0" officeooo:paragraph-rsid="0093bfe0"/>
    </style:style>
    <style:style style:name="P42" style:family="paragraph" style:parent-style-name="Table_20_Contents">
      <style:paragraph-properties fo:text-align="left" style:justify-single-word="false"/>
      <style:text-properties officeooo:rsid="00b091d4" officeooo:paragraph-rsid="00b091d4"/>
    </style:style>
    <style:style style:name="P43" style:family="paragraph" style:parent-style-name="Table_20_Contents">
      <style:paragraph-properties fo:text-align="center" style:justify-single-word="false"/>
      <style:text-properties officeooo:rsid="00ced986" officeooo:paragraph-rsid="00ced986"/>
    </style:style>
    <style:style style:name="P44" style:family="paragraph" style:parent-style-name="Table_20_Contents">
      <style:paragraph-properties fo:text-align="left" style:justify-single-word="false"/>
      <style:text-properties officeooo:rsid="00ced986" officeooo:paragraph-rsid="00ced986"/>
    </style:style>
    <style:style style:name="P45" style:family="paragraph" style:parent-style-name="Table_20_Contents">
      <style:paragraph-properties fo:text-align="center" style:justify-single-word="false"/>
      <style:text-properties officeooo:rsid="00b25be6" officeooo:paragraph-rsid="00b25be6"/>
    </style:style>
    <style:style style:name="P46" style:family="paragraph" style:parent-style-name="Table_20_Contents">
      <style:paragraph-properties fo:text-align="left" style:justify-single-word="false"/>
      <style:text-properties officeooo:rsid="00b25be6" officeooo:paragraph-rsid="00b25be6"/>
    </style:style>
    <style:style style:name="P47" style:family="paragraph" style:parent-style-name="Table_20_Contents">
      <style:paragraph-properties fo:text-align="center" style:justify-single-word="false"/>
      <style:text-properties officeooo:rsid="00b25be6" officeooo:paragraph-rsid="00c70b59"/>
    </style:style>
    <style:style style:name="P48" style:family="paragraph" style:parent-style-name="Table_20_Contents">
      <style:paragraph-properties fo:text-align="center" style:justify-single-word="false"/>
      <style:text-properties officeooo:rsid="00b28c20" officeooo:paragraph-rsid="00b28c20"/>
    </style:style>
    <style:style style:name="P49" style:family="paragraph" style:parent-style-name="Table_20_Contents">
      <style:paragraph-properties fo:text-align="left" style:justify-single-word="false"/>
      <style:text-properties officeooo:rsid="00b28c20" officeooo:paragraph-rsid="00b28c20"/>
    </style:style>
    <style:style style:name="P50" style:family="paragraph" style:parent-style-name="Table_20_Contents">
      <style:paragraph-properties fo:text-align="center" style:justify-single-word="false"/>
      <style:text-properties officeooo:rsid="00b29ed1" officeooo:paragraph-rsid="00b29ed1"/>
    </style:style>
    <style:style style:name="P51" style:family="paragraph" style:parent-style-name="Table_20_Contents">
      <style:paragraph-properties fo:text-align="left" style:justify-single-word="false"/>
      <style:text-properties officeooo:rsid="00b29ed1" officeooo:paragraph-rsid="00b29ed1"/>
    </style:style>
    <style:style style:name="P52" style:family="paragraph" style:parent-style-name="Table_20_Contents">
      <style:paragraph-properties fo:text-align="center" style:justify-single-word="false"/>
      <style:text-properties officeooo:rsid="00b3fa66" officeooo:paragraph-rsid="00b3fa66"/>
    </style:style>
    <style:style style:name="P53" style:family="paragraph" style:parent-style-name="Table_20_Contents">
      <style:paragraph-properties fo:text-align="left" style:justify-single-word="false"/>
      <style:text-properties officeooo:rsid="00b3fa66" officeooo:paragraph-rsid="00b3fa66"/>
    </style:style>
    <style:style style:name="P54" style:family="paragraph" style:parent-style-name="Table_20_Contents">
      <style:paragraph-properties fo:text-align="center" style:justify-single-word="false"/>
      <style:text-properties officeooo:rsid="00a722a7" officeooo:paragraph-rsid="00a722a7"/>
    </style:style>
    <style:style style:name="P55" style:family="paragraph" style:parent-style-name="Table_20_Contents">
      <style:paragraph-properties fo:text-align="center" style:justify-single-word="false"/>
      <style:text-properties officeooo:rsid="0093cfa2" officeooo:paragraph-rsid="0093cfa2"/>
    </style:style>
    <style:style style:name="P56" style:family="paragraph" style:parent-style-name="Table_20_Contents">
      <style:paragraph-properties fo:text-align="left" style:justify-single-word="false"/>
      <style:text-properties officeooo:rsid="0093cfa2" officeooo:paragraph-rsid="0093cfa2"/>
    </style:style>
    <style:style style:name="P57" style:family="paragraph" style:parent-style-name="Table_20_Contents">
      <style:paragraph-properties fo:text-align="center" style:justify-single-word="false"/>
      <style:text-properties officeooo:rsid="00b6a1f3" officeooo:paragraph-rsid="00b6a1f3"/>
    </style:style>
    <style:style style:name="P58" style:family="paragraph" style:parent-style-name="Table_20_Contents">
      <style:paragraph-properties fo:text-align="center" style:justify-single-word="false"/>
      <style:text-properties officeooo:rsid="0093bfe0" officeooo:paragraph-rsid="00b6a1f3"/>
    </style:style>
    <style:style style:name="P59" style:family="paragraph" style:parent-style-name="Table_20_Contents">
      <style:paragraph-properties fo:text-align="left" style:justify-single-word="false"/>
      <style:text-properties officeooo:rsid="00b6a1f3" officeooo:paragraph-rsid="00b6a1f3"/>
    </style:style>
    <style:style style:name="P60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fo:background-color="transparent" style:writing-mode="lr-tb" style:writing-mode-automatic="false"/>
      <style:text-properties officeooo:rsid="0028636d" officeooo:paragraph-rsid="0028636d"/>
    </style:style>
    <style:style style:name="P61" style:family="paragraph" style:parent-style-name="Text_20_body" style:list-style-name="">
      <style:paragraph-properties fo:margin-top="0cm" fo:margin-bottom="0.25cm" style:contextual-spacing="false" fo:line-height="150%" fo:text-align="center" style:justify-single-word="false" fo:break-before="page"/>
      <style:text-properties officeooo:rsid="002680d2" officeooo:paragraph-rsid="003a877b"/>
    </style:style>
    <style:style style:name="P62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fo:background-color="transparent" style:writing-mode="lr-tb" style:writing-mode-automatic="false"/>
      <style:text-properties officeooo:rsid="003a877b" officeooo:paragraph-rsid="003a877b"/>
    </style:style>
    <style:style style:name="P63" style:family="paragraph" style:parent-style-name="Text_20_body" style:list-style-name="" style:master-page-name="">
      <style:paragraph-properties fo:margin-top="0cm" fo:margin-bottom="0.25cm" style:contextual-spacing="false" fo:line-height="150%" fo:text-align="center" style:justify-single-word="false" style:page-number="auto" fo:break-before="auto" fo:break-after="auto"/>
      <style:text-properties officeooo:rsid="002680d2" officeooo:paragraph-rsid="003a877b"/>
    </style:style>
    <style:style style:name="P64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fo:background-color="transparent" style:writing-mode="lr-tb" style:writing-mode-automatic="false"/>
      <style:text-properties officeooo:rsid="0028636d" officeooo:paragraph-rsid="003a877b"/>
    </style:style>
    <style:style style:name="P65" style:family="paragraph" style:parent-style-name="Рисунок">
      <style:paragraph-properties fo:text-align="center" style:justify-single-word="false"/>
    </style:style>
    <style:style style:name="P66" style:family="paragraph" style:parent-style-name="Рисунок">
      <style:paragraph-properties fo:text-align="center" style:justify-single-word="false"/>
      <style:text-properties officeooo:paragraph-rsid="00c3ec24"/>
    </style:style>
    <style:style style:name="P67" style:family="paragraph" style:parent-style-name="Text_20_body" style:list-style-name="">
      <style:paragraph-properties fo:margin-top="0cm" fo:margin-bottom="0.25cm" style:contextual-spacing="false" fo:line-height="150%" fo:text-align="center" style:justify-single-word="false" fo:break-before="page"/>
      <style:text-properties officeooo:rsid="002680d2" officeooo:paragraph-rsid="003c4608"/>
    </style:style>
    <style:style style:name="P68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fo:background-color="transparent" style:writing-mode="lr-tb" style:writing-mode-automatic="false"/>
      <style:text-properties officeooo:rsid="0096f977" officeooo:paragraph-rsid="0096f977"/>
    </style:style>
    <style:style style:name="P69" style:family="paragraph" style:parent-style-name="Code">
      <style:paragraph-properties ch2_options="{'Style': 'vs', 'Language': 'Makefile', 'UseCharStyles': 0, 'LineNumberRatio': 100, 'LineNumberStart': 1, 'MasterCharStyle': '', 'ShowLineNumbers': 1, 'ColourizeBackground': 0, 'LineNumberSeparator': '  |    ', 'LineNumberPaddingSymbol': '', 'StoreOptionsWithSnippet': 1}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70" style:family="paragraph" style:parent-style-name="Code">
      <style:paragraph-properties ch2_options="{'Style': 'vs', 'Language': 'Makefile', 'UseCharStyles': 0, 'LineNumberRatio': 100, 'LineNumberStart': 1, 'MasterCharStyle': '', 'ShowLineNumbers': 1, 'ColourizeBackground': 0, 'LineNumberSeparator': '  |    ', 'LineNumberPaddingSymbol': '', 'StoreOptionsWithSnippet': 1}"/>
      <style:text-properties fo:color="#008000" loext:opacity="100%" fo:font-size="8pt" fo:language="zxx" fo:country="none" fo:font-style="normal" style:text-underline-style="none" fo:font-weight="normal" fo:background-color="transparent"/>
    </style:style>
    <style:style style:name="P71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fo:background-color="transparent" style:writing-mode="lr-tb" style:writing-mode-automatic="false"/>
      <style:text-properties officeooo:rsid="003c4608" officeooo:paragraph-rsid="0096f977"/>
    </style:style>
    <style:style style:name="P72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fo:background-color="transparent" style:writing-mode="lr-tb" style:writing-mode-automatic="false"/>
      <style:text-properties officeooo:rsid="003c4608" officeooo:paragraph-rsid="003c4608"/>
    </style:style>
    <style:style style:name="P73" style:family="paragraph" style:parent-style-name="code">
      <style:paragraph-properties ch2_options="{'Style': 'vs', 'Language': 'C', 'UseCharStyles': 0, 'LineNumberRatio': 100, 'LineNumberStart': 1, 'MasterCharStyle': '', 'ShowLineNumbers': 1, 'ColourizeBackground': 0, 'LineNumberSeparator': '  |    ', 'LineNumberPaddingSymbol': '', 'StoreOptionsWithSnippet': 1}" fo:line-height="100%" fo:text-align="left" style:justify-single-word="false" fo:text-indent="0cm" style:auto-text-indent="false"/>
      <style:text-properties style:use-window-font-color="true" loext:opacity="0%" style:font-name="Liberation Mono" fo:font-size="8pt" fo:language="zxx" fo:country="none" fo:font-style="normal" style:text-underline-style="none" fo:font-weight="normal" officeooo:rsid="003c4608" fo:background-color="transparent" style:font-size-asian="8pt" style:font-size-complex="8pt"/>
    </style:style>
    <style:style style:name="P74" style:family="paragraph" style:parent-style-name="code">
      <style:paragraph-properties ch2_options="{'Style': 'vs', 'Language': 'C', 'UseCharStyles': 0, 'LineNumberRatio': 100, 'LineNumberStart': 1, 'MasterCharStyle': '', 'ShowLineNumbers': 1, 'ColourizeBackground': 0, 'LineNumberSeparator': '  |    ', 'LineNumberPaddingSymbol': '', 'StoreOptionsWithSnippet': 1}" fo:line-height="100%" fo:text-align="left" style:justify-single-word="false" fo:text-indent="0cm" style:auto-text-indent="false"/>
      <style:text-properties fo:color="#008000" loext:opacity="100%" style:font-name="Liberation Mono" fo:font-size="8pt" fo:language="zxx" fo:country="none" fo:font-style="normal" style:text-underline-style="none" fo:font-weight="normal" officeooo:rsid="003c4608" fo:background-color="transparent" style:font-size-asian="8pt" style:font-size-complex="8pt"/>
    </style:style>
    <style:style style:name="P75" style:family="paragraph" style:parent-style-name="code">
      <style:paragraph-properties ch2_options="{'Style': 'vs', 'Language': 'C', 'UseCharStyles': 0, 'LineNumberRatio': 100, 'LineNumberStart': 1, 'MasterCharStyle': '', 'ShowLineNumbers': 1, 'ColourizeBackground': 0, 'LineNumberSeparator': '  |    ', 'LineNumberPaddingSymbol': '', 'StoreOptionsWithSnippet': 1}" fo:line-height="100%" fo:text-align="left" style:justify-single-word="false" fo:text-indent="0cm" style:auto-text-indent="false"/>
      <style:text-properties fo:color="#0000ff" loext:opacity="100%" style:font-name="Liberation Mono" fo:font-size="8pt" fo:language="zxx" fo:country="none" fo:font-style="normal" style:text-underline-style="none" fo:font-weight="normal" officeooo:rsid="003c4608" fo:background-color="transparent" style:font-size-asian="8pt" style:font-size-complex="8pt"/>
    </style:style>
    <style:style style:name="P76" style:family="paragraph" style:parent-style-name="code">
      <style:paragraph-properties ch2_options="{'Style': 'vs', 'Language': 'C', 'UseCharStyles': 0, 'LineNumberRatio': 100, 'LineNumberStart': 1, 'MasterCharStyle': '', 'ShowLineNumbers': 1, 'ColourizeBackground': 0, 'LineNumberSeparator': '  |    ', 'LineNumberPaddingSymbol': '', 'StoreOptionsWithSnippet': 1}" fo:line-height="100%" fo:text-align="left" style:justify-single-word="false" fo:text-indent="0cm" style:auto-text-indent="false"/>
      <style:text-properties fo:color="#000000" loext:opacity="100%" style:font-name="Liberation Mono" fo:font-size="8pt" fo:language="zxx" fo:country="none" fo:font-style="normal" style:text-underline-style="none" fo:font-weight="normal" officeooo:rsid="003c4608" fo:background-color="transparent" style:font-size-asian="8pt" style:font-size-complex="8pt"/>
    </style:style>
    <style:style style:name="P77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fo:background-color="transparent" style:writing-mode="lr-tb" style:writing-mode-automatic="false"/>
      <style:text-properties fo:color="#008000" loext:opacity="100%" fo:font-style="normal" style:text-underline-style="none" fo:font-weight="normal" officeooo:rsid="003c4608" officeooo:paragraph-rsid="003c4608"/>
    </style:style>
    <style:style style:name="P78" style:family="paragraph" style:parent-style-name="Text_20_body" style:list-style-name="">
      <style:paragraph-properties fo:margin-top="0cm" fo:margin-bottom="0.25cm" style:contextual-spacing="false" fo:line-height="150%" fo:text-align="center" style:justify-single-word="false" fo:break-before="page"/>
      <style:text-properties officeooo:rsid="003ecf82" officeooo:paragraph-rsid="003ecf82"/>
    </style:style>
    <style:style style:name="P79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fo:background-color="transparent" style:writing-mode="lr-tb" style:writing-mode-automatic="false"/>
      <style:text-properties officeooo:paragraph-rsid="0044e4e9"/>
    </style:style>
    <style:style style:name="P80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fo:background-color="transparent" style:writing-mode="lr-tb" style:writing-mode-automatic="false"/>
      <style:text-properties officeooo:rsid="0028636d" officeooo:paragraph-rsid="00c001ea"/>
    </style:style>
    <style:style style:name="P81" style:family="paragraph" style:parent-style-name="Text_20_body" style:list-style-name="" style:master-page-name="Landscape">
      <style:paragraph-properties fo:margin-top="0cm" fo:margin-bottom="0.25cm" style:contextual-spacing="false" fo:line-height="150%" fo:text-align="center" style:justify-single-word="false" style:page-number="auto"/>
      <style:text-properties officeooo:rsid="003ecf82" officeooo:paragraph-rsid="003ecf82"/>
    </style:style>
    <style:style style:name="P82" style:family="paragraph" style:parent-style-name="Text_20_body">
      <style:paragraph-properties fo:margin-top="0cm" fo:margin-bottom="0.25cm" style:contextual-spacing="false" fo:line-height="150%" fo:text-align="center" style:justify-single-word="false"/>
      <style:text-properties officeooo:rsid="0028636d" officeooo:paragraph-rsid="003ecf82"/>
    </style:style>
    <style:style style:name="P83" style:family="paragraph" style:parent-style-name="Text_20_body" style:list-style-name="">
      <style:paragraph-properties fo:margin-top="0cm" fo:margin-bottom="0.25cm" style:contextual-spacing="false" fo:line-height="150%" fo:text-align="center" style:justify-single-word="false"/>
      <style:text-properties officeooo:rsid="0028636d" officeooo:paragraph-rsid="003ecf82"/>
    </style:style>
    <style:style style:name="P84" style:family="paragraph" style:parent-style-name="Text_20_body" style:list-style-name="">
      <style:paragraph-properties fo:margin-top="0cm" fo:margin-bottom="0.25cm" style:contextual-spacing="false" fo:line-height="150%" fo:text-align="center" style:justify-single-word="false"/>
      <style:text-properties officeooo:rsid="00d831ed" officeooo:paragraph-rsid="00d831ed"/>
    </style:style>
    <style:style style:name="P85" style:family="paragraph" style:parent-style-name="Text_20_body" style:master-page-name="">
      <style:paragraph-properties fo:margin-top="0cm" fo:margin-bottom="0.25cm" style:contextual-spacing="false" fo:line-height="150%" fo:text-align="center" style:justify-single-word="false" style:page-number="auto"/>
      <style:text-properties officeooo:rsid="0028636d" officeooo:paragraph-rsid="003ecf8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f758d"/>
    </style:style>
    <style:style style:name="T3" style:family="text">
      <style:text-properties officeooo:rsid="00394161"/>
    </style:style>
    <style:style style:name="T4" style:family="text">
      <style:text-properties officeooo:rsid="000ca6c1"/>
    </style:style>
    <style:style style:name="T5" style:family="text">
      <style:text-properties officeooo:rsid="00cb7fcd"/>
    </style:style>
    <style:style style:name="T6" style:family="text">
      <style:text-properties officeooo:rsid="00910ddb"/>
    </style:style>
    <style:style style:name="T7" style:family="text">
      <style:text-properties officeooo:rsid="00dd73d1"/>
    </style:style>
    <style:style style:name="T8" style:family="text">
      <style:text-properties officeooo:rsid="00ab83db"/>
    </style:style>
    <style:style style:name="T9" style:family="text">
      <style:text-properties officeooo:rsid="00dd5534"/>
    </style:style>
    <style:style style:name="T10" style:family="text">
      <style:text-properties officeooo:rsid="00d9f711"/>
    </style:style>
    <style:style style:name="T11" style:family="text">
      <style:text-properties officeooo:rsid="00da7f6d"/>
    </style:style>
    <style:style style:name="T12" style:family="text">
      <style:text-properties officeooo:rsid="0016960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919963"/>
    </style:style>
    <style:style style:name="T15" style:family="text">
      <style:text-properties officeooo:rsid="00a1ba0b"/>
    </style:style>
    <style:style style:name="T16" style:family="text">
      <style:text-properties officeooo:rsid="00cd291a"/>
    </style:style>
    <style:style style:name="T17" style:family="text">
      <style:text-properties fo:font-weight="bold" officeooo:rsid="000f2314" style:font-weight-asian="bold" style:font-weight-complex="bold"/>
    </style:style>
    <style:style style:name="T18" style:family="text">
      <style:text-properties fo:font-weight="bold" officeooo:rsid="004c1b85" style:font-weight-asian="bold" style:font-weight-complex="bold"/>
    </style:style>
    <style:style style:name="T19" style:family="text">
      <style:text-properties fo:font-weight="bold" officeooo:rsid="00910ddb" style:font-weight-asian="bold" style:font-weight-complex="bold"/>
    </style:style>
    <style:style style:name="T20" style:family="text">
      <style:text-properties fo:font-weight="bold" officeooo:rsid="00e77ce9" style:font-weight-asian="bold" style:font-weight-complex="bold"/>
    </style:style>
    <style:style style:name="T21" style:family="text">
      <style:text-properties officeooo:rsid="00935d7a"/>
    </style:style>
    <style:style style:name="T22" style:family="text">
      <style:text-properties fo:font-style="italic" officeooo:rsid="00935d7a" style:font-style-asian="italic" style:font-style-complex="italic"/>
    </style:style>
    <style:style style:name="T23" style:family="text">
      <style:text-properties officeooo:rsid="00d31070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weight="bold" officeooo:rsid="004b6835" style:font-weight-asian="bold" style:font-weight-complex="bold"/>
    </style:style>
    <style:style style:name="T26" style:family="text">
      <style:text-properties fo:font-weight="bold" officeooo:rsid="0028636d" style:font-weight-asian="bold" style:font-weight-complex="bold"/>
    </style:style>
    <style:style style:name="T27" style:family="text">
      <style:text-properties officeooo:rsid="0079b2f7"/>
    </style:style>
    <style:style style:name="T28" style:family="text">
      <style:text-properties officeooo:rsid="00be26de"/>
    </style:style>
    <style:style style:name="T29" style:family="text">
      <style:text-properties officeooo:rsid="00b28c20"/>
    </style:style>
    <style:style style:name="T30" style:family="text">
      <style:text-properties officeooo:rsid="00c70b59"/>
    </style:style>
    <style:style style:name="T31" style:family="text">
      <style:text-properties officeooo:rsid="00ced986"/>
    </style:style>
    <style:style style:name="T32" style:family="text">
      <style:text-properties officeooo:rsid="00a4dcf4"/>
    </style:style>
    <style:style style:name="T33" style:family="text">
      <style:text-properties officeooo:rsid="00a89256"/>
    </style:style>
    <style:style style:name="T34" style:family="text">
      <style:text-properties officeooo:rsid="00c9ebee"/>
    </style:style>
    <style:style style:name="T35" style:family="text">
      <style:text-properties style:text-position="super 58%" officeooo:rsid="00c9ebee"/>
    </style:style>
    <style:style style:name="T36" style:family="text">
      <style:text-properties style:text-position="0% 100%" officeooo:rsid="00c9ebee"/>
    </style:style>
    <style:style style:name="T37" style:family="text">
      <style:text-properties officeooo:rsid="00e51693"/>
    </style:style>
    <style:style style:name="T38" style:family="text">
      <style:text-properties officeooo:rsid="00db66e8"/>
    </style:style>
    <style:style style:name="T39" style:family="text">
      <style:text-properties officeooo:rsid="009f3a8d"/>
    </style:style>
    <style:style style:name="T40" style:family="text">
      <style:text-properties officeooo:rsid="00b81e3d"/>
    </style:style>
    <style:style style:name="T41" style:family="text">
      <style:text-properties fo:font-weight="bold" officeooo:rsid="003a877b" style:font-weight-asian="bold" style:font-weight-complex="bold"/>
    </style:style>
    <style:style style:name="T42" style:family="text">
      <style:text-properties fo:font-weight="bold" officeooo:rsid="00a1ba0b" style:font-weight-asian="bold" style:font-weight-complex="bold"/>
    </style:style>
    <style:style style:name="T43" style:family="text">
      <style:text-properties officeooo:rsid="008d1351"/>
    </style:style>
    <style:style style:name="T44" style:family="text">
      <style:text-properties officeooo:rsid="00c3ec24"/>
    </style:style>
    <style:style style:name="T45" style:family="text">
      <style:text-properties officeooo:rsid="00d193ed"/>
    </style:style>
    <style:style style:name="T46" style:family="text">
      <style:text-properties fo:font-weight="bold" officeooo:rsid="003c4608" style:font-weight-asian="bold" style:font-weight-complex="bold"/>
    </style:style>
    <style:style style:name="T47" style:family="text">
      <style:text-properties officeooo:rsid="0098e618"/>
    </style:style>
    <style:style style:name="T48" style:family="text">
      <style:text-properties fo:color="#008000" loext:opacity="100%" fo:font-size="8pt"/>
    </style:style>
    <style:style style:name="T49" style:family="text">
      <style:text-properties fo:color="#000000" loext:opacity="100%"/>
    </style:style>
    <style:style style:name="T50" style:family="text">
      <style:text-properties fo:color="#000000" loext:opacity="100%" officeooo:rsid="00d14a4d"/>
    </style:style>
    <style:style style:name="T51" style:family="text">
      <style:text-properties fo:color="#0000ff" loext:opacity="100%"/>
    </style:style>
    <style:style style:name="T52" style:family="text">
      <style:text-properties officeooo:rsid="00cf4d0c"/>
    </style:style>
    <style:style style:name="T53" style:family="text">
      <style:text-properties fo:color="#008000" loext:opacity="100%"/>
    </style:style>
    <style:style style:name="T54" style:family="text">
      <style:text-properties fo:color="#2b91af" loext:opacity="100%"/>
    </style:style>
    <style:style style:name="T55" style:family="text">
      <style:text-properties fo:color="#a31515" loext:opacity="100%"/>
    </style:style>
    <style:style style:name="T56" style:family="text">
      <style:text-properties fo:color="#a31515" loext:opacity="100%" officeooo:rsid="00db66e8"/>
    </style:style>
    <style:style style:name="T57" style:family="text">
      <style:text-properties officeooo:rsid="0028636d"/>
    </style:style>
    <style:style style:name="T58" style:family="text">
      <style:text-properties officeooo:rsid="0099743d"/>
    </style:style>
    <style:style style:name="T59" style:family="text">
      <style:text-properties officeooo:rsid="00a61a93"/>
    </style:style>
    <style:style style:name="T60" style:family="text">
      <style:text-properties officeooo:rsid="00bb1647"/>
    </style:style>
    <style:style style:name="T61" style:family="text">
      <style:text-properties officeooo:rsid="00c1f7ff"/>
    </style:style>
    <style:style style:name="T62" style:family="text">
      <style:text-properties officeooo:rsid="00b2fb3a"/>
    </style:style>
    <style:style style:name="T63" style:family="text">
      <style:text-properties officeooo:rsid="00b37be3"/>
    </style:style>
    <style:style style:name="T64" style:family="text">
      <style:text-properties officeooo:rsid="00b571d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style:run-through="foreground" style:protect="position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protect="position" style:wrap="none" style:vertical-pos="from-top" style:vertical-rel="paragraph" style:horizontal-pos="from-left" style:horizontal-rel="paragraph" style:mirror="none" fo:clip="rect(0cm, 0cm, 4.27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protect="position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protect="position" style:wrap="none" style:vertical-pos="from-top" style:vertical-rel="paragraph" style:horizontal-pos="from-left" style:horizontal-rel="paragraph" style:mirror="none" fo:clip="rect(0cm, 0cm, 11.123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оссийской Федерации</text:p>
      <text:p text:style-name="P2"><text:span text:style-name="T1">ФЕДЕРАЛЬНОЕ </text:span>ГОСУДАРСТВЕННОЕ АВТОНОМНОЕ ОБРАЗОВАТЕЛЬНОЕ</text:p>
      <text:p text:style-name="P3">УЧРЕЖДЕНИЕ ВЫСШЕГО ОБРАЗОВАНИЯ</text:p>
      <text:p text:style-name="P4">НАЦИОНАЛЬНЫЙ ИССЛЕДОВАТЕЛЬСКИЙ УНИВЕРСИТЕТ ИТМО</text:p>
      <text:p text:style-name="P5"/>
      <text:p text:style-name="P5"/>
      <text:p text:style-name="P6">Факультет безопасности информационных технологий</text:p>
      <text:p text:style-name="P6"/>
      <text:p text:style-name="P6">Дисциплина:</text:p>
      <text:p text:style-name="P6">«<text:span text:style-name="T2">Алгоритмы и структуры данных</text:span>»</text:p>
      <text:p text:style-name="P6"/>
      <text:p text:style-name="P6"/>
      <text:p text:style-name="P6">ОТЧ<text:span text:style-name="T3">Ё</text:span>Т ПО ЛАБОРАТОРНОЙ РАБОТЕ <text:span text:style-name="T4">№</text:span><text:span text:style-name="T5">3</text:span></text:p>
      <text:p text:style-name="P7">«<text:span text:style-name="T6">Сортировка распределением (карманная сортировка)</text:span><text:span text:style-name="T7"> </text:span><text:span text:style-name="T8">в </text:span><text:span text:style-name="T5">деке</text:span><text:span text:style-name="T8"> </text:span><text:span text:style-name="T9">на</text:span></text:p>
      <text:p text:style-name="P7"><text:span text:style-name="T8">базе связного списка</text:span><text:span text:style-name="T5">. Поиск </text:span><text:span text:style-name="T10">подстрок </text:span><text:span text:style-name="T5">методом Бой</text:span><text:span text:style-name="T11">е</text:span><text:span text:style-name="T5">ра-Мура-Хор</text:span><text:span text:style-name="T11">с</text:span><text:span text:style-name="T5">пу</text:span><text:span text:style-name="T11">л</text:span><text:span text:style-name="T5">а</text:span>»</text:p>
      <text:p text:style-name="P6"/>
      <text:p text:style-name="P8">Выполнил:</text:p>
      <text:p text:style-name="P8">Пахомов Владимир Юрьевич, студент группы N3250</text:p>
      <text:p text:style-name="P8"/>
      <text:p text:style-name="P9"/>
      <text:p text:style-name="P10">________________</text:p>
      <text:p text:style-name="P11">(подпись)</text:p>
      <text:p text:style-name="P8"/>
      <text:p text:style-name="P8">Проверил:</text:p>
      <text:p text:style-name="P12">Ерофеев Сергей Анатольевич</text:p>
      <text:p text:style-name="P13"/>
      <text:p text:style-name="P13"/>
      <text:p text:style-name="P14">_____________________</text:p>
      <text:p text:style-name="P15">(отметка о выполнении)</text:p>
      <text:p text:style-name="P14"/>
      <text:p text:style-name="P14"/>
      <text:p text:style-name="P14">________________</text:p>
      <text:p text:style-name="P16">(подпись)</text:p>
      <text:p text:style-name="P17"/>
      <text:p text:style-name="P17"/>
      <text:p text:style-name="P17"/>
      <text:p text:style-name="P18">Санкт-Петербург</text:p>
      <text:p text:style-name="P18">202<text:span text:style-name="T12">6</text:span>.</text:p>
      <text:h text:style-name="P19" text:outline-level="1"><text:bookmark-start text:name="__RefHeading___Toc80_2058273410"/>СОДЕРЖАНИЕ<text:bookmark-end text:name="__RefHeading___Toc80_2058273410"/></text:h>
      <text:p text:style-name="P20"/>
      <text:table-of-content text:style-name="Sect1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1"><text:a xlink:type="simple" xlink:href="#__RefHeading___Toc80_2058273410" office:name="СОДЕРЖАНИЕ" text:style-name="Index_20_Link" text:visited-style-name="Index_20_Link">СОДЕРЖАНИЕ<text:tab/>2</text:a></text:p>
          <text:p text:style-name="P21"><text:a xlink:type="simple" xlink:href="#__RefHeading___Toc82_2058273410" office:name="ВВЕДЕНИЕ" text:style-name="Index_20_Link" text:visited-style-name="Index_20_Link">ВВЕДЕНИЕ<text:tab/>3</text:a></text:p>
          <text:p text:style-name="P21"><text:a xlink:type="simple" xlink:href="#__RefHeading___Toc143_2058273410%20Copy%201%20Copy%203" office:name="1. АЛГОРИТМ СОРТИРОВКИ" text:style-name="Index_20_Link" text:visited-style-name="Index_20_Link">1. АЛГОРИТМ СОРТИРОВКИ<text:tab/>4</text:a></text:p>
          <text:p text:style-name="P21"><text:a xlink:type="simple" xlink:href="#__RefHeading___Toc143_2058273410%20Copy%201" office:name="2. ОПИСАНИЕ ИСПОЛЬЗУЕМЫХ ПЕРЕМЕННЫХ" text:style-name="Index_20_Link" text:visited-style-name="Index_20_Link">2. ОПИСАНИЕ ИСПОЛЬЗУЕМЫХ ПЕРЕМЕННЫХ<text:tab/>5</text:a></text:p>
          <text:p text:style-name="P21"><text:a xlink:type="simple" xlink:href="#__RefHeading___Toc143_2058273410%20Copy%201%20Copy%202" office:name="3. БЛОК-СХЕМА АЛГОРИТМА" text:style-name="Index_20_Link" text:visited-style-name="Index_20_Link">3. БЛОК-СХЕМА АЛГОРИТМА<text:tab/>7</text:a></text:p>
          <text:p text:style-name="P21"><text:a xlink:type="simple" xlink:href="#__RefHeading___Toc143_2058273410%20Copy%201%20Copy%202%20Copy%201" office:name="4. ТЕСТИРОВАНИЕ АЛГОРИТМА" text:style-name="Index_20_Link" text:visited-style-name="Index_20_Link">4. ТЕСТИРОВАНИЕ АЛГОРИТМА<text:tab/>7</text:a></text:p>
          <text:p text:style-name="P21"><text:a xlink:type="simple" xlink:href="#__RefHeading___Toc143_2058273410%20Copy%201%20Copy%202%20Copy%202" office:name="5. ИСХОДНЫЙ КОД АЛГОРИТМА" text:style-name="Index_20_Link" text:visited-style-name="Index_20_Link">5. ИСХОДНЫЙ КОД АЛГОРИТМА<text:tab/>8</text:a></text:p>
          <text:p text:style-name="P21"><text:a xlink:type="simple" xlink:href="#__RefHeading___Toc143_2058273410%20Copy%201%20Copy%202%20Copy%206" office:name="ЗАКЛЮЧЕНИЕ" text:style-name="Index_20_Link" text:visited-style-name="Index_20_Link">ЗАКЛЮЧЕНИЕ<text:tab/>13</text:a></text:p>
          <text:p text:style-name="P21"><text:a xlink:type="simple" xlink:href="#__RefHeading___Toc143_2058273410%20Copy%201%20Copy%202%20Copy%207" office:name="ПРИЛОЖЕНИЕ А" text:style-name="Index_20_Link" text:visited-style-name="Index_20_Link">ПРИЛОЖЕНИЕ А<text:tab/>14</text:a></text:p>
        </text:index-body>
      </text:table-of-content>
      <text:p text:style-name="P20"/>
      <text:h text:style-name="P22" text:outline-level="1"><text:bookmark-start text:name="__RefHeading___Toc82_2058273410"/>ВВЕДЕНИЕ<text:bookmark-end text:name="__RefHeading___Toc82_2058273410"/></text:h>
      <text:p text:style-name="P23"><text:span text:style-name="T13">Цель работы</text:span> — разработать программу сортировки <text:span text:style-name="T6">распределением (карманной сортировки) </text:span>последовательности вещественных чисел,<text:span text:style-name="T6"> </text:span>которая <text:span text:style-name="T14">будет </text:span>хранит<text:span text:style-name="T15">ь</text:span>ся в <text:span text:style-name="T16">деке</text:span><text:span text:style-name="T8">, построенно</text:span><text:span text:style-name="T16">м</text:span><text:span text:style-name="T8"> на базе связного списка</text:span>, <text:span text:style-name="T16">а также предусмотреть возможность поиска подстроки в файле методом </text:span><text:span text:style-name="T5">Бой</text:span><text:span text:style-name="T11">е</text:span><text:span text:style-name="T5">ра-Мура-Хор</text:span><text:span text:style-name="T11">с</text:span><text:span text:style-name="T5">пу</text:span><text:span text:style-name="T11">л</text:span><text:span text:style-name="T5">а</text:span><text:span text:style-name="T16">.</text:span></text:p>
      <text:p text:style-name="P24"/>
      <text:h text:style-name="P25" text:outline-level="1"><text:bookmark-start text:name="__RefHeading___Toc143_2058273410 Copy 1 Copy 3"/><text:span text:style-name="T17">1. </text:span><text:span text:style-name="T18">АЛГОРИТМ </text:span><text:span text:style-name="T19">СОРТИРОВКИ</text:span><text:span text:style-name="T20"> И ПОИСКА</text:span><text:bookmark-end text:name="__RefHeading___Toc143_2058273410 Copy 1 Copy 3"/></text:h>
      <text:p text:style-name="P26">Программа получает на вход название файла, в котором хранятся исходные данные. Содержимое файла считывается целиком в динамический текстовый буфер (строку). Из этой строки последовательно считываются и преобразуются вещественные числа, которые затем записываются в двусвязный дек.</text:p>
      <text:p text:style-name="P26">Далее происходит сортировка дека по следующему алгоритму:</text:p>
      <text:list text:style-name="L1">
        <text:list-item>
          <text:p text:style-name="P27">Создаются карманы (тоже отдельные деки), количество карманов равно количеству элементов в деке;</text:p>
        </text:list-item>
        <text:list-item>
          <text:p text:style-name="P28"><text:span text:style-name="T21">Далее элементы распределяются по карманам. Для начала определяются максимальный (</text:span><text:span text:style-name="T22">max</text:span><text:span text:style-name="T21">) и минимальный (</text:span><text:span text:style-name="T22">min</text:span><text:span text:style-name="T21">) элементы дека. Индекс нужного кармана для каждого элемента определяется по формуле:<text:line-break/></text:span><text:span text:style-name="T23"><text:tab/><text:tab/><text:tab/><text:tab/></text:span><draw:frame text:anchor-type="as-char" svg:y="-0.603cm" draw:z-index="3" draw:name="Фигура1" draw:style-name="gr1" draw:text-style-name="P29" svg:width="7.206cm" svg:height="0.929cm"><draw:image xlink:href="Pictures/1000B47200001776000003059D220BC4.svg" xlink:type="simple" xlink:show="embed" xlink:actuate="onLoad" draw:mime-type="image/svg+xml"><text:p/></draw:image><draw:image xlink:href="Pictures/10000001000000E30000001D95159B00.png" xlink:type="simple" xlink:show="embed" xlink:actuate="onLoad" draw:mime-type="image/png"/><svg:title>TexMaths</svg:title><svg:desc>12§display§ind = \frac{(val - min) \cdot (numBuckets - 1)}{max - min}§svg§600§FALSE§</svg:desc></draw:frame></text:p>
        </text:list-item>
        <text:list-item>
          <text:p text:style-name="P27">Каждый заполненный карман сортируется на месте с помощью сортировки вставками;</text:p>
        </text:list-item>
        <text:list-item>
          <text:p text:style-name="P27">Содержимое карманов последовательно сливается в один дек путем перемещения элементов.</text:p>
        </text:list-item>
      </text:list>
      <text:p text:style-name="P26"/>
      <text:p text:style-name="P30">Для поиска подстроки файл воспринимается как единая строка. Поиск подстроки выполняется методом <text:span text:style-name="T5">Бой</text:span><text:span text:style-name="T11">е</text:span><text:span text:style-name="T5">ра-Мура-Хор</text:span><text:span text:style-name="T11">с</text:span><text:span text:style-name="T5">пу</text:span><text:span text:style-name="T11">л</text:span><text:span text:style-name="T5">а</text:span>. Алгоритм состоит из следующих этапов:</text:p>
      <text:list text:style-name="L2">
        <text:list-item>
          <text:p text:style-name="P31">Строится таблица сдвигов для каждого символа алфавита на основе искомого шаблона. Величина сдвига для символа на позиции <text:span text:style-name="T24">i</text:span> шаблона длины <text:span text:style-name="T24">m</text:span> рассчитывается как<text:line-break/><text:span text:style-name="T24">m - 1 - i</text:span>. Для символов, не входящих в шаблон, сдвиг равен <text:span text:style-name="T24">m</text:span>.</text:p>
        </text:list-item>
        <text:list-item>
          <text:p text:style-name="P31">Поиск шаблона в тексте выполняется справа налево. При обнаружении несовпадения текущий символ текста используется для определения величины сдвига шаблона по таблице сдвигов.</text:p>
        </text:list-item>
      </text:list>
      <text:h text:style-name="P32" text:outline-level="1"><text:bookmark-start text:name="__RefHeading___Toc143_2058273410 Copy 1"/><text:span text:style-name="T25">2</text:span><text:span text:style-name="T17">. </text:span><text:span text:style-name="T26">ОПИСАНИЕ ИСПОЛЬЗУЕМЫХ ПЕРЕМЕННЫХ</text:span><text:bookmark-end text:name="__RefHeading___Toc143_2058273410 Copy 1"/></text:h>
      <text:p text:style-name="P33">Ниже представлена таблица с описанием использованных переменных<text:span text:style-name="T27">.</text:span></text:p>
      <text:p text:style-name="P34">Таблица <text:sequence text:ref-name="refTable0" text:name="Table" text:formula="ooow:Table+1" style:num-format="1">1</text:sequence><text:span text:style-name="T28"><text:s/></text:span>— Используемые переменные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5">Название</text:p>
          </table:table-cell>
          <table:table-cell table:style-name="Table1.A1" office:value-type="string">
            <text:p text:style-name="P35">Тип</text:p>
          </table:table-cell>
          <table:table-cell table:style-name="Table1.A1" office:value-type="string">
            <text:p text:style-name="P35">Границы типа</text:p>
          </table:table-cell>
          <table:table-cell table:style-name="Table1.D1" office:value-type="string">
            <text:p text:style-name="P35">Назначение</text:p>
          </table:table-cell>
        </table:table-row>
        <table:table-row>
          <table:table-cell table:style-name="Table1.A2" office:value-type="string">
            <text:p text:style-name="P36">value</text:p>
          </table:table-cell>
          <table:table-cell table:style-name="Table1.A2" office:value-type="string">
            <text:p text:style-name="P36">float</text:p>
          </table:table-cell>
          <table:table-cell table:style-name="Table1.A2" office:value-type="string">
            <text:p text:style-name="P37"><text:span text:style-name="T29">от </text:span><text:span text:style-name="T30">-</text:span>3,4E<text:span text:style-name="T30">+</text:span>38 до 3,4E+38</text:p>
          </table:table-cell>
          <table:table-cell table:style-name="Table1.D2" office:value-type="string">
            <text:p text:style-name="P38">Значение узла <text:span text:style-name="T31">дека</text:span></text:p>
          </table:table-cell>
        </table:table-row>
        <table:table-row>
          <table:table-cell table:style-name="Table1.A2" office:value-type="string">
            <text:p text:style-name="P36">next</text:p>
          </table:table-cell>
          <table:table-cell table:style-name="Table1.A2" office:value-type="string">
            <text:p text:style-name="P36">struct Node*</text:p>
          </table:table-cell>
          <table:table-cell table:style-name="Table1.A2" office:value-type="string">
            <text:p text:style-name="P36">-</text:p>
          </table:table-cell>
          <table:table-cell table:style-name="Table1.D2" office:value-type="string">
            <text:p text:style-name="P38">Указатель на следующий узел <text:span text:style-name="T31">дека</text:span></text:p>
          </table:table-cell>
        </table:table-row>
        <table:table-row>
          <table:table-cell table:style-name="Table1.A2" office:value-type="string">
            <text:p text:style-name="P36">head</text:p>
          </table:table-cell>
          <table:table-cell table:style-name="Table1.A2" office:value-type="string">
            <text:p text:style-name="P36">struct Node*</text:p>
          </table:table-cell>
          <table:table-cell table:style-name="Table1.A2" office:value-type="string">
            <text:p text:style-name="P36">-</text:p>
          </table:table-cell>
          <table:table-cell table:style-name="Table1.D2" office:value-type="string">
            <text:p text:style-name="P38">Указатель на начальный узел <text:span text:style-name="T31">дека</text:span></text:p>
          </table:table-cell>
        </table:table-row>
        <table:table-row>
          <table:table-cell table:style-name="Table1.A2" office:value-type="string">
            <text:p text:style-name="P36">tail</text:p>
          </table:table-cell>
          <table:table-cell table:style-name="Table1.A2" office:value-type="string">
            <text:p text:style-name="P36">struct Node*</text:p>
          </table:table-cell>
          <table:table-cell table:style-name="Table1.A2" office:value-type="string">
            <text:p text:style-name="P36">-</text:p>
          </table:table-cell>
          <table:table-cell table:style-name="Table1.D2" office:value-type="string">
            <text:p text:style-name="P38">Указатель на конечный узел <text:span text:style-name="T31">дека</text:span></text:p>
          </table:table-cell>
        </table:table-row>
        <table:table-row>
          <table:table-cell table:style-name="Table1.A2" office:value-type="string">
            <text:p text:style-name="P39">size</text:p>
          </table:table-cell>
          <table:table-cell table:style-name="Table1.A2" office:value-type="string">
            <text:p text:style-name="P40">size_t</text:p>
          </table:table-cell>
          <table:table-cell table:style-name="Table1.A2" office:value-type="string">
            <text:p text:style-name="P39">от <text:span text:style-name="T32">0</text:span> до<text:span text:style-name="T33"> </text:span><text:span text:style-name="T34">2</text:span><text:span text:style-name="T35">64</text:span><text:span text:style-name="T36"> - 1</text:span></text:p>
          </table:table-cell>
          <table:table-cell table:style-name="Table1.D2" office:value-type="string">
            <text:p text:style-name="P41">Размер <text:span text:style-name="T31">дека</text:span></text:p>
          </table:table-cell>
        </table:table-row>
        <table:table-row>
          <table:table-cell table:style-name="Table1.A2" office:value-type="string">
            <text:p text:style-name="P40">node</text:p>
          </table:table-cell>
          <table:table-cell table:style-name="Table1.A2" office:value-type="string">
            <text:p text:style-name="P40">struct Node*</text:p>
          </table:table-cell>
          <table:table-cell table:style-name="Table1.A2" office:value-type="string">
            <text:p text:style-name="P40">-</text:p>
          </table:table-cell>
          <table:table-cell table:style-name="Table1.D2" office:value-type="string">
            <text:p text:style-name="P42">Указатель на узел <text:span text:style-name="T31">дека</text:span></text:p>
          </table:table-cell>
        </table:table-row>
        <table:table-row>
          <table:table-cell table:style-name="Table1.A2" office:value-type="string">
            <text:p text:style-name="P40">oldHead</text:p>
          </table:table-cell>
          <table:table-cell table:style-name="Table1.A2" office:value-type="string">
            <text:p text:style-name="P40">struct Node*</text:p>
          </table:table-cell>
          <table:table-cell table:style-name="Table1.A2" office:value-type="string">
            <text:p text:style-name="P40">-</text:p>
          </table:table-cell>
          <table:table-cell table:style-name="Table1.D2" office:value-type="string">
            <text:p text:style-name="P42">Указатель на удаляемый<text:span text:style-name="T31"> сначала</text:span> узел</text:p>
          </table:table-cell>
        </table:table-row>
        <table:table-row>
          <table:table-cell table:style-name="Table1.A2" office:value-type="string">
            <text:p text:style-name="P43">oldTail</text:p>
          </table:table-cell>
          <table:table-cell table:style-name="Table1.A2" office:value-type="string">
            <text:p text:style-name="P43">struct Node*</text:p>
          </table:table-cell>
          <table:table-cell table:style-name="Table1.A2" office:value-type="string">
            <text:p text:style-name="P43">-</text:p>
          </table:table-cell>
          <table:table-cell table:style-name="Table1.D2" office:value-type="string">
            <text:p text:style-name="P44">Указатель на удаляемый с конца узел</text:p>
          </table:table-cell>
        </table:table-row>
        <table:table-row>
          <table:table-cell table:style-name="Table1.A2" office:value-type="string">
            <text:p text:style-name="P45">cur</text:p>
          </table:table-cell>
          <table:table-cell table:style-name="Table1.A2" office:value-type="string">
            <text:p text:style-name="P45">struct Node*</text:p>
          </table:table-cell>
          <table:table-cell table:style-name="Table1.A2" office:value-type="string">
            <text:p text:style-name="P45">-</text:p>
          </table:table-cell>
          <table:table-cell table:style-name="Table1.D2" office:value-type="string">
            <text:p text:style-name="P46">Указатель на текущий узел</text:p>
          </table:table-cell>
        </table:table-row>
        <table:table-row>
          <table:table-cell table:style-name="Table1.A2" office:value-type="string">
            <text:p text:style-name="P43">next</text:p>
          </table:table-cell>
          <table:table-cell table:style-name="Table1.A2" office:value-type="string">
            <text:p text:style-name="P43">struct Node*</text:p>
          </table:table-cell>
          <table:table-cell table:style-name="Table1.A2" office:value-type="string">
            <text:p text:style-name="P43">-</text:p>
          </table:table-cell>
          <table:table-cell table:style-name="Table1.D2" office:value-type="string">
            <text:p text:style-name="P44">Указатель на следующий узел в сортировке вставками</text:p>
          </table:table-cell>
        </table:table-row>
        <table:table-row>
          <table:table-cell table:style-name="Table1.A2" office:value-type="string">
            <text:p text:style-name="P43">prev</text:p>
          </table:table-cell>
          <table:table-cell table:style-name="Table1.A2" office:value-type="string">
            <text:p text:style-name="P43">struct Node*</text:p>
          </table:table-cell>
          <table:table-cell table:style-name="Table1.A2" office:value-type="string">
            <text:p text:style-name="P43">-</text:p>
          </table:table-cell>
          <table:table-cell table:style-name="Table1.D2" office:value-type="string">
            <text:p text:style-name="P44">Указатель на предыдущий узел в сортировке вставками</text:p>
          </table:table-cell>
        </table:table-row>
        <table:table-row>
          <table:table-cell table:style-name="Table1.A2" office:value-type="string">
            <text:p text:style-name="P45">min</text:p>
          </table:table-cell>
          <table:table-cell table:style-name="Table1.A2" office:value-type="string">
            <text:p text:style-name="P45">float</text:p>
          </table:table-cell>
          <table:table-cell table:style-name="Table1.A2" office:value-type="string">
            <text:p text:style-name="P47"><text:span text:style-name="T29">от </text:span><text:span text:style-name="T30">-</text:span>3,4E<text:span text:style-name="T30">+</text:span>38 до 3,4E+38</text:p>
          </table:table-cell>
          <table:table-cell table:style-name="Table1.D2" office:value-type="string">
            <text:p text:style-name="P46">Минимальный элемент <text:span text:style-name="T31">дека</text:span></text:p>
          </table:table-cell>
        </table:table-row>
        <table:table-row>
          <table:table-cell table:style-name="Table1.A2" office:value-type="string">
            <text:p text:style-name="P45">max</text:p>
          </table:table-cell>
          <table:table-cell table:style-name="Table1.A2" office:value-type="string">
            <text:p text:style-name="P45">float</text:p>
          </table:table-cell>
          <table:table-cell table:style-name="Table1.A2" office:value-type="string">
            <text:p text:style-name="P47"><text:span text:style-name="T29">от </text:span><text:span text:style-name="T30">-</text:span>3,4E<text:span text:style-name="T30">+</text:span>38 до 3,4E+38</text:p>
          </table:table-cell>
          <table:table-cell table:style-name="Table1.D2" office:value-type="string">
            <text:p text:style-name="P46">Максимальный элемент <text:span text:style-name="T31">дека</text:span></text:p>
          </table:table-cell>
        </table:table-row>
        <table:table-row>
          <table:table-cell table:style-name="Table1.A2" office:value-type="string">
            <text:p text:style-name="P48">numBuckets</text:p>
          </table:table-cell>
          <table:table-cell table:style-name="Table1.A2" office:value-type="string">
            <text:p text:style-name="P48">int</text:p>
          </table:table-cell>
          <table:table-cell table:style-name="Table1.A2" office:value-type="string">
            <text:p text:style-name="P48">от 0 до 2147483647</text:p>
          </table:table-cell>
          <table:table-cell table:style-name="Table1.D2" office:value-type="string">
            <text:p text:style-name="P49">Количество карманов</text:p>
          </table:table-cell>
        </table:table-row>
        <table:table-row>
          <table:table-cell table:style-name="Table1.A2" office:value-type="string">
            <text:p text:style-name="P48">buckets</text:p>
          </table:table-cell>
          <table:table-cell table:style-name="Table1.A2" office:value-type="string">
            <text:p text:style-name="P48">struct <text:span text:style-name="T31">Deque</text:span>*</text:p>
          </table:table-cell>
          <table:table-cell table:style-name="Table1.A2" office:value-type="string">
            <text:p text:style-name="P48">-</text:p>
          </table:table-cell>
          <table:table-cell table:style-name="Table1.D2" office:value-type="string">
            <text:p text:style-name="P49">Указатель на выделенную память для карманов</text:p>
          </table:table-cell>
        </table:table-row>
        <table:table-row>
          <table:table-cell table:style-name="Table1.A2" office:value-type="string">
            <text:p text:style-name="P48">ind</text:p>
          </table:table-cell>
          <table:table-cell table:style-name="Table1.A2" office:value-type="string">
            <text:p text:style-name="P48">int</text:p>
          </table:table-cell>
          <table:table-cell table:style-name="Table1.A2" office:value-type="string">
            <text:p text:style-name="P48">от 0 до 2147483647</text:p>
          </table:table-cell>
          <table:table-cell table:style-name="Table1.D2" office:value-type="string">
            <text:p text:style-name="P49">Индекс кармана для элемента <text:span text:style-name="T31">дека</text:span></text:p>
          </table:table-cell>
        </table:table-row>
        <table:table-row>
          <table:table-cell table:style-name="Table1.A2" office:value-type="string">
            <text:p text:style-name="P48">val</text:p>
          </table:table-cell>
          <table:table-cell table:style-name="Table1.A2" office:value-type="string">
            <text:p text:style-name="P48">float</text:p>
          </table:table-cell>
          <table:table-cell table:style-name="Table1.A2" office:value-type="string">
            <text:p text:style-name="P47"><text:span text:style-name="T29">от </text:span><text:span text:style-name="T30">-</text:span>3,4E<text:span text:style-name="T30">+</text:span>38 до 3,4E+38</text:p>
          </table:table-cell>
          <table:table-cell table:style-name="Table1.D2" office:value-type="string">
            <text:p text:style-name="P49">Значение удал<text:span text:style-name="T31">ё</text:span>нного элемента из <text:span text:style-name="T31">дека</text:span></text:p>
          </table:table-cell>
        </table:table-row>
        <table:table-row>
          <table:table-cell table:style-name="Table1.A2" office:value-type="string">
            <text:p text:style-name="P43">shift</text:p>
          </table:table-cell>
          <table:table-cell table:style-name="Table1.A2" office:value-type="string">
            <text:p text:style-name="P43">int[256]</text:p>
          </table:table-cell>
          <table:table-cell table:style-name="Table1.A2" office:value-type="string">
            <text:p text:style-name="P43">-</text:p>
          </table:table-cell>
          <table:table-cell table:style-name="Table1.D2" office:value-type="string">
            <text:p text:style-name="P44">Таблица сдвигов для алгоритма Бойера-Мура<text:span text:style-name="T37">-</text:span>Хор<text:span text:style-name="T38">с</text:span>пу<text:span text:style-name="T38">л</text:span>а</text:p>
          </table:table-cell>
        </table:table-row>
        <table:table-row>
          <table:table-cell table:style-name="Table1.A2" office:value-type="string">
            <text:p text:style-name="P43">pattern</text:p>
          </table:table-cell>
          <table:table-cell table:style-name="Table1.A2" office:value-type="string">
            <text:p text:style-name="P43">char[256]</text:p>
          </table:table-cell>
          <table:table-cell table:style-name="Table1.A2" office:value-type="string">
            <text:p text:style-name="P43">-</text:p>
          </table:table-cell>
          <table:table-cell table:style-name="Table1.D2" office:value-type="string">
            <text:p text:style-name="P44">Искомая подстрока (шаблон)</text:p>
          </table:table-cell>
        </table:table-row>
        <text:soft-page-break/>
        <table:table-row>
          <table:table-cell table:style-name="Table1.A2" office:value-type="string">
            <text:p text:style-name="P43">fileContent</text:p>
          </table:table-cell>
          <table:table-cell table:style-name="Table1.A2" office:value-type="string">
            <text:p text:style-name="P43">char*</text:p>
          </table:table-cell>
          <table:table-cell table:style-name="Table1.A2" office:value-type="string">
            <text:p text:style-name="P43">адрес памяти</text:p>
          </table:table-cell>
          <table:table-cell table:style-name="Table1.D2" office:value-type="string">
            <text:p text:style-name="P44">Буфер для хранения содержимого файла в виде строки</text:p>
          </table:table-cell>
        </table:table-row>
        <table:table-row>
          <table:table-cell table:style-name="Table1.A2" office:value-type="string">
            <text:p text:style-name="P43">pos</text:p>
          </table:table-cell>
          <table:table-cell table:style-name="Table1.A2" office:value-type="string">
            <text:p text:style-name="P43">int</text:p>
          </table:table-cell>
          <table:table-cell table:style-name="Table1.A2" office:value-type="string">
            <text:p text:style-name="P43">от -1 до 2147483647</text:p>
          </table:table-cell>
          <table:table-cell table:style-name="Table1.D2" office:value-type="string">
            <text:p text:style-name="P44">Индекс начала найденной подстроки в тексте</text:p>
          </table:table-cell>
        </table:table-row>
        <table:table-row>
          <table:table-cell table:style-name="Table1.A2" office:value-type="string">
            <text:p text:style-name="P50">file</text:p>
          </table:table-cell>
          <table:table-cell table:style-name="Table1.A2" office:value-type="string">
            <text:p text:style-name="P50">FILE*</text:p>
          </table:table-cell>
          <table:table-cell table:style-name="Table1.A2" office:value-type="string">
            <text:p text:style-name="P50">-</text:p>
          </table:table-cell>
          <table:table-cell table:style-name="Table1.D2" office:value-type="string">
            <text:p text:style-name="P51">Указатель на файловый поток для чтения</text:p>
          </table:table-cell>
        </table:table-row>
        <table:table-row>
          <table:table-cell table:style-name="Table1.A2" office:value-type="string">
            <text:p text:style-name="P52">tmp</text:p>
          </table:table-cell>
          <table:table-cell table:style-name="Table1.A2" office:value-type="string">
            <text:p text:style-name="P52">float</text:p>
          </table:table-cell>
          <table:table-cell table:style-name="Table1.A2" office:value-type="string">
            <text:p text:style-name="P47"><text:span text:style-name="T29">от </text:span><text:span text:style-name="T30">-</text:span>3,4E<text:span text:style-name="T30">+</text:span>38 до 3,4E+38</text:p>
          </table:table-cell>
          <table:table-cell table:style-name="Table1.D2" office:value-type="string">
            <text:p text:style-name="P53">Переменная для хранения прочитанного числа</text:p>
          </table:table-cell>
        </table:table-row>
        <table:table-row>
          <table:table-cell table:style-name="Table1.A2" office:value-type="string">
            <text:p text:style-name="P39">argc</text:p>
          </table:table-cell>
          <table:table-cell table:style-name="Table1.A2" office:value-type="string">
            <text:p text:style-name="P39">int</text:p>
          </table:table-cell>
          <table:table-cell table:style-name="Table1.A2" office:value-type="string">
            <text:p text:style-name="P39">от <text:span text:style-name="T32">1</text:span> до<text:span text:style-name="T33"> </text:span>2147483647</text:p>
          </table:table-cell>
          <table:table-cell table:style-name="Table1.D2" office:value-type="string">
            <text:p text:style-name="P41">Хранит количество аргументов при запуске программы</text:p>
          </table:table-cell>
        </table:table-row>
        <table:table-row>
          <table:table-cell table:style-name="Table1.A2" office:value-type="string">
            <text:p text:style-name="P39">argv[]</text:p>
          </table:table-cell>
          <table:table-cell table:style-name="Table1.A2" office:value-type="string">
            <text:p text:style-name="P39">char**</text:p>
          </table:table-cell>
          <table:table-cell table:style-name="Table1.A2" office:value-type="string">
            <text:p text:style-name="P54">адрес памяти</text:p>
          </table:table-cell>
          <table:table-cell table:style-name="Table1.D2" office:value-type="string">
            <text:p text:style-name="P41">Массив переданных аргументов</text:p>
          </table:table-cell>
        </table:table-row>
        <table:table-row>
          <table:table-cell table:style-name="Table1.A2" office:value-type="string">
            <text:p text:style-name="P55">filename</text:p>
          </table:table-cell>
          <table:table-cell table:style-name="Table1.A2" office:value-type="string">
            <text:p text:style-name="P55">char<text:span text:style-name="T39">*</text:span></text:p>
          </table:table-cell>
          <table:table-cell table:style-name="Table1.A2" office:value-type="string">
            <text:p text:style-name="P54">адрес памяти</text:p>
          </table:table-cell>
          <table:table-cell table:style-name="Table1.D2" office:value-type="string">
            <text:p text:style-name="P56">Ссылается на имя файла</text:p>
          </table:table-cell>
        </table:table-row>
        <table:table-row>
          <table:table-cell table:style-name="Table1.A2" office:value-type="string">
            <text:p text:style-name="P43">d</text:p>
          </table:table-cell>
          <table:table-cell table:style-name="Table1.A2" office:value-type="string">
            <text:p text:style-name="P52">struct <text:span text:style-name="T31">Deque</text:span>*</text:p>
          </table:table-cell>
          <table:table-cell table:style-name="Table1.A2" office:value-type="string">
            <text:p text:style-name="P52">-</text:p>
          </table:table-cell>
          <table:table-cell table:style-name="Table1.D2" office:value-type="string">
            <text:p text:style-name="P44">Локальная переменная для дека</text:p>
          </table:table-cell>
        </table:table-row>
        <table:table-row>
          <table:table-cell table:style-name="Table1.A2" office:value-type="string">
            <text:p text:style-name="P57">i</text:p>
          </table:table-cell>
          <table:table-cell table:style-name="Table1.A2" office:value-type="string">
            <text:p text:style-name="P57">int</text:p>
          </table:table-cell>
          <table:table-cell table:style-name="Table1.A2" office:value-type="string">
            <text:p text:style-name="P58">от <text:span text:style-name="T40">0</text:span> до<text:span text:style-name="T33"> </text:span>2147483647</text:p>
          </table:table-cell>
          <table:table-cell table:style-name="Table1.D2" office:value-type="string">
            <text:p text:style-name="P59">Переменная для итерации циклов</text:p>
          </table:table-cell>
        </table:table-row>
      </table:table>
      <text:p text:style-name="P60"/>
      <text:p text:style-name="P60"/>
      <text:p text:style-name="P60"/>
      <text:h text:style-name="P61" text:outline-level="1"><text:bookmark-start text:name="__RefHeading___Toc143_2058273410 Copy 1 Copy 2"/><text:span text:style-name="T25">3</text:span><text:span text:style-name="T17">. </text:span><text:span text:style-name="T41">БЛОК</text:span><text:span text:style-name="T42">-</text:span><text:span text:style-name="T41">СХЕМА АЛГОРИТМА</text:span><text:bookmark-end text:name="__RefHeading___Toc143_2058273410 Copy 1 Copy 2"/></text:h>
      <text:p text:style-name="P62">Блок<text:span text:style-name="T15">-</text:span>схема алгоритма представлена в Приложении А.</text:p>
      <text:p text:style-name="P62"/>
      <text:h text:style-name="P63" text:outline-level="1"><text:bookmark-start text:name="__RefHeading___Toc143_2058273410 Copy 1 Copy 2 Copy 1"/><text:span text:style-name="T25">4</text:span><text:span text:style-name="T17">. </text:span><text:span text:style-name="T41">ТЕСТИРОВАНИЕ АЛГОРИТМА</text:span><text:bookmark-end text:name="__RefHeading___Toc143_2058273410 Copy 1 Copy 2 Copy 1"/></text:h>
      <text:p text:style-name="P64"><draw:frame draw:style-name="fr1" draw:name="Frame1" text:anchor-type="paragraph" svg:x="0cm" svg:y="0.323cm" svg:width="16.591cm" draw:z-index="0"><draw:text-box fo:min-height="3.582cm"><text:p text:style-name="P65"><draw:frame draw:style-name="fr2" draw:name="Изображение1" text:anchor-type="char" svg:width="16.591cm" svg:height="6.338cm" draw:z-index="8"><draw:image xlink:href="Pictures/100000010000076B000002D6452418D4.png" xlink:type="simple" xlink:show="embed" xlink:actuate="onLoad" draw:mime-type="image/png"/></draw:frame>Рисунок <text:sequence text:ref-name="refDrawing0" text:name="Drawing" text:formula="ooow:Drawing+1" style:num-format="1">1</text:sequence><text:span text:style-name="T43"><text:s/></text:span>— Результат успешной работы алгоритма </text:p></draw:text-box></draw:frame></text:p>
      <text:p text:style-name="P64"><draw:frame draw:style-name="fr3" draw:name="Frame2" text:anchor-type="char" svg:width="16.591cm" draw:z-index="1"><draw:text-box fo:min-height="1.843cm"><text:p text:style-name="P66"><draw:frame draw:style-name="fr2" draw:name="Изображение2" text:anchor-type="char" svg:width="16.591cm" svg:height="2.692cm" draw:z-index="2"><draw:image xlink:href="Pictures/100000010000037D00000091C276CFF2.png" xlink:type="simple" xlink:show="embed" xlink:actuate="onLoad" draw:mime-type="image/png"/></draw:frame>Рисунок <text:sequence text:ref-name="refDrawing1" text:name="Drawing" text:formula="ooow:Drawing+1" style:num-format="1">2</text:sequence><text:span text:style-name="T44"><text:s/>—</text:span> Результат работы алгоритма при неуказанном входном файле<text:span text:style-name="T45"> или ошибке при открытии файла</text:span></text:p></draw:text-box></draw:frame></text:p>
      <text:h text:style-name="P67" text:outline-level="1"><text:bookmark-start text:name="__RefHeading___Toc143_2058273410 Copy 1 Copy 2 Copy 2"/><text:span text:style-name="T25">5</text:span><text:span text:style-name="T17">. </text:span><text:span text:style-name="T46">ИСХОДНЫЙ КОД АЛГОРИТМА</text:span><text:bookmark-end text:name="__RefHeading___Toc143_2058273410 Copy 1 Copy 2 Copy 2"/></text:h>
      <text:p text:style-name="P68">Программа написана на языке C, <text:span text:style-name="T47">для компиляции </text:span>использовался компилятор gcc.</text:p>
      <text:p text:style-name="P68">Исходный код Makefile:</text:p>
      <text:p text:style-name="P69"><text:span text:style-name="T48"><text:s/>1 <text:s/>| <text:s text:c="3"/></text:span><text:span text:style-name="T49">CC = gcc</text:span></text:p>
      <text:p text:style-name="P69"><text:span text:style-name="T48"><text:s/>2 <text:s/>| <text:s text:c="3"/></text:span><text:span text:style-name="T49">CFLAGS = -O3 -Wall -Wextra -Werror -fanalyzer</text:span></text:p>
      <text:p text:style-name="P69"><text:span text:style-name="T48"><text:s/>3 <text:s/>| <text:s text:c="3"/></text:span><text:span text:style-name="T49">TARGET = lab</text:span><text:span text:style-name="T50">3</text:span></text:p>
      <text:p text:style-name="P70"><text:s/>4 <text:s/>| <text:s text:c="3"/></text:p>
      <text:p text:style-name="P69"><text:span text:style-name="T48"><text:s/>5 <text:s/>| <text:s text:c="3"/></text:span><text:span text:style-name="T49">all: </text:span><text:span text:style-name="T51">$(</text:span><text:span text:style-name="T49">TARGET</text:span><text:span text:style-name="T51">)</text:span></text:p>
      <text:p text:style-name="P70"><text:s/>6 <text:s/>| <text:s text:c="3"/></text:p>
      <text:p text:style-name="P69"><text:span text:style-name="T48"><text:s/>7 <text:s/>| <text:s text:c="3"/></text:span><text:span text:style-name="T49">$(TARGET): lab</text:span><text:span text:style-name="T50">3</text:span><text:span text:style-name="T49">.c</text:span></text:p>
      <text:p text:style-name="P69"><text:span text:style-name="T48"><text:s/>8 <text:s/>| <text:s text:c="3"/></text:span><text:span text:style-name="T49"><text:tab/></text:span><text:span text:style-name="T51">$(</text:span><text:span text:style-name="T49">CC</text:span><text:span text:style-name="T51">)</text:span><text:span text:style-name="T49"> </text:span><text:span text:style-name="T51">$(</text:span><text:span text:style-name="T49">CFLAGS</text:span><text:span text:style-name="T51">)</text:span><text:span text:style-name="T49"> </text:span><text:span text:style-name="T51">$(</text:span><text:span text:style-name="T49">TARGET</text:span><text:span text:style-name="T51">)</text:span><text:span text:style-name="T49">.c -o </text:span><text:span text:style-name="T51">$(</text:span><text:span text:style-name="T49">TARGET</text:span><text:span text:style-name="T51">)</text:span></text:p>
      <text:p text:style-name="P70"><text:s/>9 <text:s/>| <text:s text:c="3"/></text:p>
      <text:p text:style-name="P69"><text:span text:style-name="T48">10 <text:s/>| <text:s text:c="3"/></text:span><text:span text:style-name="T49">clean:</text:span></text:p>
      <text:p text:style-name="P69"><text:span text:style-name="T48">11 <text:s/>| <text:s text:c="3"/></text:span><text:span text:style-name="T49"><text:tab/>rm -f </text:span><text:span text:style-name="T51">$(</text:span><text:span text:style-name="T49">TARGET</text:span><text:span text:style-name="T51">)</text:span></text:p>
      <text:p text:style-name="P71"/>
      <text:p text:style-name="P72"/>
      <text:p text:style-name="P68">Исходный код lab<text:span text:style-name="T52">3</text:span>.c:</text:p>
      <text:p text:style-name="P73"><text:span text:style-name="T53"><text:s text:c="2"/>1 <text:s/>| <text:s text:c="3"/></text:span><text:span text:style-name="T51">#include</text:span><text:span text:style-name="T49"> </text:span><text:span text:style-name="T53">&lt;stdio.h&gt;</text:span></text:p>
      <text:p text:style-name="P73"><text:span text:style-name="T53"><text:s text:c="2"/>2 <text:s/>| <text:s text:c="3"/></text:span><text:span text:style-name="T51">#include</text:span><text:span text:style-name="T49"> </text:span><text:span text:style-name="T53">&lt;stdlib.h&gt;</text:span></text:p>
      <text:p text:style-name="P73"><text:span text:style-name="T53"><text:s text:c="2"/>3 <text:s/>| <text:s text:c="3"/></text:span><text:span text:style-name="T51">#include</text:span><text:span text:style-name="T49"> </text:span><text:span text:style-name="T53">&lt;string.h&gt;</text:span></text:p>
      <text:p text:style-name="P73"><text:span text:style-name="T53"><text:s text:c="2"/>4 <text:s/>| <text:s text:c="3"/></text:span><text:span text:style-name="T51">#include</text:span><text:span text:style-name="T49"> </text:span><text:span text:style-name="T53">"stddef.h"</text:span></text:p>
      <text:p text:style-name="P73"><text:span text:style-name="T53"><text:s text:c="2"/>5 <text:s/>| <text:s text:c="3"/></text:span><text:span text:style-name="T51">#include</text:span><text:span text:style-name="T49"> </text:span><text:span text:style-name="T53">"stdbool.h"</text:span></text:p>
      <text:p text:style-name="P74"><text:s text:c="2"/>6 <text:s/>| <text:s text:c="3"/></text:p>
      <text:p text:style-name="P75"><text:span text:style-name="T53"><text:s text:c="2"/>7 <text:s/>| <text:s text:c="3"/></text:span>#define ALPHABET_SIZE 256</text:p>
      <text:p text:style-name="P74"><text:s text:c="2"/>8 <text:s/>| <text:s text:c="3"/></text:p>
      <text:p text:style-name="P73"><text:span text:style-name="T53"><text:s text:c="2"/>9 <text:s/>| <text:s text:c="3"/></text:span><text:span text:style-name="T51">typedef</text:span><text:span text:style-name="T49"> </text:span><text:span text:style-name="T51">struct</text:span><text:span text:style-name="T49"> </text:span><text:span text:style-name="T54">Node</text:span><text:span text:style-name="T49"> {</text:span></text:p>
      <text:p text:style-name="P73"><text:span text:style-name="T53"><text:s/>10 <text:s/>| <text:s text:c="3"/></text:span><text:span text:style-name="T49"><text:s text:c="4"/></text:span><text:span text:style-name="T54">float</text:span><text:span text:style-name="T49"> value;</text:span></text:p>
      <text:p text:style-name="P73"><text:span text:style-name="T53"><text:s/>11 <text:s/>| <text:s text:c="3"/></text:span><text:span text:style-name="T49"><text:s text:c="4"/></text:span><text:span text:style-name="T51">struct</text:span><text:span text:style-name="T49"> </text:span><text:span text:style-name="T54">Node</text:span><text:span text:style-name="T49"> *next;</text:span></text:p>
      <text:p text:style-name="P73"><text:span text:style-name="T53"><text:s/>12 <text:s/>| <text:s text:c="3"/></text:span><text:span text:style-name="T49"><text:s text:c="4"/></text:span><text:span text:style-name="T51">struct</text:span><text:span text:style-name="T49"> </text:span><text:span text:style-name="T54">Node</text:span><text:span text:style-name="T49"> *prev;</text:span></text:p>
      <text:p text:style-name="P73"><text:span text:style-name="T53"><text:s/>13 <text:s/>| <text:s text:c="3"/></text:span><text:span text:style-name="T49">} Node;</text:span></text:p>
      <text:p text:style-name="P74"><text:s/>14 <text:s/>| <text:s text:c="3"/></text:p>
      <text:p text:style-name="P73"><text:span text:style-name="T53"><text:s/>15 <text:s/>| <text:s text:c="3"/></text:span><text:span text:style-name="T51">typedef</text:span><text:span text:style-name="T49"> </text:span><text:span text:style-name="T51">struct</text:span><text:span text:style-name="T49"> </text:span><text:span text:style-name="T54">Deque</text:span><text:span text:style-name="T49"> {</text:span></text:p>
      <text:p text:style-name="P73"><text:span text:style-name="T53"><text:s/>16 <text:s/>| <text:s text:c="3"/></text:span><text:span text:style-name="T49"><text:s text:c="4"/></text:span><text:span text:style-name="T51">struct</text:span><text:span text:style-name="T49"> </text:span><text:span text:style-name="T54">Node</text:span><text:span text:style-name="T49"> *head;</text:span></text:p>
      <text:p text:style-name="P73"><text:span text:style-name="T53"><text:s/>17 <text:s/>| <text:s text:c="3"/></text:span><text:span text:style-name="T49"><text:s text:c="4"/></text:span><text:span text:style-name="T51">struct</text:span><text:span text:style-name="T49"> </text:span><text:span text:style-name="T54">Node</text:span><text:span text:style-name="T49"> *tail;</text:span></text:p>
      <text:p text:style-name="P73"><text:span text:style-name="T53"><text:s/>18 <text:s/>| <text:s text:c="3"/></text:span><text:span text:style-name="T49"><text:s text:c="4"/></text:span><text:span text:style-name="T54">size_t</text:span><text:span text:style-name="T49"> size;</text:span></text:p>
      <text:p text:style-name="P73"><text:span text:style-name="T53"><text:s/>19 <text:s/>| <text:s text:c="3"/></text:span><text:span text:style-name="T49">} Deque;</text:span></text:p>
      <text:p text:style-name="P74"><text:s/>20 <text:s/>| <text:s text:c="3"/></text:p>
      <text:p text:style-name="P73"><text:span text:style-name="T53"><text:s/>21 <text:s/>| <text:s text:c="3"/></text:span><text:span text:style-name="T54">void</text:span><text:span text:style-name="T49"> init(Deque *d) {</text:span></text:p>
      <text:p text:style-name="P73"><text:span text:style-name="T53"><text:s/>22 <text:s/>| <text:s text:c="3"/></text:span><text:span text:style-name="T49"><text:s text:c="4"/>d-&gt;head = d-&gt;tail = NULL;</text:span></text:p>
      <text:p text:style-name="P73"><text:span text:style-name="T53"><text:s/>23 <text:s/>| <text:s text:c="3"/></text:span><text:span text:style-name="T49"><text:s text:c="4"/>d-&gt;size = 0;</text:span></text:p>
      <text:p text:style-name="P76"><text:span text:style-name="T53"><text:s/>24 <text:s/>| <text:s text:c="3"/></text:span>}</text:p>
      <text:p text:style-name="P74"><text:s/>25 <text:s/>| <text:s text:c="3"/></text:p>
      <text:p text:style-name="P73"><text:span text:style-name="T53"><text:s/>26 <text:s/>| <text:s text:c="3"/></text:span><text:span text:style-name="T54">void</text:span><text:span text:style-name="T49"> pushFront(Deque *d, </text:span><text:span text:style-name="T54">float</text:span><text:span text:style-name="T49"> value) {</text:span></text:p>
      <text:p text:style-name="P73"><text:span text:style-name="T53"><text:s/>27 <text:s/>| <text:s text:c="3"/></text:span><text:span text:style-name="T49"><text:s text:c="4"/>Node *node = malloc(</text:span><text:span text:style-name="T51">sizeof</text:span><text:span text:style-name="T49">(Node));</text:span></text:p>
      <text:p text:style-name="P73"><text:span text:style-name="T53"><text:s/>28 <text:s/>| <text:s text:c="3"/></text:span><text:span text:style-name="T49"><text:s text:c="4"/></text:span><text:span text:style-name="T51">if</text:span><text:span text:style-name="T49"> (!node) {</text:span></text:p>
      <text:p text:style-name="P73"><text:span text:style-name="T53"><text:s/>29 <text:s/>| <text:s text:c="3"/></text:span><text:span text:style-name="T49"><text:s text:c="8"/>fprintf(stderr, </text:span><text:span text:style-name="T55">"Ошибка: не удалось выделить память для узла дека.\n"</text:span><text:span text:style-name="T49">);</text:span></text:p>
      <text:p text:style-name="P73"><text:span text:style-name="T53"><text:s/>30 <text:s/>| <text:s text:c="3"/></text:span><text:span text:style-name="T49"><text:s text:c="8"/>exit(1);</text:span></text:p>
      <text:p text:style-name="P73"><text:span text:style-name="T53"><text:s/>31 <text:s/>| <text:s text:c="3"/></text:span><text:span text:style-name="T49"><text:s text:c="4"/>}</text:span></text:p>
      <text:p text:style-name="P73"><text:span text:style-name="T53"><text:s/>32 <text:s/>| <text:s text:c="3"/></text:span><text:span text:style-name="T49"><text:s text:c="4"/>node-&gt;value = value;</text:span></text:p>
      <text:p text:style-name="P73"><text:span text:style-name="T53"><text:s/>33 <text:s/>| <text:s text:c="3"/></text:span><text:span text:style-name="T49"><text:s text:c="4"/>node-&gt;next = d-&gt;head;</text:span></text:p>
      <text:p text:style-name="P73"><text:span text:style-name="T53"><text:s/>34 <text:s/>| <text:s text:c="3"/></text:span><text:span text:style-name="T49"><text:s text:c="4"/>node-&gt;prev = NULL;</text:span></text:p>
      <text:p text:style-name="P74"><text:s/>35 <text:s/>| <text:s text:c="3"/></text:p>
      <text:p text:style-name="P73"><text:span text:style-name="T53"><text:s/>36 <text:s/>| <text:s text:c="3"/></text:span><text:span text:style-name="T49"><text:s text:c="4"/></text:span><text:span text:style-name="T51">if</text:span><text:span text:style-name="T49"> (d-&gt;size == 0) {</text:span></text:p>
      <text:p text:style-name="P73"><text:span text:style-name="T53"><text:s/>37 <text:s/>| <text:s text:c="3"/></text:span><text:span text:style-name="T49"><text:s text:c="8"/>d-&gt;head = node;</text:span></text:p>
      <text:p text:style-name="P73"><text:span text:style-name="T53"><text:s/>38 <text:s/>| <text:s text:c="3"/></text:span><text:span text:style-name="T49"><text:s text:c="8"/>d-&gt;tail = node;</text:span></text:p>
      <text:p text:style-name="P73"><text:span text:style-name="T53"><text:s/>39 <text:s/>| <text:s text:c="3"/></text:span><text:span text:style-name="T49"><text:s text:c="4"/>} </text:span><text:span text:style-name="T51">else</text:span><text:span text:style-name="T49"> {</text:span></text:p>
      <text:p text:style-name="P73"><text:span text:style-name="T53"><text:s/>40 <text:s/>| <text:s text:c="3"/></text:span><text:span text:style-name="T49"><text:s text:c="8"/>d-&gt;head-&gt;prev = node;</text:span></text:p>
      <text:p text:style-name="P73"><text:span text:style-name="T53"><text:s/>41 <text:s/>| <text:s text:c="3"/></text:span><text:span text:style-name="T49"><text:s text:c="8"/>d-&gt;head = node;</text:span></text:p>
      <text:p text:style-name="P73"><text:span text:style-name="T53"><text:s/>42 <text:s/>| <text:s text:c="3"/></text:span><text:span text:style-name="T49"><text:s text:c="4"/>}</text:span></text:p>
      <text:p text:style-name="P73"><text:span text:style-name="T53"><text:s/>43 <text:s/>| <text:s text:c="3"/></text:span><text:span text:style-name="T49"><text:s text:c="4"/>d-&gt;size++;</text:span></text:p>
      <text:p text:style-name="P76"><text:span text:style-name="T53"><text:s/>44 <text:s/>| <text:s text:c="3"/></text:span>}</text:p>
      <text:p text:style-name="P74"><text:s/>45 <text:s/>| <text:s text:c="3"/></text:p>
      <text:p text:style-name="P73"><text:span text:style-name="T53"><text:s/>46 <text:s/>| <text:s text:c="3"/></text:span><text:span text:style-name="T54">void</text:span><text:span text:style-name="T49"> pushBack(Deque *d, </text:span><text:span text:style-name="T54">float</text:span><text:span text:style-name="T49"> value) {</text:span></text:p>
      <text:p text:style-name="P73"><text:soft-page-break/><text:span text:style-name="T53"><text:s/>47 <text:s/>| <text:s text:c="3"/></text:span><text:span text:style-name="T49"><text:s text:c="4"/>Node *node = malloc(</text:span><text:span text:style-name="T51">sizeof</text:span><text:span text:style-name="T49">(Node));</text:span></text:p>
      <text:p text:style-name="P73"><text:span text:style-name="T53"><text:s/>48 <text:s/>| <text:s text:c="3"/></text:span><text:span text:style-name="T49"><text:s text:c="4"/></text:span><text:span text:style-name="T51">if</text:span><text:span text:style-name="T49"> (!node) {</text:span></text:p>
      <text:p text:style-name="P73"><text:span text:style-name="T53"><text:s/>49 <text:s/>| <text:s text:c="3"/></text:span><text:span text:style-name="T49"><text:s text:c="8"/>fprintf(stderr, </text:span><text:span text:style-name="T55">"Ошибка: не удалось выделить память для узла дека.\n"</text:span><text:span text:style-name="T49">);</text:span></text:p>
      <text:p text:style-name="P73"><text:span text:style-name="T53"><text:s/>50 <text:s/>| <text:s text:c="3"/></text:span><text:span text:style-name="T49"><text:s text:c="8"/>exit(1);</text:span></text:p>
      <text:p text:style-name="P73"><text:span text:style-name="T53"><text:s/>51 <text:s/>| <text:s text:c="3"/></text:span><text:span text:style-name="T49"><text:s text:c="4"/>}</text:span></text:p>
      <text:p text:style-name="P73"><text:span text:style-name="T53"><text:s/>52 <text:s/>| <text:s text:c="3"/></text:span><text:span text:style-name="T49"><text:s text:c="4"/>node-&gt;value = value;</text:span></text:p>
      <text:p text:style-name="P73"><text:span text:style-name="T53"><text:s/>53 <text:s/>| <text:s text:c="3"/></text:span><text:span text:style-name="T49"><text:s text:c="4"/>node-&gt;next = NULL;</text:span></text:p>
      <text:p text:style-name="P73"><text:span text:style-name="T53"><text:s/>54 <text:s/>| <text:s text:c="3"/></text:span><text:span text:style-name="T49"><text:s text:c="4"/>node-&gt;prev = d-&gt;tail;</text:span></text:p>
      <text:p text:style-name="P74"><text:s/>55 <text:s/>| <text:s text:c="3"/></text:p>
      <text:p text:style-name="P73"><text:span text:style-name="T53"><text:s/>56 <text:s/>| <text:s text:c="3"/></text:span><text:span text:style-name="T49"><text:s text:c="4"/></text:span><text:span text:style-name="T51">if</text:span><text:span text:style-name="T49"> (d-&gt;size == 0) {</text:span></text:p>
      <text:p text:style-name="P73"><text:span text:style-name="T53"><text:s/>57 <text:s/>| <text:s text:c="3"/></text:span><text:span text:style-name="T49"><text:s text:c="8"/>d-&gt;head = node;</text:span></text:p>
      <text:p text:style-name="P73"><text:span text:style-name="T53"><text:s/>58 <text:s/>| <text:s text:c="3"/></text:span><text:span text:style-name="T49"><text:s text:c="8"/>d-&gt;tail = node;</text:span></text:p>
      <text:p text:style-name="P73"><text:span text:style-name="T53"><text:s/>59 <text:s/>| <text:s text:c="3"/></text:span><text:span text:style-name="T49"><text:s text:c="4"/>} </text:span><text:span text:style-name="T51">else</text:span><text:span text:style-name="T49"> {</text:span></text:p>
      <text:p text:style-name="P73"><text:span text:style-name="T53"><text:s/>60 <text:s/>| <text:s text:c="3"/></text:span><text:span text:style-name="T49"><text:s text:c="8"/>d-&gt;tail-&gt;next = node;</text:span></text:p>
      <text:p text:style-name="P73"><text:span text:style-name="T53"><text:s/>61 <text:s/>| <text:s text:c="3"/></text:span><text:span text:style-name="T49"><text:s text:c="8"/>d-&gt;tail = node;</text:span></text:p>
      <text:p text:style-name="P73"><text:span text:style-name="T53"><text:s/>62 <text:s/>| <text:s text:c="3"/></text:span><text:span text:style-name="T49"><text:s text:c="4"/>}</text:span></text:p>
      <text:p text:style-name="P73"><text:span text:style-name="T53"><text:s/>63 <text:s/>| <text:s text:c="3"/></text:span><text:span text:style-name="T49"><text:s text:c="4"/>d-&gt;size++;</text:span></text:p>
      <text:p text:style-name="P76"><text:span text:style-name="T53"><text:s/>64 <text:s/>| <text:s text:c="3"/></text:span>}</text:p>
      <text:p text:style-name="P74"><text:s/>65 <text:s/>| <text:s text:c="3"/></text:p>
      <text:p text:style-name="P73"><text:span text:style-name="T53"><text:s/>66 <text:s/>| <text:s text:c="3"/></text:span><text:span text:style-name="T54">bool</text:span><text:span text:style-name="T49"> popFront(Deque *d, </text:span><text:span text:style-name="T54">float</text:span><text:span text:style-name="T49"> *out) {</text:span></text:p>
      <text:p text:style-name="P73"><text:span text:style-name="T53"><text:s/>67 <text:s/>| <text:s text:c="3"/></text:span><text:span text:style-name="T49"><text:s text:c="4"/></text:span><text:span text:style-name="T51">if</text:span><text:span text:style-name="T49"> (d-&gt;size == 0) </text:span><text:span text:style-name="T51">return</text:span><text:span text:style-name="T49"> false;</text:span></text:p>
      <text:p text:style-name="P73"><text:span text:style-name="T53"><text:s/>68 <text:s/>| <text:s text:c="3"/></text:span><text:span text:style-name="T49"><text:s text:c="4"/>Node *oldHead = d-&gt;head;</text:span></text:p>
      <text:p text:style-name="P73"><text:span text:style-name="T53"><text:s/>69 <text:s/>| <text:s text:c="3"/></text:span><text:span text:style-name="T49"><text:s text:c="4"/>*out = oldHead-&gt;value;</text:span></text:p>
      <text:p text:style-name="P74"><text:s/>70 <text:s/>| <text:s text:c="3"/></text:p>
      <text:p text:style-name="P73"><text:span text:style-name="T53"><text:s/>71 <text:s/>| <text:s text:c="3"/></text:span><text:span text:style-name="T49"><text:s text:c="4"/>d-&gt;head = oldHead-&gt;next;</text:span></text:p>
      <text:p text:style-name="P73"><text:span text:style-name="T53"><text:s/>72 <text:s/>| <text:s text:c="3"/></text:span><text:span text:style-name="T49"><text:s text:c="4"/></text:span><text:span text:style-name="T51">if</text:span><text:span text:style-name="T49"> (d-&gt;head == NULL) {</text:span></text:p>
      <text:p text:style-name="P73"><text:span text:style-name="T53"><text:s/>73 <text:s/>| <text:s text:c="3"/></text:span><text:span text:style-name="T49"><text:s text:c="8"/>d-&gt;tail = NULL;</text:span></text:p>
      <text:p text:style-name="P73"><text:span text:style-name="T53"><text:s/>74 <text:s/>| <text:s text:c="3"/></text:span><text:span text:style-name="T49"><text:s text:c="4"/>} </text:span><text:span text:style-name="T51">else</text:span><text:span text:style-name="T49"> {</text:span></text:p>
      <text:p text:style-name="P73"><text:span text:style-name="T53"><text:s/>75 <text:s/>| <text:s text:c="3"/></text:span><text:span text:style-name="T49"><text:s text:c="8"/>d-&gt;head-&gt;prev = NULL;</text:span></text:p>
      <text:p text:style-name="P73"><text:span text:style-name="T53"><text:s/>76 <text:s/>| <text:s text:c="3"/></text:span><text:span text:style-name="T49"><text:s text:c="4"/>}</text:span></text:p>
      <text:p text:style-name="P74"><text:s/>77 <text:s/>| <text:s text:c="3"/></text:p>
      <text:p text:style-name="P73"><text:span text:style-name="T53"><text:s/>78 <text:s/>| <text:s text:c="3"/></text:span><text:span text:style-name="T49"><text:s text:c="4"/>free(oldHead);</text:span></text:p>
      <text:p text:style-name="P73"><text:span text:style-name="T53"><text:s/>79 <text:s/>| <text:s text:c="3"/></text:span><text:span text:style-name="T49"><text:s text:c="4"/>d-&gt;size--;</text:span></text:p>
      <text:p text:style-name="P73"><text:span text:style-name="T53"><text:s/>80 <text:s/>| <text:s text:c="3"/></text:span><text:span text:style-name="T49"><text:s text:c="4"/></text:span><text:span text:style-name="T51">return</text:span><text:span text:style-name="T49"> true;</text:span></text:p>
      <text:p text:style-name="P76"><text:span text:style-name="T53"><text:s/>81 <text:s/>| <text:s text:c="3"/></text:span>}</text:p>
      <text:p text:style-name="P74"><text:s/>82 <text:s/>| <text:s text:c="3"/></text:p>
      <text:p text:style-name="P73"><text:span text:style-name="T53"><text:s/>83 <text:s/>| <text:s text:c="3"/></text:span><text:span text:style-name="T54">bool</text:span><text:span text:style-name="T49"> popBack(Deque *d, </text:span><text:span text:style-name="T54">float</text:span><text:span text:style-name="T49"> *out) {</text:span></text:p>
      <text:p text:style-name="P73"><text:span text:style-name="T53"><text:s/>84 <text:s/>| <text:s text:c="3"/></text:span><text:span text:style-name="T49"><text:s text:c="4"/></text:span><text:span text:style-name="T51">if</text:span><text:span text:style-name="T49"> (d-&gt;size == 0) </text:span><text:span text:style-name="T51">return</text:span><text:span text:style-name="T49"> false;</text:span></text:p>
      <text:p text:style-name="P73"><text:span text:style-name="T53"><text:s/>85 <text:s/>| <text:s text:c="3"/></text:span><text:span text:style-name="T49"><text:s text:c="4"/>Node *oldTail = d-&gt;tail;</text:span></text:p>
      <text:p text:style-name="P73"><text:span text:style-name="T53"><text:s/>86 <text:s/>| <text:s text:c="3"/></text:span><text:span text:style-name="T49"><text:s text:c="4"/>*out = oldTail-&gt;value;</text:span></text:p>
      <text:p text:style-name="P74"><text:s/>87 <text:s/>| <text:s text:c="3"/></text:p>
      <text:p text:style-name="P73"><text:span text:style-name="T53"><text:s/>88 <text:s/>| <text:s text:c="3"/></text:span><text:span text:style-name="T49"><text:s text:c="4"/>d-&gt;tail = oldTail-&gt;prev;</text:span></text:p>
      <text:p text:style-name="P73"><text:span text:style-name="T53"><text:s/>89 <text:s/>| <text:s text:c="3"/></text:span><text:span text:style-name="T49"><text:s text:c="4"/></text:span><text:span text:style-name="T51">if</text:span><text:span text:style-name="T49"> (d-&gt;tail == NULL) {</text:span></text:p>
      <text:p text:style-name="P73"><text:span text:style-name="T53"><text:s/>90 <text:s/>| <text:s text:c="3"/></text:span><text:span text:style-name="T49"><text:s text:c="8"/>d-&gt;head = NULL;</text:span></text:p>
      <text:p text:style-name="P73"><text:span text:style-name="T53"><text:s/>91 <text:s/>| <text:s text:c="3"/></text:span><text:span text:style-name="T49"><text:s text:c="4"/>} </text:span><text:span text:style-name="T51">else</text:span><text:span text:style-name="T49"> {</text:span></text:p>
      <text:p text:style-name="P73"><text:span text:style-name="T53"><text:s/>92 <text:s/>| <text:s text:c="3"/></text:span><text:span text:style-name="T49"><text:s text:c="8"/>d-&gt;tail-&gt;next = NULL;</text:span></text:p>
      <text:p text:style-name="P73"><text:span text:style-name="T53"><text:s/>93 <text:s/>| <text:s text:c="3"/></text:span><text:span text:style-name="T49"><text:s text:c="4"/>}</text:span></text:p>
      <text:p text:style-name="P74"><text:s/>94 <text:s/>| <text:s text:c="3"/></text:p>
      <text:p text:style-name="P73"><text:span text:style-name="T53"><text:s/>95 <text:s/>| <text:s text:c="3"/></text:span><text:span text:style-name="T49"><text:s text:c="4"/>free(oldTail);</text:span></text:p>
      <text:p text:style-name="P73"><text:span text:style-name="T53"><text:s/>96 <text:s/>| <text:s text:c="3"/></text:span><text:span text:style-name="T49"><text:s text:c="4"/>d-&gt;size--;</text:span></text:p>
      <text:p text:style-name="P73"><text:span text:style-name="T53"><text:s/>97 <text:s/>| <text:s text:c="3"/></text:span><text:span text:style-name="T49"><text:s text:c="4"/></text:span><text:span text:style-name="T51">return</text:span><text:span text:style-name="T49"> true;</text:span></text:p>
      <text:p text:style-name="P76"><text:span text:style-name="T53"><text:s/>98 <text:s/>| <text:s text:c="3"/></text:span>}</text:p>
      <text:p text:style-name="P74"><text:s/>99 <text:s/>| <text:s text:c="3"/></text:p>
      <text:p text:style-name="P73"><text:span text:style-name="T53">100 <text:s/>| <text:s text:c="3"/></text:span><text:span text:style-name="T54">void</text:span><text:span text:style-name="T49"> printD(Deque *d) {</text:span></text:p>
      <text:p text:style-name="P73"><text:span text:style-name="T53">101 <text:s/>| <text:s text:c="3"/></text:span><text:span text:style-name="T49"><text:s text:c="4"/></text:span><text:span text:style-name="T51">if</text:span><text:span text:style-name="T49"> (d-&gt;size == 0) {</text:span></text:p>
      <text:p text:style-name="P73"><text:span text:style-name="T53">102 <text:s/>| <text:s text:c="3"/></text:span><text:span text:style-name="T49"><text:s text:c="8"/>printf(</text:span><text:span text:style-name="T55">"[ пусто ]\n"</text:span><text:span text:style-name="T49">);</text:span></text:p>
      <text:p text:style-name="P73"><text:span text:style-name="T53">103 <text:s/>| <text:s text:c="3"/></text:span><text:span text:style-name="T49"><text:s text:c="8"/></text:span><text:span text:style-name="T51">return</text:span><text:span text:style-name="T49">;</text:span></text:p>
      <text:p text:style-name="P73"><text:span text:style-name="T53">104 <text:s/>| <text:s text:c="3"/></text:span><text:span text:style-name="T49"><text:s text:c="4"/>}</text:span></text:p>
      <text:p text:style-name="P74">105 <text:s/>| <text:s text:c="3"/></text:p>
      <text:p text:style-name="P73"><text:span text:style-name="T53">106 <text:s/>| <text:s text:c="3"/></text:span><text:span text:style-name="T49"><text:s text:c="4"/>Node *cur = d-&gt;head;</text:span></text:p>
      <text:p text:style-name="P73"><text:span text:style-name="T53">107 <text:s/>| <text:s text:c="3"/></text:span><text:span text:style-name="T49"><text:s text:c="4"/>printf(</text:span><text:span text:style-name="T55">"[ "</text:span><text:span text:style-name="T49">);</text:span></text:p>
      <text:p text:style-name="P73"><text:span text:style-name="T53">108 <text:s/>| <text:s text:c="3"/></text:span><text:span text:style-name="T49"><text:s text:c="4"/></text:span><text:span text:style-name="T51">for</text:span><text:span text:style-name="T49"> (</text:span><text:span text:style-name="T54">size_t</text:span><text:span text:style-name="T49"> i = 0; i &lt; d-&gt;size; i++) {</text:span></text:p>
      <text:p text:style-name="P73"><text:span text:style-name="T53">109 <text:s/>| <text:s text:c="3"/></text:span><text:span text:style-name="T49"><text:s text:c="8"/>printf(</text:span><text:span text:style-name="T55">"%f "</text:span><text:span text:style-name="T49">, cur-&gt;value);</text:span></text:p>
      <text:p text:style-name="P73"><text:span text:style-name="T53">110 <text:s/>| <text:s text:c="3"/></text:span><text:span text:style-name="T49"><text:s text:c="8"/></text:span><text:span text:style-name="T51">if</text:span><text:span text:style-name="T49"> (i + 1 &lt; d-&gt;size) printf(</text:span><text:span text:style-name="T55">"&lt;-&gt; "</text:span><text:span text:style-name="T49">);</text:span></text:p>
      <text:p text:style-name="P73"><text:span text:style-name="T53">111 <text:s/>| <text:s text:c="3"/></text:span><text:span text:style-name="T49"><text:s text:c="8"/>cur = cur-&gt;next;</text:span></text:p>
      <text:p text:style-name="P73"><text:span text:style-name="T53">112 <text:s/>| <text:s text:c="3"/></text:span><text:span text:style-name="T49"><text:s text:c="4"/>}</text:span></text:p>
      <text:p text:style-name="P73"><text:span text:style-name="T53">113 <text:s/>| <text:s text:c="3"/></text:span><text:span text:style-name="T49"><text:s text:c="4"/>printf(</text:span><text:span text:style-name="T55">" ] (size=%zu)\n"</text:span><text:span text:style-name="T49">, d-&gt;size);</text:span></text:p>
      <text:p text:style-name="P76"><text:span text:style-name="T53">114 <text:s/>| <text:s text:c="3"/></text:span>}</text:p>
      <text:p text:style-name="P74">115 <text:s/>| <text:s text:c="3"/></text:p>
      <text:p text:style-name="P73"><text:span text:style-name="T53">116 <text:s/>| <text:s text:c="3"/></text:span><text:span text:style-name="T54">void</text:span><text:span text:style-name="T49"> insertionSort(Deque *d) {</text:span></text:p>
      <text:p text:style-name="P73"><text:span text:style-name="T53">117 <text:s/>| <text:s text:c="3"/></text:span><text:span text:style-name="T49"><text:s text:c="4"/></text:span><text:span text:style-name="T54">size_t</text:span><text:span text:style-name="T49"> n = d-&gt;size;</text:span></text:p>
      <text:p text:style-name="P73"><text:soft-page-break/><text:span text:style-name="T53">118 <text:s/>| <text:s text:c="3"/></text:span><text:span text:style-name="T49"><text:s text:c="4"/></text:span><text:span text:style-name="T51">if</text:span><text:span text:style-name="T49"> (n &lt;= 1) </text:span><text:span text:style-name="T51">return</text:span><text:span text:style-name="T49">;</text:span></text:p>
      <text:p text:style-name="P74">119 <text:s/>| <text:s text:c="3"/></text:p>
      <text:p text:style-name="P73"><text:span text:style-name="T53">120 <text:s/>| <text:s text:c="3"/></text:span><text:span text:style-name="T49"><text:s text:c="4"/>Node *cur = d-&gt;head-&gt;next;</text:span></text:p>
      <text:p text:style-name="P73"><text:span text:style-name="T53">121 <text:s/>| <text:s text:c="3"/></text:span><text:span text:style-name="T49"><text:s text:c="4"/></text:span><text:span text:style-name="T51">while</text:span><text:span text:style-name="T49"> (cur != NULL) {</text:span></text:p>
      <text:p text:style-name="P73"><text:span text:style-name="T53">122 <text:s/>| <text:s text:c="3"/></text:span><text:span text:style-name="T49"><text:s text:c="8"/>Node *next = cur-&gt;next;</text:span></text:p>
      <text:p text:style-name="P73"><text:span text:style-name="T53">123 <text:s/>| <text:s text:c="3"/></text:span><text:span text:style-name="T49"><text:s text:c="8"/></text:span><text:span text:style-name="T54">float</text:span><text:span text:style-name="T49"> val = cur-&gt;value;</text:span></text:p>
      <text:p text:style-name="P73"><text:span text:style-name="T53">124 <text:s/>| <text:s text:c="3"/></text:span><text:span text:style-name="T49"><text:s text:c="8"/>Node *prev = cur-&gt;prev;</text:span></text:p>
      <text:p text:style-name="P74">125 <text:s/>| <text:s text:c="3"/></text:p>
      <text:p text:style-name="P73"><text:span text:style-name="T53">126 <text:s/>| <text:s text:c="3"/></text:span><text:span text:style-name="T49"><text:s text:c="8"/></text:span><text:span text:style-name="T51">while</text:span><text:span text:style-name="T49"> (prev != NULL &amp;&amp; prev-&gt;value &gt; val) {</text:span></text:p>
      <text:p text:style-name="P73"><text:span text:style-name="T53">127 <text:s/>| <text:s text:c="3"/></text:span><text:span text:style-name="T49"><text:s text:c="12"/>prev = prev-&gt;prev;</text:span></text:p>
      <text:p text:style-name="P73"><text:span text:style-name="T53">128 <text:s/>| <text:s text:c="3"/></text:span><text:span text:style-name="T49"><text:s text:c="8"/>}</text:span></text:p>
      <text:p text:style-name="P74">129 <text:s/>| <text:s text:c="3"/></text:p>
      <text:p text:style-name="P73"><text:span text:style-name="T53">130 <text:s/>| <text:s text:c="3"/></text:span><text:span text:style-name="T49"><text:s text:c="8"/></text:span><text:span text:style-name="T51">if</text:span><text:span text:style-name="T49"> (cur-&gt;prev != NULL) {</text:span></text:p>
      <text:p text:style-name="P73"><text:span text:style-name="T53">131 <text:s/>| <text:s text:c="3"/></text:span><text:span text:style-name="T49"><text:s text:c="12"/>cur-&gt;prev-&gt;next = cur-&gt;next;</text:span></text:p>
      <text:p text:style-name="P73"><text:span text:style-name="T53">132 <text:s/>| <text:s text:c="3"/></text:span><text:span text:style-name="T49"><text:s text:c="8"/>} </text:span><text:span text:style-name="T51">else</text:span><text:span text:style-name="T49"> {</text:span></text:p>
      <text:p text:style-name="P73"><text:span text:style-name="T53">133 <text:s/>| <text:s text:c="3"/></text:span><text:span text:style-name="T49"><text:s text:c="12"/>d-&gt;head = cur-&gt;next;</text:span></text:p>
      <text:p text:style-name="P73"><text:span text:style-name="T53">134 <text:s/>| <text:s text:c="3"/></text:span><text:span text:style-name="T49"><text:s text:c="8"/>}</text:span></text:p>
      <text:p text:style-name="P74">135 <text:s/>| <text:s text:c="3"/></text:p>
      <text:p text:style-name="P73"><text:span text:style-name="T53">136 <text:s/>| <text:s text:c="3"/></text:span><text:span text:style-name="T49"><text:s text:c="8"/></text:span><text:span text:style-name="T51">if</text:span><text:span text:style-name="T49"> (cur-&gt;next != NULL) {</text:span></text:p>
      <text:p text:style-name="P73"><text:span text:style-name="T53">137 <text:s/>| <text:s text:c="3"/></text:span><text:span text:style-name="T49"><text:s text:c="12"/>cur-&gt;next-&gt;prev = cur-&gt;prev;</text:span></text:p>
      <text:p text:style-name="P73"><text:span text:style-name="T53">138 <text:s/>| <text:s text:c="3"/></text:span><text:span text:style-name="T49"><text:s text:c="8"/>} </text:span><text:span text:style-name="T51">else</text:span><text:span text:style-name="T49"> {</text:span></text:p>
      <text:p text:style-name="P73"><text:span text:style-name="T53">139 <text:s/>| <text:s text:c="3"/></text:span><text:span text:style-name="T49"><text:s text:c="12"/>d-&gt;tail = cur-&gt;prev;</text:span></text:p>
      <text:p text:style-name="P73"><text:span text:style-name="T53">140 <text:s/>| <text:s text:c="3"/></text:span><text:span text:style-name="T49"><text:s text:c="8"/>}</text:span></text:p>
      <text:p text:style-name="P74">141 <text:s/>| <text:s text:c="3"/></text:p>
      <text:p text:style-name="P73"><text:span text:style-name="T53">142 <text:s/>| <text:s text:c="3"/></text:span><text:span text:style-name="T49"><text:s text:c="8"/></text:span><text:span text:style-name="T51">if</text:span><text:span text:style-name="T49"> (prev == NULL) {</text:span></text:p>
      <text:p text:style-name="P73"><text:span text:style-name="T53">143 <text:s/>| <text:s text:c="3"/></text:span><text:span text:style-name="T49"><text:s text:c="12"/>cur-&gt;next = d-&gt;head;</text:span></text:p>
      <text:p text:style-name="P73"><text:span text:style-name="T53">144 <text:s/>| <text:s text:c="3"/></text:span><text:span text:style-name="T49"><text:s text:c="12"/>cur-&gt;prev = NULL;</text:span></text:p>
      <text:p text:style-name="P73"><text:span text:style-name="T53">145 <text:s/>| <text:s text:c="3"/></text:span><text:span text:style-name="T49"><text:s text:c="12"/></text:span><text:span text:style-name="T51">if</text:span><text:span text:style-name="T49"> (d-&gt;head != NULL) {</text:span></text:p>
      <text:p text:style-name="P73"><text:span text:style-name="T53">146 <text:s/>| <text:s text:c="3"/></text:span><text:span text:style-name="T49"><text:s text:c="16"/>d-&gt;head-&gt;prev = cur;</text:span></text:p>
      <text:p text:style-name="P73"><text:span text:style-name="T53">147 <text:s/>| <text:s text:c="3"/></text:span><text:span text:style-name="T49"><text:s text:c="12"/>}</text:span></text:p>
      <text:p text:style-name="P73"><text:span text:style-name="T53">148 <text:s/>| <text:s text:c="3"/></text:span><text:span text:style-name="T49"><text:s text:c="12"/>d-&gt;head = cur;</text:span></text:p>
      <text:p text:style-name="P73"><text:span text:style-name="T53">149 <text:s/>| <text:s text:c="3"/></text:span><text:span text:style-name="T49"><text:s text:c="8"/>} </text:span><text:span text:style-name="T51">else</text:span><text:span text:style-name="T49"> {</text:span></text:p>
      <text:p text:style-name="P73"><text:span text:style-name="T53">150 <text:s/>| <text:s text:c="3"/></text:span><text:span text:style-name="T49"><text:s text:c="12"/>cur-&gt;next = prev-&gt;next;</text:span></text:p>
      <text:p text:style-name="P73"><text:span text:style-name="T53">151 <text:s/>| <text:s text:c="3"/></text:span><text:span text:style-name="T49"><text:s text:c="12"/>cur-&gt;prev = prev;</text:span></text:p>
      <text:p text:style-name="P73"><text:span text:style-name="T53">152 <text:s/>| <text:s text:c="3"/></text:span><text:span text:style-name="T49"><text:s text:c="12"/></text:span><text:span text:style-name="T51">if</text:span><text:span text:style-name="T49"> (prev-&gt;next != NULL) {</text:span></text:p>
      <text:p text:style-name="P73"><text:span text:style-name="T53">153 <text:s/>| <text:s text:c="3"/></text:span><text:span text:style-name="T49"><text:s text:c="16"/>prev-&gt;next-&gt;prev = cur;</text:span></text:p>
      <text:p text:style-name="P73"><text:span text:style-name="T53">154 <text:s/>| <text:s text:c="3"/></text:span><text:span text:style-name="T49"><text:s text:c="12"/>} </text:span><text:span text:style-name="T51">else</text:span><text:span text:style-name="T49"> {</text:span></text:p>
      <text:p text:style-name="P73"><text:span text:style-name="T53">155 <text:s/>| <text:s text:c="3"/></text:span><text:span text:style-name="T49"><text:s text:c="16"/>d-&gt;tail = cur;</text:span></text:p>
      <text:p text:style-name="P73"><text:span text:style-name="T53">156 <text:s/>| <text:s text:c="3"/></text:span><text:span text:style-name="T49"><text:s text:c="12"/>}</text:span></text:p>
      <text:p text:style-name="P73"><text:span text:style-name="T53">157 <text:s/>| <text:s text:c="3"/></text:span><text:span text:style-name="T49"><text:s text:c="12"/>prev-&gt;next = cur;</text:span></text:p>
      <text:p text:style-name="P73"><text:span text:style-name="T53">158 <text:s/>| <text:s text:c="3"/></text:span><text:span text:style-name="T49"><text:s text:c="8"/>}</text:span></text:p>
      <text:p text:style-name="P73"><text:span text:style-name="T53">159 <text:s/>| <text:s text:c="3"/></text:span><text:span text:style-name="T49"><text:s text:c="8"/>cur = next;</text:span></text:p>
      <text:p text:style-name="P73"><text:span text:style-name="T53">160 <text:s/>| <text:s text:c="3"/></text:span><text:span text:style-name="T49"><text:s text:c="4"/>}</text:span></text:p>
      <text:p text:style-name="P76"><text:span text:style-name="T53">161 <text:s/>| <text:s text:c="3"/></text:span>}</text:p>
      <text:p text:style-name="P74">162 <text:s/>| <text:s text:c="3"/></text:p>
      <text:p text:style-name="P73"><text:span text:style-name="T53">163 <text:s/>| <text:s text:c="3"/></text:span><text:span text:style-name="T54">void</text:span><text:span text:style-name="T49"> bucketSort(Deque *d) {</text:span></text:p>
      <text:p text:style-name="P73"><text:span text:style-name="T53">164 <text:s/>| <text:s text:c="3"/></text:span><text:span text:style-name="T49"><text:s text:c="4"/></text:span><text:span text:style-name="T54">size_t</text:span><text:span text:style-name="T49"> n = d-&gt;size;</text:span></text:p>
      <text:p text:style-name="P73"><text:span text:style-name="T53">165 <text:s/>| <text:s text:c="3"/></text:span><text:span text:style-name="T49"><text:s text:c="4"/></text:span><text:span text:style-name="T51">if</text:span><text:span text:style-name="T49"> (n &lt;= 1) </text:span><text:span text:style-name="T51">return</text:span><text:span text:style-name="T49">;</text:span></text:p>
      <text:p text:style-name="P74">166 <text:s/>| <text:s text:c="3"/></text:p>
      <text:p text:style-name="P73"><text:span text:style-name="T53">167 <text:s/>| <text:s text:c="3"/></text:span><text:span text:style-name="T49"><text:s text:c="4"/></text:span><text:span text:style-name="T54">float</text:span><text:span text:style-name="T49"> min = d-&gt;head-&gt;value, max = d-&gt;head-&gt;value;</text:span></text:p>
      <text:p text:style-name="P73"><text:span text:style-name="T53">168 <text:s/>| <text:s text:c="3"/></text:span><text:span text:style-name="T49"><text:s text:c="4"/>Node *cur = d-&gt;head-&gt;next;</text:span></text:p>
      <text:p text:style-name="P73"><text:span text:style-name="T53">169 <text:s/>| <text:s text:c="3"/></text:span><text:span text:style-name="T49"><text:s text:c="4"/></text:span><text:span text:style-name="T51">for</text:span><text:span text:style-name="T49"> (</text:span><text:span text:style-name="T54">size_t</text:span><text:span text:style-name="T49"> i = 1; i &lt; n; i++) {</text:span></text:p>
      <text:p text:style-name="P73"><text:span text:style-name="T53">170 <text:s/>| <text:s text:c="3"/></text:span><text:span text:style-name="T49"><text:s text:c="8"/></text:span><text:span text:style-name="T51">if</text:span><text:span text:style-name="T49"> (cur-&gt;value &lt; min) min = cur-&gt;value;</text:span></text:p>
      <text:p text:style-name="P73"><text:span text:style-name="T53">171 <text:s/>| <text:s text:c="3"/></text:span><text:span text:style-name="T49"><text:s text:c="8"/></text:span><text:span text:style-name="T51">if</text:span><text:span text:style-name="T49"> (cur-&gt;value &gt; max) max = cur-&gt;value;</text:span></text:p>
      <text:p text:style-name="P73"><text:span text:style-name="T53">172 <text:s/>| <text:s text:c="3"/></text:span><text:span text:style-name="T49"><text:s text:c="8"/>cur = cur-&gt;next;</text:span></text:p>
      <text:p text:style-name="P73"><text:span text:style-name="T53">173 <text:s/>| <text:s text:c="3"/></text:span><text:span text:style-name="T49"><text:s text:c="4"/>}</text:span></text:p>
      <text:p text:style-name="P76"><text:span text:style-name="T53">174 <text:s/>| <text:s text:c="3"/></text:span><text:s text:c="4"/></text:p>
      <text:p text:style-name="P73"><text:span text:style-name="T53">175 <text:s/>| <text:s text:c="3"/></text:span><text:span text:style-name="T49"><text:s text:c="4"/></text:span><text:span text:style-name="T51">if</text:span><text:span text:style-name="T49"> (min == max) </text:span><text:span text:style-name="T51">return</text:span><text:span text:style-name="T49">;</text:span></text:p>
      <text:p text:style-name="P74">176 <text:s/>| <text:s text:c="3"/></text:p>
      <text:p text:style-name="P73"><text:span text:style-name="T53">177 <text:s/>| <text:s text:c="3"/></text:span><text:span text:style-name="T49"><text:s text:c="4"/></text:span><text:span text:style-name="T54">int</text:span><text:span text:style-name="T49"> numBuckets = (</text:span><text:span text:style-name="T54">int</text:span><text:span text:style-name="T49">)n;</text:span></text:p>
      <text:p text:style-name="P73"><text:span text:style-name="T53">178 <text:s/>| <text:s text:c="3"/></text:span><text:span text:style-name="T49"><text:s text:c="4"/>Deque *buckets = malloc(numBuckets * </text:span><text:span text:style-name="T51">sizeof</text:span><text:span text:style-name="T49">(Deque));</text:span></text:p>
      <text:p text:style-name="P73"><text:span text:style-name="T53">179 <text:s/>| <text:s text:c="3"/></text:span><text:span text:style-name="T49"><text:s text:c="4"/></text:span><text:span text:style-name="T51">if</text:span><text:span text:style-name="T49"> (!buckets) <text:s/>{</text:span></text:p>
      <text:p text:style-name="P73"><text:span text:style-name="T53">180 <text:s/>| <text:s text:c="3"/></text:span><text:span text:style-name="T49"><text:s text:c="8"/>fprintf(stderr, </text:span><text:span text:style-name="T55">"Ошибка: не удалось выделить память для корзин\n"</text:span><text:span text:style-name="T49">); exit(1);</text:span></text:p>
      <text:p text:style-name="P73"><text:span text:style-name="T53">181 <text:s/>| <text:s text:c="3"/></text:span><text:span text:style-name="T49"><text:s text:c="4"/>}</text:span></text:p>
      <text:p text:style-name="P73"><text:span text:style-name="T53">182 <text:s/>| <text:s text:c="3"/></text:span><text:span text:style-name="T49"><text:s text:c="4"/></text:span><text:span text:style-name="T51">for</text:span><text:span text:style-name="T49"> (</text:span><text:span text:style-name="T54">int</text:span><text:span text:style-name="T49"> i = 0; i &lt; numBuckets; i++)</text:span></text:p>
      <text:p text:style-name="P73"><text:span text:style-name="T53">183 <text:s/>| <text:s text:c="3"/></text:span><text:span text:style-name="T49"><text:s text:c="8"/>init(&amp;buckets[i]);</text:span></text:p>
      <text:p text:style-name="P74">184 <text:s/>| <text:s text:c="3"/></text:p>
      <text:p text:style-name="P73"><text:span text:style-name="T53">185 <text:s/>| <text:s text:c="3"/></text:span><text:span text:style-name="T49"><text:s text:c="4"/></text:span><text:span text:style-name="T51">while</text:span><text:span text:style-name="T49"> (d-&gt;size != 0) {</text:span></text:p>
      <text:p text:style-name="P73"><text:span text:style-name="T53">186 <text:s/>| <text:s text:c="3"/></text:span><text:span text:style-name="T49"><text:s text:c="8"/></text:span><text:span text:style-name="T54">float</text:span><text:span text:style-name="T49"> val;</text:span></text:p>
      <text:p text:style-name="P73"><text:span text:style-name="T53">187 <text:s/>| <text:s text:c="3"/></text:span><text:span text:style-name="T49"><text:s text:c="8"/>popFront(d, &amp;val);</text:span></text:p>
      <text:p text:style-name="P73"><text:span text:style-name="T53">188 <text:s/>| <text:s text:c="3"/></text:span><text:span text:style-name="T49"><text:s text:c="8"/></text:span><text:span text:style-name="T54">int</text:span><text:span text:style-name="T49"> ind = (</text:span><text:span text:style-name="T54">int</text:span><text:span text:style-name="T49">)((val - min) * (numBuckets - 1) / (max - min));</text:span></text:p>
      <text:p text:style-name="P73"><text:soft-page-break/><text:span text:style-name="T53">189 <text:s/>| <text:s text:c="3"/></text:span><text:span text:style-name="T49"><text:s text:c="8"/>pushBack(&amp;buckets[ind], val);</text:span></text:p>
      <text:p text:style-name="P73"><text:span text:style-name="T53">190 <text:s/>| <text:s text:c="3"/></text:span><text:span text:style-name="T49"><text:s text:c="4"/>}</text:span></text:p>
      <text:p text:style-name="P74">191 <text:s/>| <text:s text:c="3"/></text:p>
      <text:p text:style-name="P73"><text:span text:style-name="T53">192 <text:s/>| <text:s text:c="3"/></text:span><text:span text:style-name="T49"><text:s text:c="4"/></text:span><text:span text:style-name="T51">for</text:span><text:span text:style-name="T49"> (</text:span><text:span text:style-name="T54">int</text:span><text:span text:style-name="T49"> i = 0; i &lt; numBuckets; i++) {</text:span></text:p>
      <text:p text:style-name="P73"><text:span text:style-name="T53">193 <text:s/>| <text:s text:c="3"/></text:span><text:span text:style-name="T49"><text:s text:c="8"/></text:span><text:span text:style-name="T51">if</text:span><text:span text:style-name="T49"> (buckets[i].size == 0) </text:span><text:span text:style-name="T51">continue</text:span><text:span text:style-name="T49">;</text:span></text:p>
      <text:p text:style-name="P73"><text:span text:style-name="T53">194 <text:s/>| <text:s text:c="3"/></text:span><text:span text:style-name="T49"><text:s text:c="8"/>insertionSort(&amp;buckets[i]);</text:span></text:p>
      <text:p text:style-name="P73"><text:span text:style-name="T53">195 <text:s/>| <text:s text:c="3"/></text:span><text:span text:style-name="T49"><text:s text:c="8"/></text:span><text:span text:style-name="T54">float</text:span><text:span text:style-name="T49"> val;</text:span></text:p>
      <text:p text:style-name="P73"><text:span text:style-name="T53">196 <text:s/>| <text:s text:c="3"/></text:span><text:span text:style-name="T49"><text:s text:c="8"/></text:span><text:span text:style-name="T51">while</text:span><text:span text:style-name="T49"> (buckets[i].size != 0) {</text:span></text:p>
      <text:p text:style-name="P73"><text:span text:style-name="T53">197 <text:s/>| <text:s text:c="3"/></text:span><text:span text:style-name="T49"><text:s text:c="12"/></text:span><text:span text:style-name="T51">if</text:span><text:span text:style-name="T49"> (popFront(&amp;buckets[i], &amp;val)) {</text:span></text:p>
      <text:p text:style-name="P73"><text:span text:style-name="T53">198 <text:s/>| <text:s text:c="3"/></text:span><text:span text:style-name="T49"><text:s text:c="16"/>pushBack(d, val);</text:span></text:p>
      <text:p text:style-name="P73"><text:span text:style-name="T53">199 <text:s/>| <text:s text:c="3"/></text:span><text:span text:style-name="T49"><text:s text:c="12"/>}</text:span></text:p>
      <text:p text:style-name="P73"><text:span text:style-name="T53">200 <text:s/>| <text:s text:c="3"/></text:span><text:span text:style-name="T49"><text:s text:c="8"/>}</text:span></text:p>
      <text:p text:style-name="P73"><text:span text:style-name="T53">201 <text:s/>| <text:s text:c="3"/></text:span><text:span text:style-name="T49"><text:s text:c="4"/>}</text:span></text:p>
      <text:p text:style-name="P76"><text:span text:style-name="T53">202 <text:s/>| <text:s text:c="3"/></text:span><text:s text:c="6"/></text:p>
      <text:p text:style-name="P73"><text:span text:style-name="T53">203 <text:s/>| <text:s text:c="3"/></text:span><text:span text:style-name="T49"><text:s text:c="4"/>free(buckets);</text:span></text:p>
      <text:p text:style-name="P76"><text:span text:style-name="T53">204 <text:s/>| <text:s text:c="3"/></text:span>}</text:p>
      <text:p text:style-name="P74">205 <text:s/>| <text:s text:c="3"/></text:p>
      <text:p text:style-name="P73"><text:span text:style-name="T53">206 <text:s/>| <text:s text:c="3"/></text:span><text:span text:style-name="T54">void</text:span><text:span text:style-name="T49"> buildShiftTable(</text:span><text:span text:style-name="T51">const</text:span><text:span text:style-name="T49"> </text:span><text:span text:style-name="T54">char</text:span><text:span text:style-name="T49"> *pattern, </text:span><text:span text:style-name="T54">size_t</text:span><text:span text:style-name="T49"> m, </text:span><text:span text:style-name="T54">int</text:span><text:span text:style-name="T49"> shift[ALPHABET_SIZE]) {</text:span></text:p>
      <text:p text:style-name="P73"><text:span text:style-name="T53">207 <text:s/>| <text:s text:c="3"/></text:span><text:span text:style-name="T49"><text:s text:c="4"/></text:span><text:span text:style-name="T51">for</text:span><text:span text:style-name="T49"> (</text:span><text:span text:style-name="T54">int</text:span><text:span text:style-name="T49"> i = 0; i &lt; ALPHABET_SIZE; i++) {</text:span></text:p>
      <text:p text:style-name="P73"><text:span text:style-name="T53">208 <text:s/>| <text:s text:c="3"/></text:span><text:span text:style-name="T49"><text:s text:c="8"/>shift[i] = (</text:span><text:span text:style-name="T54">int</text:span><text:span text:style-name="T49">)m;</text:span></text:p>
      <text:p text:style-name="P73"><text:span text:style-name="T53">209 <text:s/>| <text:s text:c="3"/></text:span><text:span text:style-name="T49"><text:s text:c="4"/>}</text:span></text:p>
      <text:p text:style-name="P73"><text:span text:style-name="T53">210 <text:s/>| <text:s text:c="3"/></text:span><text:span text:style-name="T49"><text:s text:c="4"/></text:span><text:span text:style-name="T51">for</text:span><text:span text:style-name="T49"> (</text:span><text:span text:style-name="T54">size_t</text:span><text:span text:style-name="T49"> i = 0; i &lt; m - 1; i++) {</text:span></text:p>
      <text:p text:style-name="P73"><text:span text:style-name="T53">211 <text:s/>| <text:s text:c="3"/></text:span><text:span text:style-name="T49"><text:s text:c="8"/>shift[(</text:span><text:span text:style-name="T54">unsigned</text:span><text:span text:style-name="T49"> </text:span><text:span text:style-name="T54">char</text:span><text:span text:style-name="T49">)pattern[i]] = (</text:span><text:span text:style-name="T54">int</text:span><text:span text:style-name="T49">)(m - 1 - i);</text:span></text:p>
      <text:p text:style-name="P73"><text:span text:style-name="T53">212 <text:s/>| <text:s text:c="3"/></text:span><text:span text:style-name="T49"><text:s text:c="4"/>}</text:span></text:p>
      <text:p text:style-name="P76"><text:span text:style-name="T53">213 <text:s/>| <text:s text:c="3"/></text:span>}</text:p>
      <text:p text:style-name="P74">214 <text:s/>| <text:s text:c="3"/></text:p>
      <text:p text:style-name="P73"><text:span text:style-name="T53">215 <text:s/>| <text:s text:c="3"/></text:span><text:span text:style-name="T54">int</text:span><text:span text:style-name="T49"> bmhSearch(</text:span><text:span text:style-name="T51">const</text:span><text:span text:style-name="T49"> </text:span><text:span text:style-name="T54">char</text:span><text:span text:style-name="T49"> *text, </text:span><text:span text:style-name="T51">const</text:span><text:span text:style-name="T49"> </text:span><text:span text:style-name="T54">char</text:span><text:span text:style-name="T49"> *pattern) {</text:span></text:p>
      <text:p text:style-name="P73"><text:span text:style-name="T53">216 <text:s/>| <text:s text:c="3"/></text:span><text:span text:style-name="T49"><text:s text:c="4"/></text:span><text:span text:style-name="T54">size_t</text:span><text:span text:style-name="T49"> n = strlen(text);</text:span></text:p>
      <text:p text:style-name="P73"><text:span text:style-name="T53">217 <text:s/>| <text:s text:c="3"/></text:span><text:span text:style-name="T49"><text:s text:c="4"/></text:span><text:span text:style-name="T54">size_t</text:span><text:span text:style-name="T49"> m = strlen(pattern);</text:span></text:p>
      <text:p text:style-name="P73"><text:span text:style-name="T53">218 <text:s/>| <text:s text:c="3"/></text:span><text:span text:style-name="T49"><text:s text:c="4"/></text:span><text:span text:style-name="T51">if</text:span><text:span text:style-name="T49"> (m == 0 || m &gt; n) </text:span><text:span text:style-name="T51">return</text:span><text:span text:style-name="T49"> -1;</text:span></text:p>
      <text:p text:style-name="P74">219 <text:s/>| <text:s text:c="3"/></text:p>
      <text:p text:style-name="P73"><text:span text:style-name="T53">220 <text:s/>| <text:s text:c="3"/></text:span><text:span text:style-name="T49"><text:s text:c="4"/></text:span><text:span text:style-name="T54">int</text:span><text:span text:style-name="T49"> shift[ALPHABET_SIZE];</text:span></text:p>
      <text:p text:style-name="P73"><text:span text:style-name="T53">221 <text:s/>| <text:s text:c="3"/></text:span><text:span text:style-name="T49"><text:s text:c="4"/>buildShiftTable(pattern, m, shift);</text:span></text:p>
      <text:p text:style-name="P74">222 <text:s/>| <text:s text:c="3"/></text:p>
      <text:p text:style-name="P73"><text:span text:style-name="T53">223 <text:s/>| <text:s text:c="3"/></text:span><text:span text:style-name="T49"><text:s text:c="4"/></text:span><text:span text:style-name="T54">size_t</text:span><text:span text:style-name="T49"> i = m - 1;</text:span></text:p>
      <text:p text:style-name="P73"><text:span text:style-name="T53">224 <text:s/>| <text:s text:c="3"/></text:span><text:span text:style-name="T49"><text:s text:c="4"/></text:span><text:span text:style-name="T51">while</text:span><text:span text:style-name="T49"> (i &lt; n) {</text:span></text:p>
      <text:p text:style-name="P73"><text:span text:style-name="T53">225 <text:s/>| <text:s text:c="3"/></text:span><text:span text:style-name="T49"><text:s text:c="8"/></text:span><text:span text:style-name="T54">size_t</text:span><text:span text:style-name="T49"> k = 0;</text:span></text:p>
      <text:p text:style-name="P73"><text:span text:style-name="T53">226 <text:s/>| <text:s text:c="3"/></text:span><text:span text:style-name="T49"><text:s text:c="8"/></text:span><text:span text:style-name="T51">while</text:span><text:span text:style-name="T49"> (k &lt; m &amp;&amp; pattern[m - 1 - k] == text[i - k]) {</text:span></text:p>
      <text:p text:style-name="P73"><text:span text:style-name="T53">227 <text:s/>| <text:s text:c="3"/></text:span><text:span text:style-name="T49"><text:s text:c="12"/>k++;</text:span></text:p>
      <text:p text:style-name="P73"><text:span text:style-name="T53">228 <text:s/>| <text:s text:c="3"/></text:span><text:span text:style-name="T49"><text:s text:c="8"/>}</text:span></text:p>
      <text:p text:style-name="P73"><text:span text:style-name="T53">229 <text:s/>| <text:s text:c="3"/></text:span><text:span text:style-name="T49"><text:s text:c="8"/></text:span><text:span text:style-name="T51">if</text:span><text:span text:style-name="T49"> (k == m) {</text:span></text:p>
      <text:p text:style-name="P73"><text:span text:style-name="T53">230 <text:s/>| <text:s text:c="3"/></text:span><text:span text:style-name="T49"><text:s text:c="12"/></text:span><text:span text:style-name="T51">return</text:span><text:span text:style-name="T49"> (</text:span><text:span text:style-name="T54">int</text:span><text:span text:style-name="T49">)(i - m + 1);</text:span></text:p>
      <text:p text:style-name="P73"><text:span text:style-name="T53">231 <text:s/>| <text:s text:c="3"/></text:span><text:span text:style-name="T49"><text:s text:c="8"/>}</text:span></text:p>
      <text:p text:style-name="P73"><text:span text:style-name="T53">232 <text:s/>| <text:s text:c="3"/></text:span><text:span text:style-name="T49"><text:s text:c="8"/>i += shift[(</text:span><text:span text:style-name="T54">unsigned</text:span><text:span text:style-name="T49"> </text:span><text:span text:style-name="T54">char</text:span><text:span text:style-name="T49">)text[i]];</text:span></text:p>
      <text:p text:style-name="P73"><text:span text:style-name="T53">233 <text:s/>| <text:s text:c="3"/></text:span><text:span text:style-name="T49"><text:s text:c="4"/>}</text:span></text:p>
      <text:p text:style-name="P73"><text:span text:style-name="T53">234 <text:s/>| <text:s text:c="3"/></text:span><text:span text:style-name="T49"><text:s text:c="4"/></text:span><text:span text:style-name="T51">return</text:span><text:span text:style-name="T49"> -1;</text:span></text:p>
      <text:p text:style-name="P76"><text:span text:style-name="T53">235 <text:s/>| <text:s text:c="3"/></text:span>}</text:p>
      <text:p text:style-name="P74">236 <text:s/>| <text:s text:c="3"/></text:p>
      <text:p text:style-name="P73"><text:span text:style-name="T53">237 <text:s/>| <text:s text:c="3"/></text:span><text:span text:style-name="T54">char</text:span><text:span text:style-name="T49">* readFileToString(</text:span><text:span text:style-name="T51">const</text:span><text:span text:style-name="T49"> </text:span><text:span text:style-name="T54">char</text:span><text:span text:style-name="T49"> *filename) {</text:span></text:p>
      <text:p text:style-name="P73"><text:span text:style-name="T53">238 <text:s/>| <text:s text:c="3"/></text:span><text:span text:style-name="T49"><text:s text:c="4"/></text:span><text:span text:style-name="T54">FILE</text:span><text:span text:style-name="T49"> *file = fopen(filename, </text:span><text:span text:style-name="T55">"r"</text:span><text:span text:style-name="T49">);</text:span></text:p>
      <text:p text:style-name="P73"><text:span text:style-name="T53">239 <text:s/>| <text:s text:c="3"/></text:span><text:span text:style-name="T49"><text:s text:c="4"/></text:span><text:span text:style-name="T51">if</text:span><text:span text:style-name="T49"> (!file) {</text:span></text:p>
      <text:p text:style-name="P73"><text:span text:style-name="T53">240 <text:s/>| <text:s text:c="3"/></text:span><text:span text:style-name="T49"><text:s text:c="8"/>fprintf(stderr, </text:span><text:span text:style-name="T55">"Ошибка: не удалось открыть файл %s\n"</text:span><text:span text:style-name="T49">, filename);</text:span></text:p>
      <text:p text:style-name="P73"><text:span text:style-name="T53">241 <text:s/>| <text:s text:c="3"/></text:span><text:span text:style-name="T49"><text:s text:c="8"/>exit(1);</text:span></text:p>
      <text:p text:style-name="P73"><text:span text:style-name="T53">242 <text:s/>| <text:s text:c="3"/></text:span><text:span text:style-name="T49"><text:s text:c="4"/>}</text:span></text:p>
      <text:p text:style-name="P74">243 <text:s/>| <text:s text:c="3"/></text:p>
      <text:p text:style-name="P73"><text:span text:style-name="T53">244 <text:s/>| <text:s text:c="3"/></text:span><text:span text:style-name="T49"><text:s text:c="4"/>fseek(file, 0, SEEK_END);</text:span></text:p>
      <text:p text:style-name="P73"><text:span text:style-name="T53">245 <text:s/>| <text:s text:c="3"/></text:span><text:span text:style-name="T49"><text:s text:c="4"/></text:span><text:span text:style-name="T54">long</text:span><text:span text:style-name="T49"> length = ftell(file);</text:span></text:p>
      <text:p text:style-name="P73"><text:span text:style-name="T53">246 <text:s/>| <text:s text:c="3"/></text:span><text:span text:style-name="T49"><text:s text:c="4"/>fseek(file, 0, SEEK_SET);</text:span></text:p>
      <text:p text:style-name="P74">247 <text:s/>| <text:s text:c="3"/></text:p>
      <text:p text:style-name="P73"><text:span text:style-name="T53">248 <text:s/>| <text:s text:c="3"/></text:span><text:span text:style-name="T49"><text:s text:c="4"/></text:span><text:span text:style-name="T54">char</text:span><text:span text:style-name="T49"> *buffer = malloc(length + 1);</text:span></text:p>
      <text:p text:style-name="P73"><text:span text:style-name="T53">249 <text:s/>| <text:s text:c="3"/></text:span><text:span text:style-name="T49"><text:s text:c="4"/></text:span><text:span text:style-name="T51">if</text:span><text:span text:style-name="T49"> (!buffer) {</text:span></text:p>
      <text:p text:style-name="P73"><text:span text:style-name="T53">250 <text:s/>| <text:s text:c="3"/></text:span><text:span text:style-name="T49"><text:s text:c="8"/>fclose(file);</text:span></text:p>
      <text:p text:style-name="P73"><text:span text:style-name="T53">251 <text:s/>| <text:s text:c="3"/></text:span><text:span text:style-name="T49"><text:s text:c="8"/>fprintf(stderr, </text:span><text:span text:style-name="T55">"Ошибка: не удалось выделить память для буфера файла\n"</text:span><text:span text:style-name="T49">);</text:span></text:p>
      <text:p text:style-name="P73"><text:span text:style-name="T53">252 <text:s/>| <text:s text:c="3"/></text:span><text:span text:style-name="T49"><text:s text:c="8"/>exit(1);</text:span></text:p>
      <text:p text:style-name="P73"><text:span text:style-name="T53">253 <text:s/>| <text:s text:c="3"/></text:span><text:span text:style-name="T49"><text:s text:c="4"/>}</text:span></text:p>
      <text:p text:style-name="P74">254 <text:s/>| <text:s text:c="3"/></text:p>
      <text:p text:style-name="P73"><text:span text:style-name="T53">255 <text:s/>| <text:s text:c="3"/></text:span><text:span text:style-name="T49"><text:s text:c="4"/></text:span><text:span text:style-name="T54">size_t</text:span><text:span text:style-name="T49"> read_bytes = fread(buffer, 1, length, file);</text:span></text:p>
      <text:p text:style-name="P73"><text:span text:style-name="T53">256 <text:s/>| <text:s text:c="3"/></text:span><text:span text:style-name="T49"><text:s text:c="4"/>buffer[read_bytes] = </text:span><text:span text:style-name="T55">'\0'</text:span><text:span text:style-name="T49">;</text:span></text:p>
      <text:p text:style-name="P73"><text:span text:style-name="T53">257 <text:s/>| <text:s text:c="3"/></text:span><text:span text:style-name="T49"><text:s text:c="4"/>fclose(file);</text:span></text:p>
      <text:p text:style-name="P73"><text:span text:style-name="T53">258 <text:s/>| <text:s text:c="3"/></text:span><text:span text:style-name="T49"><text:s text:c="4"/></text:span><text:span text:style-name="T51">return</text:span><text:span text:style-name="T49"> buffer;</text:span></text:p>
      <text:p text:style-name="P76"><text:span text:style-name="T53">259 <text:s/>| <text:s text:c="3"/></text:span>}</text:p>
      <text:p text:style-name="P74"><text:soft-page-break/>260 <text:s/>| <text:s text:c="3"/></text:p>
      <text:p text:style-name="P73"><text:span text:style-name="T53">261 <text:s/>| <text:s text:c="3"/></text:span><text:span text:style-name="T54">void</text:span><text:span text:style-name="T49"> parseBufferToDeque(</text:span><text:span text:style-name="T51">const</text:span><text:span text:style-name="T49"> </text:span><text:span text:style-name="T54">char</text:span><text:span text:style-name="T49"> *buffer, Deque *d) {</text:span></text:p>
      <text:p text:style-name="P73"><text:span text:style-name="T53">262 <text:s/>| <text:s text:c="3"/></text:span><text:span text:style-name="T49"><text:s text:c="4"/></text:span><text:span text:style-name="T51">const</text:span><text:span text:style-name="T49"> </text:span><text:span text:style-name="T54">char</text:span><text:span text:style-name="T49"> *ptr = buffer;</text:span></text:p>
      <text:p text:style-name="P73"><text:span text:style-name="T53">263 <text:s/>| <text:s text:c="3"/></text:span><text:span text:style-name="T49"><text:s text:c="4"/></text:span><text:span text:style-name="T54">float</text:span><text:span text:style-name="T49"> tmp;</text:span></text:p>
      <text:p text:style-name="P73"><text:span text:style-name="T53">264 <text:s/>| <text:s text:c="3"/></text:span><text:span text:style-name="T49"><text:s text:c="4"/></text:span><text:span text:style-name="T54">int</text:span><text:span text:style-name="T49"> offset;</text:span></text:p>
      <text:p text:style-name="P73"><text:span text:style-name="T53">265 <text:s/>| <text:s text:c="3"/></text:span><text:span text:style-name="T49"><text:s text:c="4"/></text:span><text:span text:style-name="T51">while</text:span><text:span text:style-name="T49"> (sscanf(ptr, </text:span><text:span text:style-name="T55">"%f%n"</text:span><text:span text:style-name="T49">, &amp;tmp, &amp;offset) == 1) {</text:span></text:p>
      <text:p text:style-name="P73"><text:span text:style-name="T53">266 <text:s/>| <text:s text:c="3"/></text:span><text:span text:style-name="T49"><text:s text:c="8"/>pushBack(d, tmp);</text:span></text:p>
      <text:p text:style-name="P73"><text:span text:style-name="T53">267 <text:s/>| <text:s text:c="3"/></text:span><text:span text:style-name="T49"><text:s text:c="8"/>ptr += offset;</text:span></text:p>
      <text:p text:style-name="P73"><text:span text:style-name="T53">268 <text:s/>| <text:s text:c="3"/></text:span><text:span text:style-name="T49"><text:s text:c="4"/>}</text:span></text:p>
      <text:p text:style-name="P76"><text:span text:style-name="T53">269 <text:s/>| <text:s text:c="3"/></text:span>}</text:p>
      <text:p text:style-name="P74">270 <text:s/>| <text:s text:c="3"/></text:p>
      <text:p text:style-name="P73"><text:span text:style-name="T53">271 <text:s/>| <text:s text:c="3"/></text:span><text:span text:style-name="T54">int</text:span><text:span text:style-name="T49"> main(</text:span><text:span text:style-name="T54">int</text:span><text:span text:style-name="T49"> argc, </text:span><text:span text:style-name="T54">char</text:span><text:span text:style-name="T49"> **argv) {</text:span></text:p>
      <text:p text:style-name="P73"><text:span text:style-name="T53">272 <text:s/>| <text:s text:c="3"/></text:span><text:span text:style-name="T49"><text:s text:c="4"/></text:span><text:span text:style-name="T51">if</text:span><text:span text:style-name="T49"> (argc &lt; 2) {</text:span></text:p>
      <text:p text:style-name="P73"><text:span text:style-name="T53">273 <text:s/>| <text:s text:c="3"/></text:span><text:span text:style-name="T49"><text:s text:c="8"/>fprintf(stderr, </text:span><text:span text:style-name="T55">"Использование: %s &lt;имя_файла&gt; [подстрока]\n"</text:span><text:span text:style-name="T49">, argv[0]);</text:span></text:p>
      <text:p text:style-name="P73"><text:span text:style-name="T53">274 <text:s/>| <text:s text:c="3"/></text:span><text:span text:style-name="T49"><text:s text:c="8"/></text:span><text:span text:style-name="T51">return</text:span><text:span text:style-name="T49"> 1;</text:span></text:p>
      <text:p text:style-name="P73"><text:span text:style-name="T53">275 <text:s/>| <text:s text:c="3"/></text:span><text:span text:style-name="T49"><text:s text:c="4"/>}</text:span></text:p>
      <text:p text:style-name="P74">276 <text:s/>| <text:s text:c="3"/></text:p>
      <text:p text:style-name="P73"><text:span text:style-name="T53">277 <text:s/>| <text:s text:c="3"/></text:span><text:span text:style-name="T49"><text:s text:c="4"/></text:span><text:span text:style-name="T54">char</text:span><text:span text:style-name="T49"> *filename = argv[1];</text:span></text:p>
      <text:p text:style-name="P73"><text:span text:style-name="T53">278 <text:s/>| <text:s text:c="3"/></text:span><text:span text:style-name="T49"><text:s text:c="4"/></text:span><text:span text:style-name="T54">char</text:span><text:span text:style-name="T49"> *fileContent = readFileToString(filename);</text:span></text:p>
      <text:p text:style-name="P74">279 <text:s/>| <text:s text:c="3"/></text:p>
      <text:p text:style-name="P73"><text:span text:style-name="T53">280 <text:s/>| <text:s text:c="3"/></text:span><text:span text:style-name="T49"><text:s text:c="4"/>Deque d;</text:span></text:p>
      <text:p text:style-name="P73"><text:span text:style-name="T53">281 <text:s/>| <text:s text:c="3"/></text:span><text:span text:style-name="T49"><text:s text:c="4"/>init(&amp;d);</text:span></text:p>
      <text:p text:style-name="P73"><text:span text:style-name="T53">282 <text:s/>| <text:s text:c="3"/></text:span><text:span text:style-name="T49"><text:s text:c="4"/>parseBufferToDeque(fileContent, &amp;d);</text:span></text:p>
      <text:p text:style-name="P74">283 <text:s/>| <text:s text:c="3"/></text:p>
      <text:p text:style-name="P73"><text:span text:style-name="T53">284 <text:s/>| <text:s text:c="3"/></text:span><text:span text:style-name="T49"><text:s text:c="4"/>printf(</text:span><text:span text:style-name="T55">"Исходный текст файла:\n%s\n"</text:span><text:span text:style-name="T49">, fileContent);</text:span></text:p>
      <text:p text:style-name="P73"><text:span text:style-name="T53">285 <text:s/>| <text:s text:c="3"/></text:span><text:span text:style-name="T49"><text:s text:c="4"/>printf(</text:span><text:span text:style-name="T55">"--- Исходные данные дека ---\n"</text:span><text:span text:style-name="T49">);</text:span></text:p>
      <text:p text:style-name="P73"><text:span text:style-name="T53">286 <text:s/>| <text:s text:c="3"/></text:span><text:span text:style-name="T49"><text:s text:c="4"/>printD(&amp;d);</text:span></text:p>
      <text:p text:style-name="P74">287 <text:s/>| <text:s text:c="3"/></text:p>
      <text:p text:style-name="P73"><text:span text:style-name="T53">288 <text:s/>| <text:s text:c="3"/></text:span><text:span text:style-name="T49"><text:s text:c="4"/></text:span><text:span text:style-name="T54">char</text:span><text:span text:style-name="T49"> pattern[256];</text:span></text:p>
      <text:p text:style-name="P73"><text:span text:style-name="T53">289 <text:s/>| <text:s text:c="3"/></text:span><text:span text:style-name="T49"><text:s text:c="4"/></text:span><text:span text:style-name="T51">if</text:span><text:span text:style-name="T49"> (argc &gt;= 3) {</text:span></text:p>
      <text:p text:style-name="P73"><text:span text:style-name="T53">290 <text:s/>| <text:s text:c="3"/></text:span><text:span text:style-name="T49"><text:s text:c="8"/>strncpy(pattern, argv[2], </text:span><text:span text:style-name="T51">sizeof</text:span><text:span text:style-name="T49">(pattern) - 1);</text:span></text:p>
      <text:p text:style-name="P73"><text:span text:style-name="T53">291 <text:s/>| <text:s text:c="3"/></text:span><text:span text:style-name="T49"><text:s text:c="8"/>pattern[</text:span><text:span text:style-name="T51">sizeof</text:span><text:span text:style-name="T49">(pattern) - 1] = </text:span><text:span text:style-name="T55">'\0'</text:span><text:span text:style-name="T49">;</text:span></text:p>
      <text:p text:style-name="P73"><text:span text:style-name="T53">292 <text:s/>| <text:s text:c="3"/></text:span><text:span text:style-name="T49"><text:s text:c="4"/>} </text:span><text:span text:style-name="T51">else</text:span><text:span text:style-name="T49"> {</text:span></text:p>
      <text:p text:style-name="P73"><text:span text:style-name="T53">293 <text:s/>| <text:s text:c="3"/></text:span><text:span text:style-name="T49"><text:s text:c="8"/>printf(</text:span><text:span text:style-name="T55">"Введите подстроку для поиска методом Бойера-Мура-Хор</text:span><text:span text:style-name="T56">с</text:span><text:span text:style-name="T55">пу</text:span><text:span text:style-name="T56">л</text:span><text:span text:style-name="T55">а: "</text:span><text:span text:style-name="T49">);</text:span></text:p>
      <text:p text:style-name="P73"><text:span text:style-name="T53">294 <text:s/>| <text:s text:c="3"/></text:span><text:span text:style-name="T49"><text:s text:c="8"/></text:span><text:span text:style-name="T51">if</text:span><text:span text:style-name="T49"> (fgets(pattern, </text:span><text:span text:style-name="T51">sizeof</text:span><text:span text:style-name="T49">(pattern), stdin)) {</text:span></text:p>
      <text:p text:style-name="P73"><text:span text:style-name="T53">295 <text:s/>| <text:s text:c="3"/></text:span><text:span text:style-name="T49"><text:s text:c="12"/>pattern[strcspn(pattern, </text:span><text:span text:style-name="T55">"\n"</text:span><text:span text:style-name="T49">)] = </text:span><text:span text:style-name="T55">'\0'</text:span><text:span text:style-name="T49">;</text:span></text:p>
      <text:p text:style-name="P73"><text:span text:style-name="T53">296 <text:s/>| <text:s text:c="3"/></text:span><text:span text:style-name="T49"><text:s text:c="8"/>}</text:span></text:p>
      <text:p text:style-name="P73"><text:span text:style-name="T53">297 <text:s/>| <text:s text:c="3"/></text:span><text:span text:style-name="T49"><text:s text:c="4"/>}</text:span></text:p>
      <text:p text:style-name="P74">298 <text:s/>| <text:s text:c="3"/></text:p>
      <text:p text:style-name="P73"><text:span text:style-name="T53">299 <text:s/>| <text:s text:c="3"/></text:span><text:span text:style-name="T49"><text:s text:c="4"/>printf(</text:span><text:span text:style-name="T55">"Поиск подстроки \"%s\"...\n"</text:span><text:span text:style-name="T49">, pattern);</text:span></text:p>
      <text:p text:style-name="P73"><text:span text:style-name="T53">300 <text:s/>| <text:s text:c="3"/></text:span><text:span text:style-name="T49"><text:s text:c="4"/></text:span><text:span text:style-name="T54">int</text:span><text:span text:style-name="T49"> pos = bmhSearch(fileContent, pattern);</text:span></text:p>
      <text:p text:style-name="P73"><text:span text:style-name="T53">301 <text:s/>| <text:s text:c="3"/></text:span><text:span text:style-name="T49"><text:s text:c="4"/></text:span><text:span text:style-name="T51">if</text:span><text:span text:style-name="T49"> (pos != -1) {</text:span></text:p>
      <text:p text:style-name="P73"><text:span text:style-name="T53">302 <text:s/>| <text:s text:c="3"/></text:span><text:span text:style-name="T49"><text:s text:c="8"/>printf(</text:span><text:span text:style-name="T55">"Подстрока найдена на позиции: %d\n"</text:span><text:span text:style-name="T49">, pos);</text:span></text:p>
      <text:p text:style-name="P73"><text:span text:style-name="T53">303 <text:s/>| <text:s text:c="3"/></text:span><text:span text:style-name="T49"><text:s text:c="4"/>} </text:span><text:span text:style-name="T51">else</text:span><text:span text:style-name="T49"> {</text:span></text:p>
      <text:p text:style-name="P73"><text:span text:style-name="T53">304 <text:s/>| <text:s text:c="3"/></text:span><text:span text:style-name="T49"><text:s text:c="8"/>printf(</text:span><text:span text:style-name="T55">"Подстрока не найдена.\n"</text:span><text:span text:style-name="T49">);</text:span></text:p>
      <text:p text:style-name="P73"><text:span text:style-name="T53">305 <text:s/>| <text:s text:c="3"/></text:span><text:span text:style-name="T49"><text:s text:c="4"/>}</text:span></text:p>
      <text:p text:style-name="P74">306 <text:s/>| <text:s text:c="3"/></text:p>
      <text:p text:style-name="P73"><text:span text:style-name="T53">307 <text:s/>| <text:s text:c="3"/></text:span><text:span text:style-name="T49"><text:s text:c="4"/>bucketSort(&amp;d);</text:span></text:p>
      <text:p text:style-name="P73"><text:span text:style-name="T53">308 <text:s/>| <text:s text:c="3"/></text:span><text:span text:style-name="T49"><text:s text:c="4"/>printf(</text:span><text:span text:style-name="T55">"\n--- Отсортированные данные дека ---\n"</text:span><text:span text:style-name="T49">);</text:span></text:p>
      <text:p text:style-name="P73"><text:span text:style-name="T53">309 <text:s/>| <text:s text:c="3"/></text:span><text:span text:style-name="T49"><text:s text:c="4"/>printD(&amp;d);</text:span></text:p>
      <text:p text:style-name="P74">310 <text:s/>| <text:s text:c="3"/></text:p>
      <text:p text:style-name="P73"><text:span text:style-name="T53">311 <text:s/>| <text:s text:c="3"/></text:span><text:span text:style-name="T49"><text:s text:c="4"/>free(fileContent);</text:span></text:p>
      <text:p text:style-name="P73"><text:span text:style-name="T53">312 <text:s/>| <text:s text:c="3"/></text:span><text:span text:style-name="T49"><text:s text:c="4"/></text:span><text:span text:style-name="T54">float</text:span><text:span text:style-name="T49"> trash;</text:span></text:p>
      <text:p text:style-name="P73"><text:span text:style-name="T53">313 <text:s/>| <text:s text:c="3"/></text:span><text:span text:style-name="T49"><text:s text:c="4"/></text:span><text:span text:style-name="T51">while</text:span><text:span text:style-name="T49"> (d.size &gt; 0) {</text:span></text:p>
      <text:p text:style-name="P73"><text:span text:style-name="T53">314 <text:s/>| <text:s text:c="3"/></text:span><text:span text:style-name="T49"><text:s text:c="8"/>popFront(&amp;d, &amp;trash);</text:span></text:p>
      <text:p text:style-name="P73"><text:span text:style-name="T53">315 <text:s/>| <text:s text:c="3"/></text:span><text:span text:style-name="T49"><text:s text:c="4"/>}</text:span></text:p>
      <text:p text:style-name="P74">316 <text:s/>| <text:s text:c="3"/></text:p>
      <text:p text:style-name="P73"><text:span text:style-name="T53">317 <text:s/>| <text:s text:c="3"/></text:span><text:span text:style-name="T49"><text:s text:c="4"/></text:span><text:span text:style-name="T51">return</text:span><text:span text:style-name="T49"> 0;</text:span></text:p>
      <text:p text:style-name="P76"><text:span text:style-name="T53">318 <text:s/>| <text:s text:c="3"/></text:span>}</text:p>
      <text:p text:style-name="P77"/>
      <text:p text:style-name="P72"/>
      <text:p text:style-name="P64"/>
      <text:p text:style-name="P64"/>
      <text:h text:style-name="P78" text:outline-level="1"><text:bookmark-start text:name="__RefHeading___Toc143_2058273410 Copy 1 Copy 2 Copy 6"/><text:span text:style-name="T41">З</text:span><text:span text:style-name="T13">АКЛЮЧЕНИЕ</text:span><text:bookmark-end text:name="__RefHeading___Toc143_2058273410 Copy 1 Copy 2 Copy 6"/></text:h>
      <text:p text:style-name="P79"><text:span text:style-name="T57">В ходе выполнения лабораторной работы была разработана программа на языке С</text:span><text:span text:style-name="T58"> </text:span><text:span text:style-name="T57">для сортировки последовательности чисел </text:span><text:span text:style-name="T58">с помощью алгоритма распределения</text:span><text:span text:style-name="T59"> (карманная сортировка)</text:span><text:span text:style-name="T60">, использующ</text:span><text:span text:style-name="T61">его</text:span><text:span text:style-name="T60"> </text:span><text:span text:style-name="T52">дек</text:span><text:span text:style-name="T60">, построенн</text:span><text:span text:style-name="T52">ого </text:span><text:span text:style-name="T60">на базе связного списка</text:span><text:span text:style-name="T57">. Для</text:span><text:span text:style-name="T58"> </text:span><text:span text:style-name="T57">решения задачи также был реализован алгоритм </text:span><text:span text:style-name="T58">сортировки вставками</text:span><text:span text:style-name="T57">. </text:span>Числа считывались из файла <text:span text:style-name="T60">и хранились в </text:span><text:span text:style-name="T52">деке. Помимо этого был реализован поиск подстроки в файле методом Бойера-Мура-Хорспула</text:span><text:span text:style-name="T60">.</text:span></text:p>
      <text:p text:style-name="P80">Программа разрабатывалась в среде <text:span text:style-name="T58">VS Code</text:span><text:span text:style-name="T62">, компилировалась с</text:span> помощью <text:span text:style-name="T58">gcc </text:span><text:span text:style-name="T62">и запускалась </text:span><text:span text:style-name="T63">в ОС</text:span><text:span text:style-name="T58"> Arch Linux</text:span>.</text:p>
      <text:p text:style-name="P80">Тестирование <text:span text:style-name="T63">алгоритма </text:span>показало <text:span text:style-name="T64">его</text:span> корректную работу при различных входных<text:span text:style-name="T58"> </text:span>данных.<text:span text:style-name="T52"> </text:span>Выполнение работы позволило закрепить навыки разработки алгоритмов<text:span text:style-name="T58"> </text:span>сортировки<text:span text:style-name="T52"> и поиска подстрок</text:span>, а также углубить знания в области структур данных.</text:p>
      <text:h text:style-name="P81" text:outline-level="1"><text:bookmark-start text:name="__RefHeading___Toc143_2058273410 Copy 1 Copy 2 Copy 7"/><text:span text:style-name="T41">П</text:span><text:span text:style-name="T13">РИЛОЖЕНИЕ А</text:span><text:bookmark-end text:name="__RefHeading___Toc143_2058273410 Copy 1 Copy 2 Copy 7"/></text:h>
      <text:p text:style-name="P82"><text:bookmark-start text:name="__RefHeading___Toc3854_349052029"/><draw:frame draw:style-name="fr4" draw:name="Изображение3" text:anchor-type="as-char" svg:width="16.466cm" svg:height="20.989cm" draw:z-index="4"><draw:image xlink:href="Pictures/1000000100000E880000116238371F98.png" xlink:type="simple" xlink:show="embed" xlink:actuate="onLoad" draw:mime-type="image/png"/></draw:frame><text:bookmark-end text:name="__RefHeading___Toc3854_349052029"/></text:p>
      <text:h text:style-name="P83" text:outline-level="1"><draw:frame draw:style-name="fr5" draw:name="Изображение4" text:anchor-type="paragraph" svg:x="2.034cm" svg:y="-12.615cm" svg:width="14.018cm" svg:height="24.109cm" draw:z-index="5"><draw:image xlink:href="Pictures/10000001000009AC000011602C0EC2D5.png" xlink:type="simple" xlink:show="embed" xlink:actuate="onLoad" draw:mime-type="image/png"/></draw:frame><text:soft-page-break/></text:h>
      <text:h text:style-name="P84" text:outline-level="1"><draw:frame draw:style-name="fr6" draw:name="Изображение5" text:anchor-type="char" svg:x="1.806cm" svg:y="-1.339cm" svg:width="14.63cm" svg:height="24.55cm" draw:z-index="6"><draw:image xlink:href="Pictures/1000000100000A9600001162BFDB75FE.png" xlink:type="simple" xlink:show="embed" xlink:actuate="onLoad" draw:mime-type="image/png"/></draw:frame><text:soft-page-break/></text:h>
      <text:p text:style-name="P85"><draw:frame draw:style-name="fr7" draw:name="Изображение6" text:anchor-type="paragraph" svg:x="1.446cm" svg:y="-1.404cm" svg:width="15.526cm" svg:height="23.904cm" draw:z-index="7"><draw:image xlink:href="Pictures/1000000100000BCC000013CE23012AB9.png" xlink:type="simple" xlink:show="embed" xlink:actuate="onLoad" draw:mime-type="image/png"/></draw:frame><text:bookmark text:name="__RefHeading___Toc143_2058273410 Copy 1 Copy 1"/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аблица" style:family="paragraph" style:parent-style-name="Caption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Рисунок" style:family="paragraph" style:parent-style-name="Caption"/>
    <style:style style:name="Frame_20_contents" style:display-name="Frame contents" style:family="paragraph" style:parent-style-name="Standard" style:class="extra"/>
    <style:style style:name="Code" style:family="paragraph" style:parent-style-name="Text_20_body">
      <loext:graphic-properties draw:fill="none" draw:fill-color="#729fcf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 style:writing-mode="lr-tb" style:writing-mode-automatic="false"/>
      <style:text-properties style:font-name="Liberation Mono" fo:font-family="'Liberation Mono'" style:font-family-generic="modern" style:font-pitch="fixed" fo:font-size="8pt" officeooo:rsid="0096f977" style:font-size-asian="8pt" style:font-size-complex="8pt"/>
    </style:style>
    <style:style style:name="code" style:family="paragraph" style:parent-style-name="Code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43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3.5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5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3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  <style:master-page style:name="Landscape" style:page-layout-name="Mpm4" draw:style-name="Mdp1">
      <style:footer>
        <text:p text:style-name="MP1"><text:bookmark-start text:name="PageNumWizard_FOOTER_Landscape19"/><text:page-number text:select-page="current">17</text:page-number><text:bookmark-end text:name="PageNumWizard_FOOTER_Landscape19"/></text:p>
      </style:footer>
    </style:master-page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6T15:54:10.970395995</meta:creation-date>
    <dc:date>2026-05-30T00:17:08.573673058</dc:date>
    <meta:editing-duration>P1DT21H43M55S</meta:editing-duration>
    <meta:editing-cycles>164</meta:editing-cycles>
    <meta:generator>LibreOffice/26.2.3.2$Linux_X86_64 LibreOffice_project/620$Build-2</meta:generator>
    <meta:print-date>2026-05-28T20:29:46.169290803</meta:print-date>
    <meta:printed-by>Файлы PDF</meta:printed-by>
    <meta:document-statistic meta:table-count="1" meta:image-count="6" meta:object-count="0" meta:page-count="17" meta:paragraph-count="509" meta:word-count="2385" meta:character-count="15846" meta:non-whitespace-character-count="11017"/>
  </office:meta>
</office:document-meta>
</file>