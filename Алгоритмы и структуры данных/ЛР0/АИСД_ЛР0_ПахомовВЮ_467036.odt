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540000003778DC5199.png" manifest:media-type="image/png"/>
  <manifest:file-entry manifest:full-path="Pictures/10000001000003F40000036BEB76C07E.png" manifest:media-type="image/png"/>
  <manifest:file-entry manifest:full-path="Pictures/1000000100000B40000008B6D1441202.png" manifest:media-type="image/png"/>
  <manifest:file-entry manifest:full-path="Pictures/100000010000023500000034A4C7C4DD.png" manifest:media-type="image/png"/>
  <manifest:file-entry manifest:full-path="Pictures/10000001000003A9000002AA538EBBBB.png" manifest:media-type="image/png"/>
  <manifest:file-entry manifest:full-path="Pictures/100000010000076D000003BB7CB5FF88.png" manifest:media-type="image/png"/>
  <manifest:file-entry manifest:full-path="Pictures/1000000100000763000001CEC9CB5956.png" manifest:media-type="image/png"/>
  <manifest:file-entry manifest:full-path="Pictures/100000010000003A0000000C7C005289.png" manifest:media-type="image/png"/>
  <manifest:file-entry manifest:full-path="Pictures/10001FD2000005F800000146229C908A.svg" manifest:media-type="image/svg+xml"/>
  <manifest:file-entry manifest:full-path="Pictures/100030D200000BC300000189F056CB37.svg" manifest:media-type="image/svg+xml"/>
  <manifest:file-entry manifest:full-path="Pictures/10001CE4000005D80000017AF579B149.svg" manifest:media-type="image/svg+xml"/>
  <manifest:file-entry manifest:full-path="Pictures/100029E1000007C900000152778E9733.svg" manifest:media-type="image/svg+xml"/>
  <manifest:file-entry manifest:full-path="Pictures/10000001000000240000000B743C0C37.png" manifest:media-type="image/png"/>
  <manifest:file-entry manifest:full-path="Pictures/100000010000002B0000001B5F18953A.png" manifest:media-type="image/png"/>
  <manifest:file-entry manifest:full-path="Pictures/10000001000000510000000EB952C413.png" manifest:media-type="image/png"/>
  <manifest:file-entry manifest:full-path="Pictures/100013B8000002D300000108F39CB317.svg" manifest:media-type="image/svg+xml"/>
  <manifest:file-entry manifest:full-path="Pictures/10000001000000450000000E666B8D38.png" manifest:media-type="image/png"/>
  <manifest:file-entry manifest:full-path="Pictures/10000001000002BB0000007CC1241E2D.png" manifest:media-type="image/png"/>
  <manifest:file-entry manifest:full-path="Pictures/10000001000000A50000001F92F6D6B3.png" manifest:media-type="image/png"/>
  <manifest:file-entry manifest:full-path="Pictures/100000010000000E000000093063498A.png" manifest:media-type="image/png"/>
  <manifest:file-entry manifest:full-path="Pictures/10004D9800000C1D00000359AAFF31CA.svg" manifest:media-type="image/svg+xml"/>
  <manifest:file-entry manifest:full-path="Pictures/100000010000004B0000000DF4CA6497.png" manifest:media-type="image/png"/>
  <manifest:file-entry manifest:full-path="Pictures/10000001000000150000000D3BD5BE2B.png" manifest:media-type="image/png"/>
  <manifest:file-entry manifest:full-path="Pictures/10000001000000240000000BF60A1E3A.png" manifest:media-type="image/png"/>
  <manifest:file-entry manifest:full-path="Pictures/10000C1D00000395000000F8B34529E7.svg" manifest:media-type="image/svg+xml"/>
  <manifest:file-entry manifest:full-path="Pictures/10000D7D000002240000015FE7C144D2.svg" manifest:media-type="image/svg+xml"/>
  <manifest:file-entry manifest:full-path="Pictures/10000001000000720000000FA08B053F.png" manifest:media-type="image/png"/>
  <manifest:file-entry manifest:full-path="Pictures/10000001000000180000000D168F30B3.png" manifest:media-type="image/png"/>
  <manifest:file-entry manifest:full-path="Pictures/100000010000018C0000000F3458F1AB.png" manifest:media-type="image/png"/>
  <manifest:file-entry manifest:full-path="Pictures/100000010000072000000377CAE11F7A.png" manifest:media-type="image/png"/>
  <manifest:file-entry manifest:full-path="Pictures/100059B60000110C000003380D7AA637.svg" manifest:media-type="image/svg+xml"/>
  <manifest:file-entry manifest:full-path="Pictures/100000010000001F00000006115A7A72.png" manifest:media-type="image/png"/>
  <manifest:file-entry manifest:full-path="Pictures/100012A6000002760000015F7D6E9EFA.svg" manifest:media-type="image/svg+xml"/>
  <manifest:file-entry manifest:full-path="Pictures/10001BD400000389000002F1E91541E0.svg" manifest:media-type="image/svg+xml"/>
  <manifest:file-entry manifest:full-path="Pictures/10000001000000220000001CE92F8AB4.png" manifest:media-type="image/png"/>
  <manifest:file-entry manifest:full-path="Pictures/1000229A000007160000017A246797EF.svg" manifest:media-type="image/svg+xml"/>
  <manifest:file-entry manifest:full-path="Pictures/1000AF8D000025B6000002D52D25CCD8.svg" manifest:media-type="image/svg+xml"/>
  <manifest:file-entry manifest:full-path="Pictures/10000D8B0000037B0000013C08D81B4F.svg" manifest:media-type="image/svg+xml"/>
  <manifest:file-entry manifest:full-path="Pictures/100019E500000466000002D7D78228C8.svg" manifest:media-type="image/svg+xml"/>
  <manifest:file-entry manifest:full-path="Pictures/10001067000001D8000000E036ABAD2F.svg" manifest:media-type="image/svg+xml"/>
  <manifest:file-entry manifest:full-path="Pictures/10000001000000750000002012A757F3.png" manifest:media-type="image/png"/>
  <manifest:file-entry manifest:full-path="Pictures/100000010000001C00000009B99F47D4.png" manifest:media-type="image/png"/>
  <manifest:file-entry manifest:full-path="Pictures/10000DE20000037B0000013CA484DD91.svg" manifest:media-type="image/svg+xml"/>
  <manifest:file-entry manifest:full-path="Pictures/10000F5C0000017B000000EDE140E6D6.svg" manifest:media-type="image/svg+xml"/>
  <manifest:file-entry manifest:full-path="Pictures/10000DE6000002EE000000F8CF2DC543.svg" manifest:media-type="image/svg+xml"/>
  <manifest:file-entry manifest:full-path="Pictures/100000010000001B0000000A3DEC7E3A.png" manifest:media-type="image/png"/>
  <manifest:file-entry manifest:full-path="Pictures/100005380000004B000000F8437DAD37.svg" manifest:media-type="image/svg+xml"/>
  <manifest:file-entry manifest:full-path="Pictures/100044900000139A00000366AB06B0F5.svg" manifest:media-type="image/svg+xml"/>
  <manifest:file-entry manifest:full-path="Pictures/10000001000000B70000002141E9EA28.png" manifest:media-type="image/png"/>
  <manifest:file-entry manifest:full-path="Pictures/10002F54000009880000018DF93EBA98.svg" manifest:media-type="image/svg+xml"/>
  <manifest:file-entry manifest:full-path="Pictures/100000010000005C0000000FD3628E8F.png" manifest:media-type="image/png"/>
  <manifest:file-entry manifest:full-path="Pictures/1000000100000023000000099DEDCDF3.png" manifest:media-type="image/png"/>
  <manifest:file-entry manifest:full-path="Pictures/10002BA8000009310000017D95612C72.svg" manifest:media-type="image/svg+xml"/>
  <manifest:file-entry manifest:full-path="Pictures/100026A70000085B0000017AB80CCB20.svg" manifest:media-type="image/svg+xml"/>
  <manifest:file-entry manifest:full-path="Pictures/10000001000000220000000CF902CC1B.png" manifest:media-type="image/png"/>
  <manifest:file-entry manifest:full-path="Pictures/10003E1300000CD000000146F5F19ED8.svg" manifest:media-type="image/svg+xml"/>
  <manifest:file-entry manifest:full-path="Pictures/10000001000000220000000CE1352607.png" manifest:media-type="image/png"/>
  <manifest:file-entry manifest:full-path="Pictures/10001D7E000007F0000001537D51CE7A.svg" manifest:media-type="image/svg+xml"/>
  <manifest:file-entry manifest:full-path="Pictures/10000001000000590000000EEE4F7834.png" manifest:media-type="image/png"/>
  <manifest:file-entry manifest:full-path="Pictures/1000000100000DDE000008CADE479516.png" manifest:media-type="image/png"/>
  <manifest:file-entry manifest:full-path="Pictures/10000001000000390000000E5F5220E5.png" manifest:media-type="image/png"/>
  <manifest:file-entry manifest:full-path="Pictures/10000001000000030000000969796215.png" manifest:media-type="image/png"/>
  <manifest:file-entry manifest:full-path="Pictures/10000F540000032C0000009F9F24DA99.svg" manifest:media-type="image/svg+xml"/>
  <manifest:file-entry manifest:full-path="Pictures/1000391300000B0C000002F445BFC906.svg" manifest:media-type="image/svg+xml"/>
  <manifest:file-entry manifest:full-path="Pictures/100000010000006B0000001DDDF1946F.png" manifest:media-type="image/png"/>
  <manifest:file-entry manifest:full-path="Pictures/100000010000001200000008116B6C48.png" manifest:media-type="image/png"/>
  <manifest:file-entry manifest:full-path="Pictures/10002910000006BB00000282C0097736.svg" manifest:media-type="image/svg+xml"/>
  <manifest:file-entry manifest:full-path="Pictures/10000001000000BE00000021FD1C07A9.png" manifest:media-type="image/png"/>
  <manifest:file-entry manifest:full-path="Pictures/10004D41000012F1000003664102EF3E.svg" manifest:media-type="image/svg+xml"/>
  <manifest:file-entry manifest:full-path="Pictures/100000010000016D0000001B10CF1788.png" manifest:media-type="image/png"/>
  <manifest:file-entry manifest:full-path="Pictures/100000010000007C0000000C7E8596F9.png" manifest:media-type="image/png"/>
  <manifest:file-entry manifest:full-path="Pictures/10000001000000220000000CC596CDAF.png" manifest:media-type="image/png"/>
  <manifest:file-entry manifest:full-path="Pictures/10000C3F000003AF000001191642F0F7.svg" manifest:media-type="image/svg+xml"/>
  <manifest:file-entry manifest:full-path="Pictures/1000CC3A000028E700000195A1680585.svg" manifest:media-type="image/svg+xml"/>
  <manifest:file-entry manifest:full-path="Pictures/10000DB80000037B0000013C6F2F05B3.svg" manifest:media-type="image/svg+xml"/>
  <manifest:file-entry manifest:full-path="Pictures/100066C70000193500000471774944CB.svg" manifest:media-type="image/svg+xml"/>
  <manifest:file-entry manifest:full-path="Pictures/100000010000023000000035D8419FDB.png" manifest:media-type="image/png"/>
  <manifest:file-entry manifest:full-path="Pictures/10000001000003A10000011E1FBD96EE.png" manifest:media-type="image/png"/>
  <manifest:file-entry manifest:full-path="Pictures/1000599F00000BE40000033E15EA6173.svg" manifest:media-type="image/svg+xml"/>
  <manifest:file-entry manifest:full-path="Pictures/10000001000000F40000002B55AE7F30.png" manifest:media-type="image/png"/>
  <manifest:file-entry manifest:full-path="Pictures/10000001000000730000001FC2F72DEF.png" manifest:media-type="image/png"/>
  <manifest:file-entry manifest:full-path="Pictures/10000001000000410000001808416550.png" manifest:media-type="image/png"/>
  <manifest:file-entry manifest:full-path="Pictures/100000010000004D0000000DB883D887.png" manifest:media-type="image/png"/>
  <manifest:file-entry manifest:full-path="Pictures/10000C67000003AF000001196D801666.svg" manifest:media-type="image/svg+xml"/>
  <manifest:file-entry manifest:full-path="Pictures/10002C5C000009FD0000033551A93247.svg" manifest:media-type="image/svg+xml"/>
  <manifest:file-entry manifest:full-path="Pictures/10000001000000610000001F7429BFB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6.591cm" table:align="margins"/>
    </style:style>
    <style:style style:name="Table1.A" style:family="table-column">
      <style:table-column-properties style:column-width="4.147cm" style:rel-column-width="16383*"/>
    </style:style>
    <style:style style:name="Table1.D" style:family="table-column">
      <style:table-column-properties style:column-width="4.149cm" style:rel-column-width="16386*"/>
    </style:style>
    <style:style style:name="Table1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1.D1" style:family="table-cell">
      <style:table-cell-properties style:vertical-align="middle" fo:padding="0.097cm" fo:border="0.5pt solid #000000"/>
    </style:style>
    <style:style style:name="Table1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1.D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Text_20_body" style:master-page-name="First_20_Page">
      <style:paragraph-properties fo:margin-top="0cm" fo:margin-bottom="0cm" style:contextual-spacing="false" fo:line-height="150%" fo:text-align="center" style:justify-single-word="false" style:page-number="auto"/>
      <style:text-properties fo:font-weight="bold" officeooo:paragraph-rsid="000d823a" style:font-weight-asian="bold" style:font-weight-complex="bold"/>
    </style:style>
    <style:style style:name="P2" style:family="paragraph" style:parent-style-name="Text_20_body">
      <style:paragraph-properties fo:margin-top="0cm" fo:margin-bottom="0cm" style:contextual-spacing="false" fo:line-height="150%" fo:text-align="center" style:justify-single-word="false"/>
      <style:text-properties officeooo:paragraph-rsid="000d823a"/>
    </style:style>
    <style:style style:name="P3" style:family="paragraph" style:parent-style-name="Text_20_body">
      <style:paragraph-properties fo:margin-top="0cm" fo:margin-bottom="0cm" style:contextual-spacing="false" fo:line-height="150%" fo:text-align="center" style:justify-single-word="false"/>
    </style:style>
    <style:style style:name="P4" style:family="paragraph" style:parent-style-name="Text_20_body">
      <style:paragraph-properties fo:margin-top="0cm" fo:margin-bottom="0cm" style:contextual-spacing="false" fo:line-height="150%" fo:text-align="center" style:justify-single-word="false"/>
      <style:text-properties fo:font-weight="bold" style:font-weight-asian="bold" style:font-weight-complex="bold"/>
    </style:style>
    <style:style style:name="P5" style:family="paragraph" style:parent-style-name="Text_20_body">
      <style:paragraph-properties fo:margin-top="0cm" fo:margin-bottom="0cm" style:contextual-spacing="false" fo:line-height="150%" fo:text-align="right" style:justify-single-word="false"/>
      <style:text-properties officeooo:paragraph-rsid="000ca6c1"/>
    </style:style>
    <style:style style:name="P6" style:family="paragraph" style:parent-style-name="Text_20_body">
      <style:paragraph-properties fo:margin-top="0cm" fo:margin-bottom="0cm" style:contextual-spacing="false" fo:line-height="150%" fo:text-align="right" style:justify-single-word="false"/>
      <style:text-properties officeooo:rsid="004a596f" officeooo:paragraph-rsid="004a596f"/>
    </style:style>
    <style:style style:name="P7" style:family="paragraph" style:parent-style-name="Text_20_body">
      <style:paragraph-properties fo:margin-top="0cm" fo:margin-bottom="0cm" style:contextual-spacing="false" fo:line-height="100%" fo:text-align="right" style:justify-single-word="false"/>
      <style:text-properties officeooo:rsid="000ca6c1" officeooo:paragraph-rsid="000d823a"/>
    </style:style>
    <style:style style:name="P8" style:family="paragraph" style:parent-style-name="Text_20_body" style:master-page-name="">
      <loext:graphic-properties draw:fill="none"/>
      <style:paragraph-properties fo:margin-left="0cm" fo:margin-right="1cm" fo:margin-top="0cm" fo:margin-bottom="0cm" style:contextual-spacing="false" fo:line-height="100%" fo:text-align="right" style:justify-single-word="false" fo:text-indent="0cm" style:auto-text-indent="false" style:page-number="auto" fo:background-color="transparent"/>
      <style:text-properties fo:font-size="10pt" officeooo:paragraph-rsid="000d823a" style:font-size-asian="10pt" style:font-size-complex="10pt"/>
    </style:style>
    <style:style style:name="P9" style:family="paragraph" style:parent-style-name="Text_20_body">
      <style:paragraph-properties fo:margin-top="0cm" fo:margin-bottom="0cm" style:contextual-spacing="false" fo:line-height="150%" fo:text-align="right" style:justify-single-word="false"/>
      <style:text-properties officeooo:rsid="001f758d" officeooo:paragraph-rsid="000ca6c1"/>
    </style:style>
    <style:style style:name="P10" style:family="paragraph" style:parent-style-name="Text_20_body">
      <style:paragraph-properties fo:margin-top="0cm" fo:margin-bottom="0cm" style:contextual-spacing="false" fo:line-height="150%" fo:text-align="right" style:justify-single-word="false"/>
      <style:text-properties officeooo:rsid="000ca6c1" officeooo:paragraph-rsid="000ca6c1"/>
    </style:style>
    <style:style style:name="P11" style:family="paragraph" style:parent-style-name="Text_20_body">
      <style:paragraph-properties fo:margin-top="0cm" fo:margin-bottom="0cm" style:contextual-spacing="false" fo:line-height="100%" fo:text-align="right" style:justify-single-word="false"/>
      <style:text-properties officeooo:rsid="000ca6c1" officeooo:paragraph-rsid="000ca6c1"/>
    </style:style>
    <style:style style:name="P12" style:family="paragraph" style:parent-style-name="Text_20_body" style:master-page-name="">
      <loext:graphic-properties draw:fill="none"/>
      <style:paragraph-properties fo:margin-left="0cm" fo:margin-right="0.3cm" fo:margin-top="0cm" fo:margin-bottom="0cm" style:contextual-spacing="false" fo:line-height="100%" fo:text-align="right" style:justify-single-word="false" fo:text-indent="0cm" style:auto-text-indent="false" style:page-number="auto" fo:background-color="transparent"/>
      <style:text-properties fo:font-size="10pt" officeooo:paragraph-rsid="000d823a" style:font-size-asian="10pt" style:font-size-complex="10pt"/>
    </style:style>
    <style:style style:name="P13" style:family="paragraph" style:parent-style-name="Text_20_body" style:master-page-name="">
      <loext:graphic-properties draw:fill="none"/>
      <style:paragraph-properties fo:margin-left="0cm" fo:margin-right="0.9cm" fo:margin-top="0cm" fo:margin-bottom="0cm" style:contextual-spacing="false" fo:line-height="100%" fo:text-align="right" style:justify-single-word="false" fo:text-indent="0cm" style:auto-text-indent="false" style:page-number="auto" fo:background-color="transparent"/>
      <style:text-properties fo:font-size="10pt" officeooo:paragraph-rsid="000ca6c1" style:font-size-asian="10pt" style:font-size-complex="10pt"/>
    </style:style>
    <style:style style:name="P14" style:family="paragraph" style:parent-style-name="Text_20_body">
      <style:paragraph-properties fo:margin-top="0cm" fo:margin-bottom="0cm" style:contextual-spacing="false" fo:line-height="150%" fo:text-align="center" style:justify-single-word="false"/>
      <style:text-properties officeooo:paragraph-rsid="00394161"/>
    </style:style>
    <style:style style:name="P15" style:family="paragraph" style:parent-style-name="Text_20_body" style:list-style-name="" style:master-page-name="">
      <style:paragraph-properties fo:margin-top="0cm" fo:margin-bottom="0cm" style:contextual-spacing="false" fo:line-height="150%" fo:text-align="center" style:justify-single-word="false" style:page-number="auto" fo:break-before="page"/>
      <style:text-properties fo:font-weight="bold" officeooo:rsid="000f2314" officeooo:paragraph-rsid="000f2314" style:font-weight-asian="bold" style:font-weight-complex="bold"/>
    </style:style>
    <style:style style:name="P16" style:family="paragraph" style:parent-style-name="Text_20_body">
      <style:paragraph-properties fo:margin-top="0cm" fo:margin-bottom="0cm" style:contextual-spacing="false" fo:line-height="150%" fo:text-align="left" style:justify-single-word="false"/>
      <style:text-properties officeooo:paragraph-rsid="000d823a"/>
    </style:style>
    <style:style style:name="P17" style:family="paragraph" style:parent-style-name="Contents_20_1">
      <style:paragraph-properties fo:line-height="150%">
        <style:tab-stops>
          <style:tab-stop style:position="16.589cm" style:type="right" style:leader-style="dotted" style:leader-text="."/>
        </style:tab-stops>
      </style:paragraph-properties>
    </style:style>
    <style:style style:name="P18" style:family="paragraph" style:parent-style-name="Text_20_body" style:list-style-name="">
      <style:paragraph-properties fo:margin-top="0cm" fo:margin-bottom="0.25cm" style:contextual-spacing="false" fo:line-height="150%" fo:text-align="center" style:justify-single-word="false" fo:break-before="page"/>
      <style:text-properties fo:font-weight="bold" officeooo:rsid="000f2314" officeooo:paragraph-rsid="000f2314" style:font-weight-asian="bold" style:font-weight-complex="bold"/>
    </style:style>
    <style:style style:name="P19" style:family="paragraph" style:parent-style-name="Text_20_body" style:master-page-name="">
      <loext:graphic-properties draw:fill="none"/>
      <style:paragraph-properties fo:margin-left="0cm" fo:margin-right="0cm" fo:margin-top="0cm" fo:margin-bottom="0.25cm" style:contextual-spacing="false" fo:line-height="150%" fo:text-align="justify" style:justify-single-word="false" fo:text-indent="1.3cm" style:auto-text-indent="false" style:page-number="auto" fo:background-color="transparent"/>
      <style:text-properties officeooo:rsid="000f2314" officeooo:paragraph-rsid="002680d2"/>
    </style:style>
    <style:style style:name="P20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align="justify" style:justify-single-word="false" fo:text-indent="1.3cm" style:auto-text-indent="false" style:page-number="auto" fo:background-color="transparent"/>
      <style:text-properties officeooo:rsid="0022ab20" officeooo:paragraph-rsid="0022ab20"/>
    </style:style>
    <style:style style:name="P21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" style:font-size-asian="18pt" style:font-style-asian="normal" style:font-weight-asian="normal" style:font-name-complex="Free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22" style:family="paragraph" style:parent-style-name="Text_20_body" style:list-style-name="L1">
      <loext:graphic-properties draw:fill="none"/>
      <style:paragraph-properties fo:margin-left="0cm" fo:margin-right="0cm" fo:margin-top="0cm" fo:margin-bottom="0.247cm" style:contextual-spacing="false" fo:line-height="115%" fo:text-align="justify" style:justify-single-word="false" fo:text-indent="1.3cm" style:auto-text-indent="false" fo:background-color="transparent"/>
      <style:text-properties officeooo:rsid="0022ab20" officeooo:paragraph-rsid="0022ab20"/>
    </style:style>
    <style:style style:name="P23" style:family="paragraph" style:parent-style-name="Text_20_body" style:list-style-name="">
      <style:paragraph-properties fo:margin-top="0cm" fo:margin-bottom="0.25cm" style:contextual-spacing="false" fo:line-height="150%" fo:text-align="center" style:justify-single-word="false" fo:break-before="page"/>
      <style:text-properties officeooo:rsid="002680d2" officeooo:paragraph-rsid="004b6835"/>
    </style:style>
    <style:style style:name="P24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justify" style:justify-single-word="false" fo:text-indent="1.3cm" style:auto-text-indent="false" fo:background-color="transparent"/>
      <style:text-properties fo:font-weight="bold" officeooo:rsid="004c1b85" officeooo:paragraph-rsid="004c1b85" style:font-weight-asian="bold" style:font-weight-complex="bold"/>
    </style:style>
    <style:style style:name="P25" style:family="paragraph" style:parent-style-name="Text_20_body" style:list-style-name="L2" style:master-page-name="">
      <loext:graphic-properties draw:fill="none"/>
      <style:paragraph-properties fo:margin-left="0cm" fo:margin-right="0cm" fo:margin-top="0cm" fo:margin-bottom="0.247cm" style:contextual-spacing="false" fo:line-height="115%" fo:text-align="justify" style:justify-single-word="false" fo:text-indent="1.3cm" style:auto-text-indent="false" style:page-number="auto" fo:background-color="transparent"/>
      <style:text-properties officeooo:rsid="004c1b85" officeooo:paragraph-rsid="004c1b85"/>
    </style:style>
    <style:style style:name="P26" style:family="paragraph" style:parent-style-name="Text_20_body" style:list-style-name="L2">
      <loext:graphic-properties draw:fill="none"/>
      <style:paragraph-properties fo:margin-left="0cm" fo:margin-right="0cm" fo:margin-top="0cm" fo:margin-bottom="0.247cm" style:contextual-spacing="false" fo:line-height="115%" fo:text-align="justify" style:justify-single-word="false" fo:text-indent="1.3cm" style:auto-text-indent="false" fo:background-color="transparent"/>
      <style:text-properties officeooo:rsid="004c1b85" officeooo:paragraph-rsid="004c1b85"/>
    </style:style>
    <style:style style:name="P27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justify" style:justify-single-word="false" fo:text-indent="1.3cm" style:auto-text-indent="false" fo:background-color="transparent"/>
      <style:text-properties officeooo:rsid="004d2e77" officeooo:paragraph-rsid="004d2e77"/>
    </style:style>
    <style:style style:name="P28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justify" style:justify-single-word="false" fo:text-indent="1.3cm" style:auto-text-indent="false" fo:background-color="transparent"/>
      <style:text-properties officeooo:rsid="004e6dab" officeooo:paragraph-rsid="00634e53"/>
    </style:style>
    <style:style style:name="P29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justify" style:justify-single-word="false" fo:text-indent="1.3cm" style:auto-text-indent="false" fo:background-color="transparent"/>
      <style:text-properties fo:font-weight="bold" officeooo:rsid="0056bc54" officeooo:paragraph-rsid="005a6dc1" style:font-weight-asian="bold" style:font-weight-complex="bold"/>
    </style:style>
    <style:style style:name="P30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justify" style:justify-single-word="false" fo:text-indent="1.3cm" style:auto-text-indent="false" fo:background-color="transparent"/>
      <style:text-properties officeooo:rsid="0051ccef" officeooo:paragraph-rsid="005a6dc1"/>
    </style:style>
    <style:style style:name="P31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justify" style:justify-single-word="false" fo:text-indent="1.3cm" style:auto-text-indent="false" fo:background-color="transparent"/>
      <style:text-properties style:text-position="0% 100%" officeooo:rsid="0051ccef" officeooo:paragraph-rsid="005336ab"/>
    </style:style>
    <style:style style:name="P32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justify" style:justify-single-word="false" fo:text-indent="1.3cm" style:auto-text-indent="false" fo:background-color="transparent"/>
      <style:text-properties officeooo:rsid="005a6dc1" officeooo:paragraph-rsid="005a6dc1"/>
    </style:style>
    <style:style style:name="P33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justify" style:justify-single-word="false" fo:text-indent="1.3cm" style:auto-text-indent="false" fo:background-color="transparent"/>
      <style:text-properties fo:font-weight="bold" officeooo:rsid="0056bc54" officeooo:paragraph-rsid="0056bc54" style:font-weight-asian="bold" style:font-weight-complex="bold"/>
    </style:style>
    <style:style style:name="P34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justify" style:justify-single-word="false" fo:text-indent="1.3cm" style:auto-text-indent="false" fo:background-color="transparent"/>
      <style:text-properties officeooo:rsid="005336ab" officeooo:paragraph-rsid="0056bc54"/>
    </style:style>
    <style:style style:name="P35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justify" style:justify-single-word="false" fo:text-indent="1.3cm" style:auto-text-indent="false" fo:background-color="transparent"/>
      <style:text-properties officeooo:rsid="005336ab" officeooo:paragraph-rsid="005336ab"/>
    </style:style>
    <style:style style:name="P36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justify" style:justify-single-word="false" fo:text-indent="1.3cm" style:auto-text-indent="false" fo:background-color="transparent"/>
      <style:text-properties officeooo:rsid="005336ab" officeooo:paragraph-rsid="0054d258"/>
    </style:style>
    <style:style style:name="P37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justify" style:justify-single-word="false" fo:text-indent="1.3cm" style:auto-text-indent="false" fo:background-color="transparent"/>
      <style:text-properties officeooo:rsid="0054d258" officeooo:paragraph-rsid="0054d258"/>
    </style:style>
    <style:style style:name="P38" style:family="paragraph" style:parent-style-name="Text_20_body" style:list-style-name="L3">
      <loext:graphic-properties draw:fill="none"/>
      <style:paragraph-properties fo:margin-left="0cm" fo:margin-right="0cm" fo:margin-top="0cm" fo:margin-bottom="0.247cm" style:contextual-spacing="false" fo:line-height="115%" fo:text-align="justify" style:justify-single-word="false" fo:text-indent="1.3cm" style:auto-text-indent="false" fo:background-color="transparent"/>
      <style:text-properties officeooo:rsid="0054d258" officeooo:paragraph-rsid="0056bc54"/>
    </style:style>
    <style:style style:name="P39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justify" style:justify-single-word="false" fo:text-indent="1.3cm" style:auto-text-indent="false" fo:background-color="transparent"/>
      <style:text-properties officeooo:rsid="0056bc54" officeooo:paragraph-rsid="0056bc54"/>
    </style:style>
    <style:style style:name="P40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justify" style:justify-single-word="false" fo:text-indent="1.3cm" style:auto-text-indent="false" fo:background-color="transparent"/>
      <style:text-properties officeooo:rsid="0056bc54" officeooo:paragraph-rsid="0059b491"/>
    </style:style>
    <style:style style:name="P41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justify" style:justify-single-word="false" fo:text-indent="1.3cm" style:auto-text-indent="false" fo:background-color="transparent"/>
      <style:text-properties officeooo:rsid="005a6dc1" officeooo:paragraph-rsid="0059b491"/>
    </style:style>
    <style:style style:name="P42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justify" style:justify-single-word="false" fo:text-indent="1.3cm" style:auto-text-indent="false" fo:background-color="transparent"/>
      <style:text-properties fo:font-weight="bold" officeooo:rsid="005a6dc1" officeooo:paragraph-rsid="005a6dc1" style:font-weight-asian="bold" style:font-weight-complex="bold"/>
    </style:style>
    <style:style style:name="P43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justify" style:justify-single-word="false" fo:text-indent="1.3cm" style:auto-text-indent="false" fo:background-color="transparent"/>
      <style:text-properties officeooo:rsid="005a6dc1" officeooo:paragraph-rsid="005afc21"/>
    </style:style>
    <style:style style:name="P44" style:family="paragraph" style:parent-style-name="Text_20_body" style:list-style-name="L4">
      <loext:graphic-properties draw:fill="none"/>
      <style:paragraph-properties fo:margin-left="0cm" fo:margin-right="0cm" fo:margin-top="0cm" fo:margin-bottom="0.247cm" style:contextual-spacing="false" fo:line-height="115%" fo:text-align="justify" style:justify-single-word="false" fo:text-indent="1.3cm" style:auto-text-indent="false" fo:background-color="transparent"/>
      <style:text-properties officeooo:rsid="005afc21" officeooo:paragraph-rsid="005afc21"/>
    </style:style>
    <style:style style:name="P45" style:family="paragraph" style:parent-style-name="Text_20_body" style:list-style-name="L4">
      <loext:graphic-properties draw:fill="none"/>
      <style:paragraph-properties fo:margin-left="0cm" fo:margin-right="0cm" fo:margin-top="0cm" fo:margin-bottom="0.247cm" style:contextual-spacing="false" fo:line-height="115%" fo:text-align="justify" style:justify-single-word="false" fo:text-indent="1.3cm" style:auto-text-indent="false" fo:background-color="transparent"/>
      <style:text-properties officeooo:rsid="005afc21" officeooo:paragraph-rsid="005b2868"/>
    </style:style>
    <style:style style:name="P46" style:family="paragraph" style:parent-style-name="Text_20_body" style:list-style-name="L4">
      <loext:graphic-properties draw:fill="none"/>
      <style:paragraph-properties fo:margin-left="0cm" fo:margin-right="0cm" fo:margin-top="0cm" fo:margin-bottom="0.247cm" style:contextual-spacing="false" fo:line-height="115%" fo:text-align="justify" style:justify-single-word="false" fo:text-indent="1.3cm" style:auto-text-indent="false" fo:background-color="transparent"/>
      <style:text-properties officeooo:rsid="005b2868" officeooo:paragraph-rsid="005d196a"/>
    </style:style>
    <style:style style:name="P47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justify" style:justify-single-word="false" fo:text-indent="1.3cm" style:auto-text-indent="false" fo:background-color="transparent"/>
      <style:text-properties style:text-position="0% 100%" officeooo:rsid="005d196a" officeooo:paragraph-rsid="006acc59"/>
    </style:style>
    <style:style style:name="P48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justify" style:justify-single-word="false" fo:text-indent="1.3cm" style:auto-text-indent="false" fo:background-color="transparent"/>
      <style:text-properties officeooo:paragraph-rsid="006acc59"/>
    </style:style>
    <style:style style:name="P49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justify" style:justify-single-word="false" fo:text-indent="1.3cm" style:auto-text-indent="false" fo:background-color="transparent"/>
      <style:text-properties officeooo:rsid="005d196a" officeooo:paragraph-rsid="005e1577"/>
    </style:style>
    <style:style style:name="P50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justify" style:justify-single-word="false" fo:text-indent="1.3cm" style:auto-text-indent="false" fo:background-color="transparent"/>
      <style:text-properties fo:font-weight="bold" officeooo:rsid="0060c258" officeooo:paragraph-rsid="0060c258" style:font-weight-asian="bold" style:font-weight-complex="bold"/>
    </style:style>
    <style:style style:name="P51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justify" style:justify-single-word="false" fo:text-indent="1.3cm" style:auto-text-indent="false" fo:background-color="transparent"/>
      <style:text-properties officeooo:rsid="0060c258" officeooo:paragraph-rsid="00615352"/>
    </style:style>
    <style:style style:name="P52" style:family="paragraph" style:parent-style-name="Text_20_body" style:list-style-name="L5">
      <loext:graphic-properties draw:fill="none"/>
      <style:paragraph-properties fo:margin-left="0cm" fo:margin-right="0cm" fo:margin-top="0cm" fo:margin-bottom="0.247cm" style:contextual-spacing="false" fo:line-height="115%" fo:text-align="justify" style:justify-single-word="false" fo:text-indent="1.3cm" style:auto-text-indent="false" fo:background-color="transparent"/>
      <style:text-properties officeooo:rsid="00615352" officeooo:paragraph-rsid="00615352"/>
    </style:style>
    <style:style style:name="P53" style:family="paragraph" style:parent-style-name="Text_20_body" style:list-style-name="L5">
      <loext:graphic-properties draw:fill="none"/>
      <style:paragraph-properties fo:margin-left="0cm" fo:margin-right="0cm" fo:margin-top="0cm" fo:margin-bottom="0.247cm" style:contextual-spacing="false" fo:line-height="115%" fo:text-align="justify" style:justify-single-word="false" fo:text-indent="1.3cm" style:auto-text-indent="false" fo:background-color="transparent"/>
      <style:text-properties officeooo:rsid="00615352" officeooo:paragraph-rsid="00621d25"/>
    </style:style>
    <style:style style:name="P54" style:family="paragraph" style:parent-style-name="Text_20_body" style:list-style-name="L5">
      <loext:graphic-properties draw:fill="none"/>
      <style:paragraph-properties fo:margin-left="0cm" fo:margin-right="0cm" fo:margin-top="0cm" fo:margin-bottom="0.247cm" style:contextual-spacing="false" fo:line-height="115%" fo:text-align="justify" style:justify-single-word="false" fo:text-indent="1.3cm" style:auto-text-indent="false" fo:background-color="transparent"/>
      <style:text-properties officeooo:rsid="00621d25" officeooo:paragraph-rsid="00621d25"/>
    </style:style>
    <style:style style:name="P55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justify" style:justify-single-word="false" fo:text-indent="1.3cm" style:auto-text-indent="false" fo:background-color="transparent"/>
      <style:text-properties officeooo:rsid="00621d25" officeooo:paragraph-rsid="00621d25"/>
    </style:style>
    <style:style style:name="P56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justify" style:justify-single-word="false" fo:text-indent="1.3cm" style:auto-text-indent="false" fo:background-color="transparent"/>
      <style:text-properties fo:font-weight="bold" officeooo:rsid="00697158" officeooo:paragraph-rsid="00697158" style:font-weight-asian="bold" style:font-weight-complex="bold"/>
    </style:style>
    <style:style style:name="P57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justify" style:justify-single-word="false" fo:text-indent="1.3cm" style:auto-text-indent="false" fo:background-color="transparent"/>
      <style:text-properties officeooo:paragraph-rsid="006c0717"/>
    </style:style>
    <style:style style:name="P58" style:family="paragraph" style:parent-style-name="Text_20_body" style:list-style-name="">
      <style:paragraph-properties fo:margin-top="0cm" fo:margin-bottom="0.25cm" style:contextual-spacing="false" fo:line-height="150%" fo:text-align="center" style:justify-single-word="false" fo:break-before="page"/>
      <style:text-properties officeooo:rsid="002680d2" officeooo:paragraph-rsid="0028636d"/>
    </style:style>
    <style:style style:name="P59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3cm" style:auto-text-indent="false" fo:background-color="transparent"/>
      <style:text-properties officeooo:rsid="0028636d" officeooo:paragraph-rsid="0028636d"/>
    </style:style>
    <style:style style:name="P60" style:family="paragraph" style:parent-style-name="Таблица">
      <style:paragraph-properties fo:keep-with-next="always"/>
    </style:style>
    <style:style style:name="P61" style:family="paragraph" style:parent-style-name="Table_20_Contents">
      <style:paragraph-properties fo:text-align="center" style:justify-single-word="false"/>
      <style:text-properties fo:font-weight="bold" officeooo:rsid="0028636d" officeooo:paragraph-rsid="0028636d" style:font-weight-asian="bold" style:font-weight-complex="bold"/>
    </style:style>
    <style:style style:name="P62" style:family="paragraph" style:parent-style-name="Table_20_Contents">
      <style:paragraph-properties fo:text-align="center" style:justify-single-word="false"/>
      <style:text-properties officeooo:rsid="0028636d" officeooo:paragraph-rsid="0028636d"/>
    </style:style>
    <style:style style:name="P63" style:family="paragraph" style:parent-style-name="Table_20_Contents">
      <style:paragraph-properties fo:text-align="center" style:justify-single-word="false"/>
    </style:style>
    <style:style style:name="P64" style:family="paragraph" style:parent-style-name="Table_20_Contents">
      <style:paragraph-properties fo:text-align="center" style:justify-single-word="false"/>
      <style:text-properties officeooo:rsid="002bf3d5" officeooo:paragraph-rsid="002bf3d5"/>
    </style:style>
    <style:style style:name="P65" style:family="paragraph" style:parent-style-name="Table_20_Contents">
      <style:paragraph-properties fo:text-align="center" style:justify-single-word="false"/>
      <style:text-properties style:font-name="Liberation Serif" officeooo:rsid="002bf3d5" officeooo:paragraph-rsid="002bf3d5"/>
    </style:style>
    <style:style style:name="P66" style:family="paragraph" style:parent-style-name="Table_20_Contents">
      <style:paragraph-properties fo:text-align="center" style:justify-single-word="false"/>
      <style:text-properties officeooo:rsid="002bf3d5" officeooo:paragraph-rsid="00335240"/>
    </style:style>
    <style:style style:name="P67" style:family="paragraph" style:parent-style-name="Table_20_Contents">
      <style:paragraph-properties fo:text-align="center" style:justify-single-word="false"/>
      <style:text-properties officeooo:rsid="002df2f1" officeooo:paragraph-rsid="002df2f1"/>
    </style:style>
    <style:style style:name="P68" style:family="paragraph" style:parent-style-name="Table_20_Contents">
      <style:paragraph-properties fo:text-align="center" style:justify-single-word="false"/>
      <style:text-properties officeooo:rsid="002bf3d5" officeooo:paragraph-rsid="002df2f1"/>
    </style:style>
    <style:style style:name="P69" style:family="paragraph" style:parent-style-name="Table_20_Contents">
      <style:paragraph-properties fo:text-align="center" style:justify-single-word="false"/>
      <style:text-properties officeooo:rsid="0031ac98" officeooo:paragraph-rsid="0031ac98"/>
    </style:style>
    <style:style style:name="P70" style:family="paragraph" style:parent-style-name="Table_20_Contents">
      <style:paragraph-properties fo:text-align="center" style:justify-single-word="false"/>
      <style:text-properties officeooo:rsid="002fe224" officeooo:paragraph-rsid="002fe224"/>
    </style:style>
    <style:style style:name="P71" style:family="paragraph" style:parent-style-name="Table_20_Contents">
      <style:paragraph-properties fo:text-align="center" style:justify-single-word="false"/>
      <style:text-properties officeooo:rsid="00335240" officeooo:paragraph-rsid="00335240"/>
    </style:style>
    <style:style style:name="P72" style:family="paragraph" style:parent-style-name="Table_20_Contents">
      <style:paragraph-properties fo:text-align="center" style:justify-single-word="false"/>
      <style:text-properties officeooo:rsid="0033fa91" officeooo:paragraph-rsid="0033fa91"/>
    </style:style>
    <style:style style:name="P73" style:family="paragraph" style:parent-style-name="Table_20_Contents">
      <style:paragraph-properties fo:text-align="center" style:justify-single-word="false"/>
      <style:text-properties officeooo:rsid="002bf3d5" officeooo:paragraph-rsid="0033fa91"/>
    </style:style>
    <style:style style:name="P74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3cm" style:auto-text-indent="false" fo:background-color="transparent" style:writing-mode="lr-tb" style:writing-mode-automatic="false"/>
      <style:text-properties officeooo:rsid="0028636d" officeooo:paragraph-rsid="0028636d"/>
    </style:style>
    <style:style style:name="P75" style:family="paragraph" style:parent-style-name="Text_20_body" style:list-style-name="">
      <style:paragraph-properties fo:margin-top="0cm" fo:margin-bottom="0.25cm" style:contextual-spacing="false" fo:line-height="150%" fo:text-align="center" style:justify-single-word="false" fo:break-before="page"/>
      <style:text-properties officeooo:rsid="002680d2" officeooo:paragraph-rsid="003a877b"/>
    </style:style>
    <style:style style:name="P76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3cm" style:auto-text-indent="false" fo:background-color="transparent" style:writing-mode="lr-tb" style:writing-mode-automatic="false"/>
      <style:text-properties officeooo:rsid="003a877b" officeooo:paragraph-rsid="003a877b"/>
    </style:style>
    <style:style style:name="P77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3cm" style:auto-text-indent="false" fo:background-color="transparent" style:writing-mode="lr-tb" style:writing-mode-automatic="false"/>
      <style:text-properties officeooo:rsid="0028636d" officeooo:paragraph-rsid="003a877b"/>
    </style:style>
    <style:style style:name="P78" style:family="paragraph" style:parent-style-name="Рисунок">
      <style:paragraph-properties fo:text-align="center" style:justify-single-word="false"/>
    </style:style>
    <style:style style:name="P79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3cm" style:auto-text-indent="false" fo:break-before="page" fo:background-color="transparent" style:writing-mode="lr-tb" style:writing-mode-automatic="false"/>
      <style:text-properties officeooo:rsid="0028636d" officeooo:paragraph-rsid="003a877b"/>
    </style:style>
    <style:style style:name="P80" style:family="paragraph" style:parent-style-name="Рисунок">
      <style:paragraph-properties fo:text-align="center" style:justify-single-word="false"/>
      <style:text-properties officeooo:paragraph-rsid="008ebd3e"/>
    </style:style>
    <style:style style:name="P81" style:family="paragraph" style:parent-style-name="Text_20_body" style:list-style-name="">
      <style:paragraph-properties fo:margin-top="0cm" fo:margin-bottom="0.25cm" style:contextual-spacing="false" fo:line-height="150%" fo:text-align="center" style:justify-single-word="false" fo:break-before="page"/>
      <style:text-properties officeooo:rsid="002680d2" officeooo:paragraph-rsid="003c4608"/>
    </style:style>
    <style:style style:name="P82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3cm" style:auto-text-indent="false" fo:background-color="transparent" style:writing-mode="lr-tb" style:writing-mode-automatic="false"/>
      <style:text-properties officeooo:rsid="003c4608" officeooo:paragraph-rsid="003c4608"/>
    </style:style>
    <style:style style:name="P83" style:family="paragraph" style:parent-style-name="Text_20_body" style:master-page-name="">
      <loext:graphic-properties draw:fill="none"/>
      <style:paragraph-properties ch2_options="{'Style': 'vs', 'Language': 'JavaScript', 'UseCharStyles': 0, 'LineNumberRatio': 100, 'LineNumberStart': 1, 'MasterCharStyle': '', 'ShowLineNumbers': 1, 'ColourizeBackground': 0, 'LineNumberSeparator': '  |    ', 'LineNumberPaddingSymbol': '', 'StoreOptionsWithSnippet': 1}" fo:margin-left="0cm" fo:margin-right="0cm" fo:margin-top="0cm" fo:margin-bottom="0cm" style:contextual-spacing="false" fo:line-height="100%" fo:text-align="left" style:justify-single-word="false" fo:text-indent="0cm" style:auto-text-indent="false" style:page-number="auto" fo:background-color="transparent" style:writing-mode="lr-tb" style:writing-mode-automatic="false"/>
      <style:text-properties style:use-window-font-color="true" loext:opacity="0%" style:font-name="Liberation Mono" fo:font-size="8pt" fo:language="zxx" fo:country="none" fo:font-style="normal" style:text-underline-style="none" fo:font-weight="normal" officeooo:rsid="003c4608" officeooo:paragraph-rsid="003c4608" fo:background-color="transparent" style:font-size-asian="8pt" style:font-size-complex="8pt"/>
    </style:style>
    <style:style style:name="P84" style:family="paragraph" style:parent-style-name="Text_20_body">
      <loext:graphic-properties draw:fill="none"/>
      <style:paragraph-properties ch2_options="{'Style': 'vs', 'Language': 'JavaScript', 'UseCharStyles': 0, 'LineNumberRatio': 100, 'LineNumberStart': 1, 'MasterCharStyle': '', 'ShowLineNumbers': 1, 'ColourizeBackground': 0, 'LineNumberSeparator': '  |    ', 'LineNumberPaddingSymbol': '', 'StoreOptionsWithSnippet': 1}" fo:margin-left="0cm" fo:margin-right="0cm" fo:margin-top="0cm" fo:margin-bottom="0cm" style:contextual-spacing="false" fo:line-height="100%" fo:text-align="left" style:justify-single-word="false" fo:text-indent="0cm" style:auto-text-indent="false" fo:background-color="transparent" style:writing-mode="lr-tb" style:writing-mode-automatic="false"/>
      <style:text-properties fo:color="#008000" loext:opacity="100%" style:font-name="Liberation Mono" fo:font-size="8pt" fo:language="zxx" fo:country="none" fo:font-style="normal" style:text-underline-style="none" fo:font-weight="normal" officeooo:rsid="003c4608" officeooo:paragraph-rsid="003c4608" fo:background-color="transparent" style:font-size-asian="8pt" style:font-size-complex="8pt"/>
    </style:style>
    <style:style style:name="P85" style:family="paragraph" style:parent-style-name="Text_20_body">
      <loext:graphic-properties draw:fill="none"/>
      <style:paragraph-properties ch2_options="{'Style': 'vs', 'Language': 'JavaScript', 'UseCharStyles': 0, 'LineNumberRatio': 100, 'LineNumberStart': 1, 'MasterCharStyle': '', 'ShowLineNumbers': 1, 'ColourizeBackground': 0, 'LineNumberSeparator': '  |    ', 'LineNumberPaddingSymbol': '', 'StoreOptionsWithSnippet': 1}" fo:margin-left="0cm" fo:margin-right="0cm" fo:margin-top="0cm" fo:margin-bottom="0cm" style:contextual-spacing="false" fo:line-height="100%" fo:text-align="left" style:justify-single-word="false" fo:text-indent="0cm" style:auto-text-indent="false" fo:background-color="transparent" style:writing-mode="lr-tb" style:writing-mode-automatic="false"/>
      <style:text-properties style:use-window-font-color="true" loext:opacity="0%" style:font-name="Liberation Mono" fo:font-size="8pt" fo:language="zxx" fo:country="none" fo:font-style="normal" style:text-underline-style="none" fo:font-weight="normal" officeooo:rsid="003c4608" officeooo:paragraph-rsid="003c4608" fo:background-color="transparent" style:font-size-asian="8pt" style:font-size-complex="8pt"/>
    </style:style>
    <style:style style:name="P86" style:family="paragraph" style:parent-style-name="Text_20_body">
      <loext:graphic-properties draw:fill="none"/>
      <style:paragraph-properties ch2_options="{'Style': 'vs', 'Language': 'JavaScript', 'UseCharStyles': 0, 'LineNumberRatio': 100, 'LineNumberStart': 1, 'MasterCharStyle': '', 'ShowLineNumbers': 1, 'ColourizeBackground': 0, 'LineNumberSeparator': '  |    ', 'LineNumberPaddingSymbol': '', 'StoreOptionsWithSnippet': 1}" fo:margin-left="0cm" fo:margin-right="0cm" fo:margin-top="0cm" fo:margin-bottom="0cm" style:contextual-spacing="false" fo:line-height="100%" fo:text-align="left" style:justify-single-word="false" fo:text-indent="0cm" style:auto-text-indent="false" fo:background-color="transparent" style:writing-mode="lr-tb" style:writing-mode-automatic="false"/>
      <style:text-properties fo:color="#000000" loext:opacity="100%" style:font-name="Liberation Mono" fo:font-size="8pt" fo:language="zxx" fo:country="none" fo:font-style="normal" style:text-underline-style="none" fo:font-weight="normal" officeooo:rsid="003c4608" officeooo:paragraph-rsid="003c4608" fo:background-color="transparent" style:font-size-asian="8pt" style:font-size-complex="8pt"/>
    </style:style>
    <style:style style:name="P87" style:family="paragraph" style:parent-style-name="Text_20_body" style:list-style-name="">
      <style:paragraph-properties fo:margin-top="0cm" fo:margin-bottom="0.25cm" style:contextual-spacing="false" fo:line-height="150%" fo:text-align="center" style:justify-single-word="false" fo:break-before="page"/>
      <style:text-properties officeooo:rsid="003ecf82" officeooo:paragraph-rsid="003ecf82"/>
    </style:style>
    <style:style style:name="P88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3cm" style:auto-text-indent="false" fo:background-color="transparent" style:writing-mode="lr-tb" style:writing-mode-automatic="false"/>
      <style:text-properties officeooo:rsid="0028636d" officeooo:paragraph-rsid="0044e4e9"/>
    </style:style>
    <style:style style:name="P89" style:family="paragraph" style:parent-style-name="Text_20_body" style:list-style-name="" style:master-page-name="Landscape">
      <style:paragraph-properties fo:margin-top="0cm" fo:margin-bottom="0.25cm" style:contextual-spacing="false" fo:line-height="150%" fo:text-align="center" style:justify-single-word="false" style:page-number="auto"/>
      <style:text-properties officeooo:rsid="003ecf82" officeooo:paragraph-rsid="003ecf82"/>
    </style:style>
    <style:style style:name="P90" style:family="paragraph" style:parent-style-name="Text_20_body" style:list-style-name="">
      <style:paragraph-properties fo:margin-top="0cm" fo:margin-bottom="0.25cm" style:contextual-spacing="false" fo:line-height="150%" fo:text-align="center" style:justify-single-word="false"/>
      <style:text-properties fo:font-weight="bold" officeooo:rsid="003ecf82" officeooo:paragraph-rsid="003ecf82" style:font-weight-asian="bold" style:font-weight-complex="bold"/>
    </style:style>
    <style:style style:name="P91" style:family="paragraph" style:parent-style-name="Text_20_body" style:list-style-name="">
      <style:paragraph-properties fo:margin-top="0cm" fo:margin-bottom="0.25cm" style:contextual-spacing="false" fo:line-height="150%" fo:text-align="center" style:justify-single-word="false" fo:break-before="page"/>
      <style:text-properties officeooo:rsid="0028636d" officeooo:paragraph-rsid="003ecf82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1f758d"/>
    </style:style>
    <style:style style:name="T3" style:family="text">
      <style:text-properties officeooo:rsid="00394161"/>
    </style:style>
    <style:style style:name="T4" style:family="text">
      <style:text-properties officeooo:rsid="000ca6c1"/>
    </style:style>
    <style:style style:name="T5" style:family="text">
      <style:text-properties officeooo:rsid="0016960e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87ae64"/>
    </style:style>
    <style:style style:name="T8" style:family="text">
      <style:text-properties officeooo:rsid="0024ffab"/>
    </style:style>
    <style:style style:name="T9" style:family="text">
      <style:text-properties fo:font-weight="bold" officeooo:rsid="000f2314" style:font-weight-asian="bold" style:font-weight-complex="bold"/>
    </style:style>
    <style:style style:name="T10" style:family="text">
      <style:text-properties fo:font-weight="bold" officeooo:rsid="004c1b85" style:font-weight-asian="bold" style:font-weight-complex="bold"/>
    </style:style>
    <style:style style:name="T11" style:family="text">
      <style:text-properties officeooo:rsid="004d2e77"/>
    </style:style>
    <style:style style:name="T12" style:family="text">
      <style:text-properties style:text-position="0% 100%"/>
    </style:style>
    <style:style style:name="T13" style:family="text">
      <style:text-properties style:text-position="0% 100%" officeooo:rsid="00634e53"/>
    </style:style>
    <style:style style:name="T14" style:family="text">
      <style:text-properties officeooo:rsid="005a6dc1"/>
    </style:style>
    <style:style style:name="T15" style:family="text">
      <style:text-properties officeooo:rsid="0056bc54"/>
    </style:style>
    <style:style style:name="T16" style:family="text">
      <style:text-properties officeooo:rsid="005336ab"/>
    </style:style>
    <style:style style:name="T17" style:family="text">
      <style:text-properties officeooo:rsid="0054d258"/>
    </style:style>
    <style:style style:name="T18" style:family="text">
      <style:text-properties style:text-position="0% 100%" officeooo:rsid="0054d258"/>
    </style:style>
    <style:style style:name="T19" style:family="text">
      <style:text-properties style:text-position="0% 100%" officeooo:rsid="0056bc54"/>
    </style:style>
    <style:style style:name="T20" style:family="text">
      <style:text-properties style:font-name="Liberation Serif"/>
    </style:style>
    <style:style style:name="T21" style:family="text">
      <style:text-properties style:text-position="0% 100%" style:font-name="Liberation Serif"/>
    </style:style>
    <style:style style:name="T22" style:family="text">
      <style:text-properties fo:font-family="'Liberation Serif'" style:font-family-generic="roman" style:font-family-asian="'Liberation Serif'" style:font-family-generic-asian="roman" style:font-family-complex="'Liberation Serif'" style:font-family-generic-complex="roman"/>
    </style:style>
    <style:style style:name="T23" style:family="text">
      <style:text-properties officeooo:rsid="0058b103"/>
    </style:style>
    <style:style style:name="T24" style:family="text">
      <style:text-properties style:text-position="0% 100%" officeooo:rsid="0058b103"/>
    </style:style>
    <style:style style:name="T25" style:family="text">
      <style:text-properties style:text-position="0% 100%" officeooo:rsid="005a6dc1"/>
    </style:style>
    <style:style style:name="T26" style:family="text">
      <style:text-properties style:text-position="0% 100%" officeooo:rsid="005afc21"/>
    </style:style>
    <style:style style:name="T27" style:family="text">
      <style:text-properties style:text-position="0% 100%" officeooo:rsid="00625d7e"/>
    </style:style>
    <style:style style:name="T28" style:family="text">
      <style:text-properties style:text-position="0% 100%" officeooo:rsid="005d196a"/>
    </style:style>
    <style:style style:name="T29" style:family="text">
      <style:text-properties style:text-position="0% 100%" officeooo:rsid="005e2eab"/>
    </style:style>
    <style:style style:name="T30" style:family="text">
      <style:text-properties style:text-position="0% 100%" officeooo:rsid="005e1577"/>
    </style:style>
    <style:style style:name="T31" style:family="text">
      <style:text-properties style:text-position="0% 100%" officeooo:rsid="006011ce"/>
    </style:style>
    <style:style style:name="T32" style:family="text">
      <style:text-properties style:text-position="0% 100%" officeooo:rsid="00615352"/>
    </style:style>
    <style:style style:name="T33" style:family="text">
      <style:text-properties style:text-position="0% 100%" officeooo:rsid="00621d25"/>
    </style:style>
    <style:style style:name="T34" style:family="text">
      <style:text-properties officeooo:rsid="00697158"/>
    </style:style>
    <style:style style:name="T35" style:family="text">
      <style:text-properties officeooo:rsid="006c0717"/>
    </style:style>
    <style:style style:name="T36" style:family="text">
      <style:text-properties style:text-position="0% 100%" officeooo:rsid="006c0717"/>
    </style:style>
    <style:style style:name="T37" style:family="text">
      <style:text-properties fo:font-weight="bold" officeooo:rsid="004b6835" style:font-weight-asian="bold" style:font-weight-complex="bold"/>
    </style:style>
    <style:style style:name="T38" style:family="text">
      <style:text-properties fo:font-weight="bold" officeooo:rsid="0028636d" style:font-weight-asian="bold" style:font-weight-complex="bold"/>
    </style:style>
    <style:style style:name="T39" style:family="text">
      <style:text-properties officeooo:rsid="0079b2f7"/>
    </style:style>
    <style:style style:name="T40" style:family="text">
      <style:text-properties officeooo:rsid="002af18b"/>
    </style:style>
    <style:style style:name="T41" style:family="text">
      <style:text-properties officeooo:rsid="0031ac98"/>
    </style:style>
    <style:style style:name="T42" style:family="text">
      <style:text-properties fo:font-weight="bold" officeooo:rsid="003a877b" style:font-weight-asian="bold" style:font-weight-complex="bold"/>
    </style:style>
    <style:style style:name="T43" style:family="text">
      <style:text-properties officeooo:rsid="008d1351"/>
    </style:style>
    <style:style style:name="T44" style:family="text">
      <style:text-properties officeooo:rsid="003b4b4b"/>
    </style:style>
    <style:style style:name="T45" style:family="text">
      <style:text-properties fo:font-weight="bold" officeooo:rsid="003c4608" style:font-weight-asian="bold" style:font-weight-complex="bold"/>
    </style:style>
    <style:style style:name="T46" style:family="text">
      <style:text-properties fo:color="#008000" loext:opacity="100%"/>
    </style:style>
    <style:style style:name="T47" style:family="text">
      <style:text-properties fo:color="#0000ff" loext:opacity="100%"/>
    </style:style>
    <style:style style:name="T48" style:family="text">
      <style:text-properties fo:color="#000000" loext:opacity="100%"/>
    </style:style>
    <style:style style:name="T49" style:family="text">
      <style:text-properties fo:color="#a31515" loext:opacity="100%"/>
    </style:style>
    <style:style style:name="T50" style:family="text">
      <style:text-properties fo:color="#000000" loext:opacity="100%" fo:font-style="normal" style:text-underline-style="none" fo:font-weight="normal"/>
    </style:style>
    <style:style style:name="T51" style:family="text">
      <style:text-properties fo:color="#a31515" loext:opacity="100%" officeooo:rsid="008d1351"/>
    </style:style>
    <style:style style:name="T52" style:family="text">
      <style:text-properties fo:color="#008000" loext:opacity="100%" officeooo:rsid="007aee2f"/>
    </style:style>
    <style:style style:name="T53" style:family="text">
      <style:text-properties officeooo:rsid="00829329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4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1.344cm, 0.727cm, 0.848cm, 0.242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space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space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space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space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none" style:vertical-pos="from-top" style:vertical-rel="paragraph" style:horizontal-pos="center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Таблица"/>
        <text:sequence-decl text:display-outline-level="0" text:name="Рисунок"/>
      </text:sequence-decls>
      <text:p text:style-name="P1">Министерство науки и высшего образования Российской Федерации</text:p>
      <text:p text:style-name="P2"><text:span text:style-name="T1">ФЕДЕРАЛЬНОЕ </text:span>ГОСУДАРСТВЕННОЕ АВТОНОМНОЕ ОБРАЗОВАТЕЛЬНОЕ</text:p>
      <text:p text:style-name="P3">УЧРЕЖДЕНИЕ ВЫСШЕГО ОБРАЗОВАНИЯ</text:p>
      <text:p text:style-name="P4">НАЦИОНАЛЬНЫЙ ИССЛЕДОВАТЕЛЬСКИЙ УНИВЕРСИТЕТ ИТМО</text:p>
      <text:p text:style-name="P4"/>
      <text:p text:style-name="P4"/>
      <text:p text:style-name="P3">Факультет безопасности информационных технологий</text:p>
      <text:p text:style-name="P3"/>
      <text:p text:style-name="P3">Дисциплина:</text:p>
      <text:p text:style-name="P3">«<text:span text:style-name="T2">Алгоритмы и структуры данных</text:span>»</text:p>
      <text:p text:style-name="P3"/>
      <text:p text:style-name="P3"/>
      <text:p text:style-name="P3">ОТЧ<text:span text:style-name="T3">Ё</text:span>Т ПО ЛАБОРАТОРНОЙ РАБОТЕ <text:span text:style-name="T4">№</text:span><text:span text:style-name="T2">0</text:span></text:p>
      <text:p text:style-name="P3">«<text:span text:style-name="T2">Решение уравнения 6 степени</text:span>»</text:p>
      <text:p text:style-name="P3"/>
      <text:p text:style-name="P5">Выполнил:</text:p>
      <text:p text:style-name="P5">Пахомов Владимир Юрьевич, студент группы N3250</text:p>
      <text:p text:style-name="P5"/>
      <text:p text:style-name="P6"/>
      <text:p text:style-name="P7">________________</text:p>
      <text:p text:style-name="P8">(подпись)</text:p>
      <text:p text:style-name="P5"/>
      <text:p text:style-name="P5">Проверил:</text:p>
      <text:p text:style-name="P9">Ерофеев Сергей Анатольевич</text:p>
      <text:p text:style-name="P10"/>
      <text:p text:style-name="P10"/>
      <text:p text:style-name="P11">_____________________</text:p>
      <text:p text:style-name="P12">(отметка о выполнении)</text:p>
      <text:p text:style-name="P11"/>
      <text:p text:style-name="P11"/>
      <text:p text:style-name="P11">________________</text:p>
      <text:p text:style-name="P13">(подпись)</text:p>
      <text:p text:style-name="P2"/>
      <text:p text:style-name="P2"/>
      <text:p text:style-name="P14">Санкт-Петербург</text:p>
      <text:p text:style-name="P14">202<text:span text:style-name="T5">6</text:span>.</text:p>
      <text:h text:style-name="P15" text:outline-level="1"><text:bookmark-start text:name="__RefHeading___Toc80_2058273410"/>СОДЕРЖАНИЕ<text:bookmark-end text:name="__RefHeading___Toc80_2058273410"/></text:h>
      <text:p text:style-name="P16"/>
      <text:table-of-content text:style-name="Sect1" text:name="Оглавление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7"><text:a xlink:type="simple" xlink:href="#__RefHeading___Toc80_2058273410" office:name="СОДЕРЖАНИЕ" text:style-name="Index_20_Link" text:visited-style-name="Index_20_Link">СОДЕРЖАНИЕ<text:tab/>2</text:a></text:p>
          <text:p text:style-name="P17"><text:a xlink:type="simple" xlink:href="#__RefHeading___Toc82_2058273410" office:name="ВВЕДЕНИЕ" text:style-name="Index_20_Link" text:visited-style-name="Index_20_Link">ВВЕДЕНИЕ<text:tab/>3</text:a></text:p>
          <text:p text:style-name="P17"><text:a xlink:type="simple" xlink:href="#__RefHeading___Toc143_2058273410%20Copy%201%20Copy%203" office:name="1. АЛГОРИТМ РЕШЕНИЯ УРАВНЕНИЯ" text:style-name="Index_20_Link" text:visited-style-name="Index_20_Link">1. АЛГОРИТМ РЕШЕНИЯ УРАВНЕНИЯ<text:tab/>4</text:a></text:p>
          <text:p text:style-name="P17"><text:a xlink:type="simple" xlink:href="#__RefHeading___Toc143_2058273410%20Copy%201" office:name="2. ОПИСАНИЕ ИСПОЛЬЗУЕМЫХ ПЕРЕМЕННЫХ" text:style-name="Index_20_Link" text:visited-style-name="Index_20_Link">2. ОПИСАНИЕ ИСПОЛЬЗУЕМЫХ ПЕРЕМЕННЫХ<text:tab/>7</text:a></text:p>
          <text:p text:style-name="P17"><text:a xlink:type="simple" xlink:href="#__RefHeading___Toc143_2058273410%20Copy%201%20Copy%202" office:name="3. БЛОК СХЕМА АЛГОРИТМА" text:style-name="Index_20_Link" text:visited-style-name="Index_20_Link">3. БЛОК СХЕМА АЛГОРИТМА<text:tab/>10</text:a></text:p>
          <text:p text:style-name="P17"><text:a xlink:type="simple" xlink:href="#__RefHeading___Toc143_2058273410%20Copy%201%20Copy%202%20Copy%201" office:name="4. ТЕСТИРОВАНИЕ АЛГОРИТМА" text:style-name="Index_20_Link" text:visited-style-name="Index_20_Link">4. ТЕСТИРОВАНИЕ АЛГОРИТМА<text:tab/>11</text:a></text:p>
          <text:p text:style-name="P17"><text:a xlink:type="simple" xlink:href="#__RefHeading___Toc143_2058273410%20Copy%201%20Copy%202%20Copy%202" office:name="5. ИСХОДНЫЙ КОД АЛГОРИТМА" text:style-name="Index_20_Link" text:visited-style-name="Index_20_Link">5. ИСХОДНЫЙ КОД АЛГОРИТМА<text:tab/>14</text:a></text:p>
          <text:p text:style-name="P17"><text:a xlink:type="simple" xlink:href="#__RefHeading___Toc143_2058273410%20Copy%201%20Copy%202%20Copy%206" office:name="ЗАКЛЮЧЕНИЕ" text:style-name="Index_20_Link" text:visited-style-name="Index_20_Link">ЗАКЛЮЧЕНИЕ<text:tab/>21</text:a></text:p>
          <text:p text:style-name="P17"><text:a xlink:type="simple" xlink:href="#__RefHeading___Toc143_2058273410%20Copy%201%20Copy%202%20Copy%207" office:name="ПРИЛОЖЕНИЕ А" text:style-name="Index_20_Link" text:visited-style-name="Index_20_Link">ПРИЛОЖЕНИЕ А<text:tab/>22</text:a></text:p>
        </text:index-body>
      </text:table-of-content>
      <text:p text:style-name="P16"/>
      <text:h text:style-name="P18" text:outline-level="1"><text:bookmark-start text:name="__RefHeading___Toc82_2058273410"/>ВВЕДЕНИЕ<text:bookmark-end text:name="__RefHeading___Toc82_2058273410"/></text:h>
      <text:p text:style-name="P19"><text:span text:style-name="T6">Цель работы</text:span> — <text:span text:style-name="T2">разработать программу для нахождения корней уравнения 6 степени вида:</text:span></text:p>
      <text:p text:style-name="P20"><draw:frame text:anchor-type="paragraph" draw:z-index="0" draw:name="Shape1" draw:style-name="gr1" draw:text-style-name="P21" svg:width="12.565cm" svg:height="0.486cm" svg:x="2.013cm" svg:y="-0.279cm"><draw:image xlink:href="Pictures/1000CC3A000028E700000195A1680585.svg" xlink:type="simple" xlink:show="embed" xlink:actuate="onLoad" draw:mime-type="image/svg+xml"><text:p/></draw:image><draw:image xlink:href="Pictures/100000010000018C0000000F3458F1AB.png" xlink:type="simple" xlink:show="embed" xlink:actuate="onLoad" draw:mime-type="image/png"/><svg:title>TexMaths</svg:title><svg:desc>12§display§ax^6 + bx^5 + cx^4 + dx^3 + nx^2 + mx + k = 0, \qquad a,b,c,d,n,m,k \in \mathbb{R}§svg§600§FALSE§</svg:desc></draw:frame>Для нахождения корней нужно использовать сле<text:span text:style-name="T7">д</text:span>ующий алгоритм:</text:p>
      <text:list text:style-name="L1">
        <text:list-item>
          <text:p text:style-name="P22">при a ≠ 0 найти первый корень методом касательных;</text:p>
        </text:list-item>
        <text:list-item>
          <text:p text:style-name="P22">при a = 0, b ≠ 0 найти первый корень методом хорд;</text:p>
        </text:list-item>
        <text:list-item>
          <text:p text:style-name="P22">при a = 0, b = 0, c ≠ 0 найти первый корень комбинированным методом хорд и касательных;</text:p>
        </text:list-item>
        <text:list-item>
          <text:p text:style-name="P22">при a = 0, b = 0, c = 0, d ≠ 0 найти три корня методом Кардано;</text:p>
        </text:list-item>
        <text:list-item>
          <text:p text:style-name="P22">при a = 0, b = 0, c = 0, d = 0, <text:span text:style-name="T8">n</text:span> ≠ 0 найти два корня методом Виета;</text:p>
        </text:list-item>
        <text:list-item>
          <text:p text:style-name="P22">при a = 0, b = 0, c = 0, d = 0, <text:span text:style-name="T8">n</text:span> = 0, <text:span text:style-name="T8">m</text:span> ≠ 0 найти корень, равный -<text:span text:style-name="T8">k</text:span> / <text:span text:style-name="T8">m</text:span>;</text:p>
        </text:list-item>
        <text:list-item>
          <text:p text:style-name="P22">при a = 0, b = 0, c = 0, d = 0, <text:span text:style-name="T8">n</text:span> = 0, <text:span text:style-name="T8">m</text:span> = 0, <text:span text:style-name="T8">k</text:span> ≠ 0 вывести, что решений нет;</text:p>
        </text:list-item>
        <text:list-item>
          <text:p text:style-name="P22">при a = 0, b = 0, c = 0, d = 0, <text:span text:style-name="T8">n</text:span> = 0, <text:span text:style-name="T8">m</text:span> = 0, <text:span text:style-name="T8">k</text:span> = 0 вывести, что x является любым числом.</text:p>
        </text:list-item>
      </text:list>
      <text:p text:style-name="P20">После нахождения каждого корня степень уравнения понижается при помощи схемы Горнера. Получившееся после понижения степени уравнение решается по <text:span text:style-name="T8">такому</text:span> же алгоритму.</text:p>
      <text:h text:style-name="P23" text:outline-level="1"><text:bookmark-start text:name="__RefHeading___Toc143_2058273410 Copy 1 Copy 3"/><text:span text:style-name="T9">1. </text:span><text:span text:style-name="T10">АЛГОРИТМ РЕШЕНИЯ УРАВНЕНИЯ</text:span><text:bookmark-end text:name="__RefHeading___Toc143_2058273410 Copy 1 Copy 3"/></text:h>
      <text:p text:style-name="P24"><draw:frame text:anchor-type="paragraph" draw:z-index="8" draw:name="Shape 1" draw:style-name="gr1" draw:text-style-name="P21" svg:width="12.565cm" svg:height="0.486cm" svg:x="2.013cm" svg:y="-0.111cm"><draw:image xlink:href="Pictures/1000CC3A000028E700000195A1680585.svg" xlink:type="simple" xlink:show="embed" xlink:actuate="onLoad" draw:mime-type="image/svg+xml"><text:p/></draw:image><draw:image xlink:href="Pictures/100000010000018C0000000F3458F1AB.png" xlink:type="simple" xlink:show="embed" xlink:actuate="onLoad" draw:mime-type="image/png"/><svg:title>TexMaths</svg:title><svg:desc>12§display§ax^6 + bx^5 + cx^4 + dx^3 + nx^2 + mx + k = 0, \qquad a,b,c,d,n,m,k \in \mathbb{R}§svg§600§FALSE§</svg:desc></draw:frame>1) Проверка коэффициентов:</text:p>
      <text:list text:style-name="L2">
        <text:list-item>
          <text:p text:style-name="P25">если a ≠ 0, то уравнение степени 6. Ищем интервал с корнем;</text:p>
        </text:list-item>
        <text:list-item>
          <text:p text:style-name="P26">если a = 0, b ≠ 0, то уравнение степени 5. Ищем интервал с корнем;</text:p>
        </text:list-item>
        <text:list-item>
          <text:p text:style-name="P26">если a = 0, b = 0, c ≠ 0, то уравнение степени 4. Ищем интервал с корнем;</text:p>
        </text:list-item>
        <text:list-item>
          <text:p text:style-name="P26">если a = 0, b = 0, c = 0, d ≠ 0, то уравнение степени 3. Используем метод Кардано<text:span text:style-name="T11">;</text:span></text:p>
        </text:list-item>
        <text:list-item>
          <text:p text:style-name="P26">если a = 0, b = 0, c = 0, d = 0, n ≠ 0, уравнение степени<text:span text:style-name="T11"> 2. Используем теорему Виета.</text:span></text:p>
        </text:list-item>
      </text:list>
      <text:p text:style-name="P24">2) Поиск интервала<text:span text:style-name="T11">:</text:span></text:p>
      <text:p text:style-name="P27">Для начала нужно определить границы, в которых будет искаться корень. Для этого используем теорему Коши, которая гласит, что корни находятся внутри промежутка [-R; R], где R:</text:p>
      <text:p text:style-name="P28"><draw:frame text:anchor-type="char" draw:z-index="9" draw:name="Shape2" draw:style-name="gr2" draw:text-style-name="P21" svg:width="5.238cm" svg:height="0.99cm" svg:x="5.798cm" svg:y="-0.118cm"><draw:image xlink:href="Pictures/100059B60000110C000003380D7AA637.svg" xlink:type="simple" xlink:show="embed" xlink:actuate="onLoad" draw:mime-type="image/svg+xml"><text:p/></draw:image><draw:image xlink:href="Pictures/10000001000000A50000001F92F6D6B3.png" xlink:type="simple" xlink:show="embed" xlink:actuate="onLoad" draw:mime-type="image/png"/><svg:title>TexMaths</svg:title><svg:desc>12§display§R = 1 + \frac{max(|a_{n-1}| \dots|a_0|)}{a_n}§svg§600§FALSE§</svg:desc></draw:frame>Далее нужно разбить этот диапазон на мелкие отрезки, например на <text:s/><text:span text:style-name="T12"><draw:frame text:anchor-type="as-char" svg:y="-0.6cm" draw:z-index="10" draw:name="Shape3" draw:style-name="gr3" draw:text-style-name="P21" svg:width="1.087cm" svg:height="0.902cm"><draw:image xlink:href="Pictures/10001BD400000389000002F1E91541E0.svg" xlink:type="simple" xlink:show="embed" xlink:actuate="onLoad" draw:mime-type="image/svg+xml"><text:p/></draw:image><draw:image xlink:href="Pictures/10000001000000220000001CE92F8AB4.png" xlink:type="simple" xlink:show="embed" xlink:actuate="onLoad" draw:mime-type="image/png"/><svg:title>TexMaths</svg:title><svg:desc>12§display§\frac{R}{10000}§svg§600§FALSE§</svg:desc></draw:frame></text:span><text:span text:style-name="T13">, и потом идём по ним, пока не найдём две соседние точки, в которых значения функции </text:span><text:span text:style-name="T13"><draw:frame text:anchor-type="as-char" svg:y="-0.314cm" draw:z-index="41" draw:name="Shape4" draw:style-name="gr3" draw:text-style-name="P21" svg:width="0.757cm" svg:height="0.421cm"><draw:image xlink:href="Pictures/100012A6000002760000015F7D6E9EFA.svg" xlink:type="simple" xlink:show="embed" xlink:actuate="onLoad" draw:mime-type="image/svg+xml"><text:p/></draw:image><draw:image xlink:href="Pictures/10000001000000180000000D168F30B3.png" xlink:type="simple" xlink:show="embed" xlink:actuate="onLoad" draw:mime-type="image/png"/><svg:title>TexMaths</svg:title><svg:desc>12§display§f(x)§svg§600§FALSE§</svg:desc></draw:frame></text:span><text:span text:style-name="T13"><text:s/>различаются (условие Больцано-Коши).</text:span></text:p>
      <text:p text:style-name="P29">3) <text:span text:style-name="T14">Метод касательных</text:span></text:p>
      <text:p text:style-name="P30">Для корня полинома 6 степени используется метод касательных. Это итерационный метод, где следующее приближение<text:span text:style-name="T15"> </text:span><text:span text:style-name="T12"><draw:frame text:anchor-type="as-char" svg:y="-0.205cm" draw:z-index="22" draw:name="Shape4" draw:style-name="gr3" draw:text-style-name="P21" svg:width="0.865cm" svg:height="0.317cm"><draw:image xlink:href="Pictures/100013B8000002D300000108F39CB317.svg" xlink:type="simple" xlink:show="embed" xlink:actuate="onLoad" draw:mime-type="image/svg+xml"><text:p/></draw:image><draw:image xlink:href="Pictures/100000010000001B0000000A3DEC7E3A.png" xlink:type="simple" xlink:show="embed" xlink:actuate="onLoad" draw:mime-type="image/png"/><svg:title>TexMaths</svg:title><svg:desc>12§display§x_{n+1}§svg§600§FALSE§</svg:desc></draw:frame></text:span><text:span text:style-name="T12"><text:s/>находится как точка пересечения касательной к графику функции в точке </text:span><text:span text:style-name="T12"><draw:frame text:anchor-type="as-char" svg:y="-0.21cm" draw:z-index="23" draw:name="Shape5" draw:style-name="gr3" draw:text-style-name="P21" svg:width="0.452cm" svg:height="0.283cm"><draw:image xlink:href="Pictures/10000F5C0000017B000000EDE140E6D6.svg" xlink:type="simple" xlink:show="embed" xlink:actuate="onLoad" draw:mime-type="image/svg+xml"><text:p/></draw:image><draw:image xlink:href="Pictures/100000010000000E000000093063498A.png" xlink:type="simple" xlink:show="embed" xlink:actuate="onLoad" draw:mime-type="image/png"/><svg:title>TexMaths</svg:title><svg:desc>12§display§x_n
§svg§600§FALSE§</svg:desc></draw:frame></text:span><text:span text:style-name="T12"><text:s/>с осью абсцисс.</text:span></text:p>
      <text:p text:style-name="P31">Формула<text:span text:style-name="T16">: </text:span><text:s/><draw:frame text:anchor-type="as-char" svg:y="-0.601cm" draw:z-index="11" draw:name="Shape4" draw:style-name="gr3" draw:text-style-name="P21" svg:width="3.652cm" svg:height="0.996cm"><draw:image xlink:href="Pictures/1000599F00000BE40000033E15EA6173.svg" xlink:type="simple" xlink:show="embed" xlink:actuate="onLoad" draw:mime-type="image/svg+xml"><text:p/></draw:image><draw:image xlink:href="Pictures/10000001000000730000001FC2F72DEF.png" xlink:type="simple" xlink:show="embed" xlink:actuate="onLoad" draw:mime-type="image/png"/><svg:title>TexMaths</svg:title><svg:desc>12§display§x_{n+1} = x_n - \frac{f(x_n)}{f'(x_n)}§svg§600§FALSE§</svg:desc></draw:frame></text:p>
      <text:p text:style-name="P32">После завершения метода переходим к пункту 4.</text:p>
      <text:p text:style-name="P32"/>
      <text:p text:style-name="P33">4) Метод хорд</text:p>
      <text:p text:style-name="P34">Для нахождения полинома 5 степени используется метод хорд. Вместо касательной используется хорда, проведённая через концы интервала <text:span text:style-name="T12"><draw:frame text:anchor-type="as-char" svg:y="-0.314cm" draw:z-index="21" draw:name="Shape6" draw:style-name="gr3" draw:text-style-name="P21" svg:width="0.657cm" svg:height="0.421cm"><draw:image xlink:href="Pictures/10000D7D000002240000015FE7C144D2.svg" xlink:type="simple" xlink:show="embed" xlink:actuate="onLoad" draw:mime-type="image/svg+xml"><text:p/></draw:image><draw:image xlink:href="Pictures/10000001000000150000000D3BD5BE2B.png" xlink:type="simple" xlink:show="embed" xlink:actuate="onLoad" draw:mime-type="image/png"/><svg:title>TexMaths</svg:title><svg:desc>12§display§[l, r]§svg§600§FALSE§</svg:desc></draw:frame></text:span>, на котором функция меняет знак. Корень ищется как точка пересечения этой хорды с осью OX.</text:p>
      <text:p text:style-name="P35">Формула: <text:s/><text:span text:style-name="T12"><draw:frame text:anchor-type="as-char" svg:y="-0.619cm" draw:z-index="12" draw:name="Shape5" draw:style-name="gr3" draw:text-style-name="P21" svg:width="3.719cm" svg:height="1.027cm"><draw:image xlink:href="Pictures/10004D9800000C1D00000359AAFF31CA.svg" xlink:type="simple" xlink:show="embed" xlink:actuate="onLoad" draw:mime-type="image/svg+xml"><text:p/></draw:image><draw:image xlink:href="Pictures/10000001000000750000002012A757F3.png" xlink:type="simple" xlink:show="embed" xlink:actuate="onLoad" draw:mime-type="image/png"/><svg:title>TexMaths</svg:title><svg:desc>12§display§x = l - \frac{f(l) \cdot (r - l)}{f(r) - f(l)}§svg§600§FALSE§</svg:desc></draw:frame></text:span></text:p>
      <text:p text:style-name="P36"><text:soft-page-break/>Если значение <text:span text:style-name="T12"><draw:frame text:anchor-type="as-char" svg:y="-0.339cm" draw:z-index="13" draw:name="Shape6" draw:style-name="gr3" draw:text-style-name="P21" svg:width="2.177cm" svg:height="0.452cm"><draw:image xlink:href="Pictures/1000229A000007160000017A246797EF.svg" xlink:type="simple" xlink:show="embed" xlink:actuate="onLoad" draw:mime-type="image/svg+xml"><text:p/></draw:image><draw:image xlink:href="Pictures/10000001000000450000000E666B8D38.png" xlink:type="simple" xlink:show="embed" xlink:actuate="onLoad" draw:mime-type="image/png"/><svg:title>TexMaths</svg:title><svg:desc>12§display§|f(r) - f(l)|§svg§600§FALSE§</svg:desc></draw:frame></text:span><text:s/>близко к нулю<text:span text:style-name="T17"> или </text:span>, то сдвигаем промежуток <text:span text:style-name="T12"><draw:frame text:anchor-type="as-char" svg:y="-0.296cm" draw:z-index="14" draw:name="Shape7" draw:style-name="gr3" draw:text-style-name="P21" svg:width="0.089cm" svg:height="0.297cm"><draw:image xlink:href="Pictures/100005380000004B000000F8437DAD37.svg" xlink:type="simple" xlink:show="embed" xlink:actuate="onLoad" draw:mime-type="image/svg+xml"><text:p/></draw:image><draw:image xlink:href="Pictures/10000001000000030000000969796215.png" xlink:type="simple" xlink:show="embed" xlink:actuate="onLoad" draw:mime-type="image/png"/><svg:title>TexMaths</svg:title><svg:desc>12§display§l§svg§600§FALSE§</svg:desc></draw:frame></text:span><text:span text:style-name="T17"><text:s/>на </text:span><text:span text:style-name="T18"><draw:frame text:anchor-type="as-char" svg:y="-0.183cm" draw:z-index="15" draw:name="Shape8" draw:style-name="gr3" draw:text-style-name="P21" svg:width="0.565cm" svg:height="0.267cm"><draw:image xlink:href="Pictures/10001067000001D8000000E036ABAD2F.svg" xlink:type="simple" xlink:show="embed" xlink:actuate="onLoad" draw:mime-type="image/svg+xml"><text:p/></draw:image><draw:image xlink:href="Pictures/100000010000001200000008116B6C48.png" xlink:type="simple" xlink:show="embed" xlink:actuate="onLoad" draw:mime-type="image/png"/><svg:title>TexMaths</svg:title><svg:desc>12§display§eps§svg§600§FALSE§</svg:desc></draw:frame></text:span><text:span text:style-name="T17"><text:s/>вправо.</text:span></text:p>
      <text:p text:style-name="P37">Если значение функции <text:span text:style-name="T12"><draw:frame text:anchor-type="as-char" svg:y="-0.314cm" draw:z-index="16" draw:name="Shape9" draw:style-name="gr3" draw:text-style-name="P21" svg:width="0.757cm" svg:height="0.421cm"><draw:image xlink:href="Pictures/100012A6000002760000015F7D6E9EFA.svg" xlink:type="simple" xlink:show="embed" xlink:actuate="onLoad" draw:mime-type="image/svg+xml"><text:p/></draw:image><draw:image xlink:href="Pictures/10000001000000180000000D168F30B3.png" xlink:type="simple" xlink:show="embed" xlink:actuate="onLoad" draw:mime-type="image/png"/><svg:title>TexMaths</svg:title><svg:desc>12§display§f(x)
§svg§600§FALSE§</svg:desc></draw:frame></text:span><text:s/>меньше заданной точности <text:span text:style-name="T12"><draw:frame text:anchor-type="as-char" svg:y="-0.183cm" draw:z-index="17" draw:name="Shape10" draw:style-name="gr3" draw:text-style-name="P21" svg:width="0.565cm" svg:height="0.267cm"><draw:image xlink:href="Pictures/10001067000001D8000000E036ABAD2F.svg" xlink:type="simple" xlink:show="embed" xlink:actuate="onLoad" draw:mime-type="image/svg+xml"><text:p/></draw:image><draw:image xlink:href="Pictures/100000010000001200000008116B6C48.png" xlink:type="simple" xlink:show="embed" xlink:actuate="onLoad" draw:mime-type="image/png"/><svg:title>TexMaths</svg:title><svg:desc>12§display§eps§svg§600§FALSE§</svg:desc></draw:frame></text:span>, то возвращаем корень. Если на данном шаге требуемая точность ещё не достигнута, то сужаем интервал по следующему условию:</text:p>
      <text:list text:style-name="L3">
        <text:list-item>
          <text:p text:style-name="P38">если<text:span text:style-name="T15"> </text:span><text:span text:style-name="T19"><draw:frame text:anchor-type="as-char" svg:y="-0.339cm" draw:z-index="18" draw:name="Shape11" draw:style-name="gr3" draw:text-style-name="P21" svg:width="2.567cm" svg:height="0.452cm"><draw:image xlink:href="Pictures/100026A70000085B0000017AB80CCB20.svg" xlink:type="simple" xlink:show="embed" xlink:actuate="onLoad" draw:mime-type="image/svg+xml"><text:p/></draw:image><draw:image xlink:href="Pictures/10000001000000510000000EB952C413.png" xlink:type="simple" xlink:show="embed" xlink:actuate="onLoad" draw:mime-type="image/png"/><svg:title>TexMaths</svg:title><svg:desc>12§display§f(l) \cdot f(r) &lt; 0§svg§600§FALSE§</svg:desc></draw:frame></text:span><text:span text:style-name="T20">, то </text:span><text:span text:style-name="T21"><draw:frame text:anchor-type="as-char" svg:y="-0.191cm" draw:z-index="19" draw:name="Shape12" draw:style-name="gr3" draw:text-style-name="P21" svg:width="0.974cm" svg:height="0.191cm"><draw:image xlink:href="Pictures/10000F540000032C0000009F9F24DA99.svg" xlink:type="simple" xlink:show="embed" xlink:actuate="onLoad" draw:mime-type="image/svg+xml"><text:p/></draw:image><draw:image xlink:href="Pictures/100000010000001F00000006115A7A72.png" xlink:type="simple" xlink:show="embed" xlink:actuate="onLoad" draw:mime-type="image/png"/><svg:title>TexMaths</svg:title><svg:desc>12§display§r = x§svg§600§FALSE§</svg:desc></draw:frame></text:span></text:p>
        </text:list-item>
        <text:list-item>
          <text:p text:style-name="P38">иначе <text:span text:style-name="T12"><draw:frame text:anchor-type="as-char" svg:y="-0.296cm" draw:z-index="20" draw:name="Shape13" draw:style-name="gr3" draw:text-style-name="P21" svg:width="0.9cm" svg:height="0.297cm"><draw:image xlink:href="Pictures/10000DE6000002EE000000F8CF2DC543.svg" xlink:type="simple" xlink:show="embed" xlink:actuate="onLoad" draw:mime-type="image/svg+xml"><text:p/></draw:image><draw:image xlink:href="Pictures/100000010000001C00000009B99F47D4.png" xlink:type="simple" xlink:show="embed" xlink:actuate="onLoad" draw:mime-type="image/png"/><svg:title>TexMaths</svg:title><svg:desc>12§display§l = x§svg§600§FALSE§</svg:desc></draw:frame></text:span></text:p>
        </text:list-item>
      </text:list>
      <text:p text:style-name="P39">После завершения <text:span text:style-name="T14">метода</text:span> переходим к пункту 5.</text:p>
      <text:p text:style-name="P39"/>
      <text:p text:style-name="P33">5) Комбинированный метод (метод хорд и касательных)</text:p>
      <text:p text:style-name="P40">Для нахождения корня полинома степени 4 используется комбинированный метод. Этот метод приближается к корню сразу с двух сторон. С одной стороны применяется метод касательных, с другой <text:span text:style-name="T22">–</text:span> метод хорд. <text:span text:style-name="T23">Для определения с какой стороны использовать хорду, а с какой касательную, используется условие </text:span><text:span text:style-name="T24"><draw:frame text:anchor-type="as-char" svg:y="-0.363cm" draw:z-index="24" draw:name="Shape14" draw:style-name="gr3" draw:text-style-name="P21" svg:width="2.927cm" svg:height="0.477cm"><draw:image xlink:href="Pictures/10002F54000009880000018DF93EBA98.svg" xlink:type="simple" xlink:show="embed" xlink:actuate="onLoad" draw:mime-type="image/svg+xml"><text:p/></draw:image><draw:image xlink:href="Pictures/100000010000005C0000000FD3628E8F.png" xlink:type="simple" xlink:show="embed" xlink:actuate="onLoad" draw:mime-type="image/png"/><svg:title>TexMaths</svg:title><svg:desc>12§display§f(x) \cdot f''(x) &gt; 0§svg§600§FALSE§</svg:desc></draw:frame></text:span><text:span text:style-name="T25">.</text:span></text:p>
      <text:p text:style-name="P32">После выполнения метода переходим к пункту 6.</text:p>
      <text:p text:style-name="P41"/>
      <text:p text:style-name="P42">6) Метод Кардано</text:p>
      <text:p text:style-name="P43">Для нахождения корней полинома степени 3 используется метод Кардано. Для начала уравнение приводится к каноническому виду <text:span text:style-name="T12"><draw:frame text:anchor-type="as-char" svg:y="-0.37cm" draw:z-index="25" draw:name="Shape15" draw:style-name="gr3" draw:text-style-name="P21" svg:width="2.821cm" svg:height="0.456cm"><draw:image xlink:href="Pictures/10002BA8000009310000017D95612C72.svg" xlink:type="simple" xlink:show="embed" xlink:actuate="onLoad" draw:mime-type="image/svg+xml"><text:p/></draw:image><draw:image xlink:href="Pictures/10000001000000590000000EEE4F7834.png" xlink:type="simple" xlink:show="embed" xlink:actuate="onLoad" draw:mime-type="image/png"/><svg:title>TexMaths</svg:title><svg:desc>12§display§y^3 + py + q = 0§svg§600§FALSE§</svg:desc></draw:frame></text:span><text:span text:style-name="T26">, затем вычисляется дискриминант </text:span><text:span text:style-name="T27"><text:s/></text:span><text:span text:style-name="T26"><draw:frame text:anchor-type="as-char" svg:y="-0.601cm" draw:z-index="26" draw:name="Shape16" draw:style-name="gr3" draw:text-style-name="P21" svg:width="3.394cm" svg:height="0.907cm"><draw:image xlink:href="Pictures/1000391300000B0C000002F445BFC906.svg" xlink:type="simple" xlink:show="embed" xlink:actuate="onLoad" draw:mime-type="image/svg+xml"><text:p/></draw:image><draw:image xlink:href="Pictures/100000010000006B0000001DDDF1946F.png" xlink:type="simple" xlink:show="embed" xlink:actuate="onLoad" draw:mime-type="image/png"/><svg:title>TexMaths</svg:title><svg:desc>12§display§Q = \Big(\frac{p}{3}\Big) ^ 3 + \Big(\frac{q}{2}\Big)^2§svg§600§FALSE§</svg:desc></draw:frame></text:span><text:span text:style-name="T26">. Дальше проверяем условия:</text:span></text:p>
      <text:list text:style-name="L4">
        <text:list-item>
          <text:p text:style-name="P44">если <text:span text:style-name="T12"><draw:frame text:anchor-type="as-char" svg:y="-0.295cm" draw:z-index="27" draw:name="Shape17" draw:style-name="gr3" draw:text-style-name="P21" svg:width="1.07cm" svg:height="0.38cm"><draw:image xlink:href="Pictures/10000DE20000037B0000013CA484DD91.svg" xlink:type="simple" xlink:show="embed" xlink:actuate="onLoad" draw:mime-type="image/svg+xml"><text:p/></draw:image><draw:image xlink:href="Pictures/10000001000000220000000CF902CC1B.png" xlink:type="simple" xlink:show="embed" xlink:actuate="onLoad" draw:mime-type="image/png"/><svg:title>TexMaths</svg:title><svg:desc>12§display§Q &gt; 0§svg§600§FALSE§</svg:desc></draw:frame></text:span><text:span text:style-name="T12">, то находим единственный вещественный корень </text:span><text:span text:style-name="T12"><draw:frame text:anchor-type="as-char" svg:y="-0.693cm" draw:z-index="28" draw:name="Shape18" draw:style-name="gr3" draw:text-style-name="P21" svg:width="6.021cm" svg:height="1.045cm"><draw:image xlink:href="Pictures/100044900000139A00000366AB06B0F5.svg" xlink:type="simple" xlink:show="embed" xlink:actuate="onLoad" draw:mime-type="image/svg+xml"><text:p/></draw:image><draw:image xlink:href="Pictures/10000001000000BE00000021FD1C07A9.png" xlink:type="simple" xlink:show="embed" xlink:actuate="onLoad" draw:mime-type="image/png"/><svg:title>TexMaths</svg:title><svg:desc>12§display§y = \sqrt[3]{\frac{-q}{2} + \sqrt{Q}} + \sqrt[3]{\frac{-q}{2} - \sqrt{Q}}§svg§600§FALSE§</svg:desc></draw:frame></text:span><text:span text:style-name="T27">;</text:span></text:p>
        </text:list-item>
        <text:list-item>
          <text:p text:style-name="P45">если <text:span text:style-name="T12"><draw:frame text:anchor-type="as-char" svg:y="-0.295cm" draw:z-index="29" draw:name="Shape19" draw:style-name="gr3" draw:text-style-name="P21" svg:width="1.07cm" svg:height="0.38cm"><draw:image xlink:href="Pictures/10000D8B0000037B0000013C08D81B4F.svg" xlink:type="simple" xlink:show="embed" xlink:actuate="onLoad" draw:mime-type="image/svg+xml"><text:p/></draw:image><draw:image xlink:href="Pictures/10000001000000220000000CE1352607.png" xlink:type="simple" xlink:show="embed" xlink:actuate="onLoad" draw:mime-type="image/png"/><svg:title>TexMaths</svg:title><svg:desc>12§display§Q = 0§svg§600§FALSE§</svg:desc></draw:frame></text:span><text:span text:style-name="T12">, то находим три вещественных корня, два из которых будут кратными </text:span><text:span text:style-name="T12"><draw:frame text:anchor-type="as-char" svg:y="-0.693cm" draw:z-index="30" draw:name="Shape20" draw:style-name="gr3" draw:text-style-name="P21" svg:width="5.816cm" svg:height="1.045cm"><draw:image xlink:href="Pictures/10004D41000012F1000003664102EF3E.svg" xlink:type="simple" xlink:show="embed" xlink:actuate="onLoad" draw:mime-type="image/svg+xml"><text:p/></draw:image><draw:image xlink:href="Pictures/10000001000000B70000002141E9EA28.png" xlink:type="simple" xlink:show="embed" xlink:actuate="onLoad" draw:mime-type="image/png"/><svg:title>TexMaths</svg:title><svg:desc>12§display§y_1 = 2 \cdot \sqrt[3]{\frac{-q}{2}}, \quad y_{2, 3} = -\sqrt[3]{\frac{-q}{2}}§svg§600§FALSE§</svg:desc></draw:frame></text:span><text:span text:style-name="T27">;</text:span></text:p>
        </text:list-item>
        <text:list-item>
          <text:p text:style-name="P46">если <text:span text:style-name="T12"><draw:frame text:anchor-type="as-char" svg:y="-0.295cm" draw:z-index="31" draw:name="Shape21" draw:style-name="gr3" draw:text-style-name="P21" svg:width="1.07cm" svg:height="0.38cm"><draw:image xlink:href="Pictures/10000DB80000037B0000013C6F2F05B3.svg" xlink:type="simple" xlink:show="embed" xlink:actuate="onLoad" draw:mime-type="image/svg+xml"><text:p/></draw:image><draw:image xlink:href="Pictures/10000001000000220000000CC596CDAF.png" xlink:type="simple" xlink:show="embed" xlink:actuate="onLoad" draw:mime-type="image/png"/><svg:title>TexMaths</svg:title><svg:desc>12§display§Q &lt; 0§svg§600§FALSE§</svg:desc></draw:frame></text:span><text:span text:style-name="T12">, то уравнение имеет три различных вещественных корня</text:span><text:span text:style-name="T28">. Для этого сначала нужно сделать геометрическую подстановку:</text:span></text:p>
        </text:list-item>
      </text:list>
      <text:p text:style-name="P47"><draw:frame text:anchor-type="as-char" svg:y="-0.644cm" draw:z-index="32" draw:name="Shape22" draw:style-name="gr3" draw:text-style-name="P21" svg:width="7.742cm" svg:height="1.364cm"><draw:image xlink:href="Pictures/100066C70000193500000471774944CB.svg" xlink:type="simple" xlink:show="embed" xlink:actuate="onLoad" draw:mime-type="image/svg+xml"><text:p/></draw:image><draw:image xlink:href="Pictures/10000001000000F40000002B55AE7F30.png" xlink:type="simple" xlink:show="embed" xlink:actuate="onLoad" draw:mime-type="image/png"/><svg:title>TexMaths</svg:title><svg:desc>12§display§\varphi = \arccos \Big( - \frac{q}{2\cdot\sqrt{-\frac{p^3}{27}}} \Big), \quad t = 2 \cdot \sqrt{-\frac{p}{3}}§svg§600§FALSE§</svg:desc></draw:frame></text:p>
      <text:p text:style-name="P48"><draw:frame text:anchor-type="as-char" svg:y="-0.572cm" draw:z-index="33" draw:name="Shape23" draw:style-name="gr3" draw:text-style-name="P21" svg:width="11.586cm" svg:height="0.869cm"><draw:image xlink:href="Pictures/1000AF8D000025B6000002D52D25CCD8.svg" xlink:type="simple" xlink:show="embed" xlink:actuate="onLoad" draw:mime-type="image/svg+xml"><text:p/></draw:image><draw:image xlink:href="Pictures/100000010000016D0000001B10CF1788.png" xlink:type="simple" xlink:show="embed" xlink:actuate="onLoad" draw:mime-type="image/png"/><svg:title>TexMaths</svg:title><svg:desc>12§display§y_1 = t \cdot \cos \frac{\varphi}{3}, \quad y_2 = t \cdot \cos \Big( \frac{\varphi}{3} + \frac{2\pi}{3} \Big), \quad y_3 = t \cdot \cos \Big( \frac{\varphi}{3} + \frac{4\pi}{3} \Big)§svg§600§FALSE§</svg:desc></draw:frame></text:p>
      <text:p text:style-name="P49"><text:soft-page-break/><text:span text:style-name="T12">После нахождения корней делается </text:span><text:span text:style-name="T29">обратная </text:span><text:span text:style-name="T12">замена</text:span><text:span text:style-name="T30"> </text:span><text:span text:style-name="T12"><text:s/></text:span><text:span text:style-name="T12"><draw:frame text:anchor-type="as-char" svg:y="-0.474cm" draw:z-index="34" draw:name="Shape24" draw:style-name="gr3" draw:text-style-name="P21" svg:width="2.066cm" svg:height="0.768cm"><draw:image xlink:href="Pictures/10002910000006BB00000282C0097736.svg" xlink:type="simple" xlink:show="embed" xlink:actuate="onLoad" draw:mime-type="image/svg+xml"><text:p/></draw:image><draw:image xlink:href="Pictures/10000001000000410000001808416550.png" xlink:type="simple" xlink:show="embed" xlink:actuate="onLoad" draw:mime-type="image/png"/><svg:title>TexMaths</svg:title><svg:desc>12§display§x_i = y_i - \frac{a}{3}§svg§600§FALSE§</svg:desc></draw:frame></text:span><text:span text:style-name="T31">.</text:span></text:p>
      <text:p text:style-name="P50">7) Теорема Виета</text:p>
      <text:p text:style-name="P51">Для нахождения двух корней полинома степени 2 используется теорема Виета. Для нахождения корней сначала находим дискриминант <text:span text:style-name="T12"><draw:frame text:anchor-type="as-char" svg:y="-0.37cm" draw:z-index="35" draw:name="Shape25" draw:style-name="gr3" draw:text-style-name="P21" svg:width="2.437cm" svg:height="0.408cm"><draw:image xlink:href="Pictures/10001D7E000007F0000001537D51CE7A.svg" xlink:type="simple" xlink:show="embed" xlink:actuate="onLoad" draw:mime-type="image/svg+xml"><text:p/></draw:image><draw:image xlink:href="Pictures/100000010000004D0000000DB883D887.png" xlink:type="simple" xlink:show="embed" xlink:actuate="onLoad" draw:mime-type="image/png"/><svg:title>TexMaths</svg:title><svg:desc>12§display§D = b^2 - 4ac§svg§600§FALSE§</svg:desc></draw:frame></text:span><text:span text:style-name="T32">. Далее</text:span></text:p>
      <text:list text:style-name="L5">
        <text:list-item>
          <text:p text:style-name="P52">если <text:span text:style-name="T12"><draw:frame text:anchor-type="as-char" svg:y="-0.318cm" draw:z-index="36" draw:name="Shape26" draw:style-name="gr3" draw:text-style-name="P21" svg:width="1.131cm" svg:height="0.336cm"><draw:image xlink:href="Pictures/10000C67000003AF000001196D801666.svg" xlink:type="simple" xlink:show="embed" xlink:actuate="onLoad" draw:mime-type="image/svg+xml"><text:p/></draw:image><draw:image xlink:href="Pictures/10000001000000240000000BF60A1E3A.png" xlink:type="simple" xlink:show="embed" xlink:actuate="onLoad" draw:mime-type="image/png"/><svg:title>TexMaths</svg:title><svg:desc>12§display§D &gt; 0§svg§600§FALSE§</svg:desc></draw:frame></text:span><text:span text:style-name="T12">, то возвращаем два корня </text:span><text:span text:style-name="T12"><draw:frame text:anchor-type="as-char" svg:y="-0.69cm" draw:z-index="37" draw:name="Shape27" draw:style-name="gr3" draw:text-style-name="P21" svg:width="3.068cm" svg:height="0.985cm"><draw:image xlink:href="Pictures/10002C5C000009FD0000033551A93247.svg" xlink:type="simple" xlink:show="embed" xlink:actuate="onLoad" draw:mime-type="image/svg+xml"><text:p/></draw:image><draw:image xlink:href="Pictures/10000001000000610000001F7429BFBB.png" xlink:type="simple" xlink:show="embed" xlink:actuate="onLoad" draw:mime-type="image/png"/><svg:title>TexMaths</svg:title><svg:desc>12§display§x_{1,2} = \frac{-b \pm \sqrt{D}}{2a}§svg§600§FALSE§</svg:desc></draw:frame></text:span><text:span text:style-name="T33">;</text:span></text:p>
        </text:list-item>
        <text:list-item>
          <text:p text:style-name="P53">если <text:span text:style-name="T12"><draw:frame text:anchor-type="as-char" svg:y="-0.296cm" draw:z-index="38" draw:name="Shape28" draw:style-name="gr3" draw:text-style-name="P21" svg:width="1.098cm" svg:height="0.297cm"><draw:image xlink:href="Pictures/10000C1D00000395000000F8B34529E7.svg" xlink:type="simple" xlink:show="embed" xlink:actuate="onLoad" draw:mime-type="image/svg+xml"><text:p/></draw:image><draw:image xlink:href="Pictures/1000000100000023000000099DEDCDF3.png" xlink:type="simple" xlink:show="embed" xlink:actuate="onLoad" draw:mime-type="image/png"/><svg:title>TexMaths</svg:title><svg:desc>12§display§D = 0§svg§600§FALSE§</svg:desc></draw:frame></text:span><text:span text:style-name="T12">, то возвращаем один корень </text:span><text:span text:style-name="T12"><draw:frame text:anchor-type="as-char" svg:y="-0.58cm" draw:z-index="39" draw:name="Shape29" draw:style-name="gr3" draw:text-style-name="P21" svg:width="1.35cm" svg:height="0.872cm"><draw:image xlink:href="Pictures/100019E500000466000002D7D78228C8.svg" xlink:type="simple" xlink:show="embed" xlink:actuate="onLoad" draw:mime-type="image/svg+xml"><text:p/></draw:image><draw:image xlink:href="Pictures/100000010000002B0000001B5F18953A.png" xlink:type="simple" xlink:show="embed" xlink:actuate="onLoad" draw:mime-type="image/png"/><svg:title>TexMaths</svg:title><svg:desc>12§display§x = \frac{-b}{2a}§svg§600§FALSE§</svg:desc></draw:frame></text:span><text:span text:style-name="T33">;</text:span></text:p>
        </text:list-item>
        <text:list-item>
          <text:p text:style-name="P54">если <text:span text:style-name="T12"><draw:frame text:anchor-type="as-char" svg:y="-0.318cm" draw:z-index="40" draw:name="Shape30" draw:style-name="gr3" draw:text-style-name="P21" svg:width="1.131cm" svg:height="0.336cm"><draw:image xlink:href="Pictures/10000C3F000003AF000001191642F0F7.svg" xlink:type="simple" xlink:show="embed" xlink:actuate="onLoad" draw:mime-type="image/svg+xml"><text:p/></draw:image><draw:image xlink:href="Pictures/10000001000000240000000B743C0C37.png" xlink:type="simple" xlink:show="embed" xlink:actuate="onLoad" draw:mime-type="image/png"/><svg:title>TexMaths</svg:title><svg:desc>12§display§D &lt; 0
§svg§600§FALSE§</svg:desc></draw:frame></text:span><text:span text:style-name="T12">, то корней нет.</text:span></text:p>
        </text:list-item>
      </text:list>
      <text:p text:style-name="P55"/>
      <text:p text:style-name="P56">8) Схема Горнера</text:p>
      <text:p text:style-name="P57"><text:span text:style-name="T34">Схема Горнера используется для понижения степени полинома после нахождения корня</text:span><text:span text:style-name="T35">. Полином </text:span><text:span text:style-name="T36"><draw:frame text:anchor-type="as-char" svg:y="-0.333cm" draw:z-index="44" draw:name="Shape31" draw:style-name="gr3" draw:text-style-name="P21" svg:width="2.389cm" svg:height="0.405cm"><draw:image xlink:href="Pictures/100029E1000007C900000152778E9733.svg" xlink:type="simple" xlink:show="embed" xlink:actuate="onLoad" draw:mime-type="image/svg+xml"><text:p/></draw:image><draw:image xlink:href="Pictures/100000010000004B0000000DF4CA6497.png" xlink:type="simple" xlink:show="embed" xlink:actuate="onLoad" draw:mime-type="image/png"/><svg:title>TexMaths</svg:title><svg:desc>12§display§a_nx^n + \dots a_0§svg§600§FALSE§</svg:desc></draw:frame></text:span><text:span text:style-name="T36"><text:s/></text:span><text:span text:style-name="T35">делится на </text:span><text:span text:style-name="T36"><draw:frame text:anchor-type="as-char" svg:y="-0.339cm" draw:z-index="42" draw:name="Shape32" draw:style-name="gr3" draw:text-style-name="P21" svg:width="1.796cm" svg:height="0.452cm"><draw:image xlink:href="Pictures/10001CE4000005D80000017AF579B149.svg" xlink:type="simple" xlink:show="embed" xlink:actuate="onLoad" draw:mime-type="image/svg+xml"><text:p/></draw:image><draw:image xlink:href="Pictures/10000001000000390000000E5F5220E5.png" xlink:type="simple" xlink:show="embed" xlink:actuate="onLoad" draw:mime-type="image/png"/><svg:title>TexMaths</svg:title><svg:desc>12§display§(x - root)§svg§600§FALSE§</svg:desc></draw:frame></text:span><text:span text:style-name="T36"><text:s/>и коэффициенты для нового полинома </text:span><text:span text:style-name="T36"><draw:frame text:anchor-type="as-char" svg:y="-0.37cm" draw:z-index="45" draw:name="Shape33" draw:style-name="gr3" draw:text-style-name="P21" svg:width="3.611cm" svg:height="0.47cm"><draw:image xlink:href="Pictures/100030D200000BC300000189F056CB37.svg" xlink:type="simple" xlink:show="embed" xlink:actuate="onLoad" draw:mime-type="image/svg+xml"><text:p/></draw:image><draw:image xlink:href="Pictures/10000001000000720000000FA08B053F.png" xlink:type="simple" xlink:show="embed" xlink:actuate="onLoad" draw:mime-type="image/png"/><svg:title>TexMaths</svg:title><svg:desc>12§display§b_{n-1}x^{n-1} + \dots + b_0§svg§600§FALSE§</svg:desc></draw:frame></text:span><text:span text:style-name="T36"><text:s/>пересчитываются по формулам:</text:span></text:p>
      <text:p text:style-name="P57"><draw:frame text:anchor-type="as-char" svg:y="-0.293cm" draw:z-index="46" draw:name="Shape34" draw:style-name="gr3" draw:text-style-name="P21" svg:width="1.835cm" svg:height="0.391cm"><draw:image xlink:href="Pictures/10001FD2000005F800000146229C908A.svg" xlink:type="simple" xlink:show="embed" xlink:actuate="onLoad" draw:mime-type="image/svg+xml"><text:p/></draw:image><draw:image xlink:href="Pictures/100000010000003A0000000C7C005289.png" xlink:type="simple" xlink:show="embed" xlink:actuate="onLoad" draw:mime-type="image/png"/><svg:title>TexMaths</svg:title><svg:desc>12§display§b_{n-1} = a_n§svg§600§FALSE§</svg:desc></draw:frame></text:p>
      <text:p text:style-name="P57"><draw:frame text:anchor-type="as-char" svg:y="-0.293cm" draw:z-index="43" draw:name="Shape35" draw:style-name="gr3" draw:text-style-name="P21" svg:width="3.936cm" svg:height="0.391cm"><draw:image xlink:href="Pictures/10003E1300000CD000000146F5F19ED8.svg" xlink:type="simple" xlink:show="embed" xlink:actuate="onLoad" draw:mime-type="image/svg+xml"><text:p/></draw:image><draw:image xlink:href="Pictures/100000010000007C0000000C7E8596F9.png" xlink:type="simple" xlink:show="embed" xlink:actuate="onLoad" draw:mime-type="image/png"/><svg:title>TexMaths</svg:title><svg:desc>12§display§b_i = b_{i+1} \cdot root + a_{i+1}§svg§600§FALSE§</svg:desc></draw:frame></text:p>
      <text:h text:style-name="P58" text:outline-level="1"><text:bookmark-start text:name="__RefHeading___Toc143_2058273410 Copy 1"/><text:span text:style-name="T37">2</text:span><text:span text:style-name="T9">. </text:span><text:span text:style-name="T38">ОПИСАНИЕ ИСПОЛЬЗУЕМЫХ ПЕРЕМЕННЫХ</text:span><text:bookmark-end text:name="__RefHeading___Toc143_2058273410 Copy 1"/></text:h>
      <text:p text:style-name="P59">Ниже представлена таблица с описанием использованных переменных<text:span text:style-name="T39">.</text:span></text:p>
      <text:p text:style-name="P60">Таблица <text:sequence text:ref-name="refТаблица0" text:name="Таблица" text:formula="ooow:Таблица+1" style:num-format="1">1</text:sequence>— Используемые переменные</text:p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61">Название</text:p>
            <text:p text:style-name="P61">переменной</text:p>
          </table:table-cell>
          <table:table-cell table:style-name="Table1.A1" office:value-type="string">
            <text:p text:style-name="P61">Тип переменной</text:p>
          </table:table-cell>
          <table:table-cell table:style-name="Table1.A1" office:value-type="string">
            <text:p text:style-name="P61">Границы типа</text:p>
          </table:table-cell>
          <table:table-cell table:style-name="Table1.D1" office:value-type="string">
            <text:p text:style-name="P61">Назначение переменной</text:p>
          </table:table-cell>
        </table:table-row>
        <table:table-row>
          <table:table-cell table:style-name="Table1.A2" office:value-type="string">
            <text:p text:style-name="P62">solutions</text:p>
          </table:table-cell>
          <table:table-cell table:style-name="Table1.A2" office:value-type="string">
            <text:p text:style-name="P62">number[]</text:p>
          </table:table-cell>
          <table:table-cell table:style-name="Table1.A2" office:value-type="string">
            <text:p text:style-name="P63">-</text:p>
          </table:table-cell>
          <table:table-cell table:style-name="Table1.D2" office:value-type="string">
            <text:p text:style-name="P62">Хранит все найденные корни</text:p>
          </table:table-cell>
        </table:table-row>
        <table:table-row>
          <table:table-cell table:style-name="Table1.A2" office:value-type="string">
            <text:p text:style-name="P62">coeffs</text:p>
          </table:table-cell>
          <table:table-cell table:style-name="Table1.A2" office:value-type="string">
            <text:p text:style-name="P62"><text:span text:style-name="T40">n</text:span>umber[]</text:p>
          </table:table-cell>
          <table:table-cell table:style-name="Table1.A2" office:value-type="string">
            <text:p text:style-name="P64">-</text:p>
          </table:table-cell>
          <table:table-cell table:style-name="Table1.D2" office:value-type="string">
            <text:p text:style-name="P64">Хранит коэффициенты уравнения</text:p>
          </table:table-cell>
        </table:table-row>
        <table:table-row>
          <table:table-cell table:style-name="Table1.A2" office:value-type="string">
            <text:p text:style-name="P64">eps</text:p>
          </table:table-cell>
          <table:table-cell table:style-name="Table1.A2" office:value-type="string">
            <text:p text:style-name="P64">number</text:p>
          </table:table-cell>
          <table:table-cell table:style-name="Table1.A2" office:value-type="string">
            <text:p text:style-name="P65">-1.79769e+308 до 1.79769+308</text:p>
          </table:table-cell>
          <table:table-cell table:style-name="Table1.D2" office:value-type="string">
            <text:p text:style-name="P64">Точность для поиска корней</text:p>
          </table:table-cell>
        </table:table-row>
        <table:table-row>
          <table:table-cell table:style-name="Table1.A2" office:value-type="string">
            <text:p text:style-name="P64">N</text:p>
          </table:table-cell>
          <table:table-cell table:style-name="Table1.A2" office:value-type="string">
            <text:p text:style-name="P64">number</text:p>
          </table:table-cell>
          <table:table-cell table:style-name="Table1.A2" office:value-type="string">
            <text:p text:style-name="P64">0 до 9007199254740991</text:p>
          </table:table-cell>
          <table:table-cell table:style-name="Table1.D2" office:value-type="string">
            <text:p text:style-name="P64">Количество итераций</text:p>
          </table:table-cell>
        </table:table-row>
        <table:table-row>
          <table:table-cell table:style-name="Table1.A2" office:value-type="string">
            <text:p text:style-name="P64">x0</text:p>
          </table:table-cell>
          <table:table-cell table:style-name="Table1.A2" office:value-type="string">
            <text:p text:style-name="P64">number</text:p>
          </table:table-cell>
          <table:table-cell table:style-name="Table1.A2" office:value-type="string">
            <text:p text:style-name="P66">-1.79769e+308 до 1.79769+308</text:p>
          </table:table-cell>
          <table:table-cell table:style-name="Table1.D2" office:value-type="string">
            <text:p text:style-name="P64">Начальное приближение для метода касательных</text:p>
          </table:table-cell>
        </table:table-row>
        <table:table-row>
          <table:table-cell table:style-name="Table1.A2" office:value-type="string">
            <text:p text:style-name="P64">l</text:p>
          </table:table-cell>
          <table:table-cell table:style-name="Table1.A2" office:value-type="string">
            <text:p text:style-name="P64">number</text:p>
          </table:table-cell>
          <table:table-cell table:style-name="Table1.A2" office:value-type="string">
            <text:p text:style-name="P66">-1.79769e+308 до 1.79769+308</text:p>
          </table:table-cell>
          <table:table-cell table:style-name="Table1.D2" office:value-type="string">
            <text:p text:style-name="P64">Левая граница поиска корня для метода хорд</text:p>
          </table:table-cell>
        </table:table-row>
        <table:table-row>
          <table:table-cell table:style-name="Table1.A2" office:value-type="string">
            <text:p text:style-name="P64">r</text:p>
          </table:table-cell>
          <table:table-cell table:style-name="Table1.A2" office:value-type="string">
            <text:p text:style-name="P64">number</text:p>
          </table:table-cell>
          <table:table-cell table:style-name="Table1.A2" office:value-type="string">
            <text:p text:style-name="P66">-1.79769e+308 до 1.79769+308</text:p>
          </table:table-cell>
          <table:table-cell table:style-name="Table1.D2" office:value-type="string">
            <text:p text:style-name="P64">Правая граница поиска корня для метода хорд</text:p>
          </table:table-cell>
        </table:table-row>
        <table:table-row>
          <table:table-cell table:style-name="Table1.A2" office:value-type="string">
            <text:p text:style-name="P64">root</text:p>
          </table:table-cell>
          <table:table-cell table:style-name="Table1.A2" office:value-type="string">
            <text:p text:style-name="P64">number</text:p>
          </table:table-cell>
          <table:table-cell table:style-name="Table1.A2" office:value-type="string">
            <text:p text:style-name="P66">-1.79769e+308 до 1.79769+308</text:p>
          </table:table-cell>
          <table:table-cell table:style-name="Table1.D2" office:value-type="string">
            <text:p text:style-name="P67">Хранит текущий найденный корень</text:p>
          </table:table-cell>
        </table:table-row>
        <table:table-row>
          <table:table-cell table:style-name="Table1.A2" office:value-type="string">
            <text:p text:style-name="P67">res</text:p>
          </table:table-cell>
          <table:table-cell table:style-name="Table1.A2" office:value-type="string">
            <text:p text:style-name="P67">number</text:p>
          </table:table-cell>
          <table:table-cell table:style-name="Table1.A2" office:value-type="string">
            <text:p text:style-name="P68">-1.79769e+308 до 1.79769+308</text:p>
          </table:table-cell>
          <table:table-cell table:style-name="Table1.D2" office:value-type="string">
            <text:p text:style-name="P67">Используется для расчёта значения функции в точке</text:p>
          </table:table-cell>
        </table:table-row>
        <table:table-row>
          <table:table-cell table:style-name="Table1.A2" office:value-type="string">
            <text:p text:style-name="P67">i</text:p>
          </table:table-cell>
          <table:table-cell table:style-name="Table1.A2" office:value-type="string">
            <text:p text:style-name="P67">number</text:p>
          </table:table-cell>
          <table:table-cell table:style-name="Table1.A2" office:value-type="string">
            <text:p text:style-name="P68">0 до 9007199254740991</text:p>
          </table:table-cell>
          <table:table-cell table:style-name="Table1.D2" office:value-type="string">
            <text:p text:style-name="P67">Используется для итераций в циклах</text:p>
          </table:table-cell>
        </table:table-row>
        <table:table-row>
          <table:table-cell table:style-name="Table1.A2" office:value-type="string">
            <text:p text:style-name="P67">cleanedCoeffs</text:p>
          </table:table-cell>
          <table:table-cell table:style-name="Table1.A2" office:value-type="string">
            <text:p text:style-name="P67">number[]</text:p>
          </table:table-cell>
          <table:table-cell table:style-name="Table1.A2" office:value-type="string">
            <text:p text:style-name="P67">-</text:p>
          </table:table-cell>
          <table:table-cell table:style-name="Table1.D2" office:value-type="string">
            <text:p text:style-name="P67">Хранит ненулевые коэффициенты в функции поиска границ корней</text:p>
          </table:table-cell>
        </table:table-row>
        <table:table-row>
          <table:table-cell table:style-name="Table1.A2" office:value-type="string">
            <text:p text:style-name="P69">zeroFlag</text:p>
          </table:table-cell>
          <table:table-cell table:style-name="Table1.A2" office:value-type="string">
            <text:p text:style-name="P70">boolean</text:p>
          </table:table-cell>
          <table:table-cell table:style-name="Table1.A2" office:value-type="string">
            <text:p text:style-name="P70">true / false</text:p>
          </table:table-cell>
          <table:table-cell table:style-name="Table1.D2" office:value-type="string">
            <text:p text:style-name="P67">Флаг,</text:p>
            <text:p text:style-name="P67"><text:s/>для очищения списка коэффициентов от <text:span text:style-name="T41">ведущих </text:span>нулей</text:p>
          </table:table-cell>
        </table:table-row>
        <text:soft-page-break/>
        <table:table-row>
          <table:table-cell table:style-name="Table1.A2" office:value-type="string">
            <text:p text:style-name="P69">maxCoeff</text:p>
          </table:table-cell>
          <table:table-cell table:style-name="Table1.A2" office:value-type="string">
            <text:p text:style-name="P69">number</text:p>
          </table:table-cell>
          <table:table-cell table:style-name="Table1.A2" office:value-type="string">
            <text:p text:style-name="P66">-1.79769e+308 до 1.79769+308</text:p>
          </table:table-cell>
          <table:table-cell table:style-name="Table1.D2" office:value-type="string">
            <text:p text:style-name="P71">Максимальный коэффициент полинома</text:p>
          </table:table-cell>
        </table:table-row>
        <table:table-row>
          <table:table-cell table:style-name="Table1.A2" office:value-type="string">
            <text:p text:style-name="P71">bound</text:p>
          </table:table-cell>
          <table:table-cell table:style-name="Table1.A2" office:value-type="string">
            <text:p text:style-name="P71">number</text:p>
          </table:table-cell>
          <table:table-cell table:style-name="Table1.A2" office:value-type="string">
            <text:p text:style-name="P66">-1.79769e+308 до 1.79769+308</text:p>
          </table:table-cell>
          <table:table-cell table:style-name="Table1.D2" office:value-type="string">
            <text:p text:style-name="P71">Граница диапазона поиска корней</text:p>
          </table:table-cell>
        </table:table-row>
        <table:table-row>
          <table:table-cell table:style-name="Table1.A2" office:value-type="string">
            <text:p text:style-name="P71">step</text:p>
          </table:table-cell>
          <table:table-cell table:style-name="Table1.A2" office:value-type="string">
            <text:p text:style-name="P71">number</text:p>
          </table:table-cell>
          <table:table-cell table:style-name="Table1.A2" office:value-type="string">
            <text:p text:style-name="P66">-1.79769e+308 до 1.79769+308</text:p>
          </table:table-cell>
          <table:table-cell table:style-name="Table1.D2" office:value-type="string">
            <text:p text:style-name="P71">Шаг, с которым будет искаться диапазон поиска корней</text:p>
          </table:table-cell>
        </table:table-row>
        <table:table-row>
          <table:table-cell table:style-name="Table1.A2" office:value-type="string">
            <text:p text:style-name="P71">n</text:p>
          </table:table-cell>
          <table:table-cell table:style-name="Table1.A2" office:value-type="string">
            <text:p text:style-name="P71">number</text:p>
          </table:table-cell>
          <table:table-cell table:style-name="Table1.A2" office:value-type="string">
            <text:p text:style-name="P71">0 до 6</text:p>
          </table:table-cell>
          <table:table-cell table:style-name="Table1.D2" office:value-type="string">
            <text:p text:style-name="P71">Степень полинома</text:p>
          </table:table-cell>
        </table:table-row>
        <table:table-row>
          <table:table-cell table:style-name="Table1.A2" office:value-type="string">
            <text:p text:style-name="P71">k</text:p>
          </table:table-cell>
          <table:table-cell table:style-name="Table1.A2" office:value-type="string">
            <text:p text:style-name="P71">number</text:p>
          </table:table-cell>
          <table:table-cell table:style-name="Table1.A2" office:value-type="string">
            <text:p text:style-name="P71">0 до 7</text:p>
          </table:table-cell>
          <table:table-cell table:style-name="Table1.D2" office:value-type="string">
            <text:p text:style-name="P71">Количество коэффициентов</text:p>
          </table:table-cell>
        </table:table-row>
        <table:table-row>
          <table:table-cell table:style-name="Table1.A2" office:value-type="string">
            <text:p text:style-name="P71">newCoeffs</text:p>
          </table:table-cell>
          <table:table-cell table:style-name="Table1.A2" office:value-type="string">
            <text:p text:style-name="P71">number[]</text:p>
          </table:table-cell>
          <table:table-cell table:style-name="Table1.A2" office:value-type="string">
            <text:p text:style-name="P71">-</text:p>
          </table:table-cell>
          <table:table-cell table:style-name="Table1.D2" office:value-type="string">
            <text:p text:style-name="P71">Новые коэффициенты полинома поле понижения степени</text:p>
          </table:table-cell>
        </table:table-row>
        <table:table-row>
          <table:table-cell table:style-name="Table1.A2" office:value-type="string">
            <text:p text:style-name="P71">D</text:p>
          </table:table-cell>
          <table:table-cell table:style-name="Table1.A2" office:value-type="string">
            <text:p text:style-name="P71">number</text:p>
          </table:table-cell>
          <table:table-cell table:style-name="Table1.A2" office:value-type="string">
            <text:p text:style-name="P66">-1.79769e+308 до 1.79769+308</text:p>
          </table:table-cell>
          <table:table-cell table:style-name="Table1.D2" office:value-type="string">
            <text:p text:style-name="P71">Дискриминант полинома 2 степени</text:p>
          </table:table-cell>
        </table:table-row>
        <table:table-row>
          <table:table-cell table:style-name="Table1.A2" office:value-type="string">
            <text:p text:style-name="P71">a, b, c, d, n, m, k</text:p>
          </table:table-cell>
          <table:table-cell table:style-name="Table1.A2" office:value-type="string">
            <text:p text:style-name="P71">number</text:p>
          </table:table-cell>
          <table:table-cell table:style-name="Table1.A2" office:value-type="string">
            <text:p text:style-name="P66">-1.79769e+308 до 1.79769+308</text:p>
          </table:table-cell>
          <table:table-cell table:style-name="Table1.D2" office:value-type="string">
            <text:p text:style-name="P71">Коэффициенты полинома при степени 6, 5, 4, 3, 2, 1, 0 соответственно</text:p>
          </table:table-cell>
        </table:table-row>
        <table:table-row>
          <table:table-cell table:style-name="Table1.A2" office:value-type="string">
            <text:p text:style-name="P71">A, B, C</text:p>
          </table:table-cell>
          <table:table-cell table:style-name="Table1.A2" office:value-type="string">
            <text:p text:style-name="P71">number</text:p>
          </table:table-cell>
          <table:table-cell table:style-name="Table1.A2" office:value-type="string">
            <text:p text:style-name="P66">-1.79769e+308 до 1.79769+308</text:p>
          </table:table-cell>
          <table:table-cell table:style-name="Table1.D2" office:value-type="string">
            <text:p text:style-name="P71">Вспомогательные переменные для нахождения коэффициентов полинома 3 степени</text:p>
          </table:table-cell>
        </table:table-row>
        <table:table-row>
          <table:table-cell table:style-name="Table1.A2" office:value-type="string">
            <text:p text:style-name="P71">p, q</text:p>
          </table:table-cell>
          <table:table-cell table:style-name="Table1.A2" office:value-type="string">
            <text:p text:style-name="P71">number</text:p>
          </table:table-cell>
          <table:table-cell table:style-name="Table1.A2" office:value-type="string">
            <text:p text:style-name="P66">-1.79769e+308 до 1.79769+308</text:p>
          </table:table-cell>
          <table:table-cell table:style-name="Table1.D2" office:value-type="string">
            <text:p text:style-name="P71">Коэффициенты полинома 3 степени</text:p>
          </table:table-cell>
        </table:table-row>
        <table:table-row>
          <table:table-cell table:style-name="Table1.A2" office:value-type="string">
            <text:p text:style-name="P71">Q</text:p>
          </table:table-cell>
          <table:table-cell table:style-name="Table1.A2" office:value-type="string">
            <text:p text:style-name="P71">number</text:p>
          </table:table-cell>
          <table:table-cell table:style-name="Table1.A2" office:value-type="string">
            <text:p text:style-name="P66">-1.79769e+308 до 1.79769+308</text:p>
          </table:table-cell>
          <table:table-cell table:style-name="Table1.D2" office:value-type="string">
            <text:p text:style-name="P71">Дискриминант полинома 3 степени</text:p>
          </table:table-cell>
        </table:table-row>
        <table:table-row>
          <table:table-cell table:style-name="Table1.A2" office:value-type="string">
            <text:p text:style-name="P71">shift</text:p>
          </table:table-cell>
          <table:table-cell table:style-name="Table1.A2" office:value-type="string">
            <text:p text:style-name="P71">number</text:p>
          </table:table-cell>
          <table:table-cell table:style-name="Table1.A2" office:value-type="string">
            <text:p text:style-name="P66">-1.79769e+308 до 1.79769+308</text:p>
          </table:table-cell>
          <table:table-cell table:style-name="Table1.D2" office:value-type="string">
            <text:p text:style-name="P72">Сдвиг для возврата к корням исходного полинома 3 степени</text:p>
          </table:table-cell>
        </table:table-row>
        <table:table-row>
          <table:table-cell table:style-name="Table1.A2" office:value-type="string">
            <text:p text:style-name="P72">u, v</text:p>
          </table:table-cell>
          <table:table-cell table:style-name="Table1.A2" office:value-type="string">
            <text:p text:style-name="P72">number</text:p>
          </table:table-cell>
          <table:table-cell table:style-name="Table1.A2" office:value-type="string">
            <text:p text:style-name="P73">-1.79769e+308 до 1.79769+308</text:p>
          </table:table-cell>
          <table:table-cell table:style-name="Table1.D2" office:value-type="string">
            <text:p text:style-name="P72">Вспомогательные переменные для нахождения корней полинома 3 степени</text:p>
          </table:table-cell>
        </table:table-row>
        <table:table-row>
          <table:table-cell table:style-name="Table1.A2" office:value-type="string">
            <text:p text:style-name="P72">x1, x2</text:p>
          </table:table-cell>
          <table:table-cell table:style-name="Table1.A2" office:value-type="string">
            <text:p text:style-name="P72">number</text:p>
          </table:table-cell>
          <table:table-cell table:style-name="Table1.A2" office:value-type="string">
            <text:p text:style-name="P73">-1.79769e+308 до 1.79769+308</text:p>
          </table:table-cell>
          <table:table-cell table:style-name="Table1.D2" office:value-type="string">
            <text:p text:style-name="P72">Корни полинома 3 степени</text:p>
          </table:table-cell>
        </table:table-row>
        <table:table-row>
          <table:table-cell table:style-name="Table1.A2" office:value-type="string">
            <text:p text:style-name="P72">r</text:p>
          </table:table-cell>
          <table:table-cell table:style-name="Table1.A2" office:value-type="string">
            <text:p text:style-name="P72">number</text:p>
          </table:table-cell>
          <table:table-cell table:style-name="Table1.A2" office:value-type="string">
            <text:p text:style-name="P73">-1.79769e+308 до <text:soft-page-break/>1.79769+308</text:p>
          </table:table-cell>
          <table:table-cell table:style-name="Table1.D2" office:value-type="string">
            <text:p text:style-name="P72">Вспомогательная <text:soft-page-break/>переменная для нахождения угла phi</text:p>
          </table:table-cell>
        </table:table-row>
        <table:table-row>
          <table:table-cell table:style-name="Table1.A2" office:value-type="string">
            <text:p text:style-name="P72">phi</text:p>
          </table:table-cell>
          <table:table-cell table:style-name="Table1.A2" office:value-type="string">
            <text:p text:style-name="P72">number</text:p>
          </table:table-cell>
          <table:table-cell table:style-name="Table1.A2" office:value-type="string">
            <text:p text:style-name="P73">-1.79769e+308 до 1.79769+308</text:p>
          </table:table-cell>
          <table:table-cell table:style-name="Table1.D2" office:value-type="string">
            <text:p text:style-name="P72">Угол, необходимый для нахождения трёх корней полинома 3 степени</text:p>
          </table:table-cell>
        </table:table-row>
        <table:table-row>
          <table:table-cell table:style-name="Table1.A2" office:value-type="string">
            <text:p text:style-name="P72">t</text:p>
          </table:table-cell>
          <table:table-cell table:style-name="Table1.A2" office:value-type="string">
            <text:p text:style-name="P72">number</text:p>
          </table:table-cell>
          <table:table-cell table:style-name="Table1.A2" office:value-type="string">
            <text:p text:style-name="P73">-1.79769e+308 до 1.79769+308</text:p>
          </table:table-cell>
          <table:table-cell table:style-name="Table1.D2" office:value-type="string">
            <text:p text:style-name="P72">Вспомогательная переменная для нахождения корней полинома 3 степени</text:p>
          </table:table-cell>
        </table:table-row>
        <table:table-row>
          <table:table-cell table:style-name="Table1.A2" office:value-type="string">
            <text:p text:style-name="P72">fx</text:p>
          </table:table-cell>
          <table:table-cell table:style-name="Table1.A2" office:value-type="string">
            <text:p text:style-name="P72">number</text:p>
          </table:table-cell>
          <table:table-cell table:style-name="Table1.A2" office:value-type="string">
            <text:p text:style-name="P73">-1.79769e+308 до 1.79769+308</text:p>
          </table:table-cell>
          <table:table-cell table:style-name="Table1.D2" office:value-type="string">
            <text:p text:style-name="P72">Значение полинома в точке x</text:p>
          </table:table-cell>
        </table:table-row>
        <table:table-row>
          <table:table-cell table:style-name="Table1.A2" office:value-type="string">
            <text:p text:style-name="P72">dfx</text:p>
          </table:table-cell>
          <table:table-cell table:style-name="Table1.A2" office:value-type="string">
            <text:p text:style-name="P72">number</text:p>
          </table:table-cell>
          <table:table-cell table:style-name="Table1.A2" office:value-type="string">
            <text:p text:style-name="P73">-1.79769e+308 до 1.79769+308</text:p>
          </table:table-cell>
          <table:table-cell table:style-name="Table1.D2" office:value-type="string">
            <text:p text:style-name="P72">Значение производной полинома в точке x</text:p>
          </table:table-cell>
        </table:table-row>
        <table:table-row>
          <table:table-cell table:style-name="Table1.A2" office:value-type="string">
            <text:p text:style-name="P72">delta</text:p>
          </table:table-cell>
          <table:table-cell table:style-name="Table1.A2" office:value-type="string">
            <text:p text:style-name="P72">number</text:p>
          </table:table-cell>
          <table:table-cell table:style-name="Table1.A2" office:value-type="string">
            <text:p text:style-name="P73">-1.79769e+308 до 1.79769+308</text:p>
          </table:table-cell>
          <table:table-cell table:style-name="Table1.D2" office:value-type="string">
            <text:p text:style-name="P72">Шаг Ньютона для метода касательных</text:p>
          </table:table-cell>
        </table:table-row>
        <table:table-row>
          <table:table-cell table:style-name="Table1.A2" office:value-type="string">
            <text:p text:style-name="P72">xPrev</text:p>
          </table:table-cell>
          <table:table-cell table:style-name="Table1.A2" office:value-type="string">
            <text:p text:style-name="P72">number</text:p>
          </table:table-cell>
          <table:table-cell table:style-name="Table1.A2" office:value-type="string">
            <text:p text:style-name="P73">-1.79769e+308 до 1.79769+308</text:p>
          </table:table-cell>
          <table:table-cell table:style-name="Table1.D2" office:value-type="string">
            <text:p text:style-name="P72">Координата пересечения хорды с осью X в начале итерации</text:p>
          </table:table-cell>
        </table:table-row>
        <table:table-row>
          <table:table-cell table:style-name="Table1.A2" office:value-type="string">
            <text:p text:style-name="P72">fl</text:p>
          </table:table-cell>
          <table:table-cell table:style-name="Table1.A2" office:value-type="string">
            <text:p text:style-name="P72">number</text:p>
          </table:table-cell>
          <table:table-cell table:style-name="Table1.A2" office:value-type="string">
            <text:p text:style-name="P73">-1.79769e+308 до 1.79769+308</text:p>
          </table:table-cell>
          <table:table-cell table:style-name="Table1.D2" office:value-type="string">
            <text:p text:style-name="P72">Значение функции в точке l - левой границы</text:p>
          </table:table-cell>
        </table:table-row>
        <table:table-row>
          <table:table-cell table:style-name="Table1.A2" office:value-type="string">
            <text:p text:style-name="P72">fr</text:p>
          </table:table-cell>
          <table:table-cell table:style-name="Table1.A2" office:value-type="string">
            <text:p text:style-name="P72">number</text:p>
          </table:table-cell>
          <table:table-cell table:style-name="Table1.A2" office:value-type="string">
            <text:p text:style-name="P73">-1.79769e+308 до 1.79769+308</text:p>
          </table:table-cell>
          <table:table-cell table:style-name="Table1.D2" office:value-type="string">
            <text:p text:style-name="P72">Значение функции в точке r - правой границы</text:p>
          </table:table-cell>
        </table:table-row>
      </table:table>
      <text:p text:style-name="P74"/>
      <text:p text:style-name="P74"/>
      <text:p text:style-name="P74"/>
      <text:h text:style-name="P75" text:outline-level="1"><text:bookmark-start text:name="__RefHeading___Toc143_2058273410 Copy 1 Copy 2"/><text:span text:style-name="T37">3</text:span><text:span text:style-name="T9">. </text:span><text:span text:style-name="T42">БЛОК СХЕМА АЛГОРИТМА</text:span><text:bookmark-end text:name="__RefHeading___Toc143_2058273410 Copy 1 Copy 2"/></text:h>
      <text:p text:style-name="P76">Блок схема алгоритма представлена в Приложении А.</text:p>
      <text:p text:style-name="P74"/>
      <text:p text:style-name="P74"/>
      <text:p text:style-name="P74"/>
      <text:h text:style-name="P75" text:outline-level="1"><text:bookmark-start text:name="__RefHeading___Toc143_2058273410 Copy 1 Copy 2 Copy 1"/><text:span text:style-name="T37">4</text:span><text:span text:style-name="T9">. </text:span><text:span text:style-name="T42">ТЕСТИРОВАНИЕ АЛГОРИТМА</text:span><text:bookmark-end text:name="__RefHeading___Toc143_2058273410 Copy 1 Copy 2 Copy 1"/></text:h>
      <text:p text:style-name="P77"><draw:frame draw:style-name="fr1" draw:name="Frame1" text:anchor-type="paragraph" svg:x="0cm" svg:y="0.323cm" svg:width="16.591cm" draw:z-index="3"><draw:text-box fo:min-height="3.582cm"><text:p text:style-name="P78"><draw:frame draw:style-name="fr2" draw:name="Image3" text:anchor-type="char" svg:width="16.591cm" svg:height="4.048cm" draw:z-index="52"><draw:image xlink:href="Pictures/1000000100000763000001CEC9CB5956.png" xlink:type="simple" xlink:show="embed" xlink:actuate="onLoad" draw:mime-type="image/png"/></draw:frame>Рисунок <text:sequence text:ref-name="refРисунок0" text:name="Рисунок" text:formula="ooow:Рисунок+1" style:num-format="1">1</text:sequence><text:span text:style-name="T43"><text:s/></text:span>— Результат успешной работы алгоритма </text:p></draw:text-box></draw:frame><draw:frame draw:style-name="fr1" draw:name="Frame2" text:anchor-type="paragraph" svg:x="0.025cm" svg:y="7.131cm" svg:width="16.591cm" draw:z-index="1"><draw:text-box fo:min-height="7.138cm"><text:p text:style-name="P78"><draw:frame draw:style-name="fr2" draw:name="Image1" text:anchor-type="char" svg:width="16.591cm" svg:height="8.329cm" draw:z-index="53"><draw:image xlink:href="Pictures/100000010000076D000003BB7CB5FF88.png" xlink:type="simple" xlink:show="embed" xlink:actuate="onLoad" draw:mime-type="image/png"/></draw:frame>Рисунок <text:sequence text:ref-name="refРисунок1" text:name="Рисунок" text:formula="ooow:Рисунок+1" style:num-format="1">2</text:sequence><text:span text:style-name="T43"><text:s/></text:span>— Результат работы алгоритма для полиномов степени 5 и 4</text:p></draw:text-box></draw:frame></text:p>
      <text:p text:style-name="P77"/>
      <text:p text:style-name="P79"/>
      <text:p text:style-name="P77"><draw:frame draw:style-name="fr1" draw:name="Frame3" text:anchor-type="paragraph" svg:x="-0.072cm" svg:y="-0.496cm" svg:width="16.591cm" draw:z-index="2"><draw:text-box fo:min-height="10.656cm"><text:p text:style-name="P78"><draw:frame draw:style-name="fr2" draw:name="Image2" text:anchor-type="char" svg:width="16.591cm" svg:height="12.076cm" draw:z-index="54"><draw:image xlink:href="Pictures/10000001000003A9000002AA538EBBBB.png" xlink:type="simple" xlink:show="embed" xlink:actuate="onLoad" draw:mime-type="image/png"/></draw:frame>Рисунок <text:sequence text:ref-name="refРисунок2" text:name="Рисунок" text:formula="ooow:Рисунок+1" style:num-format="1">3</text:sequence><text:span text:style-name="T43"><text:s/></text:span>— Результат работы алгоритма для полиномов степени 3, 2 и 1</text:p></draw:text-box></draw:frame></text:p>
      <text:p text:style-name="P77"><draw:frame draw:style-name="fr3" draw:name="Frame4" text:anchor-type="char" svg:width="16.591cm" draw:z-index="4"><draw:text-box fo:min-height="4.468cm"><text:p text:style-name="P78"><draw:frame draw:style-name="fr2" draw:name="Image4" text:anchor-type="char" svg:width="16.591cm" svg:height="2.942cm" draw:z-index="55"><draw:image xlink:href="Pictures/10000001000002BB0000007CC1241E2D.png" xlink:type="simple" xlink:show="embed" xlink:actuate="onLoad" draw:mime-type="image/png"/></draw:frame>Рисунок <text:sequence text:ref-name="refРисунок3" text:name="Рисунок" text:formula="ooow:Рисунок+1" style:num-format="1">4</text:sequence><text:span text:style-name="T43"><text:s/></text:span>— Результат работы алгоритма <text:span text:style-name="T44">с ошибками при</text:span> вводе коэффициентов</text:p></draw:text-box></draw:frame></text:p>
      <text:p text:style-name="P77"/>
      <text:p text:style-name="P77"/>
      <text:p text:style-name="P77"><draw:frame draw:style-name="fr4" draw:name="Frame5" text:anchor-type="paragraph" svg:width="16.591cm" draw:z-index="5"><draw:text-box fo:min-height="4.803cm"><text:p text:style-name="P78"><draw:frame draw:style-name="fr2" draw:name="Image5" text:anchor-type="char" svg:width="16.591cm" svg:height="5.106cm" draw:z-index="56"><draw:image xlink:href="Pictures/10000001000003A10000011E1FBD96EE.png" xlink:type="simple" xlink:show="embed" xlink:actuate="onLoad" draw:mime-type="image/png"/></draw:frame>Рисунок <text:sequence text:ref-name="refРисунок4" text:name="Рисунок" text:formula="ooow:Рисунок+1" style:num-format="1">5</text:sequence><text:span text:style-name="T43"><text:s/></text:span>— Результат работы алгоритма <text:span text:style-name="T44">с ошибками при </text:span>вводе параметров<text:span text:style-name="T44"> </text:span></text:p></draw:text-box></draw:frame><text:soft-page-break/></text:p>
      <text:p text:style-name="P77"><draw:frame draw:style-name="fr3" draw:name="Frame6" text:anchor-type="char" svg:width="16.591cm" draw:z-index="6"><draw:text-box fo:min-height="1.699cm"><text:p text:style-name="P78">Ри<draw:frame draw:style-name="fr5" draw:name="Image6" text:anchor-type="char" svg:x="0.822cm" svg:y="0.122cm" svg:width="14.947cm" svg:height="1.376cm" draw:z-index="57"><draw:image xlink:href="Pictures/100000010000023500000034A4C7C4DD.png" xlink:type="simple" xlink:show="embed" xlink:actuate="onLoad" draw:mime-type="image/png"/></draw:frame>сунок <text:sequence text:ref-name="refРисунок5" text:name="Рисунок" text:formula="ooow:Рисунок+1" style:num-format="1">6</text:sequence><text:span text:style-name="T43"><text:s/></text:span>— Результат работы алгоритма при всех нулевых коэффициентах</text:p></draw:text-box></draw:frame></text:p>
      <text:p text:style-name="P77"><draw:frame draw:style-name="fr3" draw:name="Frame7" text:anchor-type="char" svg:width="16.591cm" draw:z-index="7"><draw:text-box fo:min-height="1.866cm"><text:p text:style-name="P80"><draw:frame draw:style-name="fr5" draw:name="Image7" text:anchor-type="char" svg:x="0.889cm" svg:y="0.162cm" svg:width="14.813cm" svg:height="1.402cm" draw:z-index="58"><draw:image xlink:href="Pictures/100000010000023000000035D8419FDB.png" xlink:type="simple" xlink:show="embed" xlink:actuate="onLoad" draw:mime-type="image/png"/></draw:frame>Рисунок <text:sequence text:ref-name="refРисунок6" text:name="Рисунок" text:formula="ooow:Рисунок+1" style:num-format="1">7</text:sequence><text:span text:style-name="T43"><text:s/></text:span>— Результат работы алгоритма при всех нулевых коэффициентах<text:span text:style-name="T43">, </text:span>кроме k</text:p></draw:text-box></draw:frame></text:p>
      <text:p text:style-name="P77"/>
      <text:h text:style-name="P81" text:outline-level="1"><text:bookmark-start text:name="__RefHeading___Toc143_2058273410 Copy 1 Copy 2 Copy 2"/><text:span text:style-name="T37">5</text:span><text:span text:style-name="T9">. </text:span><text:span text:style-name="T45">ИСХОДНЫЙ КОД АЛГОРИТМА</text:span><text:bookmark-end text:name="__RefHeading___Toc143_2058273410 Copy 1 Copy 2 Copy 2"/></text:h>
      <text:p text:style-name="P82"/>
      <text:p text:style-name="P83"><text:span text:style-name="T46"><text:s text:c="2"/>1 <text:s/>| <text:s text:c="3"/></text:span><text:span text:style-name="T47">const</text:span><text:span text:style-name="T48"> fs = require(</text:span><text:span text:style-name="T49">"fs"</text:span><text:span text:style-name="T48">);</text:span></text:p>
      <text:p text:style-name="P84"><text:s text:c="2"/>2 <text:s/>| <text:s text:c="3"/></text:p>
      <text:p text:style-name="P84"><text:s text:c="2"/>3 <text:s/>| <text:s text:c="3"/>// -------------------------------------------------------------------------<text:span text:style-name="T50"/></text:p>
      <text:p text:style-name="P84"><text:s text:c="2"/>4 <text:s/>| <text:s text:c="3"/>// <text:s text:c="22"/>ВСПОМОГАТЕЛЬНЫЕ ФУНКЦИИ<text:span text:style-name="T50"/></text:p>
      <text:p text:style-name="P84"><text:s text:c="2"/>5 <text:s/>| <text:s text:c="3"/>// -------------------------------------------------------------------------<text:span text:style-name="T50"/></text:p>
      <text:p text:style-name="P84"><text:s text:c="2"/>6 <text:s/>| <text:s text:c="3"/>/**</text:p>
      <text:p text:style-name="P84"><text:s text:c="2"/>7 <text:s/>| <text:s text:c="4"/>* Вычисляет значение полинома в точке x схемой Горнера</text:p>
      <text:p text:style-name="P84"><text:s text:c="2"/>8 <text:s/>| <text:s text:c="4"/>* @param {number[]} coeffs</text:p>
      <text:p text:style-name="P84"><text:s text:c="2"/>9 <text:s/>| <text:s text:c="4"/>* @param {number} x</text:p>
      <text:p text:style-name="P84"><text:s/>10 <text:s/>| <text:s text:c="4"/>*/<text:span text:style-name="T50"/></text:p>
      <text:p text:style-name="P85"><text:span text:style-name="T46"><text:s/>11 <text:s/>| <text:s text:c="3"/></text:span><text:span text:style-name="T47">function</text:span><text:span text:style-name="T48"> f(coeffs, x) {</text:span></text:p>
      <text:p text:style-name="P85"><text:span text:style-name="T46"><text:s/>12 <text:s/>| <text:s text:c="3"/></text:span><text:span text:style-name="T48"><text:s text:c="2"/></text:span><text:span text:style-name="T47">let</text:span><text:span text:style-name="T48"> res = 0;</text:span></text:p>
      <text:p text:style-name="P85"><text:span text:style-name="T46"><text:s/>13 <text:s/>| <text:s text:c="3"/></text:span><text:span text:style-name="T48"><text:s text:c="2"/></text:span><text:span text:style-name="T47">for</text:span><text:span text:style-name="T48"> (</text:span><text:span text:style-name="T47">let</text:span><text:span text:style-name="T48"> i = 0; i &lt; coeffs.length; i++) res = res * x + coeffs[i];</text:span></text:p>
      <text:p text:style-name="P85"><text:span text:style-name="T46"><text:s/>14 <text:s/>| <text:s text:c="3"/></text:span><text:span text:style-name="T48"><text:s text:c="2"/></text:span><text:span text:style-name="T47">return</text:span><text:span text:style-name="T48"> res;</text:span></text:p>
      <text:p text:style-name="P86"><text:span text:style-name="T46"><text:s/>15 <text:s/>| <text:s text:c="3"/></text:span>}</text:p>
      <text:p text:style-name="P84"><text:s/>16 <text:s/>| <text:s text:c="3"/></text:p>
      <text:p text:style-name="P84"><text:s/>17 <text:s/>| <text:s text:c="3"/>/**</text:p>
      <text:p text:style-name="P84"><text:s/>18 <text:s/>| <text:s text:c="4"/>* Вычисляет значение производной функции в точке x схемой Горнера</text:p>
      <text:p text:style-name="P84"><text:s/>19 <text:s/>| <text:s text:c="4"/>* @param {number[]} coeffs</text:p>
      <text:p text:style-name="P84"><text:s/>20 <text:s/>| <text:s text:c="4"/>* @param {number} x</text:p>
      <text:p text:style-name="P84"><text:s/>21 <text:s/>| <text:s text:c="4"/>*/<text:span text:style-name="T50"/></text:p>
      <text:p text:style-name="P85"><text:span text:style-name="T46"><text:s/>22 <text:s/>| <text:s text:c="3"/></text:span><text:span text:style-name="T47">function</text:span><text:span text:style-name="T48"> df(coeffs, x) {</text:span></text:p>
      <text:p text:style-name="P85"><text:span text:style-name="T46"><text:s/>23 <text:s/>| <text:s text:c="3"/></text:span><text:span text:style-name="T48"><text:s text:c="2"/></text:span><text:span text:style-name="T47">let</text:span><text:span text:style-name="T48"> res = 0;</text:span></text:p>
      <text:p text:style-name="P85"><text:span text:style-name="T46"><text:s/>24 <text:s/>| <text:s text:c="3"/></text:span><text:span text:style-name="T48"><text:s text:c="2"/></text:span><text:span text:style-name="T47">let</text:span><text:span text:style-name="T48"> n = coeffs.length - 1;</text:span></text:p>
      <text:p text:style-name="P85"><text:span text:style-name="T46"><text:s/>25 <text:s/>| <text:s text:c="3"/></text:span><text:span text:style-name="T48"><text:s text:c="2"/></text:span><text:span text:style-name="T47">for</text:span><text:span text:style-name="T48"> (</text:span><text:span text:style-name="T47">let</text:span><text:span text:style-name="T48"> i = 0; i &lt; n; i++) res = res * x + coeffs[i] * (n - i);</text:span></text:p>
      <text:p text:style-name="P85"><text:span text:style-name="T46"><text:s/>26 <text:s/>| <text:s text:c="3"/></text:span><text:span text:style-name="T48"><text:s text:c="2"/></text:span><text:span text:style-name="T47">return</text:span><text:span text:style-name="T48"> res;</text:span></text:p>
      <text:p text:style-name="P86"><text:span text:style-name="T46"><text:s/>27 <text:s/>| <text:s text:c="3"/></text:span>}</text:p>
      <text:p text:style-name="P84"><text:s/>28 <text:s/>| <text:s text:c="3"/></text:p>
      <text:p text:style-name="P84"><text:s/>29 <text:s/>| <text:s text:c="3"/>/**</text:p>
      <text:p text:style-name="P84"><text:s/>30 <text:s/>| <text:s text:c="4"/>* Вычисляет значение второй производной функции в точке x схемой Горнера</text:p>
      <text:p text:style-name="P84"><text:s/>31 <text:s/>| <text:s text:c="4"/>* @param {number[]} coeffs</text:p>
      <text:p text:style-name="P84"><text:s/>32 <text:s/>| <text:s text:c="4"/>* @param {number} x</text:p>
      <text:p text:style-name="P84"><text:s/>33 <text:s/>| <text:s text:c="4"/>*/<text:span text:style-name="T50"/></text:p>
      <text:p text:style-name="P85"><text:span text:style-name="T46"><text:s/>34 <text:s/>| <text:s text:c="3"/></text:span><text:span text:style-name="T47">function</text:span><text:span text:style-name="T48"> ddf(coeffs, x) {</text:span></text:p>
      <text:p text:style-name="P85"><text:span text:style-name="T46"><text:s/>35 <text:s/>| <text:s text:c="3"/></text:span><text:span text:style-name="T48"><text:s text:c="2"/></text:span><text:span text:style-name="T47">let</text:span><text:span text:style-name="T48"> res = 0;</text:span></text:p>
      <text:p text:style-name="P85"><text:span text:style-name="T46"><text:s/>36 <text:s/>| <text:s text:c="3"/></text:span><text:span text:style-name="T48"><text:s text:c="2"/></text:span><text:span text:style-name="T47">let</text:span><text:span text:style-name="T48"> n = coeffs.length - 1;</text:span></text:p>
      <text:p text:style-name="P85"><text:span text:style-name="T46"><text:s/>37 <text:s/>| <text:s text:c="3"/></text:span><text:span text:style-name="T48"><text:s text:c="2"/></text:span><text:span text:style-name="T47">for</text:span><text:span text:style-name="T48"> (</text:span><text:span text:style-name="T47">let</text:span><text:span text:style-name="T48"> i = 0; i &lt; n - 1; i++)</text:span></text:p>
      <text:p text:style-name="P85"><text:span text:style-name="T46"><text:s/>38 <text:s/>| <text:s text:c="3"/></text:span><text:span text:style-name="T48"><text:s text:c="4"/>res = res * x + coeffs[i] * (n - i) * (n - i - 1);</text:span></text:p>
      <text:p text:style-name="P85"><text:span text:style-name="T46"><text:s/>39 <text:s/>| <text:s text:c="3"/></text:span><text:span text:style-name="T48"><text:s text:c="2"/></text:span><text:span text:style-name="T47">return</text:span><text:span text:style-name="T48"> res;</text:span></text:p>
      <text:p text:style-name="P86"><text:span text:style-name="T46"><text:s/>40 <text:s/>| <text:s text:c="3"/></text:span>}</text:p>
      <text:p text:style-name="P84"><text:s/>41 <text:s/>| <text:s text:c="3"/></text:p>
      <text:p text:style-name="P84"><text:s/>42 <text:s/>| <text:s text:c="3"/>/**</text:p>
      <text:p text:style-name="P84"><text:s/>43 <text:s/>| <text:s text:c="4"/>* Вычисляет границы поиска корней по теореме Коши</text:p>
      <text:p text:style-name="P84"><text:s/>44 <text:s/>| <text:s text:c="4"/>* @param {number[]} coeffs</text:p>
      <text:p text:style-name="P84"><text:s/>45 <text:s/>| <text:s text:c="4"/>*/<text:span text:style-name="T50"/></text:p>
      <text:p text:style-name="P85"><text:span text:style-name="T46"><text:s/>46 <text:s/>| <text:s text:c="3"/></text:span><text:span text:style-name="T47">function</text:span><text:span text:style-name="T48"> cachyBound(coeffs) {</text:span></text:p>
      <text:p text:style-name="P85"><text:span text:style-name="T46"><text:s/>47 <text:s/>| <text:s text:c="3"/></text:span><text:span text:style-name="T48"><text:s text:c="2"/></text:span><text:span text:style-name="T47">let</text:span><text:span text:style-name="T48"> cleanedCoeffs = [];</text:span></text:p>
      <text:p text:style-name="P85"><text:span text:style-name="T46"><text:s/>48 <text:s/>| <text:s text:c="3"/></text:span><text:span text:style-name="T48"><text:s text:c="2"/></text:span><text:span text:style-name="T47">let</text:span><text:span text:style-name="T48"> zeroFlag = </text:span><text:span text:style-name="T47">false</text:span><text:span text:style-name="T48">;</text:span></text:p>
      <text:p text:style-name="P85"><text:span text:style-name="T46"><text:s/>49 <text:s/>| <text:s text:c="3"/></text:span><text:span text:style-name="T48"><text:s text:c="2"/></text:span><text:span text:style-name="T47">for</text:span><text:span text:style-name="T48"> (</text:span><text:span text:style-name="T47">let</text:span><text:span text:style-name="T48"> i = 0; i &lt; coeffs.length; i++) {</text:span></text:p>
      <text:p text:style-name="P85"><text:span text:style-name="T46"><text:s/>50 <text:s/>| <text:s text:c="3"/></text:span><text:span text:style-name="T48"><text:s text:c="4"/></text:span><text:span text:style-name="T47">if</text:span><text:span text:style-name="T48"> (coeffs[i] !== 0 || zeroFlag) {</text:span></text:p>
      <text:p text:style-name="P85"><text:span text:style-name="T46"><text:s/>51 <text:s/>| <text:s text:c="3"/></text:span><text:span text:style-name="T48"><text:s text:c="6"/>cleanedCoeffs.push(coeffs[i]);</text:span></text:p>
      <text:p text:style-name="P85"><text:span text:style-name="T46"><text:s/>52 <text:s/>| <text:s text:c="3"/></text:span><text:span text:style-name="T48"><text:s text:c="6"/>zeroFlag = </text:span><text:span text:style-name="T47">true</text:span><text:span text:style-name="T48">;</text:span></text:p>
      <text:p text:style-name="P85"><text:span text:style-name="T46"><text:s/>53 <text:s/>| <text:s text:c="3"/></text:span><text:span text:style-name="T48"><text:s text:c="4"/>}</text:span></text:p>
      <text:p text:style-name="P85"><text:span text:style-name="T46"><text:s/>54 <text:s/>| <text:s text:c="3"/></text:span><text:span text:style-name="T48"><text:s text:c="2"/>}</text:span></text:p>
      <text:p text:style-name="P84"><text:s/>55 <text:s/>| <text:s text:c="3"/></text:p>
      <text:p text:style-name="P85"><text:span text:style-name="T46"><text:s/>56 <text:s/>| <text:s text:c="3"/></text:span><text:span text:style-name="T48"><text:s text:c="2"/></text:span><text:span text:style-name="T47">if</text:span><text:span text:style-name="T48"> (cleanedCoeffs.length &lt;= 1) </text:span><text:span text:style-name="T47">return</text:span><text:span text:style-name="T48"> 100;</text:span></text:p>
      <text:p text:style-name="P84"><text:s/>57 <text:s/>| <text:s text:c="3"/></text:p>
      <text:p text:style-name="P85"><text:span text:style-name="T46"><text:s/>58 <text:s/>| <text:s text:c="3"/></text:span><text:span text:style-name="T48"><text:s text:c="2"/></text:span><text:span text:style-name="T47">const</text:span><text:span text:style-name="T48"> maxCoeff =</text:span></text:p>
      <text:p text:style-name="P85"><text:span text:style-name="T46"><text:s/>59 <text:s/>| <text:s text:c="3"/></text:span><text:span text:style-name="T48"><text:s text:c="4"/>cleanedCoeffs.length &gt; 1</text:span></text:p>
      <text:p text:style-name="P85"><text:span text:style-name="T46"><text:s/>60 <text:s/>| <text:s text:c="3"/></text:span><text:span text:style-name="T48"><text:s text:c="6"/>? Math.max(...cleanedCoeffs.slice(1).map(Math.abs))</text:span></text:p>
      <text:p text:style-name="P85"><text:span text:style-name="T46"><text:s/>61 <text:s/>| <text:s text:c="3"/></text:span><text:span text:style-name="T48"><text:s text:c="6"/>: 0;</text:span></text:p>
      <text:p text:style-name="P85"><text:span text:style-name="T46"><text:s/>62 <text:s/>| <text:s text:c="3"/></text:span><text:span text:style-name="T48"><text:s text:c="2"/></text:span><text:span text:style-name="T47">return</text:span><text:span text:style-name="T48"> 1 + maxCoeff / Math.abs(cleanedCoeffs[0]);</text:span></text:p>
      <text:p text:style-name="P86"><text:span text:style-name="T46"><text:s/>63 <text:s/>| <text:s text:c="3"/></text:span>}</text:p>
      <text:p text:style-name="P84"><text:s/>64 <text:s/>| <text:s text:c="3"/></text:p>
      <text:p text:style-name="P84"><text:s/>65 <text:s/>| <text:s text:c="3"/>/**</text:p>
      <text:p text:style-name="P84"><text:s/>66 <text:s/>| <text:s text:c="4"/>* Поиск интервала, где функция меняет свой знак</text:p>
      <text:p text:style-name="P84"><text:soft-page-break/><text:s/>67 <text:s/>| <text:s text:c="4"/>* @param {number[]} coeffs</text:p>
      <text:p text:style-name="P84"><text:s/>68 <text:s/>| <text:s text:c="4"/>* @param {number} bound</text:p>
      <text:p text:style-name="P84"><text:s/>69 <text:s/>| <text:s text:c="4"/>*/<text:span text:style-name="T50"/></text:p>
      <text:p text:style-name="P85"><text:span text:style-name="T46"><text:s/>70 <text:s/>| <text:s text:c="3"/></text:span><text:span text:style-name="T47">function</text:span><text:span text:style-name="T48"> findInterval(coeffs, bound) {</text:span></text:p>
      <text:p text:style-name="P85"><text:span text:style-name="T46"><text:s/>71 <text:s/>| <text:s text:c="3"/></text:span><text:span text:style-name="T48"><text:s text:c="2"/></text:span><text:span text:style-name="T47">let</text:span><text:span text:style-name="T48"> step = bound / 20000;</text:span></text:p>
      <text:p text:style-name="P85"><text:span text:style-name="T46"><text:s/>72 <text:s/>| <text:s text:c="3"/></text:span><text:span text:style-name="T48"><text:s text:c="2"/></text:span><text:span text:style-name="T47">let</text:span><text:span text:style-name="T48"> l = -bound;</text:span></text:p>
      <text:p text:style-name="P85"><text:span text:style-name="T46"><text:s/>73 <text:s/>| <text:s text:c="3"/></text:span><text:span text:style-name="T48"><text:s text:c="2"/></text:span><text:span text:style-name="T47">while</text:span><text:span text:style-name="T48"> (l &lt; bound) {</text:span></text:p>
      <text:p text:style-name="P85"><text:span text:style-name="T46"><text:s/>74 <text:s/>| <text:s text:c="3"/></text:span><text:span text:style-name="T48"><text:s text:c="4"/></text:span><text:span text:style-name="T47">let</text:span><text:span text:style-name="T48"> r = l + step;</text:span></text:p>
      <text:p text:style-name="P85"><text:span text:style-name="T46"><text:s/>75 <text:s/>| <text:s text:c="3"/></text:span><text:span text:style-name="T48"><text:s text:c="4"/></text:span><text:span text:style-name="T47">if</text:span><text:span text:style-name="T48"> (f(coeffs, l) * f(coeffs, r) &lt; 0) </text:span><text:span text:style-name="T47">return</text:span><text:span text:style-name="T48"> [l, r];</text:span></text:p>
      <text:p text:style-name="P85"><text:span text:style-name="T46"><text:s/>76 <text:s/>| <text:s text:c="3"/></text:span><text:span text:style-name="T48"><text:s text:c="4"/>l += step;</text:span></text:p>
      <text:p text:style-name="P85"><text:span text:style-name="T46"><text:s/>77 <text:s/>| <text:s text:c="3"/></text:span><text:span text:style-name="T48"><text:s text:c="2"/>}</text:span></text:p>
      <text:p text:style-name="P85"><text:span text:style-name="T46"><text:s/>78 <text:s/>| <text:s text:c="3"/></text:span><text:span text:style-name="T48"><text:s text:c="2"/></text:span><text:span text:style-name="T47">return</text:span><text:span text:style-name="T48"> [-bound / 2, bound / 2];</text:span></text:p>
      <text:p text:style-name="P86"><text:span text:style-name="T46"><text:s/>79 <text:s/>| <text:s text:c="3"/></text:span>}</text:p>
      <text:p text:style-name="P84"><text:s/>80 <text:s/>| <text:s text:c="3"/></text:p>
      <text:p text:style-name="P84"><text:s/>81 <text:s/>| <text:s text:c="3"/>// -------------------------------------------------------------------------<text:span text:style-name="T50"/></text:p>
      <text:p text:style-name="P84"><text:s/>82 <text:s/>| <text:s text:c="3"/>// <text:s text:c="22"/>МЕТОДЫ ДЛЯ НАХОЖДЕНИЯ КОРНЕЙ<text:span text:style-name="T50"/></text:p>
      <text:p text:style-name="P84"><text:s/>83 <text:s/>| <text:s text:c="3"/>// -------------------------------------------------------------------------<text:span text:style-name="T50"/></text:p>
      <text:p text:style-name="P84"><text:s/>84 <text:s/>| <text:s text:c="3"/></text:p>
      <text:p text:style-name="P84"><text:s/>85 <text:s/>| <text:s text:c="3"/>/**</text:p>
      <text:p text:style-name="P84"><text:s/>86 <text:s/>| <text:s text:c="4"/>* Схема Горнера для понижения степени полинома.</text:p>
      <text:p text:style-name="P84"><text:s/>87 <text:s/>| <text:s text:c="4"/>* После деления на (x - root) уменьшает длину coeffs на единицу</text:p>
      <text:p text:style-name="P84"><text:s/>88 <text:s/>| <text:s text:c="4"/>* @param {number[]} coeffs</text:p>
      <text:p text:style-name="P84"><text:s/>89 <text:s/>| <text:s text:c="4"/>* @param {number} root</text:p>
      <text:p text:style-name="P84"><text:s/>90 <text:s/>| <text:s text:c="4"/>*/<text:span text:style-name="T50"/></text:p>
      <text:p text:style-name="P85"><text:span text:style-name="T46"><text:s/>91 <text:s/>| <text:s text:c="3"/></text:span><text:span text:style-name="T47">function</text:span><text:span text:style-name="T48"> hornersShema(coeffs, root) {</text:span></text:p>
      <text:p text:style-name="P85"><text:span text:style-name="T46"><text:s/>92 <text:s/>| <text:s text:c="3"/></text:span><text:span text:style-name="T48"><text:s text:c="2"/></text:span><text:span text:style-name="T47">const</text:span><text:span text:style-name="T48"> k = coeffs.length;</text:span></text:p>
      <text:p text:style-name="P85"><text:span text:style-name="T46"><text:s/>93 <text:s/>| <text:s text:c="3"/></text:span><text:span text:style-name="T48"><text:s text:c="2"/></text:span><text:span text:style-name="T47">let</text:span><text:span text:style-name="T48"> newCoeffs = </text:span><text:span text:style-name="T47">new</text:span><text:span text:style-name="T48"> Array(k - 1);</text:span></text:p>
      <text:p text:style-name="P85"><text:span text:style-name="T46"><text:s/>94 <text:s/>| <text:s text:c="3"/></text:span><text:span text:style-name="T48"><text:s text:c="2"/>newCoeffs[0] = coeffs[0];</text:span></text:p>
      <text:p text:style-name="P85"><text:span text:style-name="T46"><text:s/>95 <text:s/>| <text:s text:c="3"/></text:span><text:span text:style-name="T48"><text:s text:c="2"/></text:span><text:span text:style-name="T47">for</text:span><text:span text:style-name="T48"> (</text:span><text:span text:style-name="T47">let</text:span><text:span text:style-name="T48"> i = 1; i &lt; k - 1; i++) {</text:span></text:p>
      <text:p text:style-name="P85"><text:span text:style-name="T46"><text:s/>96 <text:s/>| <text:s text:c="3"/></text:span><text:span text:style-name="T48"><text:s text:c="4"/>newCoeffs[i] = coeffs[i] + newCoeffs[i - 1] * root;</text:span></text:p>
      <text:p text:style-name="P85"><text:span text:style-name="T46"><text:s/>97 <text:s/>| <text:s text:c="3"/></text:span><text:span text:style-name="T48"><text:s text:c="2"/>}</text:span></text:p>
      <text:p text:style-name="P85"><text:span text:style-name="T46"><text:s/>98 <text:s/>| <text:s text:c="3"/></text:span><text:span text:style-name="T48"><text:s text:c="2"/></text:span><text:span text:style-name="T47">return</text:span><text:span text:style-name="T48"> newCoeffs;</text:span></text:p>
      <text:p text:style-name="P86"><text:span text:style-name="T46"><text:s/>99 <text:s/>| <text:s text:c="3"/></text:span>}</text:p>
      <text:p text:style-name="P84">100 <text:s/>| <text:s text:c="3"/></text:p>
      <text:p text:style-name="P84">101 <text:s/>| <text:s text:c="3"/>/**</text:p>
      <text:p text:style-name="P84">102 <text:s/>| <text:s text:c="4"/>* Теорема Виета для полинома степени 2</text:p>
      <text:p text:style-name="P84">103 <text:s/>| <text:s text:c="4"/>* @param {number[]} coeffs</text:p>
      <text:p text:style-name="P84">104 <text:s/>| <text:s text:c="4"/>*/<text:span text:style-name="T50"/></text:p>
      <text:p text:style-name="P85"><text:span text:style-name="T46">105 <text:s/>| <text:s text:c="3"/></text:span><text:span text:style-name="T47">function</text:span><text:span text:style-name="T48"> vietasTheorem(coeffs) {</text:span></text:p>
      <text:p text:style-name="P85"><text:span text:style-name="T46">106 <text:s/>| <text:s text:c="3"/></text:span><text:span text:style-name="T48"><text:s text:c="2"/></text:span><text:span text:style-name="T47">const</text:span><text:span text:style-name="T48"> [a, b, c] = coeffs;</text:span></text:p>
      <text:p text:style-name="P85"><text:span text:style-name="T46">107 <text:s/>| <text:s text:c="3"/></text:span><text:span text:style-name="T48"><text:s text:c="2"/></text:span><text:span text:style-name="T47">const</text:span><text:span text:style-name="T48"> D = b * b - 4 * a * c;</text:span></text:p>
      <text:p text:style-name="P85"><text:span text:style-name="T46">108 <text:s/>| <text:s text:c="3"/></text:span><text:span text:style-name="T48"><text:s text:c="2"/></text:span><text:span text:style-name="T47">if</text:span><text:span text:style-name="T48"> (D &gt;= 0)</text:span></text:p>
      <text:p text:style-name="P85"><text:span text:style-name="T46">109 <text:s/>| <text:s text:c="3"/></text:span><text:span text:style-name="T48"><text:s text:c="4"/></text:span><text:span text:style-name="T47">return</text:span><text:span text:style-name="T48"> [(-b + Math.sqrt(D)) / (2 * a), (-b - Math.sqrt(D)) / (2 * a)];</text:span></text:p>
      <text:p text:style-name="P85"><text:span text:style-name="T46">110 <text:s/>| <text:s text:c="3"/></text:span><text:span text:style-name="T48"><text:s text:c="2"/></text:span><text:span text:style-name="T47">if</text:span><text:span text:style-name="T48"> (D === 0) </text:span><text:span text:style-name="T47">return</text:span><text:span text:style-name="T48"> [-b / (2 * a)];</text:span></text:p>
      <text:p text:style-name="P85"><text:span text:style-name="T46">111 <text:s/>| <text:s text:c="3"/></text:span><text:span text:style-name="T48"><text:s text:c="2"/></text:span><text:span text:style-name="T47">else</text:span><text:span text:style-name="T48"> </text:span><text:span text:style-name="T47">return</text:span><text:span text:style-name="T48"> </text:span><text:span text:style-name="T47">null</text:span><text:span text:style-name="T48">;</text:span></text:p>
      <text:p text:style-name="P86"><text:span text:style-name="T46">112 <text:s/>| <text:s text:c="3"/></text:span>}</text:p>
      <text:p text:style-name="P84">113 <text:s/>| <text:s text:c="3"/></text:p>
      <text:p text:style-name="P84">114 <text:s/>| <text:s text:c="3"/>/**</text:p>
      <text:p text:style-name="P84">115 <text:s/>| <text:s text:c="4"/>* Метод Кардано для полинома степени 3</text:p>
      <text:p text:style-name="P84">116 <text:s/>| <text:s text:c="4"/>* @param {number[]} coeffs</text:p>
      <text:p text:style-name="P84">117 <text:s/>| <text:s text:c="4"/>*/<text:span text:style-name="T50"/></text:p>
      <text:p text:style-name="P85"><text:span text:style-name="T46">118 <text:s/>| <text:s text:c="3"/></text:span><text:span text:style-name="T47">function</text:span><text:span text:style-name="T48"> cardanosMethod(coeffs) {</text:span></text:p>
      <text:p text:style-name="P85"><text:span text:style-name="T46">119 <text:s/>| <text:s text:c="3"/></text:span><text:span text:style-name="T48"><text:s text:c="2"/></text:span><text:span text:style-name="T47">const</text:span><text:span text:style-name="T48"> [a, b, c, d] = coeffs;</text:span></text:p>
      <text:p text:style-name="P84">120 <text:s/>| <text:s text:c="3"/></text:p>
      <text:p text:style-name="P85"><text:span text:style-name="T46">121 <text:s/>| <text:s text:c="3"/></text:span><text:span text:style-name="T48"><text:s text:c="2"/></text:span><text:span text:style-name="T47">let</text:span><text:span text:style-name="T48"> A = b / a;</text:span></text:p>
      <text:p text:style-name="P85"><text:span text:style-name="T46">122 <text:s/>| <text:s text:c="3"/></text:span><text:span text:style-name="T48"><text:s text:c="2"/></text:span><text:span text:style-name="T47">let</text:span><text:span text:style-name="T48"> B = c / a;</text:span></text:p>
      <text:p text:style-name="P85"><text:span text:style-name="T46">123 <text:s/>| <text:s text:c="3"/></text:span><text:span text:style-name="T48"><text:s text:c="2"/></text:span><text:span text:style-name="T47">let</text:span><text:span text:style-name="T48"> C = d / a;</text:span></text:p>
      <text:p text:style-name="P84">124 <text:s/>| <text:s text:c="3"/></text:p>
      <text:p text:style-name="P85"><text:span text:style-name="T46">125 <text:s/>| <text:s text:c="3"/></text:span><text:span text:style-name="T48"><text:s text:c="2"/></text:span><text:span text:style-name="T47">const</text:span><text:span text:style-name="T48"> p = B - A ** 2 / 3;</text:span></text:p>
      <text:p text:style-name="P85"><text:span text:style-name="T46">126 <text:s/>| <text:s text:c="3"/></text:span><text:span text:style-name="T48"><text:s text:c="2"/></text:span><text:span text:style-name="T47">const</text:span><text:span text:style-name="T48"> q = (2 * A ** 3) / 27 - (A * B) / 3 + C;</text:span></text:p>
      <text:p text:style-name="P85"><text:span text:style-name="T46">127 <text:s/>| <text:s text:c="3"/></text:span><text:span text:style-name="T48"><text:s text:c="2"/></text:span><text:span text:style-name="T47">const</text:span><text:span text:style-name="T48"> Q = (p / 3) ** 3 + (q / 2) ** 2;</text:span></text:p>
      <text:p text:style-name="P85"><text:span text:style-name="T46">128 <text:s/>| <text:s text:c="3"/></text:span><text:span text:style-name="T48"><text:s text:c="2"/></text:span><text:span text:style-name="T47">const</text:span><text:span text:style-name="T48"> shift = A / 3;</text:span></text:p>
      <text:p text:style-name="P84">129 <text:s/>| <text:s text:c="3"/></text:p>
      <text:p text:style-name="P85"><text:span text:style-name="T46">130 <text:s/>| <text:s text:c="3"/></text:span><text:span text:style-name="T48"><text:s text:c="2"/></text:span><text:span text:style-name="T47">const</text:span><text:span text:style-name="T48"> cbrt = (x) =&gt; Math.sign(x) * Math.pow(Math.abs(x), 1 / 3);</text:span></text:p>
      <text:p text:style-name="P84">131 <text:s/>| <text:s text:c="3"/></text:p>
      <text:p text:style-name="P85"><text:span text:style-name="T46">132 <text:s/>| <text:s text:c="3"/></text:span><text:span text:style-name="T48"><text:s text:c="2"/></text:span><text:span text:style-name="T47">if</text:span><text:span text:style-name="T48"> (Math.abs(Q) &lt; 1e-5) {</text:span></text:p>
      <text:p text:style-name="P85"><text:span text:style-name="T46">133 <text:s/>| <text:s text:c="3"/></text:span><text:span text:style-name="T48"><text:s text:c="4"/></text:span><text:span text:style-name="T47">const</text:span><text:span text:style-name="T48"> u = cbrt(-q / 2);</text:span></text:p>
      <text:p text:style-name="P85"><text:span text:style-name="T46">134 <text:s/>| <text:s text:c="3"/></text:span><text:span text:style-name="T48"><text:s text:c="4"/></text:span><text:span text:style-name="T47">const</text:span><text:span text:style-name="T48"> x1 = 2 * u - shift;</text:span></text:p>
      <text:p text:style-name="P85"><text:span text:style-name="T46">135 <text:s/>| <text:s text:c="3"/></text:span><text:span text:style-name="T48"><text:s text:c="4"/></text:span><text:span text:style-name="T47">const</text:span><text:span text:style-name="T48"> x2 = -u - shift;</text:span></text:p>
      <text:p text:style-name="P85"><text:span text:style-name="T46">136 <text:s/>| <text:s text:c="3"/></text:span><text:span text:style-name="T48"><text:s text:c="4"/></text:span><text:span text:style-name="T47">return</text:span><text:span text:style-name="T48"> [x1, x2];</text:span></text:p>
      <text:p text:style-name="P85"><text:span text:style-name="T46">137 <text:s/>| <text:s text:c="3"/></text:span><text:span text:style-name="T48"><text:s text:c="2"/>} </text:span><text:span text:style-name="T47">else</text:span><text:span text:style-name="T48"> </text:span><text:span text:style-name="T47">if</text:span><text:span text:style-name="T48"> (Q &gt; 0) {</text:span></text:p>
      <text:p text:style-name="P85"><text:soft-page-break/><text:span text:style-name="T46">138 <text:s/>| <text:s text:c="3"/></text:span><text:span text:style-name="T48"><text:s text:c="4"/></text:span><text:span text:style-name="T47">const</text:span><text:span text:style-name="T48"> u = cbrt(-q / 2 + Math.sqrt(Q));</text:span></text:p>
      <text:p text:style-name="P85"><text:span text:style-name="T46">139 <text:s/>| <text:s text:c="3"/></text:span><text:span text:style-name="T48"><text:s text:c="4"/></text:span><text:span text:style-name="T47">const</text:span><text:span text:style-name="T48"> v = cbrt(-q / 2 - Math.sqrt(Q));</text:span></text:p>
      <text:p text:style-name="P85"><text:span text:style-name="T46">140 <text:s/>| <text:s text:c="3"/></text:span><text:span text:style-name="T48"><text:s text:c="4"/></text:span><text:span text:style-name="T47">const</text:span><text:span text:style-name="T48"> x1 = u + v - shift;</text:span></text:p>
      <text:p text:style-name="P85"><text:span text:style-name="T46">141 <text:s/>| <text:s text:c="3"/></text:span><text:span text:style-name="T48"><text:s text:c="4"/></text:span><text:span text:style-name="T47">return</text:span><text:span text:style-name="T48"> [x1];</text:span></text:p>
      <text:p text:style-name="P85"><text:span text:style-name="T46">142 <text:s/>| <text:s text:c="3"/></text:span><text:span text:style-name="T48"><text:s text:c="2"/>} </text:span><text:span text:style-name="T47">else</text:span><text:span text:style-name="T48"> {</text:span></text:p>
      <text:p text:style-name="P85"><text:span text:style-name="T46">143 <text:s/>| <text:s text:c="3"/></text:span><text:span text:style-name="T48"><text:s text:c="4"/></text:span><text:span text:style-name="T47">const</text:span><text:span text:style-name="T48"> r = Math.sqrt(-(p ** 3) / 27);</text:span></text:p>
      <text:p text:style-name="P85"><text:span text:style-name="T46">144 <text:s/>| <text:s text:c="3"/></text:span><text:span text:style-name="T48"><text:s text:c="4"/></text:span><text:span text:style-name="T47">const</text:span><text:span text:style-name="T48"> t = 2 * Math.sqrt(-p / 3);</text:span></text:p>
      <text:p text:style-name="P85"><text:span text:style-name="T46">145 <text:s/>| <text:s text:c="3"/></text:span><text:span text:style-name="T48"><text:s text:c="4"/></text:span><text:span text:style-name="T47">const</text:span><text:span text:style-name="T48"> phi = (1 / 3) * Math.acos(-q / (2 * r));</text:span></text:p>
      <text:p text:style-name="P85"><text:span text:style-name="T46">146 <text:s/>| <text:s text:c="3"/></text:span><text:span text:style-name="T48"><text:s text:c="4"/></text:span><text:span text:style-name="T47">return</text:span><text:span text:style-name="T48"> [</text:span></text:p>
      <text:p text:style-name="P85"><text:span text:style-name="T46">147 <text:s/>| <text:s text:c="3"/></text:span><text:span text:style-name="T48"><text:s text:c="6"/>t * Math.cos(phi) - shift,</text:span></text:p>
      <text:p text:style-name="P85"><text:span text:style-name="T46">148 <text:s/>| <text:s text:c="3"/></text:span><text:span text:style-name="T48"><text:s text:c="6"/>t * Math.cos(phi + (2 * Math.PI) / 3) - shift,</text:span></text:p>
      <text:p text:style-name="P85"><text:span text:style-name="T46">149 <text:s/>| <text:s text:c="3"/></text:span><text:span text:style-name="T48"><text:s text:c="6"/>t * Math.cos(phi + (4 * Math.PI) / 3) - shift,</text:span></text:p>
      <text:p text:style-name="P85"><text:span text:style-name="T46">150 <text:s/>| <text:s text:c="3"/></text:span><text:span text:style-name="T48"><text:s text:c="4"/>];</text:span></text:p>
      <text:p text:style-name="P85"><text:span text:style-name="T46">151 <text:s/>| <text:s text:c="3"/></text:span><text:span text:style-name="T48"><text:s text:c="2"/>}</text:span></text:p>
      <text:p text:style-name="P86"><text:span text:style-name="T46">152 <text:s/>| <text:s text:c="3"/></text:span>}</text:p>
      <text:p text:style-name="P84">153 <text:s/>| <text:s text:c="3"/></text:p>
      <text:p text:style-name="P84">154 <text:s/>| <text:s text:c="3"/>/**</text:p>
      <text:p text:style-name="P84">155 <text:s/>| <text:s text:c="4"/>* Метод касательных</text:p>
      <text:p text:style-name="P84">156 <text:s/>| <text:s text:c="4"/>* @param {number[]} coeffs</text:p>
      <text:p text:style-name="P84">157 <text:s/>| <text:s text:c="4"/>* @param {number} eps - точность</text:p>
      <text:p text:style-name="P84">158 <text:s/>| <text:s text:c="4"/>* @param {number} N - количество итераций</text:p>
      <text:p text:style-name="P84">159 <text:s/>| <text:s text:c="4"/>* @param {number} x0 - предполагаемый корень</text:p>
      <text:p text:style-name="P84">160 <text:s/>| <text:s text:c="4"/>*/<text:span text:style-name="T50"/></text:p>
      <text:p text:style-name="P85"><text:span text:style-name="T46">161 <text:s/>| <text:s text:c="3"/></text:span><text:span text:style-name="T47">function</text:span><text:span text:style-name="T48"> tangentsMethod(coeffs, eps, N, x0) {</text:span></text:p>
      <text:p text:style-name="P85"><text:span text:style-name="T46">162 <text:s/>| <text:s text:c="3"/></text:span><text:span text:style-name="T48"><text:s text:c="2"/></text:span><text:span text:style-name="T47">for</text:span><text:span text:style-name="T48"> (</text:span><text:span text:style-name="T47">let</text:span><text:span text:style-name="T48"> i = 0; i &lt; N; i++) {</text:span></text:p>
      <text:p text:style-name="P85"><text:span text:style-name="T46">163 <text:s/>| <text:s text:c="3"/></text:span><text:span text:style-name="T48"><text:s text:c="4"/></text:span><text:span text:style-name="T47">const</text:span><text:span text:style-name="T48"> fx = f(coeffs, x0);</text:span></text:p>
      <text:p text:style-name="P85"><text:span text:style-name="T46">164 <text:s/>| <text:s text:c="3"/></text:span><text:span text:style-name="T48"><text:s text:c="4"/></text:span><text:span text:style-name="T47">const</text:span><text:span text:style-name="T48"> dfx = df(coeffs, x0);</text:span></text:p>
      <text:p text:style-name="P85"><text:span text:style-name="T46">165 <text:s/>| <text:s text:c="3"/></text:span><text:span text:style-name="T48"><text:s text:c="4"/></text:span><text:span text:style-name="T47">if</text:span><text:span text:style-name="T48"> (Math.abs(dfx) &lt; 1e-14) {</text:span></text:p>
      <text:p text:style-name="P85"><text:span text:style-name="T46">166 <text:s/>| <text:s text:c="3"/></text:span><text:span text:style-name="T48"><text:s text:c="6"/></text:span><text:span text:style-name="T47">if</text:span><text:span text:style-name="T48"> (Math.abs(fx) &lt; eps) </text:span><text:span text:style-name="T47">return</text:span><text:span text:style-name="T48"> x0;</text:span></text:p>
      <text:p text:style-name="P85"><text:span text:style-name="T46">167 <text:s/>| <text:s text:c="3"/></text:span><text:span text:style-name="T48"><text:s text:c="6"/></text:span><text:span text:style-name="T47">else</text:span><text:span text:style-name="T48"> </text:span><text:span text:style-name="T47">return</text:span><text:span text:style-name="T48"> </text:span><text:span text:style-name="T47">null</text:span><text:span text:style-name="T48">;</text:span></text:p>
      <text:p text:style-name="P85"><text:span text:style-name="T46">168 <text:s/>| <text:s text:c="3"/></text:span><text:span text:style-name="T48"><text:s text:c="4"/>}</text:span></text:p>
      <text:p text:style-name="P85"><text:span text:style-name="T46">169 <text:s/>| <text:s text:c="3"/></text:span><text:span text:style-name="T48"><text:s text:c="4"/></text:span><text:span text:style-name="T47">const</text:span><text:span text:style-name="T48"> delta = fx / dfx;</text:span></text:p>
      <text:p text:style-name="P85"><text:span text:style-name="T46">170 <text:s/>| <text:s text:c="3"/></text:span><text:span text:style-name="T48"><text:s text:c="4"/>x0 -= delta;</text:span></text:p>
      <text:p text:style-name="P85"><text:span text:style-name="T46">171 <text:s/>| <text:s text:c="3"/></text:span><text:span text:style-name="T48"><text:s text:c="4"/></text:span><text:span text:style-name="T47">if</text:span><text:span text:style-name="T48"> (Math.abs(delta) &lt; eps) {</text:span></text:p>
      <text:p text:style-name="P85"><text:span text:style-name="T46">172 <text:s/>| <text:s text:c="3"/></text:span><text:span text:style-name="T48"><text:s text:c="6"/></text:span><text:span text:style-name="T47">if</text:span><text:span text:style-name="T48"> (Math.abs(f(coeffs, x0)) &lt; eps) </text:span><text:span text:style-name="T47">return</text:span><text:span text:style-name="T48"> x0;</text:span></text:p>
      <text:p text:style-name="P85"><text:span text:style-name="T46">173 <text:s/>| <text:s text:c="3"/></text:span><text:span text:style-name="T48"><text:s text:c="4"/>}</text:span></text:p>
      <text:p text:style-name="P85"><text:span text:style-name="T46">174 <text:s/>| <text:s text:c="3"/></text:span><text:span text:style-name="T48"><text:s text:c="2"/>}</text:span></text:p>
      <text:p text:style-name="P85"><text:span text:style-name="T46">175 <text:s/>| <text:s text:c="3"/></text:span><text:span text:style-name="T48"><text:s text:c="2"/></text:span><text:span text:style-name="T47">return</text:span><text:span text:style-name="T48"> </text:span><text:span text:style-name="T47">null</text:span><text:span text:style-name="T48">;</text:span></text:p>
      <text:p text:style-name="P86"><text:span text:style-name="T46">176 <text:s/>| <text:s text:c="3"/></text:span>}</text:p>
      <text:p text:style-name="P84">177 <text:s/>| <text:s text:c="3"/></text:p>
      <text:p text:style-name="P84">178 <text:s/>| <text:s text:c="3"/>/**</text:p>
      <text:p text:style-name="P84">179 <text:s/>| <text:s text:c="4"/>* Метод хорд</text:p>
      <text:p text:style-name="P84">180 <text:s/>| <text:s text:c="4"/>* @param {number[]} coeffs</text:p>
      <text:p text:style-name="P84">181 <text:s/>| <text:s text:c="4"/>* @param {number} eps - точность</text:p>
      <text:p text:style-name="P84">182 <text:s/>| <text:s text:c="4"/>* @param {number} N - количество итераций</text:p>
      <text:p text:style-name="P84">183 <text:s/>| <text:s text:c="4"/>* @param {number} l - левая граница</text:p>
      <text:p text:style-name="P84">184 <text:s/>| <text:s text:c="4"/>* @param {number} r - правая граница</text:p>
      <text:p text:style-name="P84">185 <text:s/>| <text:s text:c="4"/>*/<text:span text:style-name="T50"/></text:p>
      <text:p text:style-name="P85"><text:span text:style-name="T46">186 <text:s/>| <text:s text:c="3"/></text:span><text:span text:style-name="T47">function</text:span><text:span text:style-name="T48"> chordsMethod(coeffs, eps, N, l, r) {</text:span></text:p>
      <text:p text:style-name="P85"><text:span text:style-name="T46">187 <text:s/>| <text:s text:c="3"/></text:span><text:span text:style-name="T48"><text:s text:c="2"/></text:span><text:span text:style-name="T47">let</text:span><text:span text:style-name="T48"> x = l;</text:span></text:p>
      <text:p text:style-name="P85"><text:span text:style-name="T46">188 <text:s/>| <text:s text:c="3"/></text:span><text:span text:style-name="T48"><text:s text:c="2"/></text:span><text:span text:style-name="T47">for</text:span><text:span text:style-name="T48"> (</text:span><text:span text:style-name="T47">let</text:span><text:span text:style-name="T48"> i = 0; i &lt; N; i++) {</text:span></text:p>
      <text:p text:style-name="P85"><text:span text:style-name="T46">189 <text:s/>| <text:s text:c="3"/></text:span><text:span text:style-name="T48"><text:s text:c="4"/></text:span><text:span text:style-name="T47">let</text:span><text:span text:style-name="T48"> xPrev = x;</text:span></text:p>
      <text:p text:style-name="P85"><text:span text:style-name="T46">190 <text:s/>| <text:s text:c="3"/></text:span><text:span text:style-name="T48"><text:s text:c="4"/></text:span><text:span text:style-name="T47">let</text:span><text:span text:style-name="T48"> fl = f(coeffs, l);</text:span></text:p>
      <text:p text:style-name="P85"><text:span text:style-name="T46">191 <text:s/>| <text:s text:c="3"/></text:span><text:span text:style-name="T48"><text:s text:c="4"/></text:span><text:span text:style-name="T47">let</text:span><text:span text:style-name="T48"> fr = f(coeffs, r);</text:span></text:p>
      <text:p text:style-name="P85"><text:span text:style-name="T46">192 <text:s/>| <text:s text:c="3"/></text:span><text:span text:style-name="T48"><text:s text:c="4"/></text:span><text:span text:style-name="T47">if</text:span><text:span text:style-name="T48"> (Math.abs(fr - fl) &lt; 1e-12) {</text:span></text:p>
      <text:p text:style-name="P85"><text:span text:style-name="T46">193 <text:s/>| <text:s text:c="3"/></text:span><text:span text:style-name="T48"><text:s text:c="6"/></text:span><text:span text:style-name="T47">if</text:span><text:span text:style-name="T48"> (Math.abs(f(coeffs, x)) &lt; eps) </text:span><text:span text:style-name="T47">return</text:span><text:span text:style-name="T48"> x;</text:span></text:p>
      <text:p text:style-name="P85"><text:span text:style-name="T46">194 <text:s/>| <text:s text:c="3"/></text:span><text:span text:style-name="T48"><text:s text:c="6"/>l += eps;</text:span></text:p>
      <text:p text:style-name="P85"><text:span text:style-name="T46">195 <text:s/>| <text:s text:c="3"/></text:span><text:span text:style-name="T48"><text:s text:c="6"/></text:span><text:span text:style-name="T47">continue</text:span><text:span text:style-name="T48">;</text:span></text:p>
      <text:p text:style-name="P85"><text:span text:style-name="T46">196 <text:s/>| <text:s text:c="3"/></text:span><text:span text:style-name="T48"><text:s text:c="4"/>}</text:span></text:p>
      <text:p text:style-name="P85"><text:span text:style-name="T46">197 <text:s/>| <text:s text:c="3"/></text:span><text:span text:style-name="T48"><text:s text:c="4"/>x = l - (fl * (r - l)) / (fr - fl);</text:span></text:p>
      <text:p text:style-name="P85"><text:span text:style-name="T46">198 <text:s/>| <text:s text:c="3"/></text:span><text:span text:style-name="T48"><text:s text:c="4"/></text:span><text:span text:style-name="T47">const</text:span><text:span text:style-name="T48"> fx = f(coeffs, x);</text:span></text:p>
      <text:p text:style-name="P85"><text:span text:style-name="T46">199 <text:s/>| <text:s text:c="3"/></text:span><text:span text:style-name="T48"><text:s text:c="4"/></text:span><text:span text:style-name="T47">if</text:span><text:span text:style-name="T48"> (fx === 0) </text:span><text:span text:style-name="T47">return</text:span><text:span text:style-name="T48"> x;</text:span></text:p>
      <text:p text:style-name="P85"><text:span text:style-name="T46">200 <text:s/>| <text:s text:c="3"/></text:span><text:span text:style-name="T48"><text:s text:c="4"/></text:span><text:span text:style-name="T47">if</text:span><text:span text:style-name="T48"> (fl * fx &lt; 0) r = x;</text:span></text:p>
      <text:p text:style-name="P85"><text:span text:style-name="T46">201 <text:s/>| <text:s text:c="3"/></text:span><text:span text:style-name="T48"><text:s text:c="4"/></text:span><text:span text:style-name="T47">else</text:span><text:span text:style-name="T48"> l = x;</text:span></text:p>
      <text:p text:style-name="P85"><text:span text:style-name="T46">202 <text:s/>| <text:s text:c="3"/></text:span><text:span text:style-name="T48"><text:s text:c="4"/></text:span><text:span text:style-name="T47">if</text:span><text:span text:style-name="T48"> (Math.abs(x - xPrev) &lt; eps) {</text:span></text:p>
      <text:p text:style-name="P85"><text:span text:style-name="T46">203 <text:s/>| <text:s text:c="3"/></text:span><text:span text:style-name="T48"><text:s text:c="6"/></text:span><text:span text:style-name="T47">if</text:span><text:span text:style-name="T48"> (Math.abs(fx) &lt; eps) </text:span><text:span text:style-name="T47">return</text:span><text:span text:style-name="T48"> x;</text:span></text:p>
      <text:p text:style-name="P85"><text:span text:style-name="T46">204 <text:s/>| <text:s text:c="3"/></text:span><text:span text:style-name="T48"><text:s text:c="4"/>}</text:span></text:p>
      <text:p text:style-name="P85"><text:span text:style-name="T46">205 <text:s/>| <text:s text:c="3"/></text:span><text:span text:style-name="T48"><text:s text:c="2"/>}</text:span></text:p>
      <text:p text:style-name="P85"><text:span text:style-name="T46">206 <text:s/>| <text:s text:c="3"/></text:span><text:span text:style-name="T48"><text:s text:c="2"/></text:span><text:span text:style-name="T47">return</text:span><text:span text:style-name="T48"> </text:span><text:span text:style-name="T47">null</text:span><text:span text:style-name="T48">;</text:span></text:p>
      <text:p text:style-name="P86"><text:span text:style-name="T46">207 <text:s/>| <text:s text:c="3"/></text:span>}</text:p>
      <text:p text:style-name="P84">208 <text:s/>| <text:s text:c="3"/></text:p>
      <text:p text:style-name="P84"><text:soft-page-break/>209 <text:s/>| <text:s text:c="3"/>/**</text:p>
      <text:p text:style-name="P84">210 <text:s/>| <text:s text:c="4"/>* Комбинированный метод (метод хорд и касательных)</text:p>
      <text:p text:style-name="P84">211 <text:s/>| <text:s text:c="4"/>* @param {number[]} coeffs</text:p>
      <text:p text:style-name="P84">212 <text:s/>| <text:s text:c="4"/>* @param {number} eps - точность</text:p>
      <text:p text:style-name="P84">213 <text:s/>| <text:s text:c="4"/>* @param {number} N - количество итераций</text:p>
      <text:p text:style-name="P84">214 <text:s/>| <text:s text:c="4"/>* @param {number} l - левая граница</text:p>
      <text:p text:style-name="P84">215 <text:s/>| <text:s text:c="4"/>* @param {number} r - правая граница</text:p>
      <text:p text:style-name="P84">216 <text:s/>| <text:s text:c="4"/>*/<text:span text:style-name="T50"/></text:p>
      <text:p text:style-name="P85"><text:span text:style-name="T46">217 <text:s/>| <text:s text:c="3"/></text:span><text:span text:style-name="T47">function</text:span><text:span text:style-name="T48"> chordsAndTangentsMethod(coeffs, eps, N, l, r) {</text:span></text:p>
      <text:p text:style-name="P85"><text:span text:style-name="T46">218 <text:s/>| <text:s text:c="3"/></text:span><text:span text:style-name="T48"><text:s text:c="2"/></text:span><text:span text:style-name="T47">for</text:span><text:span text:style-name="T48"> (</text:span><text:span text:style-name="T47">let</text:span><text:span text:style-name="T48"> i = 0; i &lt; N; i++) {</text:span></text:p>
      <text:p text:style-name="P85"><text:span text:style-name="T46">219 <text:s/>| <text:s text:c="3"/></text:span><text:span text:style-name="T48"><text:s text:c="4"/></text:span><text:span text:style-name="T47">let</text:span><text:span text:style-name="T48"> fl = f(coeffs, l),</text:span></text:p>
      <text:p text:style-name="P85"><text:span text:style-name="T46">220 <text:s/>| <text:s text:c="3"/></text:span><text:span text:style-name="T48"><text:s text:c="6"/>fr = f(coeffs, r);</text:span></text:p>
      <text:p text:style-name="P85"><text:span text:style-name="T46">221 <text:s/>| <text:s text:c="3"/></text:span><text:span text:style-name="T48"><text:s text:c="4"/></text:span><text:span text:style-name="T47">if</text:span><text:span text:style-name="T48"> (Math.abs(fr - fl) &lt; 1e-18) {</text:span></text:p>
      <text:p text:style-name="P85"><text:span text:style-name="T46">222 <text:s/>| <text:s text:c="3"/></text:span><text:span text:style-name="T48"><text:s text:c="6"/></text:span><text:span text:style-name="T47">if</text:span><text:span text:style-name="T48"> (Math.abs(f(coeffs, (l + r) / 2)) &lt; eps) </text:span><text:span text:style-name="T47">return</text:span><text:span text:style-name="T48"> (l + r) / 2;</text:span></text:p>
      <text:p text:style-name="P85"><text:span text:style-name="T46">223 <text:s/>| <text:s text:c="3"/></text:span><text:span text:style-name="T48"><text:s text:c="6"/>l += eps;</text:span></text:p>
      <text:p text:style-name="P85"><text:span text:style-name="T46">224 <text:s/>| <text:s text:c="3"/></text:span><text:span text:style-name="T48"><text:s text:c="6"/></text:span><text:span text:style-name="T47">continue</text:span><text:span text:style-name="T48">;</text:span></text:p>
      <text:p text:style-name="P85"><text:span text:style-name="T46">225 <text:s/>| <text:s text:c="3"/></text:span><text:span text:style-name="T48"><text:s text:c="4"/>}</text:span></text:p>
      <text:p text:style-name="P85"><text:span text:style-name="T46">226 <text:s/>| <text:s text:c="3"/></text:span><text:span text:style-name="T48"><text:s text:c="4"/></text:span><text:span text:style-name="T47">if</text:span><text:span text:style-name="T48"> (fr * ddf(coeffs, r) &gt; 0) {</text:span></text:p>
      <text:p text:style-name="P85"><text:span text:style-name="T46">227 <text:s/>| <text:s text:c="3"/></text:span><text:span text:style-name="T48"><text:s text:c="6"/></text:span><text:span text:style-name="T47">if</text:span><text:span text:style-name="T48"> (Math.abs(df(coeffs, r)) &gt; 1e-15) r = r - fr / df(coeffs, r);</text:span></text:p>
      <text:p text:style-name="P85"><text:span text:style-name="T46">228 <text:s/>| <text:s text:c="3"/></text:span><text:span text:style-name="T48"><text:s text:c="6"/>l = l - (fl * (r - l)) / (fr - fl);</text:span></text:p>
      <text:p text:style-name="P85"><text:span text:style-name="T46">229 <text:s/>| <text:s text:c="3"/></text:span><text:span text:style-name="T48"><text:s text:c="4"/>} </text:span><text:span text:style-name="T47">else</text:span><text:span text:style-name="T48"> {</text:span></text:p>
      <text:p text:style-name="P85"><text:span text:style-name="T46">230 <text:s/>| <text:s text:c="3"/></text:span><text:span text:style-name="T48"><text:s text:c="6"/></text:span><text:span text:style-name="T47">if</text:span><text:span text:style-name="T48"> (Math.abs(df(coeffs, l)) &gt; 1e-15) l = l - fl / df(coeffs, l);</text:span></text:p>
      <text:p text:style-name="P85"><text:span text:style-name="T46">231 <text:s/>| <text:s text:c="3"/></text:span><text:span text:style-name="T48"><text:s text:c="6"/>r = r - (fr * (r - l)) / (fr - fl);</text:span></text:p>
      <text:p text:style-name="P85"><text:span text:style-name="T46">232 <text:s/>| <text:s text:c="3"/></text:span><text:span text:style-name="T48"><text:s text:c="4"/>}</text:span></text:p>
      <text:p text:style-name="P85"><text:span text:style-name="T46">233 <text:s/>| <text:s text:c="3"/></text:span><text:span text:style-name="T48"><text:s text:c="4"/></text:span><text:span text:style-name="T47">if</text:span><text:span text:style-name="T48"> (Math.abs(r - l) &lt; eps) {</text:span></text:p>
      <text:p text:style-name="P85"><text:span text:style-name="T46">234 <text:s/>| <text:s text:c="3"/></text:span><text:span text:style-name="T48"><text:s text:c="6"/></text:span><text:span text:style-name="T47">if</text:span><text:span text:style-name="T48"> (Math.abs(f(coeffs, (l + r) / 2)) &lt; eps) </text:span><text:span text:style-name="T47">return</text:span><text:span text:style-name="T48"> (l + r) / 2;</text:span></text:p>
      <text:p text:style-name="P85"><text:span text:style-name="T46">235 <text:s/>| <text:s text:c="3"/></text:span><text:span text:style-name="T48"><text:s text:c="4"/>}</text:span></text:p>
      <text:p text:style-name="P85"><text:span text:style-name="T46">236 <text:s/>| <text:s text:c="3"/></text:span><text:span text:style-name="T48"><text:s text:c="2"/>}</text:span></text:p>
      <text:p text:style-name="P85"><text:span text:style-name="T46">237 <text:s/>| <text:s text:c="3"/></text:span><text:span text:style-name="T48"><text:s text:c="2"/></text:span><text:span text:style-name="T47">return</text:span><text:span text:style-name="T48"> </text:span><text:span text:style-name="T47">null</text:span><text:span text:style-name="T48">;</text:span></text:p>
      <text:p text:style-name="P86"><text:span text:style-name="T46">238 <text:s/>| <text:s text:c="3"/></text:span>}</text:p>
      <text:p text:style-name="P84">239 <text:s/>| <text:s text:c="3"/></text:p>
      <text:p text:style-name="P84">240 <text:s/>| <text:s text:c="3"/>// -------------------------------------------------------------------------<text:span text:style-name="T50"/></text:p>
      <text:p text:style-name="P84">241 <text:s/>| <text:s text:c="3"/>// <text:s text:c="11"/>ФУНКЦИИ ДЛЯ ВАЛИДАЦИИ ПОЛЬЗОВАТЕЛЬСКОГО ВВОДА<text:span text:style-name="T50"/></text:p>
      <text:p text:style-name="P84">242 <text:s/>| <text:s text:c="3"/>// -------------------------------------------------------------------------<text:span text:style-name="T50"/></text:p>
      <text:p text:style-name="P84">243 <text:s/>| <text:s text:c="3"/></text:p>
      <text:p text:style-name="P84">244 <text:s/>| <text:s text:c="3"/>/**</text:p>
      <text:p text:style-name="P84">245 <text:s/>| <text:s text:c="4"/>* Проверка числа</text:p>
      <text:p text:style-name="P84">246 <text:s/>| <text:s text:c="4"/>* @param {number} val</text:p>
      <text:p text:style-name="P84">247 <text:s/>| <text:s text:c="4"/>*/<text:span text:style-name="T50"/></text:p>
      <text:p text:style-name="P85"><text:span text:style-name="T46">248 <text:s/>| <text:s text:c="3"/></text:span><text:span text:style-name="T47">function</text:span><text:span text:style-name="T48"> isValidNumber(val) {</text:span></text:p>
      <text:p text:style-name="P85"><text:span text:style-name="T46">249 <text:s/>| <text:s text:c="3"/></text:span><text:span text:style-name="T48"><text:s text:c="2"/></text:span><text:span text:style-name="T47">return</text:span><text:span text:style-name="T48"> isFinite(val) &amp;&amp; Math.abs(val) &lt;= Number.MAX_VALUE;</text:span></text:p>
      <text:p text:style-name="P86"><text:span text:style-name="T46">250 <text:s/>| <text:s text:c="3"/></text:span>}</text:p>
      <text:p text:style-name="P84">251 <text:s/>| <text:s text:c="3"/></text:p>
      <text:p text:style-name="P84">252 <text:s/>| <text:s text:c="3"/>/**</text:p>
      <text:p text:style-name="P84">253 <text:s/>| <text:s text:c="4"/>* Запрос ввода строки</text:p>
      <text:p text:style-name="P84">254 <text:s/>| <text:s text:c="4"/>*/<text:span text:style-name="T50"/></text:p>
      <text:p text:style-name="P85"><text:span text:style-name="T46">255 <text:s/>| <text:s text:c="3"/></text:span><text:span text:style-name="T47">function</text:span><text:span text:style-name="T48"> readLine() {</text:span></text:p>
      <text:p text:style-name="P85"><text:span text:style-name="T46">256 <text:s/>| <text:s text:c="3"/></text:span><text:span text:style-name="T48"><text:s text:c="2"/></text:span><text:span text:style-name="T47">const</text:span><text:span text:style-name="T48"> buffer = Buffer.alloc(500);</text:span></text:p>
      <text:p text:style-name="P85"><text:span text:style-name="T46">257 <text:s/>| <text:s text:c="3"/></text:span><text:span text:style-name="T48"><text:s text:c="2"/></text:span><text:span text:style-name="T47">const</text:span><text:span text:style-name="T48"> bytesRead = fs.readSync(0, buffer, 0, 500);</text:span></text:p>
      <text:p text:style-name="P85"><text:span text:style-name="T46">258 <text:s/>| <text:s text:c="3"/></text:span><text:span text:style-name="T48"><text:s text:c="2"/></text:span><text:span text:style-name="T47">if</text:span><text:span text:style-name="T48"> (bytesRead === 0) </text:span><text:span text:style-name="T47">return</text:span><text:span text:style-name="T48"> </text:span><text:span text:style-name="T49">""</text:span><text:span text:style-name="T48">;</text:span></text:p>
      <text:p text:style-name="P85"><text:span text:style-name="T46">259 <text:s/>| <text:s text:c="3"/></text:span><text:span text:style-name="T48"><text:s text:c="2"/></text:span><text:span text:style-name="T47">return</text:span><text:span text:style-name="T48"> buffer.toString(</text:span><text:span text:style-name="T49">"utf8"</text:span><text:span text:style-name="T48">, 0, bytesRead).trim();</text:span></text:p>
      <text:p text:style-name="P86"><text:span text:style-name="T46">260 <text:s/>| <text:s text:c="3"/></text:span>}</text:p>
      <text:p text:style-name="P84">261 <text:s/>| <text:s text:c="3"/></text:p>
      <text:p text:style-name="P84">262 <text:s/>| <text:s text:c="3"/>/**</text:p>
      <text:p text:style-name="P84">263 <text:s/>| <text:s text:c="4"/>* Получение данных из пользовательского ввода</text:p>
      <text:p text:style-name="P84">264 <text:s/>| <text:s text:c="4"/>*/<text:span text:style-name="T50"/></text:p>
      <text:p text:style-name="P85"><text:span text:style-name="T46">265 <text:s/>| <text:s text:c="3"/></text:span><text:span text:style-name="T47">function</text:span><text:span text:style-name="T48"> getInput() {</text:span></text:p>
      <text:p text:style-name="P85"><text:span text:style-name="T46">266 <text:s/>| <text:s text:c="3"/></text:span><text:span text:style-name="T48"><text:s text:c="2"/></text:span><text:span text:style-name="T47">let</text:span><text:span text:style-name="T48"> coeffsInput, eps, N, x0, l, r;</text:span></text:p>
      <text:p text:style-name="P85"><text:span text:style-name="T46">267 <text:s/>| <text:s text:c="3"/></text:span><text:span text:style-name="T48"><text:s text:c="2"/>process.stdout.write(</text:span></text:p>
      <text:p text:style-name="P85"><text:span text:style-name="T46">268 <text:s/>| <text:s text:c="3"/></text:span><text:span text:style-name="T48"><text:s text:c="4"/></text:span><text:span text:style-name="T49">"Введите 7 коэффициентов полинома (a b c d n m k) через пробел:\n&gt; "</text:span><text:span text:style-name="T48">,</text:span></text:p>
      <text:p text:style-name="P85"><text:span text:style-name="T46">269 <text:s/>| <text:s text:c="3"/></text:span><text:span text:style-name="T48"><text:s text:c="2"/>);</text:span></text:p>
      <text:p text:style-name="P85"><text:span text:style-name="T46">270 <text:s/>| <text:s text:c="3"/></text:span><text:span text:style-name="T48"><text:s text:c="2"/></text:span><text:span text:style-name="T47">while</text:span><text:span text:style-name="T48"> (</text:span><text:span text:style-name="T47">true</text:span><text:span text:style-name="T48">) {</text:span></text:p>
      <text:p text:style-name="P85"><text:span text:style-name="T46">271 <text:s/>| <text:s text:c="3"/></text:span><text:span text:style-name="T48"><text:s text:c="4"/></text:span><text:span text:style-name="T47">let</text:span><text:span text:style-name="T48"> input = readLine();</text:span></text:p>
      <text:p text:style-name="P85"><text:span text:style-name="T46">272 <text:s/>| <text:s text:c="3"/></text:span><text:span text:style-name="T48"><text:s text:c="4"/></text:span><text:span text:style-name="T47">if</text:span><text:span text:style-name="T48"> (!input) </text:span><text:span text:style-name="T47">continue</text:span><text:span text:style-name="T48">;</text:span></text:p>
      <text:p text:style-name="P85"><text:span text:style-name="T46">273 <text:s/>| <text:s text:c="3"/></text:span><text:span text:style-name="T48"><text:s text:c="4"/></text:span><text:span text:style-name="T47">let</text:span><text:span text:style-name="T48"> parts = input.split(</text:span><text:span text:style-name="T49">/\s+/</text:span><text:span text:style-name="T48">);</text:span></text:p>
      <text:p text:style-name="P85"><text:span text:style-name="T46">274 <text:s/>| <text:s text:c="3"/></text:span><text:span text:style-name="T48"><text:s text:c="4"/></text:span><text:span text:style-name="T47">if</text:span><text:span text:style-name="T48"> (parts.length !== 7) {</text:span></text:p>
      <text:p text:style-name="P85"><text:span text:style-name="T46">275 <text:s/>| <text:s text:c="3"/></text:span><text:span text:style-name="T48"><text:s text:c="6"/>process.stdout.write(</text:span></text:p>
      <text:p text:style-name="P85"><text:span text:style-name="T46">276 <text:s/>| <text:s text:c="3"/></text:span><text:span text:style-name="T48"><text:s text:c="8"/></text:span><text:span text:style-name="T49">"Ошибка: Введено не 7 параметров. Повторите ввод:\n&gt; "</text:span><text:span text:style-name="T48">,</text:span></text:p>
      <text:p text:style-name="P85"><text:span text:style-name="T46">277 <text:s/>| <text:s text:c="3"/></text:span><text:span text:style-name="T48"><text:s text:c="6"/>);</text:span></text:p>
      <text:p text:style-name="P85"><text:span text:style-name="T46">278 <text:s/>| <text:s text:c="3"/></text:span><text:span text:style-name="T48"><text:s text:c="6"/></text:span><text:span text:style-name="T47">continue</text:span><text:span text:style-name="T48">;</text:span></text:p>
      <text:p text:style-name="P85"><text:span text:style-name="T46">279 <text:s/>| <text:s text:c="3"/></text:span><text:span text:style-name="T48"><text:s text:c="4"/>}</text:span></text:p>
      <text:p text:style-name="P85"><text:soft-page-break/><text:span text:style-name="T46">280 <text:s/>| <text:s text:c="3"/></text:span><text:span text:style-name="T48"><text:s text:c="4"/>coeffsInput = parts.map(Number);</text:span></text:p>
      <text:p text:style-name="P85"><text:span text:style-name="T46">281 <text:s/>| <text:s text:c="3"/></text:span><text:span text:style-name="T48"><text:s text:c="4"/></text:span><text:span text:style-name="T47">if</text:span><text:span text:style-name="T48"> (coeffsInput.some((t) =&gt; !isValidNumber(t))) {</text:span></text:p>
      <text:p text:style-name="P85"><text:span text:style-name="T46">282 <text:s/>| <text:s text:c="3"/></text:span><text:span text:style-name="T48"><text:s text:c="6"/>process.stdout.write(</text:span></text:p>
      <text:p text:style-name="P85"><text:span text:style-name="T46">283 <text:s/>| <text:s text:c="3"/></text:span><text:span text:style-name="T48"><text:s text:c="8"/></text:span><text:span text:style-name="T49">"Ошибка: Не удалось прочитать числа или числа слишком большие. Повторите ввод:\n&gt; "</text:span><text:span text:style-name="T48">,</text:span></text:p>
      <text:p text:style-name="P85"><text:span text:style-name="T46">284 <text:s/>| <text:s text:c="3"/></text:span><text:span text:style-name="T48"><text:s text:c="6"/>);</text:span></text:p>
      <text:p text:style-name="P85"><text:span text:style-name="T46">285 <text:s/>| <text:s text:c="3"/></text:span><text:span text:style-name="T48"><text:s text:c="6"/></text:span><text:span text:style-name="T47">continue</text:span><text:span text:style-name="T48">;</text:span></text:p>
      <text:p text:style-name="P85"><text:span text:style-name="T46">286 <text:s/>| <text:s text:c="3"/></text:span><text:span text:style-name="T48"><text:s text:c="4"/>}</text:span></text:p>
      <text:p text:style-name="P85"><text:span text:style-name="T46">287 <text:s/>| <text:s text:c="3"/></text:span><text:span text:style-name="T48"><text:s text:c="4"/></text:span><text:span text:style-name="T47">if</text:span><text:span text:style-name="T48"> (coeffsInput.every((t) =&gt; t === 0)) {</text:span></text:p>
      <text:p text:style-name="P85"><text:span text:style-name="T46">288 <text:s/>| <text:s text:c="3"/></text:span><text:span text:style-name="T48"><text:s text:c="6"/>console.log(</text:span><text:span text:style-name="T49">"Решением </text:span><text:span text:style-name="T51">уравнения </text:span><text:span text:style-name="T49">является любое число"</text:span><text:span text:style-name="T48">);</text:span></text:p>
      <text:p text:style-name="P85"><text:span text:style-name="T46">289 <text:s/>| <text:s text:c="3"/></text:span><text:span text:style-name="T48"><text:s text:c="6"/>process.exit(0);</text:span></text:p>
      <text:p text:style-name="P85"><text:span text:style-name="T46">290 <text:s/>| <text:s text:c="3"/></text:span><text:span text:style-name="T48"><text:s text:c="4"/>}</text:span></text:p>
      <text:p text:style-name="P85"><text:span text:style-name="T46">291 <text:s/>| <text:s text:c="3"/></text:span><text:span text:style-name="T48"><text:s text:c="4"/></text:span><text:span text:style-name="T47">if</text:span><text:span text:style-name="T48"> (</text:span></text:p>
      <text:p text:style-name="P85"><text:span text:style-name="T46">292 <text:s/>| <text:s text:c="3"/></text:span><text:span text:style-name="T48"><text:s text:c="6"/>coeffsInput.slice(0, -1).every((c) =&gt; c === 0) &amp;&amp;</text:span></text:p>
      <text:p text:style-name="P85"><text:span text:style-name="T46">293 <text:s/>| <text:s text:c="3"/></text:span><text:span text:style-name="T48"><text:s text:c="6"/>coeffsInput[6] !== 0</text:span></text:p>
      <text:p text:style-name="P85"><text:span text:style-name="T46">294 <text:s/>| <text:s text:c="3"/></text:span><text:span text:style-name="T48"><text:s text:c="4"/>) {</text:span></text:p>
      <text:p text:style-name="P85"><text:span text:style-name="T46">295 <text:s/>| <text:s text:c="3"/></text:span><text:span text:style-name="T48"><text:s text:c="6"/>console.log(</text:span><text:span text:style-name="T49">"Решений нет"</text:span><text:span text:style-name="T48">);</text:span></text:p>
      <text:p text:style-name="P85"><text:span text:style-name="T46">296 <text:s/>| <text:s text:c="3"/></text:span><text:span text:style-name="T48"><text:s text:c="6"/>process.exit(0);</text:span></text:p>
      <text:p text:style-name="P85"><text:span text:style-name="T46">297 <text:s/>| <text:s text:c="3"/></text:span><text:span text:style-name="T48"><text:s text:c="4"/>}</text:span></text:p>
      <text:p text:style-name="P85"><text:span text:style-name="T46">298 <text:s/>| <text:s text:c="3"/></text:span><text:span text:style-name="T48"><text:s text:c="4"/></text:span><text:span text:style-name="T47">break</text:span><text:span text:style-name="T48">;</text:span></text:p>
      <text:p text:style-name="P85"><text:span text:style-name="T46">299 <text:s/>| <text:s text:c="3"/></text:span><text:span text:style-name="T48"><text:s text:c="2"/>}</text:span></text:p>
      <text:p text:style-name="P84">300 <text:s/>| <text:s text:c="3"/></text:p>
      <text:p text:style-name="P85"><text:span text:style-name="T46">301 <text:s/>| <text:s text:c="3"/></text:span><text:span text:style-name="T48"><text:s text:c="2"/></text:span><text:span text:style-name="T47">const</text:span><text:span text:style-name="T48"> bound = cachyBound(coeffsInput);</text:span></text:p>
      <text:p text:style-name="P85"><text:span text:style-name="T46">302 <text:s/>| <text:s text:c="3"/></text:span><text:span text:style-name="T48"><text:s text:c="2"/></text:span><text:span text:style-name="T47">let</text:span><text:span text:style-name="T48"> [lx, rx] = findInterval(coeffsInput, bound);</text:span></text:p>
      <text:p text:style-name="P84">303 <text:s/>| <text:s text:c="3"/></text:p>
      <text:p text:style-name="P85"><text:span text:style-name="T46">304 <text:s/>| <text:s text:c="3"/></text:span><text:span text:style-name="T48"><text:s text:c="2"/></text:span><text:span text:style-name="T47">let</text:span><text:span text:style-name="T48"> start;</text:span></text:p>
      <text:p text:style-name="P85"><text:span text:style-name="T46">305 <text:s/>| <text:s text:c="3"/></text:span><text:span text:style-name="T48"><text:s text:c="2"/></text:span><text:span text:style-name="T47">if</text:span><text:span text:style-name="T48"> (f(coeffsInput, lx) * ddf(coeffsInput, lx) &gt; 0) start = lx;</text:span></text:p>
      <text:p text:style-name="P85"><text:span text:style-name="T46">306 <text:s/>| <text:s text:c="3"/></text:span><text:span text:style-name="T48"><text:s text:c="2"/></text:span><text:span text:style-name="T47">else</text:span><text:span text:style-name="T48"> start = rx;</text:span></text:p>
      <text:p text:style-name="P84">307 <text:s/>| <text:s text:c="3"/></text:p>
      <text:p text:style-name="P85"><text:span text:style-name="T46">308 <text:s/>| <text:s text:c="3"/></text:span><text:span text:style-name="T48"><text:s text:c="2"/>process.stdout.write(</text:span></text:p>
      <text:p text:style-name="P85"><text:span text:style-name="T46">309 <text:s/>| <text:s text:c="3"/></text:span><text:span text:style-name="T48"><text:s text:c="4"/></text:span><text:span text:style-name="T49">`Введите по порядку через пробел:\n <text:s/>eps - точность (1e-10)\n <text:s/>N - количество итераций (1000)\n <text:s/>x0 - начальное значение (0)\n <text:s/>l - левая граница (${</text:span><text:span text:style-name="T48">-bound</text:span><text:span text:style-name="T49">})\n <text:s/>r - правая граница (${</text:span><text:span text:style-name="T48">bound</text:span><text:span text:style-name="T49">})\nДля установки всех значений по умолчаню нажмите </text:span><text:span text:style-name="T51">"</text:span><text:span text:style-name="T49">Enter</text:span><text:span text:style-name="T51">"</text:span><text:span text:style-name="T49">. Для отдельного значения по умолчанию </text:span><text:span text:style-name="T51">вводите</text:span><text:span text:style-name="T49"> символ "-" на месте нужного параметра</text:span><text:span text:style-name="T51">:</text:span><text:span text:style-name="T49">\n&gt; `</text:span><text:span text:style-name="T48">,</text:span></text:p>
      <text:p text:style-name="P85"><text:span text:style-name="T46">310 <text:s/>| <text:s text:c="3"/></text:span><text:span text:style-name="T48"><text:s text:c="2"/>);</text:span></text:p>
      <text:p text:style-name="P85"><text:span text:style-name="T46">311 <text:s/>| <text:s text:c="3"/></text:span><text:span text:style-name="T48"><text:s text:c="2"/></text:span><text:span text:style-name="T47">while</text:span><text:span text:style-name="T48"> (</text:span><text:span text:style-name="T47">true</text:span><text:span text:style-name="T48">) {</text:span></text:p>
      <text:p text:style-name="P85"><text:span text:style-name="T46">312 <text:s/>| <text:s text:c="3"/></text:span><text:span text:style-name="T48"><text:s text:c="4"/></text:span><text:span text:style-name="T47">let</text:span><text:span text:style-name="T48"> input = readLine();</text:span></text:p>
      <text:p text:style-name="P85"><text:span text:style-name="T46">313 <text:s/>| <text:s text:c="3"/></text:span><text:span text:style-name="T48"><text:s text:c="4"/></text:span><text:span text:style-name="T47">const</text:span><text:span text:style-name="T48"> defaultValues = [1e-10, 1000, start, -bound, bound];</text:span></text:p>
      <text:p text:style-name="P85"><text:span text:style-name="T46">314 <text:s/>| <text:s text:c="3"/></text:span><text:span text:style-name="T48"><text:s text:c="4"/></text:span><text:span text:style-name="T47">if</text:span><text:span text:style-name="T48"> (!input) {</text:span></text:p>
      <text:p text:style-name="P85"><text:span text:style-name="T46">315 <text:s/>| <text:s text:c="3"/></text:span><text:span text:style-name="T48"><text:s text:c="6"/>[eps, N, x0, l, r] = defaultValues;</text:span></text:p>
      <text:p text:style-name="P85"><text:span text:style-name="T46">316 <text:s/>| <text:s text:c="3"/></text:span><text:span text:style-name="T48"><text:s text:c="6"/></text:span><text:span text:style-name="T47">break</text:span><text:span text:style-name="T48">;</text:span></text:p>
      <text:p text:style-name="P85"><text:span text:style-name="T46">317 <text:s/>| <text:s text:c="3"/></text:span><text:span text:style-name="T48"><text:s text:c="4"/>}</text:span></text:p>
      <text:p text:style-name="P85"><text:span text:style-name="T46">318 <text:s/>| <text:s text:c="3"/></text:span><text:span text:style-name="T48"><text:s text:c="4"/></text:span><text:span text:style-name="T47">let</text:span><text:span text:style-name="T48"> parts = input.split(</text:span><text:span text:style-name="T49">/\s+/</text:span><text:span text:style-name="T48">);</text:span></text:p>
      <text:p text:style-name="P85"><text:span text:style-name="T46">319 <text:s/>| <text:s text:c="3"/></text:span><text:span text:style-name="T48"><text:s text:c="4"/></text:span><text:span text:style-name="T47">if</text:span><text:span text:style-name="T48"> (parts.length !== 5) {</text:span></text:p>
      <text:p text:style-name="P85"><text:span text:style-name="T46">320 <text:s/>| <text:s text:c="3"/></text:span><text:span text:style-name="T48"><text:s text:c="6"/>process.stdout.write(</text:span></text:p>
      <text:p text:style-name="P85"><text:span text:style-name="T46">321 <text:s/>| <text:s text:c="3"/></text:span><text:span text:style-name="T48"><text:s text:c="8"/></text:span><text:span text:style-name="T49">"Ошибка: Должно быть введено ровно 5 параметров. Повторите ввод:\n&gt; "</text:span><text:span text:style-name="T48">,</text:span></text:p>
      <text:p text:style-name="P85"><text:span text:style-name="T46">322 <text:s/>| <text:s text:c="3"/></text:span><text:span text:style-name="T48"><text:s text:c="6"/>);</text:span></text:p>
      <text:p text:style-name="P85"><text:span text:style-name="T46">323 <text:s/>| <text:s text:c="3"/></text:span><text:span text:style-name="T48"><text:s text:c="6"/></text:span><text:span text:style-name="T47">continue</text:span><text:span text:style-name="T48">;</text:span></text:p>
      <text:p text:style-name="P85"><text:span text:style-name="T46">324 <text:s/>| <text:s text:c="3"/></text:span><text:span text:style-name="T48"><text:s text:c="4"/>}</text:span></text:p>
      <text:p text:style-name="P85"><text:span text:style-name="T46">325 <text:s/>| <text:s text:c="3"/></text:span><text:span text:style-name="T48"><text:s text:c="4"/></text:span><text:span text:style-name="T47">if</text:span><text:span text:style-name="T48"> (!parts.every((val) =&gt; isValidNumber(val) || val === </text:span><text:span text:style-name="T49">"-"</text:span><text:span text:style-name="T48">)) {</text:span></text:p>
      <text:p text:style-name="P85"><text:span text:style-name="T46">326 <text:s/>| <text:s text:c="3"/></text:span><text:span text:style-name="T48"><text:s text:c="6"/>process.stdout.write(</text:span></text:p>
      <text:p text:style-name="P85"><text:span text:style-name="T46">327 <text:s/>| <text:s text:c="3"/></text:span><text:span text:style-name="T48"><text:s text:c="8"/></text:span><text:span text:style-name="T49">"Ошибка: Введены некорректные параметры. Повторите ввод:\n&gt; "</text:span><text:span text:style-name="T48">,</text:span></text:p>
      <text:p text:style-name="P85"><text:span text:style-name="T46">328 <text:s/>| <text:s text:c="3"/></text:span><text:span text:style-name="T48"><text:s text:c="6"/>);</text:span></text:p>
      <text:p text:style-name="P85"><text:span text:style-name="T46">329 <text:s/>| <text:s text:c="3"/></text:span><text:span text:style-name="T48"><text:s text:c="6"/></text:span><text:span text:style-name="T47">continue</text:span><text:span text:style-name="T48">;</text:span></text:p>
      <text:p text:style-name="P85"><text:span text:style-name="T46">330 <text:s/>| <text:s text:c="3"/></text:span><text:span text:style-name="T48"><text:s text:c="4"/>}</text:span></text:p>
      <text:p text:style-name="P84">331 <text:s/>| <text:s text:c="3"/></text:p>
      <text:p text:style-name="P85"><text:span text:style-name="T46">332 <text:s/>| <text:s text:c="3"/></text:span><text:span text:style-name="T48"><text:s text:c="4"/>[eps, N, x0, l, r] = parts.map((val, ind) =&gt;</text:span></text:p>
      <text:p text:style-name="P85"><text:span text:style-name="T46">333 <text:s/>| <text:s text:c="3"/></text:span><text:span text:style-name="T48"><text:s text:c="6"/>val === </text:span><text:span text:style-name="T49">"-"</text:span><text:span text:style-name="T48"> ? defaultValues[ind] : parseFloat(val),</text:span></text:p>
      <text:p text:style-name="P85"><text:span text:style-name="T46">334 <text:s/>| <text:s text:c="3"/></text:span><text:span text:style-name="T48"><text:s text:c="4"/>);</text:span></text:p>
      <text:p text:style-name="P85"><text:span text:style-name="T46">335 <text:s/>| <text:s text:c="3"/></text:span><text:span text:style-name="T48"><text:s text:c="4"/></text:span><text:span text:style-name="T47">break</text:span><text:span text:style-name="T48">;</text:span></text:p>
      <text:p text:style-name="P85"><text:span text:style-name="T46">336 <text:s/>| <text:s text:c="3"/></text:span><text:span text:style-name="T48"><text:s text:c="2"/>}</text:span></text:p>
      <text:p text:style-name="P84">337 <text:s/>| <text:s text:c="3"/></text:p>
      <text:p text:style-name="P85"><text:span text:style-name="T46">338 <text:s/>| <text:s text:c="3"/></text:span><text:span text:style-name="T48"><text:s text:c="2"/></text:span><text:span text:style-name="T47">return</text:span><text:span text:style-name="T48"> [coeffsInput, eps, N, x0, l, r];</text:span></text:p>
      <text:p text:style-name="P86"><text:span text:style-name="T46">339 <text:s/>| <text:s text:c="3"/></text:span>}</text:p>
      <text:p text:style-name="P84">340 <text:s/>| <text:s text:c="3"/></text:p>
      <text:p text:style-name="P84">341 <text:s/>| <text:s text:c="3"/>/**</text:p>
      <text:p text:style-name="P84">342 <text:s/>| <text:s text:c="4"/>* Вывод корней без повторов</text:p>
      <text:p text:style-name="P84">343 <text:s/>| <text:s text:c="4"/>* @param {number[]} solutions</text:p>
      <text:p text:style-name="P84">344 <text:s/>| <text:s text:c="4"/>*/<text:span text:style-name="T50"/></text:p>
      <text:p text:style-name="P85"><text:span text:style-name="T46">345 <text:s/>| <text:s text:c="3"/></text:span><text:span text:style-name="T47">function</text:span><text:span text:style-name="T48"> printRoots(solutions) {</text:span></text:p>
      <text:p text:style-name="P85"><text:span text:style-name="T46">346 <text:s/>| <text:s text:c="3"/></text:span><text:span text:style-name="T48"><text:s text:c="2"/>console.log(</text:span></text:p>
      <text:p text:style-name="P85"><text:soft-page-break/><text:span text:style-name="T46">347 <text:s/>| <text:s text:c="3"/></text:span><text:span text:style-name="T48"><text:s text:c="4"/></text:span><text:span text:style-name="T49">"Найденные корни:"</text:span><text:span text:style-name="T48">,</text:span></text:p>
      <text:p text:style-name="P85"><text:span text:style-name="T46">348 <text:s/>| <text:s text:c="3"/></text:span><text:span text:style-name="T48"><text:s text:c="4"/>...</text:span><text:span text:style-name="T47">new</text:span><text:span text:style-name="T48"> Set(solutions.map((val) =&gt; formatRoot(val)).sort((a, b) =&gt; a - b)),</text:span></text:p>
      <text:p text:style-name="P85"><text:span text:style-name="T46">349 <text:s/>| <text:s text:c="3"/></text:span><text:span text:style-name="T48"><text:s text:c="2"/>);</text:span></text:p>
      <text:p text:style-name="P86"><text:span text:style-name="T46">350 <text:s/>| <text:s text:c="3"/></text:span>}</text:p>
      <text:p text:style-name="P84">351 <text:s/>| <text:s text:c="3"/></text:p>
      <text:p text:style-name="P84">352 <text:s/>| <text:s text:c="3"/>/**</text:p>
      <text:p text:style-name="P84">353 <text:s/>| <text:s text:c="4"/>* Округление корня</text:p>
      <text:p text:style-name="P84">354 <text:s/>| <text:s text:c="4"/>* @param {number} x</text:p>
      <text:p text:style-name="P84">355 <text:s/>| <text:s text:c="4"/>*/<text:span text:style-name="T50"/></text:p>
      <text:p text:style-name="P85"><text:span text:style-name="T46">356 <text:s/>| <text:s text:c="3"/></text:span><text:span text:style-name="T47">function</text:span><text:span text:style-name="T48"> formatRoot(x) {</text:span></text:p>
      <text:p text:style-name="P85"><text:span text:style-name="T46">357 <text:s/>| <text:s text:c="3"/></text:span><text:span text:style-name="T48"><text:s text:c="2"/></text:span><text:span text:style-name="T47">if</text:span><text:span text:style-name="T48"> (Math.abs(Math.round(x * 1e6) / 1e6 - Math.round(x)) &lt; 0.1) {</text:span></text:p>
      <text:p text:style-name="P85"><text:span text:style-name="T46">358 <text:s/>| <text:s text:c="3"/></text:span><text:span text:style-name="T48"><text:s text:c="4"/></text:span><text:span text:style-name="T47">return</text:span><text:span text:style-name="T48"> Math.round(x);</text:span></text:p>
      <text:p text:style-name="P85"><text:span text:style-name="T46">359 <text:s/>| <text:s text:c="3"/></text:span><text:span text:style-name="T48"><text:s text:c="2"/>}</text:span></text:p>
      <text:p text:style-name="P85"><text:span text:style-name="T46">360 <text:s/>| <text:s text:c="3"/></text:span><text:span text:style-name="T48"><text:s text:c="2"/></text:span><text:span text:style-name="T47">return</text:span><text:span text:style-name="T48"> parseFloat(x.toFixed(3));</text:span></text:p>
      <text:p text:style-name="P86"><text:span text:style-name="T46">361 <text:s/>| <text:s text:c="3"/></text:span>}</text:p>
      <text:p text:style-name="P84">362 <text:s/>| <text:s text:c="3"/></text:p>
      <text:p text:style-name="P84">363 <text:s/>| <text:s text:c="3"/>// -------------------------------------------------------------------------<text:span text:style-name="T50"/></text:p>
      <text:p text:style-name="P84">364 <text:s/>| <text:s text:c="3"/>// <text:s text:c="27"/>ГЛАВНАЯ ФУНКЦИЯ<text:span text:style-name="T50"/></text:p>
      <text:p text:style-name="P84">365 <text:s/>| <text:s text:c="3"/>// -------------------------------------------------------------------------<text:span text:style-name="T50"/></text:p>
      <text:p text:style-name="P85"><text:span text:style-name="T46">366 <text:s/>| <text:s text:c="3"/></text:span><text:span text:style-name="T47">function</text:span><text:span text:style-name="T48"> main() {</text:span></text:p>
      <text:p text:style-name="P85"><text:span text:style-name="T46">367 <text:s/>| <text:s text:c="3"/></text:span><text:span text:style-name="T48"><text:s text:c="2"/></text:span><text:span text:style-name="T47">let</text:span><text:span text:style-name="T48"> solutions = [];</text:span></text:p>
      <text:p text:style-name="P85"><text:span text:style-name="T46">368 <text:s/>| <text:s text:c="3"/></text:span><text:span text:style-name="T48"><text:s text:c="2"/></text:span><text:span text:style-name="T47">let</text:span><text:span text:style-name="T48"> [coeffs, eps, N, x0, l, r] = getInput();</text:span></text:p>
      <text:p text:style-name="P84">369 <text:s/>| <text:s text:c="3"/></text:p>
      <text:p text:style-name="P85"><text:span text:style-name="T46">370 <text:s/>| <text:s text:c="3"/></text:span><text:span text:style-name="T48"><text:s text:c="2"/></text:span><text:span text:style-name="T47">let</text:span><text:span text:style-name="T48"> root;</text:span></text:p>
      <text:p text:style-name="P85"><text:span text:style-name="T46">371 <text:s/>| <text:s text:c="3"/></text:span><text:span text:style-name="T48"><text:s text:c="2"/></text:span><text:span text:style-name="T46">// ПЕРВЫЙ КОРЕНЬ (6 степень)</text:span></text:p>
      <text:p text:style-name="P85"><text:span text:style-name="T46">372 <text:s/>| <text:s text:c="3"/></text:span><text:span text:style-name="T48"><text:s text:c="2"/></text:span><text:span text:style-name="T47">if</text:span><text:span text:style-name="T48"> (coeffs[0] !== 0) {</text:span></text:p>
      <text:p text:style-name="P85"><text:span text:style-name="T46">373 <text:s/>| <text:s text:c="3"/></text:span><text:span text:style-name="T48"><text:s text:c="4"/>root = tangentsMethod(coeffs, eps, N, x0);</text:span></text:p>
      <text:p text:style-name="P84">374 <text:s/>| <text:s text:c="3"/></text:p>
      <text:p text:style-name="P85"><text:span text:style-name="T46">375 <text:s/>| <text:s text:c="3"/></text:span><text:span text:style-name="T48"><text:s text:c="4"/></text:span><text:span text:style-name="T47">if</text:span><text:span text:style-name="T48"> (root !== </text:span><text:span text:style-name="T47">null</text:span><text:span text:style-name="T48">) {</text:span></text:p>
      <text:p text:style-name="P85"><text:span text:style-name="T46">376 <text:s/>| <text:s text:c="3"/></text:span><text:span text:style-name="T48"><text:s text:c="6"/>solutions.push(root);</text:span></text:p>
      <text:p text:style-name="P85"><text:span text:style-name="T46">377 <text:s/>| <text:s text:c="3"/></text:span><text:span text:style-name="T48"><text:s text:c="6"/>coeffs = hornersShema(coeffs, root);</text:span></text:p>
      <text:p text:style-name="P85"><text:span text:style-name="T46">378 <text:s/>| <text:s text:c="3"/></text:span><text:span text:style-name="T48"><text:s text:c="4"/>} </text:span><text:span text:style-name="T47">else</text:span><text:span text:style-name="T48"> {</text:span></text:p>
      <text:p text:style-name="P85"><text:span text:style-name="T46">379 <text:s/>| <text:s text:c="3"/></text:span><text:span text:style-name="T48"><text:s text:c="6"/>console.log(</text:span><text:span text:style-name="T49">"Корней нет"</text:span><text:span text:style-name="T48">);</text:span></text:p>
      <text:p text:style-name="P85"><text:span text:style-name="T46">380 <text:s/>| <text:s text:c="3"/></text:span><text:span text:style-name="T48"><text:s text:c="6"/></text:span><text:span text:style-name="T47">return</text:span><text:span text:style-name="T48">;</text:span></text:p>
      <text:p text:style-name="P85"><text:span text:style-name="T46">381 <text:s/>| <text:s text:c="3"/></text:span><text:span text:style-name="T48"><text:s text:c="4"/>}</text:span></text:p>
      <text:p text:style-name="P85"><text:span text:style-name="T46">382 <text:s/>| <text:s text:c="3"/></text:span><text:span text:style-name="T48"><text:s text:c="2"/>} </text:span><text:span text:style-name="T47">else</text:span><text:span text:style-name="T48"> {</text:span></text:p>
      <text:p text:style-name="P85"><text:span text:style-name="T46">383 <text:s/>| <text:s text:c="3"/></text:span><text:span text:style-name="T48"><text:s text:c="4"/>coeffs = coeffs.slice(1);</text:span></text:p>
      <text:p text:style-name="P85"><text:span text:style-name="T46">384 <text:s/>| <text:s text:c="3"/></text:span><text:span text:style-name="T48"><text:s text:c="2"/>}</text:span></text:p>
      <text:p text:style-name="P84">385 <text:s/>| <text:s text:c="3"/></text:p>
      <text:p text:style-name="P85"><text:span text:style-name="T46">386 <text:s/>| <text:s text:c="3"/></text:span><text:span text:style-name="T48"><text:s text:c="2"/></text:span><text:span text:style-name="T46">// ВТОРОЙ КОРЕНЬ (5 степень)</text:span></text:p>
      <text:p text:style-name="P85"><text:span text:style-name="T46">387 <text:s/>| <text:s text:c="3"/></text:span><text:span text:style-name="T48"><text:s text:c="2"/></text:span><text:span text:style-name="T47">if</text:span><text:span text:style-name="T48"> (coeffs[0] !== 0) {</text:span></text:p>
      <text:p text:style-name="P85"><text:span text:style-name="T46">388 <text:s/>| <text:s text:c="3"/></text:span><text:span text:style-name="T48"><text:s text:c="4"/>root = chordsMethod(coeffs, eps, N, ...findInterval(coeffs, r));</text:span></text:p>
      <text:p text:style-name="P85"><text:span text:style-name="T46">389 <text:s/>| <text:s text:c="3"/></text:span><text:span text:style-name="T48"><text:s text:c="4"/></text:span><text:span text:style-name="T47">if</text:span><text:span text:style-name="T48"> (root !== </text:span><text:span text:style-name="T47">null</text:span><text:span text:style-name="T48">) {</text:span></text:p>
      <text:p text:style-name="P85"><text:span text:style-name="T46">390 <text:s/>| <text:s text:c="3"/></text:span><text:span text:style-name="T48"><text:s text:c="6"/>solutions.push(root);</text:span></text:p>
      <text:p text:style-name="P85"><text:span text:style-name="T46">391 <text:s/>| <text:s text:c="3"/></text:span><text:span text:style-name="T48"><text:s text:c="6"/>coeffs = hornersShema(coeffs, root);</text:span></text:p>
      <text:p text:style-name="P85"><text:span text:style-name="T46">392 <text:s/>| <text:s text:c="3"/></text:span><text:span text:style-name="T48"><text:s text:c="4"/>} </text:span><text:span text:style-name="T47">else</text:span><text:span text:style-name="T48"> {</text:span></text:p>
      <text:p text:style-name="P85"><text:span text:style-name="T46">393 <text:s/>| <text:s text:c="3"/></text:span><text:span text:style-name="T48"><text:s text:c="6"/>printRoots(solutions);</text:span></text:p>
      <text:p text:style-name="P85"><text:span text:style-name="T46">394 <text:s/>| <text:s text:c="3"/></text:span><text:span text:style-name="T48"><text:s text:c="6"/></text:span><text:span text:style-name="T47">return</text:span><text:span text:style-name="T48">;</text:span></text:p>
      <text:p text:style-name="P85"><text:span text:style-name="T46">395 <text:s/>| <text:s text:c="3"/></text:span><text:span text:style-name="T48"><text:s text:c="4"/>}</text:span></text:p>
      <text:p text:style-name="P85"><text:span text:style-name="T46">396 <text:s/>| <text:s text:c="3"/></text:span><text:span text:style-name="T48"><text:s text:c="2"/>} </text:span><text:span text:style-name="T47">else</text:span><text:span text:style-name="T48"> {</text:span></text:p>
      <text:p text:style-name="P85"><text:span text:style-name="T46">397 <text:s/>| <text:s text:c="3"/></text:span><text:span text:style-name="T48"><text:s text:c="4"/>coeffs = coeffs.slice(1);</text:span></text:p>
      <text:p text:style-name="P85"><text:span text:style-name="T46">398 <text:s/>| <text:s text:c="3"/></text:span><text:span text:style-name="T48"><text:s text:c="2"/>}</text:span></text:p>
      <text:p text:style-name="P84">399 <text:s/>| <text:s text:c="3"/></text:p>
      <text:p text:style-name="P85"><text:span text:style-name="T46">400 <text:s/>| <text:s text:c="3"/></text:span><text:span text:style-name="T48"><text:s text:c="2"/></text:span><text:span text:style-name="T46">// ТРЕТИЙ КОРЕНЬ (4 степень)</text:span></text:p>
      <text:p text:style-name="P85"><text:span text:style-name="T46">401 <text:s/>| <text:s text:c="3"/></text:span><text:span text:style-name="T48"><text:s text:c="2"/></text:span><text:span text:style-name="T47">if</text:span><text:span text:style-name="T48"> (coeffs[0] !== 0) {</text:span></text:p>
      <text:p text:style-name="P85"><text:span text:style-name="T46">402 <text:s/>| <text:s text:c="3"/></text:span><text:span text:style-name="T48"><text:s text:c="4"/>root = chordsAndTangentsMethod(coeffs, eps, N, l, r);</text:span></text:p>
      <text:p text:style-name="P85"><text:span text:style-name="T46">403 <text:s/>| <text:s text:c="3"/></text:span><text:span text:style-name="T48"><text:s text:c="4"/></text:span><text:span text:style-name="T47">if</text:span><text:span text:style-name="T48"> (root !== </text:span><text:span text:style-name="T47">null</text:span><text:span text:style-name="T48">) {</text:span></text:p>
      <text:p text:style-name="P85"><text:span text:style-name="T46">404 <text:s/>| <text:s text:c="3"/></text:span><text:span text:style-name="T48"><text:s text:c="6"/>solutions.push(root);</text:span></text:p>
      <text:p text:style-name="P85"><text:span text:style-name="T46">405 <text:s/>| <text:s text:c="3"/></text:span><text:span text:style-name="T48"><text:s text:c="6"/>coeffs = hornersShema(coeffs, root);</text:span></text:p>
      <text:p text:style-name="P85"><text:span text:style-name="T46">406 <text:s/>| <text:s text:c="3"/></text:span><text:span text:style-name="T48"><text:s text:c="6"/>coeffs = coeffs.map((c) =&gt; (Math.abs(c) &lt; 1e-12 ? 0 : c));</text:span></text:p>
      <text:p text:style-name="P85"><text:span text:style-name="T46">407 <text:s/>| <text:s text:c="3"/></text:span><text:span text:style-name="T48"><text:s text:c="4"/>} </text:span><text:span text:style-name="T47">else</text:span><text:span text:style-name="T48"> {</text:span></text:p>
      <text:p text:style-name="P85"><text:span text:style-name="T46">408 <text:s/>| <text:s text:c="3"/></text:span><text:span text:style-name="T48"><text:s text:c="6"/>printRoots(solutions);</text:span></text:p>
      <text:p text:style-name="P85"><text:span text:style-name="T46">409 <text:s/>| <text:s text:c="3"/></text:span><text:span text:style-name="T48"><text:s text:c="6"/></text:span><text:span text:style-name="T47">return</text:span><text:span text:style-name="T48">;</text:span></text:p>
      <text:p text:style-name="P85"><text:span text:style-name="T46">410 <text:s/>| <text:s text:c="3"/></text:span><text:span text:style-name="T48"><text:s text:c="4"/>}</text:span></text:p>
      <text:p text:style-name="P85"><text:span text:style-name="T46">411 <text:s/>| <text:s text:c="3"/></text:span><text:span text:style-name="T48"><text:s text:c="2"/>} </text:span><text:span text:style-name="T47">else</text:span><text:span text:style-name="T48"> {</text:span></text:p>
      <text:p text:style-name="P85"><text:span text:style-name="T46">412 <text:s/>| <text:s text:c="3"/></text:span><text:span text:style-name="T48"><text:s text:c="4"/>coeffs = coeffs.slice(1);</text:span></text:p>
      <text:p text:style-name="P85"><text:span text:style-name="T46">413 <text:s/>| <text:s text:c="3"/></text:span><text:span text:style-name="T48"><text:s text:c="2"/>}</text:span></text:p>
      <text:p text:style-name="P84">414 <text:s/>| <text:s text:c="3"/></text:p>
      <text:p text:style-name="P85"><text:span text:style-name="T46">415 <text:s/>| <text:s text:c="3"/></text:span><text:span text:style-name="T48"><text:s text:c="2"/></text:span><text:span text:style-name="T47">let</text:span><text:span text:style-name="T48"> roots;</text:span></text:p>
      <text:p text:style-name="P85"><text:span text:style-name="T46">416 <text:s/>| <text:s text:c="3"/></text:span><text:span text:style-name="T48"><text:s text:c="2"/></text:span><text:span text:style-name="T46">// МЕТОД КАРДАНО (3 степень)</text:span></text:p>
      <text:p text:style-name="P85"><text:span text:style-name="T46">417 <text:s/>| <text:s text:c="3"/></text:span><text:span text:style-name="T48"><text:s text:c="2"/></text:span><text:span text:style-name="T47">if</text:span><text:span text:style-name="T48"> (coeffs[0] !== 0) {</text:span></text:p>
      <text:p text:style-name="P85"><text:soft-page-break/><text:span text:style-name="T46">418 <text:s/>| <text:s text:c="3"/></text:span><text:span text:style-name="T48"><text:s text:c="4"/>roots = cardanosMethod(coeffs);</text:span></text:p>
      <text:p text:style-name="P85"><text:span text:style-name="T46">419 <text:s/>| <text:s text:c="3"/></text:span><text:span text:style-name="T48"><text:s text:c="4"/>solutions.push(...roots);</text:span></text:p>
      <text:p text:style-name="P85"><text:span text:style-name="T46">420 <text:s/>| <text:s text:c="3"/></text:span><text:span text:style-name="T48"><text:s text:c="4"/>printRoots(solutions);</text:span></text:p>
      <text:p text:style-name="P85"><text:span text:style-name="T46">421 <text:s/>| <text:s text:c="3"/></text:span><text:span text:style-name="T48"><text:s text:c="4"/></text:span><text:span text:style-name="T47">return</text:span><text:span text:style-name="T48">;</text:span></text:p>
      <text:p text:style-name="P85"><text:span text:style-name="T46">422 <text:s/>| <text:s text:c="3"/></text:span><text:span text:style-name="T48"><text:s text:c="2"/>} </text:span><text:span text:style-name="T47">else</text:span><text:span text:style-name="T48"> {</text:span></text:p>
      <text:p text:style-name="P85"><text:span text:style-name="T46">423 <text:s/>| <text:s text:c="3"/></text:span><text:span text:style-name="T48"><text:s text:c="4"/>coeffs = coeffs.slice(1);</text:span></text:p>
      <text:p text:style-name="P85"><text:span text:style-name="T46">424 <text:s/>| <text:s text:c="3"/></text:span><text:span text:style-name="T48"><text:s text:c="2"/>}</text:span></text:p>
      <text:p text:style-name="P84">425 <text:s/>| <text:s text:c="3"/></text:p>
      <text:p text:style-name="P85"><text:span text:style-name="T46">426 <text:s/>| <text:s text:c="3"/></text:span><text:span text:style-name="T48"><text:s text:c="2"/></text:span><text:span text:style-name="T46">// ТЕОРЕМА ВИЕТА (2 степень)</text:span></text:p>
      <text:p text:style-name="P85"><text:span text:style-name="T46">427 <text:s/>| <text:s text:c="3"/></text:span><text:span text:style-name="T48"><text:s text:c="2"/></text:span><text:span text:style-name="T47">if</text:span><text:span text:style-name="T48"> (coeffs[0] !== 0) {</text:span></text:p>
      <text:p text:style-name="P85"><text:span text:style-name="T46">428 <text:s/>| <text:s text:c="3"/></text:span><text:span text:style-name="T48"><text:s text:c="4"/>roots = vietasTheorem(coeffs);</text:span></text:p>
      <text:p text:style-name="P85"><text:span text:style-name="T46">429 <text:s/>| <text:s text:c="3"/></text:span><text:span text:style-name="T48"><text:s text:c="4"/>solutions.push(...roots);</text:span></text:p>
      <text:p text:style-name="P85"><text:span text:style-name="T46">430 <text:s/>| <text:s text:c="3"/></text:span><text:span text:style-name="T48"><text:s text:c="4"/>printRoots(solutions);</text:span></text:p>
      <text:p text:style-name="P85"><text:span text:style-name="T46">431 <text:s/>| <text:s text:c="3"/></text:span><text:span text:style-name="T48"><text:s text:c="4"/></text:span><text:span text:style-name="T47">return</text:span><text:span text:style-name="T48">;</text:span></text:p>
      <text:p text:style-name="P85"><text:span text:style-name="T46">432 <text:s/>| <text:s text:c="3"/></text:span><text:span text:style-name="T48"><text:s text:c="2"/>} </text:span><text:span text:style-name="T47">else</text:span><text:span text:style-name="T48"> {</text:span></text:p>
      <text:p text:style-name="P85"><text:span text:style-name="T46">433 <text:s/>| <text:s text:c="3"/></text:span><text:span text:style-name="T48"><text:s text:c="4"/>coeffs = coeffs.slice(1);</text:span></text:p>
      <text:p text:style-name="P85"><text:span text:style-name="T46">434 <text:s/>| <text:s text:c="3"/></text:span><text:span text:style-name="T48"><text:s text:c="2"/>}</text:span></text:p>
      <text:p text:style-name="P84">435 <text:s/>| <text:s text:c="3"/></text:p>
      <text:p text:style-name="P85"><text:span text:style-name="T46">436 <text:s/>| <text:s text:c="3"/></text:span><text:span text:style-name="T48"><text:s text:c="2"/></text:span><text:span text:style-name="T46">// ЛИНЕ</text:span><text:span text:style-name="T52">Й</text:span><text:span text:style-name="T46">НОЕ УРАВНЕНИЕ (1 степень)</text:span></text:p>
      <text:p text:style-name="P85"><text:span text:style-name="T46">437 <text:s/>| <text:s text:c="3"/></text:span><text:span text:style-name="T48"><text:s text:c="2"/></text:span><text:span text:style-name="T47">if</text:span><text:span text:style-name="T48"> (coeffs[0] !== 0) {</text:span></text:p>
      <text:p text:style-name="P85"><text:span text:style-name="T46">438 <text:s/>| <text:s text:c="3"/></text:span><text:span text:style-name="T48"><text:s text:c="4"/>solutions.push(-coeffs[1] / coeffs[0]);</text:span></text:p>
      <text:p text:style-name="P85"><text:span text:style-name="T46">439 <text:s/>| <text:s text:c="3"/></text:span><text:span text:style-name="T48"><text:s text:c="4"/>printRoots(solutions);</text:span></text:p>
      <text:p text:style-name="P85"><text:span text:style-name="T46">440 <text:s/>| <text:s text:c="3"/></text:span><text:span text:style-name="T48"><text:s text:c="4"/></text:span><text:span text:style-name="T47">return</text:span><text:span text:style-name="T48">;</text:span></text:p>
      <text:p text:style-name="P85"><text:span text:style-name="T46">441 <text:s/>| <text:s text:c="3"/></text:span><text:span text:style-name="T48"><text:s text:c="2"/>}</text:span></text:p>
      <text:p text:style-name="P86"><text:span text:style-name="T46">442 <text:s/>| <text:s text:c="3"/></text:span>}</text:p>
      <text:p text:style-name="P84">443 <text:s/>| <text:s text:c="3"/></text:p>
      <text:p text:style-name="P85"><text:span text:style-name="T46">444 <text:s/>| <text:s text:c="3"/></text:span><text:span text:style-name="T47">try</text:span><text:span text:style-name="T48"> {</text:span></text:p>
      <text:p text:style-name="P85"><text:span text:style-name="T46">445 <text:s/>| <text:s text:c="3"/></text:span><text:span text:style-name="T48"><text:s text:c="2"/>main();</text:span></text:p>
      <text:p text:style-name="P85"><text:span text:style-name="T46">446 <text:s/>| <text:s text:c="3"/></text:span><text:span text:style-name="T48">} </text:span><text:span text:style-name="T47">catch</text:span><text:span text:style-name="T48"> (e) {</text:span></text:p>
      <text:p text:style-name="P85"><text:span text:style-name="T46">447 <text:s/>| <text:s text:c="3"/></text:span><text:span text:style-name="T48"><text:s text:c="2"/></text:span><text:span text:style-name="T47">if</text:span><text:span text:style-name="T48"> (e.message.includes(</text:span><text:span text:style-name="T49">"EOF"</text:span><text:span text:style-name="T48">)) console.log(</text:span><text:span text:style-name="T49">"\nВыход из программы."</text:span><text:span text:style-name="T48">);</text:span></text:p>
      <text:p text:style-name="P85"><text:span text:style-name="T46">448 <text:s/>| <text:s text:c="3"/></text:span><text:span text:style-name="T48"><text:s text:c="2"/></text:span><text:span text:style-name="T47">else</text:span><text:span text:style-name="T48"> console.error(e);</text:span></text:p>
      <text:p text:style-name="P86"><text:span text:style-name="T46">449 <text:s/>| <text:s text:c="3"/></text:span>}</text:p>
      <text:p text:style-name="P82"/>
      <text:p text:style-name="P82"/>
      <text:p text:style-name="P82"/>
      <text:p text:style-name="P77"/>
      <text:p text:style-name="P77"/>
      <text:h text:style-name="P87" text:outline-level="1"><text:bookmark-start text:name="__RefHeading___Toc143_2058273410 Copy 1 Copy 2 Copy 6"/><text:span text:style-name="T42">З</text:span><text:span text:style-name="T6">АКЛЮЧЕНИЕ</text:span><text:bookmark-end text:name="__RefHeading___Toc143_2058273410 Copy 1 Copy 2 Copy 6"/></text:h>
      <text:p text:style-name="P88">В ходе выполнения лабораторной работы была разработана программа на языке JavaScript для нахождения корней полинома шестой степени различными численными методами. Для написания исходного текста использовался редактор VSCodium, а запуск осуществлялся в среде выполнения NodeJS v25.0.7.</text:p>
      <text:p text:style-name="P88">Были изучены методы нахождения корней: касательных, хорд, комбинированный хорд и касательных, а также метод Кардано, теорема Виета и схема Горнера <text:span text:style-name="T53">(</text:span>для понижения степени полинома<text:span text:style-name="T53">)</text:span>.</text:p>
      <text:p text:style-name="P88">Тестирование показало корректную работу программы при различных входных данных. Выполнение работы позволило закрепить навыки разработки алгоритмов для решения математических задач.<text:bookmark-start text:name="__RefHeading___Toc143_2058273410 Copy 1 Copy 2 Copy 5"/></text:p>
      <text:p text:style-name="P77"/>
      <text:p text:style-name="P77"/>
      <text:p text:style-name="P77"><text:bookmark-end text:name="__RefHeading___Toc143_2058273410 Copy 1 Copy 2 Copy 5"/></text:p>
      <text:h text:style-name="P89" text:outline-level="1"><text:bookmark-start text:name="__RefHeading___Toc143_2058273410 Copy 1 Copy 2 Copy 7"/><text:span text:style-name="T42">П</text:span><text:span text:style-name="T6">РИЛОЖЕНИЕ А</text:span><text:bookmark-end text:name="__RefHeading___Toc143_2058273410 Copy 1 Copy 2 Copy 7"/></text:h>
      <text:h text:style-name="P90" text:outline-level="1"><draw:frame draw:style-name="fr6" draw:name="Image8" text:anchor-type="char" svg:width="19.881cm" svg:height="15.395cm" draw:z-index="47"><draw:image xlink:href="Pictures/1000000100000B40000008B6D1441202.png" xlink:type="simple" xlink:show="embed" xlink:actuate="onLoad" draw:mime-type="image/png"/></draw:frame></text:h>
      <text:h text:style-name="P91" text:outline-level="1"><draw:frame draw:style-name="fr7" draw:name="Image9" text:anchor-type="char" svg:width="26.423cm" svg:height="16.745cm" draw:z-index="48"><draw:image xlink:href="Pictures/1000000100000DDE000008CADE479516.png" xlink:type="simple" xlink:show="embed" xlink:actuate="onLoad" draw:mime-type="image/png"/></draw:frame></text:h>
      <text:p text:style-name="P77"><text:soft-page-break/></text:p>
      <text:p text:style-name="P77"><draw:frame draw:style-name="fr8" draw:name="Image10" text:anchor-type="char" svg:x="-1.155cm" svg:y="-0.102cm" svg:width="26.619cm" svg:height="11.973cm" draw:z-index="49"><draw:image xlink:href="Pictures/100000010000072000000377CAE11F7A.png" xlink:type="simple" xlink:show="embed" xlink:actuate="onLoad" draw:mime-type="image/png"/></draw:frame></text:p>
      <text:p text:style-name="P77"/>
      <text:p text:style-name="P77"/>
      <text:p text:style-name="P79"><text:bookmark-start text:name="__RefHeading___Toc143_2058273410 Copy 1 Copy 1"/><draw:frame draw:style-name="fr9" draw:name="Image11" text:anchor-type="char" svg:y="-0.309cm" svg:width="19.957cm" svg:height="17.254cm" draw:z-index="50"><draw:image xlink:href="Pictures/10000001000003F40000036BEB76C07E.png" xlink:type="simple" xlink:show="embed" xlink:actuate="onLoad" draw:mime-type="image/png"/></draw:frame><draw:frame draw:style-name="fr5" draw:name="Image12" text:anchor-type="char" svg:x="7.087cm" svg:y="7.673cm" svg:width="2.223cm" svg:height="1.455cm" draw:z-index="51"><draw:image xlink:href="Pictures/10000001000000540000003778DC5199.png" xlink:type="simple" xlink:show="embed" xlink:actuate="onLoad" draw:mime-type="image/png"/></draw:frame><text:bookmark-end text:name="__RefHeading___Toc143_2058273410 Copy 1 Copy 1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Таблица" style:family="paragraph" style:parent-style-name="Caption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96cm" style:type="center"/>
          <style:tab-stop style:position="16.59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296cm" style:type="center"/>
          <style:tab-stop style:position="16.591cm" style:type="right"/>
        </style:tab-stops>
      </style:paragraph-properties>
    </style:style>
    <style:style style:name="Рисунок" style:family="paragraph" style:parent-style-name="Caption"/>
    <style:style style:name="Frame_20_contents" style:display-name="Frame contents" style:family="paragraph" style:parent-style-name="Standard" style:class="extra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cm" fo:margin-bottom="2cm" fo:margin-left="3.5cm" fo:margin-right="1.499cm" style:writing-mode="lr-tb" style:layout-grid-color="#c0c0c0" style:layout-grid-lines="43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3.5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7.94cm" fo:page-height="21.59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Default Page Style1"/><text:page-number text:select-page="current">12</text:page-number><text:bookmark-end text:name="PageNumWizard_FOOTER_Default Page Style1"/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3" draw:style-name="Mdp1"/>
    <style:master-page style:name="Landscape" style:page-layout-name="Mpm4" draw:style-name="Mdp1">
      <style:footer>
        <text:p text:style-name="MP1"><text:bookmark-start text:name="PageNumWizard_FOOTER_Landscape19"/><text:page-number text:select-page="current">25</text:page-number><text:bookmark-end text:name="PageNumWizard_FOOTER_Landscape19"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16T15:54:10.970395995</meta:creation-date>
    <dc:date>2026-03-14T14:30:39.656104601</dc:date>
    <meta:editing-duration>P1DT9H20M5S</meta:editing-duration>
    <meta:editing-cycles>95</meta:editing-cycles>
    <meta:generator>LibreOffice/26.2.1.2$Linux_X86_64 LibreOffice_project/620$Build-2</meta:generator>
    <meta:print-date>2026-03-14T12:41:01.714635128</meta:print-date>
    <meta:printed-by>PDF files</meta:printed-by>
    <meta:document-statistic meta:table-count="1" meta:image-count="12" meta:object-count="0" meta:page-count="25" meta:paragraph-count="701" meta:word-count="4015" meta:character-count="24280" meta:non-whitespace-character-count="17826"/>
  </office:meta>
</office:document-meta>
</file>