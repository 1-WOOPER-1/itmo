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2000007EEF8C9301A.png" manifest:media-type="image/png"/>
  <manifest:file-entry manifest:full-path="Pictures/1000000100000550000009604241ADD6.png" manifest:media-type="image/png"/>
  <manifest:file-entry manifest:full-path="Pictures/1000000100000500000009BA4D4467F8.png" manifest:media-type="image/png"/>
  <manifest:file-entry manifest:full-path="Pictures/100000010000078A00000D203B5D2DDD.png" manifest:media-type="image/png"/>
  <manifest:file-entry manifest:full-path="Pictures/100000010000095600000CE4829A46EE.png" manifest:media-type="image/png"/>
  <manifest:file-entry manifest:full-path="Pictures/100000010000028A00000072428E23D5.png" manifest:media-type="image/png"/>
  <manifest:file-entry manifest:full-path="Pictures/10000001000006890000037E73E05660.png" manifest:media-type="image/png"/>
  <manifest:file-entry manifest:full-path="Pictures/10000001000000E30000001D95159B00.png" manifest:media-type="image/png"/>
  <manifest:file-entry manifest:full-path="Pictures/1000B47200001776000003059D220BC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09cm" table:align="left"/>
    </style:style>
    <style:style style:name="Таблица1.A" style:family="table-column">
      <style:table-column-properties style:column-width="2.293cm"/>
    </style:style>
    <style:style style:name="Таблица1.B" style:family="table-column">
      <style:table-column-properties style:column-width="2.999cm"/>
    </style:style>
    <style:style style:name="Таблица1.C" style:family="table-column">
      <style:table-column-properties style:column-width="4.135cm"/>
    </style:style>
    <style:style style:name="Таблица1.D" style:family="table-column">
      <style:table-column-properties style:column-width="7.664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dd73d1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4a596f" officeooo:paragraph-rsid="004a596f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11" style:family="paragraph" style:parent-style-name="Text_20_body" style:master-page-name="">
      <loext:graphic-properties draw:fill="none"/>
      <style:paragraph-properties fo:margin-left="0cm" fo:margin-right="1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1f758d" officeooo:paragraph-rsid="000ca6c1"/>
    </style:style>
    <style:style style:name="P13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4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5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6" style:family="paragraph" style:parent-style-name="Text_20_body" style:master-page-name="">
      <loext:graphic-properties draw:fill="none"/>
      <style:paragraph-properties fo:margin-left="0cm" fo:margin-right="0.9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ca6c1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18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394161"/>
    </style:style>
    <style:style style:name="P19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21" style:family="paragraph" style:parent-style-name="Contents_20_1">
      <style:paragraph-properties fo:line-height="150%">
        <style:tab-stops>
          <style:tab-stop style:position="17.089cm" style:type="right" style:leader-style="dotted" style:leader-text="."/>
        </style:tab-stops>
      </style:paragraph-properties>
    </style:style>
    <style:style style:name="P22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0f2314" officeooo:paragraph-rsid="00da7f6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0f2314" officeooo:paragraph-rsid="00da7f6d"/>
    </style:style>
    <style:style style:name="P2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paragraph-rsid="004b6835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ac9f4c"/>
    </style:style>
    <style:style style:name="P27" style:family="paragraph" style:parent-style-name="Text_20_body" style:list-style-name="L1">
      <style:paragraph-properties fo:text-align="justify" style:justify-single-word="false" style:writing-mode="lr-tb" style:writing-mode-automatic="false"/>
      <style:text-properties officeooo:rsid="00935d7a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da7f6d"/>
    </style:style>
    <style:style style:name="P3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rsid="00935d7a" officeooo:paragraph-rsid="00ea93b6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ea93b6"/>
    </style:style>
    <style:style style:name="P32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28636d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rsid="0028636d" officeooo:paragraph-rsid="0028636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a877b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a877b" officeooo:paragraph-rsid="003a877b"/>
    </style:style>
    <style:style style:name="P37" style:family="paragraph" style:parent-style-name="Text_20_body" style:list-style-name="" style:master-page-name="">
      <style:paragraph-properties fo:margin-top="0cm" fo:margin-bottom="0.25cm" style:contextual-spacing="false" fo:line-height="150%" fo:text-align="center" style:justify-single-word="false" style:page-number="auto" fo:break-before="auto" fo:break-after="auto"/>
      <style:text-properties officeooo:rsid="002680d2" officeooo:paragraph-rsid="003a877b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3a877b"/>
    </style:style>
    <style:style style:name="P39" style:family="paragraph" style:parent-style-name="Рисунок">
      <style:paragraph-properties fo:text-align="center" style:justify-single-word="false"/>
    </style:style>
    <style:style style:name="P40" style:family="paragraph" style:parent-style-name="Рисунок">
      <style:paragraph-properties fo:text-align="center" style:justify-single-word="false"/>
      <style:text-properties officeooo:paragraph-rsid="00c3ec24"/>
    </style:style>
    <style:style style:name="P4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c4608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96f977" officeooo:paragraph-rsid="0096f977"/>
    </style:style>
    <style:style style:name="P43" style:family="paragraph" style:parent-style-name="Code"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4" style:family="paragraph" style:parent-style-name="Code"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000" loext:opacity="100%" fo:font-size="8pt" fo:language="zxx" fo:country="none" fo:font-style="normal" style:text-underline-style="none" fo:font-weight="normal" fo:background-color="transparent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c4608" officeooo:paragraph-rsid="0096f977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c4608" officeooo:paragraph-rsid="003c4608"/>
    </style:style>
    <style:style style:name="P47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style:use-window-font-color="true" loext:opacity="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48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8000" loext:opacity="10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49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0000" loext:opacity="10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50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rsid="003ecf82" officeooo:paragraph-rsid="003ecf82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paragraph-rsid="0044e4e9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c001ea"/>
    </style:style>
    <style:style style:name="P53" style:family="paragraph" style:parent-style-name="Text_20_body" style:list-style-name="" style:master-page-name="Landscape">
      <style:paragraph-properties fo:margin-top="0cm" fo:margin-bottom="0.25cm" style:contextual-spacing="false" fo:line-height="150%" fo:text-align="center" style:justify-single-word="false" style:page-number="auto"/>
      <style:text-properties officeooo:rsid="003ecf82" officeooo:paragraph-rsid="003ecf82"/>
    </style:style>
    <style:style style:name="P54" style:family="paragraph" style:parent-style-name="Text_20_body">
      <style:paragraph-properties fo:margin-top="0cm" fo:margin-bottom="0.25cm" style:contextual-spacing="false" fo:line-height="150%" fo:text-align="center" style:justify-single-word="false"/>
      <style:text-properties officeooo:rsid="0028636d" officeooo:paragraph-rsid="003ecf82"/>
    </style:style>
    <style:style style:name="P5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rsid="00d831ed" officeooo:paragraph-rsid="003ecf82"/>
    </style:style>
    <style:style style:name="P56" style:family="paragraph" style:parent-style-name="Text_20_body" style:master-page-name="">
      <style:paragraph-properties fo:margin-top="0cm" fo:margin-bottom="0.25cm" style:contextual-spacing="false" fo:line-height="150%" fo:text-align="center" style:justify-single-word="false" style:page-number="auto"/>
      <style:text-properties officeooo:rsid="0028636d" officeooo:paragraph-rsid="003ecf82"/>
    </style:style>
    <style:style style:name="P57" style:family="paragraph" style:parent-style-name="Text_20_body">
      <style:paragraph-properties fo:margin-top="0cm" fo:margin-bottom="0.25cm" style:contextual-spacing="false" fo:line-height="150%" fo:text-align="center" style:justify-single-word="false" fo:break-before="page"/>
      <style:text-properties officeooo:rsid="0028636d" officeooo:paragraph-rsid="003ecf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758d"/>
    </style:style>
    <style:style style:name="T3" style:family="text">
      <style:text-properties officeooo:rsid="00394161"/>
    </style:style>
    <style:style style:name="T4" style:family="text">
      <style:text-properties officeooo:rsid="000ca6c1"/>
    </style:style>
    <style:style style:name="T5" style:family="text">
      <style:text-properties officeooo:rsid="00e6c9c2"/>
    </style:style>
    <style:style style:name="T6" style:family="text">
      <style:text-properties officeooo:rsid="00910ddb"/>
    </style:style>
    <style:style style:name="T7" style:family="text">
      <style:text-properties officeooo:rsid="00dd73d1"/>
    </style:style>
    <style:style style:name="T8" style:family="text">
      <style:text-properties officeooo:rsid="00ab83db"/>
    </style:style>
    <style:style style:name="T9" style:family="text">
      <style:text-properties officeooo:rsid="00dd5534"/>
    </style:style>
    <style:style style:name="T10" style:family="text">
      <style:text-properties officeooo:rsid="00cb7fcd"/>
    </style:style>
    <style:style style:name="T11" style:family="text">
      <style:text-properties officeooo:rsid="00d9f711"/>
    </style:style>
    <style:style style:name="T12" style:family="text">
      <style:text-properties officeooo:rsid="0016960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f50975"/>
    </style:style>
    <style:style style:name="T15" style:family="text">
      <style:text-properties fo:font-weight="bold" officeooo:rsid="000f2314" style:font-weight-asian="bold" style:font-weight-complex="bold"/>
    </style:style>
    <style:style style:name="T16" style:family="text">
      <style:text-properties fo:font-weight="bold" officeooo:rsid="004c1b85" style:font-weight-asian="bold" style:font-weight-complex="bold"/>
    </style:style>
    <style:style style:name="T17" style:family="text">
      <style:text-properties fo:font-weight="bold" officeooo:rsid="00910ddb" style:font-weight-asian="bold" style:font-weight-complex="bold"/>
    </style:style>
    <style:style style:name="T18" style:family="text">
      <style:text-properties fo:font-weight="bold" officeooo:rsid="00e6c9c2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ebfde1"/>
    </style:style>
    <style:style style:name="T21" style:family="text">
      <style:text-properties officeooo:rsid="00ea93b6"/>
    </style:style>
    <style:style style:name="T22" style:family="text">
      <style:text-properties fo:font-weight="bold" officeooo:rsid="004b6835" style:font-weight-asian="bold" style:font-weight-complex="bold"/>
    </style:style>
    <style:style style:name="T23" style:family="text">
      <style:text-properties fo:font-weight="bold" officeooo:rsid="0028636d" style:font-weight-asian="bold" style:font-weight-complex="bold"/>
    </style:style>
    <style:style style:name="T24" style:family="text">
      <style:text-properties officeooo:rsid="0079b2f7"/>
    </style:style>
    <style:style style:name="T25" style:family="text">
      <style:text-properties officeooo:rsid="00f12f4b"/>
    </style:style>
    <style:style style:name="T26" style:family="text">
      <style:text-properties fo:font-weight="bold" officeooo:rsid="003a877b" style:font-weight-asian="bold" style:font-weight-complex="bold"/>
    </style:style>
    <style:style style:name="T27" style:family="text">
      <style:text-properties fo:font-weight="bold" officeooo:rsid="00a1ba0b" style:font-weight-asian="bold" style:font-weight-complex="bold"/>
    </style:style>
    <style:style style:name="T28" style:family="text">
      <style:text-properties officeooo:rsid="00a1ba0b"/>
    </style:style>
    <style:style style:name="T29" style:family="text">
      <style:text-properties officeooo:rsid="008d1351"/>
    </style:style>
    <style:style style:name="T30" style:family="text">
      <style:text-properties officeooo:rsid="00c3ec24"/>
    </style:style>
    <style:style style:name="T31" style:family="text">
      <style:text-properties officeooo:rsid="00d193ed"/>
    </style:style>
    <style:style style:name="T32" style:family="text">
      <style:text-properties fo:font-weight="bold" officeooo:rsid="003c4608" style:font-weight-asian="bold" style:font-weight-complex="bold"/>
    </style:style>
    <style:style style:name="T33" style:family="text">
      <style:text-properties officeooo:rsid="0098e618"/>
    </style:style>
    <style:style style:name="T34" style:family="text">
      <style:text-properties fo:color="#008000" loext:opacity="100%" fo:font-size="8pt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officeooo:rsid="00ef21e4"/>
    </style:style>
    <style:style style:name="T37" style:family="text">
      <style:text-properties fo:color="#0000ff" loext:opacity="100%"/>
    </style:style>
    <style:style style:name="T38" style:family="text">
      <style:text-properties officeooo:rsid="00ef21e4"/>
    </style:style>
    <style:style style:name="T39" style:family="text">
      <style:text-properties fo:color="#008000" loext:opacity="100%"/>
    </style:style>
    <style:style style:name="T40" style:family="text">
      <style:text-properties fo:color="#2b91af" loext:opacity="100%"/>
    </style:style>
    <style:style style:name="T41" style:family="text">
      <style:text-properties fo:color="#a31515" loext:opacity="100%"/>
    </style:style>
    <style:style style:name="T42" style:family="text">
      <style:text-properties officeooo:rsid="0028636d"/>
    </style:style>
    <style:style style:name="T43" style:family="text">
      <style:text-properties officeooo:rsid="0099743d"/>
    </style:style>
    <style:style style:name="T44" style:family="text">
      <style:text-properties officeooo:rsid="00a61a93"/>
    </style:style>
    <style:style style:name="T45" style:family="text">
      <style:text-properties officeooo:rsid="00bb1647"/>
    </style:style>
    <style:style style:name="T46" style:family="text">
      <style:text-properties officeooo:rsid="00c1f7ff"/>
    </style:style>
    <style:style style:name="T47" style:family="text">
      <style:text-properties officeooo:rsid="00e834f0"/>
    </style:style>
    <style:style style:name="T48" style:family="text">
      <style:text-properties officeooo:rsid="00f53d08"/>
    </style:style>
    <style:style style:name="T49" style:family="text">
      <style:text-properties officeooo:rsid="00cf4d0c"/>
    </style:style>
    <style:style style:name="T50" style:family="text">
      <style:text-properties officeooo:rsid="00b2fb3a"/>
    </style:style>
    <style:style style:name="T51" style:family="text">
      <style:text-properties officeooo:rsid="00b37be3"/>
    </style:style>
    <style:style style:name="T52" style:family="text">
      <style:text-properties officeooo:rsid="00b571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6.555cm, 5.302cm, 4.62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5"/>
      <text:p text:style-name="P5"/>
      <text:p text:style-name="P6">Факультет безопасности информационных технологий</text:p>
      <text:p text:style-name="P6"/>
      <text:p text:style-name="P6">Дисциплина:</text:p>
      <text:p text:style-name="P6">«<text:span text:style-name="T2">Алгоритмы и структуры данных</text:span>»</text:p>
      <text:p text:style-name="P6"/>
      <text:p text:style-name="P6"/>
      <text:p text:style-name="P6">ОТЧ<text:span text:style-name="T3">Ё</text:span>Т ПО ЛАБОРАТОРНОЙ РАБОТЕ <text:span text:style-name="T4">№</text:span><text:span text:style-name="T5">4</text:span></text:p>
      <text:p text:style-name="P7">«<text:span text:style-name="T6">Сортировка распределением (карманная сортировка)</text:span><text:span text:style-name="T7"> </text:span><text:span text:style-name="T8">в </text:span><text:span text:style-name="T5">очереди</text:span><text:span text:style-name="T8"> </text:span><text:span text:style-name="T9">на</text:span></text:p>
      <text:p text:style-name="P7"><text:span text:style-name="T8">базе связного списка</text:span><text:span text:style-name="T10">. Поиск </text:span><text:span text:style-name="T11">подстрок </text:span><text:span text:style-name="T10">методом </text:span><text:span text:style-name="T5">Кнута-Морриса-Пратта</text:span>»</text:p>
      <text:p text:style-name="P6"/>
      <text:p text:style-name="P8">Выполнил:</text:p>
      <text:p text:style-name="P8">Пахомов Владимир Юрьевич, студент группы N3250</text:p>
      <text:p text:style-name="P8"/>
      <text:p text:style-name="P9"/>
      <text:p text:style-name="P10">________________</text:p>
      <text:p text:style-name="P11">(подпись)</text:p>
      <text:p text:style-name="P8"/>
      <text:p text:style-name="P8">Проверил:</text:p>
      <text:p text:style-name="P12">Ерофеев Сергей Анатольевич</text:p>
      <text:p text:style-name="P13"/>
      <text:p text:style-name="P13"/>
      <text:p text:style-name="P14">_____________________</text:p>
      <text:p text:style-name="P15">(отметка о выполнении)</text:p>
      <text:p text:style-name="P14"/>
      <text:p text:style-name="P14"/>
      <text:p text:style-name="P14">________________</text:p>
      <text:p text:style-name="P16">(подпись)</text:p>
      <text:p text:style-name="P17"/>
      <text:p text:style-name="P17"/>
      <text:p text:style-name="P17"/>
      <text:p text:style-name="P18">Санкт-Петербург</text:p>
      <text:p text:style-name="P18">202<text:span text:style-name="T12">6</text:span>.</text:p>
      <text:h text:style-name="P19" text:outline-level="1"><text:bookmark-start text:name="__RefHeading___Toc80_2058273410"/>СОДЕРЖАНИЕ<text:bookmark-end text:name="__RefHeading___Toc80_2058273410"/></text:h>
      <text:p text:style-name="P20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80_2058273410" office:name="СОДЕРЖАНИЕ" text:style-name="Index_20_Link" text:visited-style-name="Index_20_Link">СОДЕРЖАНИЕ<text:tab/>2</text:a></text:p>
          <text:p text:style-name="P21"><text:a xlink:type="simple" xlink:href="#__RefHeading___Toc82_2058273410" office:name="ВВЕДЕНИЕ" text:style-name="Index_20_Link" text:visited-style-name="Index_20_Link">ВВЕДЕНИЕ<text:tab/>3</text:a></text:p>
          <text:p text:style-name="P21"><text:a xlink:type="simple" xlink:href="#__RefHeading___Toc143_2058273410%20Copy%201%20Copy%203" office:name="1. АЛГОРИТМ СОРТИРОВКИ И ПОИСКА" text:style-name="Index_20_Link" text:visited-style-name="Index_20_Link">1. АЛГОРИТМ СОРТИРОВКИ И ПОИСКА<text:tab/>4</text:a></text:p>
          <text:p text:style-name="P21"><text:a xlink:type="simple" xlink:href="#__RefHeading___Toc143_2058273410%20Copy%201" office:name="2. ОПИСАНИЕ ИСПОЛЬЗУЕМЫХ ПЕРЕМЕННЫХ" text:style-name="Index_20_Link" text:visited-style-name="Index_20_Link">2. ОПИСАНИЕ ИСПОЛЬЗУЕМЫХ ПЕРЕМЕННЫХ<text:tab/>5</text:a></text:p>
          <text:p text:style-name="P21"><text:a xlink:type="simple" xlink:href="#__RefHeading___Toc143_2058273410%20Copy%201%20Copy%202" office:name="3. БЛОК-СХЕМА АЛГОРИТМА" text:style-name="Index_20_Link" text:visited-style-name="Index_20_Link">3. БЛОК-СХЕМА АЛГОРИТМА<text:tab/>8</text:a></text:p>
          <text:p text:style-name="P21"><text:a xlink:type="simple" xlink:href="#__RefHeading___Toc143_2058273410%20Copy%201%20Copy%202%20Copy%201" office:name="4. ТЕСТИРОВАНИЕ АЛГОРИТМА" text:style-name="Index_20_Link" text:visited-style-name="Index_20_Link">4. ТЕСТИРОВАНИЕ АЛГОРИТМА<text:tab/>8</text:a></text:p>
          <text:p text:style-name="P21"><text:a xlink:type="simple" xlink:href="#__RefHeading___Toc143_2058273410%20Copy%201%20Copy%202%20Copy%202" office:name="5. ИСХОДНЫЙ КОД АЛГОРИТМА" text:style-name="Index_20_Link" text:visited-style-name="Index_20_Link">5. ИСХОДНЫЙ КОД АЛГОРИТМА<text:tab/>9</text:a></text:p>
          <text:p text:style-name="P21"><text:a xlink:type="simple" xlink:href="#__RefHeading___Toc143_2058273410%20Copy%201%20Copy%202%20Copy%206" office:name="ЗАКЛЮЧЕНИЕ" text:style-name="Index_20_Link" text:visited-style-name="Index_20_Link">ЗАКЛЮЧЕНИЕ<text:tab/>15</text:a></text:p>
          <text:p text:style-name="P21"><text:a xlink:type="simple" xlink:href="#__RefHeading___Toc143_2058273410%20Copy%201%20Copy%202%20Copy%207" office:name="ПРИЛОЖЕНИЕ А" text:style-name="Index_20_Link" text:visited-style-name="Index_20_Link">ПРИЛОЖЕНИЕ А<text:tab/>16</text:a></text:p>
        </text:index-body>
      </text:table-of-content>
      <text:p text:style-name="P20"/>
      <text:h text:style-name="P22" text:outline-level="1"><text:bookmark-start text:name="__RefHeading___Toc82_2058273410"/>ВВЕДЕНИЕ<text:bookmark-end text:name="__RefHeading___Toc82_2058273410"/></text:h>
      <text:p text:style-name="P23"><text:span text:style-name="T13">Цель работы</text:span> — разработать программу карманной сортировки последовательности вещественных чисел, хранящейся в очереди на базе <text:span text:style-name="T14">связного</text:span> списка, записать результат её работы в красно-чёрное дерево, а также предусмотреть поиск подстроки методом Кнута-Морриса-Пратта</text:p>
      <text:p text:style-name="P24"/>
      <text:h text:style-name="P25" text:outline-level="1"><text:bookmark-start text:name="__RefHeading___Toc143_2058273410 Copy 1 Copy 3"/><text:span text:style-name="T15">1. </text:span><text:span text:style-name="T16">АЛГОРИТМ </text:span><text:span text:style-name="T17">СОРТИРОВКИ</text:span><text:span text:style-name="T18"> И ПОИСКА</text:span><text:bookmark-end text:name="__RefHeading___Toc143_2058273410 Copy 1 Copy 3"/></text:h>
      <text:p text:style-name="P26">Программа получает на вход название файла, в котором хранятся исходные данные. Содержимое файла считывается целиком в динамический текстовый буфер (строку). Из этой строки последовательно считываются и преобразуются вещественные числа, которые затем записываются в <text:span text:style-name="T5">односвязную очередь</text:span>.</text:p>
      <text:p text:style-name="P26">Далее происходит сортировка <text:span text:style-name="T5">очереди </text:span>по следующему алгоритму:</text:p>
      <text:list text:style-name="L1">
        <text:list-item>
          <text:p text:style-name="P27">Создаются карманы (тоже отдельные очереди), количество карманов равно количеству элементов в очереди;</text:p>
        </text:list-item>
        <text:list-item>
          <text:p text:style-name="P27">Далее элементы распределяются по карманам. Для начала определяются максимальный (<text:span text:style-name="T19">max</text:span>) и минимальный (<text:span text:style-name="T19">min</text:span>) элементы очереди. Индекс нужного кармана для каждого элемента определяется по формуле:<text:line-break/><text:tab/><text:tab/><text:tab/><text:tab/><draw:frame text:anchor-type="as-char" svg:y="-0.603cm" draw:z-index="2" draw:name="Фигура1" draw:style-name="gr1" draw:text-style-name="P28" svg:width="7.206cm" svg:height="0.929cm"><draw:image xlink:href="Pictures/1000B47200001776000003059D220BC4.svg" xlink:type="simple" xlink:show="embed" xlink:actuate="onLoad" draw:mime-type="image/svg+xml"><text:p/></draw:image><draw:image xlink:href="Pictures/10000001000000E30000001D95159B00.png" xlink:type="simple" xlink:show="embed" xlink:actuate="onLoad" draw:mime-type="image/png"/><svg:title>TexMaths</svg:title><svg:desc>12§display§ind = \frac{(val - min) \cdot (numBuckets - 1)}{max - min}§svg§600§FALSE§</svg:desc></draw:frame></text:p>
        </text:list-item>
        <text:list-item>
          <text:p text:style-name="P27">Каждый заполненный карман сортируется на месте с помощью сортировки вставками;</text:p>
        </text:list-item>
        <text:list-item>
          <text:p text:style-name="P27">Содержимое карманов последовательно сливается в од<text:span text:style-name="T20">ну очередь</text:span> пут<text:span text:style-name="T20">ё</text:span>м перемещения элементов.</text:p>
        </text:list-item>
      </text:list>
      <text:p text:style-name="P26"/>
      <text:p text:style-name="P29">Для поиска подстроки файл воспринимается как единая строка. Поиск подстроки выполняется методом <text:span text:style-name="T21">Кнута-Морриса-Пратта</text:span>. Алгоритм состоит из следующих этапов<text:span text:style-name="T21">:</text:span></text:p>
      <text:list text:continue-numbering="true" text:style-name="L1">
        <text:list-item>
          <text:p text:style-name="P27">Построение префикс-функции (таблицы префиксов) для искомой подстроки. Для каждой позиции вычисляется длина наибольшего собственного префикса, совпадающего с суффиксом рассматриваемой части строки.</text:p>
        </text:list-item>
        <text:list-item>
          <text:p text:style-name="P30">Последовательный просмотр текста. При несовпадении символов алгоритм использует значения префикс-функции для определения следующей позиции сравнения без повторной проверки уже обработанных символов.</text:p>
        </text:list-item>
      </text:list>
      <text:p text:style-name="P31">Благодаря использованию префикс-функции количество сравнений существенно уменьшается по сравнению с наивным методом поиска.</text:p>
      <text:h text:style-name="P32" text:outline-level="1"><text:bookmark-start text:name="__RefHeading___Toc143_2058273410 Copy 1"/><text:span text:style-name="T22">2</text:span><text:span text:style-name="T15">. </text:span><text:span text:style-name="T23">ОПИСАНИЕ ИСПОЛЬЗУЕМЫХ ПЕРЕМЕННЫХ</text:span><text:bookmark-end text:name="__RefHeading___Toc143_2058273410 Copy 1"/></text:h>
      <text:p text:style-name="P33">Ниже представлена таблица с описанием использованных переменных<text:span text:style-name="T24">.</text:span></text:p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Название</text:p>
            </table:table-cell>
            <table:table-cell table:style-name="Таблица1.A1" office:value-type="string">
              <text:p text:style-name="Table_20_Heading">Тип</text:p>
            </table:table-cell>
            <table:table-cell table:style-name="Таблица1.A1" office:value-type="string">
              <text:p text:style-name="Table_20_Heading">Границы типа</text:p>
            </table:table-cell>
            <table:table-cell table:style-name="Таблица1.D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Таблица1.A2" office:value-type="string">
            <text:p text:style-name="P34">value</text:p>
          </table:table-cell>
          <table:table-cell table:style-name="Таблица1.A2" office:value-type="string">
            <text:p text:style-name="P34">float</text:p>
          </table:table-cell>
          <table:table-cell table:style-name="Таблица1.A2" office:value-type="string">
            <text:p text:style-name="P34">от -3,4E+38 до 3,4E+38</text:p>
          </table:table-cell>
          <table:table-cell table:style-name="Таблица1.D2" office:value-type="string">
            <text:p text:style-name="Table_20_Contents">Значение узла очереди</text:p>
          </table:table-cell>
        </table:table-row>
        <table:table-row>
          <table:table-cell table:style-name="Таблица1.A2" office:value-type="string">
            <text:p text:style-name="P34">next</text:p>
          </table:table-cell>
          <table:table-cell table:style-name="Таблица1.A2" office:value-type="string">
            <text:p text:style-name="P34">struct Q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следующий узел очереди</text:p>
          </table:table-cell>
        </table:table-row>
        <table:table-row>
          <table:table-cell table:style-name="Таблица1.A2" office:value-type="string">
            <text:p text:style-name="P34">head</text:p>
          </table:table-cell>
          <table:table-cell table:style-name="Таблица1.A2" office:value-type="string">
            <text:p text:style-name="P34">struct Q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первый элемент очереди</text:p>
          </table:table-cell>
        </table:table-row>
        <table:table-row>
          <table:table-cell table:style-name="Таблица1.A2" office:value-type="string">
            <text:p text:style-name="P34">tail</text:p>
          </table:table-cell>
          <table:table-cell table:style-name="Таблица1.A2" office:value-type="string">
            <text:p text:style-name="P34">struct Q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последний элемент очереди</text:p>
          </table:table-cell>
        </table:table-row>
        <table:table-row>
          <table:table-cell table:style-name="Таблица1.A2" office:value-type="string">
            <text:p text:style-name="P34">size</text:p>
          </table:table-cell>
          <table:table-cell table:style-name="Таблица1.A2" office:value-type="string">
            <text:p text:style-name="P34">size_t</text:p>
          </table:table-cell>
          <table:table-cell table:style-name="Таблица1.A2" office:value-type="string">
            <text:p text:style-name="P34">от 0 до 2⁶⁴−1</text:p>
          </table:table-cell>
          <table:table-cell table:style-name="Таблица1.D2" office:value-type="string">
            <text:p text:style-name="Table_20_Contents">Количество элементов в очереди</text:p>
          </table:table-cell>
        </table:table-row>
        <table:table-row>
          <table:table-cell table:style-name="Таблица1.A2" office:value-type="string">
            <text:p text:style-name="P34">q</text:p>
          </table:table-cell>
          <table:table-cell table:style-name="Таблица1.A2" office:value-type="string">
            <text:p text:style-name="P34">struct Queu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структуру очереди</text:p>
          </table:table-cell>
        </table:table-row>
        <table:table-row>
          <table:table-cell table:style-name="Таблица1.A2" office:value-type="string">
            <text:p text:style-name="P34">node</text:p>
          </table:table-cell>
          <table:table-cell table:style-name="Таблица1.A2" office:value-type="string">
            <text:p text:style-name="P34">struct Q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создаваемый узел очереди</text:p>
          </table:table-cell>
        </table:table-row>
        <table:table-row>
          <table:table-cell table:style-name="Таблица1.A2" office:value-type="string">
            <text:p text:style-name="P34">old</text:p>
          </table:table-cell>
          <table:table-cell table:style-name="Таблица1.A2" office:value-type="string">
            <text:p text:style-name="P34">struct Q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удаляемый узел очереди</text:p>
          </table:table-cell>
        </table:table-row>
        <table:table-row>
          <table:table-cell table:style-name="Таблица1.A2" office:value-type="string">
            <text:p text:style-name="P34">cur</text:p>
          </table:table-cell>
          <table:table-cell table:style-name="Таблица1.A2" office:value-type="string">
            <text:p text:style-name="P34">struct Q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текущий элемент очереди</text:p>
          </table:table-cell>
        </table:table-row>
        <table:table-row>
          <table:table-cell table:style-name="Таблица1.A2" office:value-type="string">
            <text:p text:style-name="P34">min</text:p>
          </table:table-cell>
          <table:table-cell table:style-name="Таблица1.A2" office:value-type="string">
            <text:p text:style-name="P34">float</text:p>
          </table:table-cell>
          <table:table-cell table:style-name="Таблица1.A2" office:value-type="string">
            <text:p text:style-name="P34">от -3,4E+38 до 3,4E+38</text:p>
          </table:table-cell>
          <table:table-cell table:style-name="Таблица1.D2" office:value-type="string">
            <text:p text:style-name="Table_20_Contents">Минимальное значение в очереди</text:p>
          </table:table-cell>
        </table:table-row>
        <table:table-row>
          <table:table-cell table:style-name="Таблица1.A2" office:value-type="string">
            <text:p text:style-name="P34">max</text:p>
          </table:table-cell>
          <table:table-cell table:style-name="Таблица1.A2" office:value-type="string">
            <text:p text:style-name="P34">float</text:p>
          </table:table-cell>
          <table:table-cell table:style-name="Таблица1.A2" office:value-type="string">
            <text:p text:style-name="P34">от -3,4E+38 до 3,4E+38</text:p>
          </table:table-cell>
          <table:table-cell table:style-name="Таблица1.D2" office:value-type="string">
            <text:p text:style-name="Table_20_Contents">Максимальное значение в очереди</text:p>
          </table:table-cell>
        </table:table-row>
        <table:table-row>
          <table:table-cell table:style-name="Таблица1.A2" office:value-type="string">
            <text:p text:style-name="P34">nb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от 0 до 2147483647</text:p>
          </table:table-cell>
          <table:table-cell table:style-name="Таблица1.D2" office:value-type="string">
            <text:p text:style-name="Table_20_Contents">Количество корзин при <text:span text:style-name="T25">карманной</text:span> сортировке</text:p>
          </table:table-cell>
        </table:table-row>
        <table:table-row>
          <table:table-cell table:style-name="Таблица1.A2" office:value-type="string">
            <text:p text:style-name="P34">buckets</text:p>
          </table:table-cell>
          <table:table-cell table:style-name="Таблица1.A2" office:value-type="string">
            <text:p text:style-name="P34">struct Queue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Массив корзин для <text:span text:style-name="T25">карманной </text:span>сортировки</text:p>
          </table:table-cell>
        </table:table-row>
        <table:table-row>
          <table:table-cell table:style-name="Таблица1.A2" office:value-type="string">
            <text:p text:style-name="P34">idx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от 0 до 2147483647</text:p>
          </table:table-cell>
          <table:table-cell table:style-name="Таблица1.D2" office:value-type="string">
            <text:p text:style-name="Table_20_Contents">Индекс корзины для элемента</text:p>
          </table:table-cell>
        </table:table-row>
        <table:table-row>
          <table:table-cell table:style-name="Таблица1.A2" office:value-type="string">
            <text:p text:style-name="P34">val</text:p>
          </table:table-cell>
          <table:table-cell table:style-name="Таблица1.A2" office:value-type="string">
            <text:p text:style-name="P34">float</text:p>
          </table:table-cell>
          <table:table-cell table:style-name="Таблица1.A2" office:value-type="string">
            <text:p text:style-name="P34">от -3,4E+38 до 3,4E+38</text:p>
          </table:table-cell>
          <table:table-cell table:style-name="Таблица1.D2" office:value-type="string">
            <text:p text:style-name="Table_20_Contents">Временное значение элемента очереди</text:p>
          </table:table-cell>
        </table:table-row>
        <table:table-row>
          <table:table-cell table:style-name="Таблица1.A2" office:value-type="string">
            <text:p text:style-name="P34">m</text:p>
          </table:table-cell>
          <table:table-cell table:style-name="Таблица1.A2" office:value-type="string">
            <text:p text:style-name="P34">size_t</text:p>
          </table:table-cell>
          <table:table-cell table:style-name="Таблица1.A2" office:value-type="string">
            <text:p text:style-name="P34">от 0 до 2⁶⁴−1</text:p>
          </table:table-cell>
          <table:table-cell table:style-name="Таблица1.D2" office:value-type="string">
            <text:p text:style-name="Table_20_Contents">Размер корзины или длина шаблона</text:p>
          </table:table-cell>
        </table:table-row>
        <table:table-row>
          <table:table-cell table:style-name="Таблица1.A2" office:value-type="string">
            <text:p text:style-name="P34">n</text:p>
          </table:table-cell>
          <table:table-cell table:style-name="Таблица1.A2" office:value-type="string">
            <text:p text:style-name="P34">size_t</text:p>
          </table:table-cell>
          <table:table-cell table:style-name="Таблица1.A2" office:value-type="string">
            <text:p text:style-name="P34">от 0 до 2⁶⁴−1</text:p>
          </table:table-cell>
          <table:table-cell table:style-name="Таблица1.D2" office:value-type="string">
            <text:p text:style-name="Table_20_Contents">Размер очереди или длина текста</text:p>
          </table:table-cell>
        </table:table-row>
        <table:table-row>
          <table:table-cell table:style-name="Таблица1.A2" office:value-type="string">
            <text:p text:style-name="P34">k</text:p>
          </table:table-cell>
          <table:table-cell table:style-name="Таблица1.A2" office:value-type="string">
            <text:p text:style-name="P34">size_t</text:p>
          </table:table-cell>
          <table:table-cell table:style-name="Таблица1.A2" office:value-type="string">
            <text:p text:style-name="P34">от 0 до 2⁶⁴−1</text:p>
          </table:table-cell>
          <table:table-cell table:style-name="Таблица1.D2" office:value-type="string">
            <text:p text:style-name="Table_20_Contents">Счётчик при построении префикс-функции</text:p>
          </table:table-cell>
        </table:table-row>
        <table:table-row>
          <table:table-cell table:style-name="Таблица1.A2" office:value-type="string">
            <text:p text:style-name="P34">j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от -2147483648 до 2147483647</text:p>
          </table:table-cell>
          <table:table-cell table:style-name="Таблица1.D2" office:value-type="string">
            <text:p text:style-name="Table_20_Contents">Индекс при сортировке вставками</text:p>
          </table:table-cell>
        </table:table-row>
        <table:table-row>
          <table:table-cell table:style-name="Таблица1.A2" office:value-type="string">
            <text:p text:style-name="P34">pi</text:p>
          </table:table-cell>
          <table:table-cell table:style-name="Таблица1.A2" office:value-type="string">
            <text:p text:style-name="P34">int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Таблица префиксов алгоритма КМП</text:p>
          </table:table-cell>
        </table:table-row>
        <table:table-row>
          <table:table-cell table:style-name="Таблица1.A2" office:value-type="string">
            <text:p text:style-name="P34">q</text:p>
          </table:table-cell>
          <table:table-cell table:style-name="Таблица1.A2" office:value-type="string">
            <text:p text:style-name="P34">size_t</text:p>
          </table:table-cell>
          <table:table-cell table:style-name="Таблица1.A2" office:value-type="string">
            <text:p text:style-name="P34">от 0 до 2⁶⁴−1</text:p>
          </table:table-cell>
          <table:table-cell table:style-name="Таблица1.D2" office:value-type="string">
            <text:p text:style-name="Table_20_Contents">Текущая длина совпавшего префикса</text:p>
          </table:table-cell>
        </table:table-row>
        <table:table-row>
          <table:table-cell table:style-name="Таблица1.A2" office:value-type="string">
            <text:p text:style-name="P34">pattern</text:p>
          </table:table-cell>
          <table:table-cell table:style-name="Таблица1.A2" office:value-type="string">
            <text:p text:style-name="P34">char[256]</text:p>
          </table:table-cell>
          <table:table-cell table:style-name="Таблица1.A2" office:value-type="string">
            <text:p text:style-name="P34">до 255 символов</text:p>
          </table:table-cell>
          <table:table-cell table:style-name="Таблица1.D2" office:value-type="string">
            <text:p text:style-name="Table_20_Contents">Искомая подстрока</text:p>
          </table:table-cell>
        </table:table-row>
        <text:soft-page-break/>
        <table:table-row>
          <table:table-cell table:style-name="Таблица1.A2" office:value-type="string">
            <text:p text:style-name="P34">text</text:p>
          </table:table-cell>
          <table:table-cell table:style-name="Таблица1.A2" office:value-type="string">
            <text:p text:style-name="P34">const char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Текст для поиска подстроки</text:p>
          </table:table-cell>
        </table:table-row>
        <table:table-row>
          <table:table-cell table:style-name="Таблица1.A2" office:value-type="string">
            <text:p text:style-name="P34">pos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от -1 до 2147483647</text:p>
          </table:table-cell>
          <table:table-cell table:style-name="Таблица1.D2" office:value-type="string">
            <text:p text:style-name="Table_20_Contents">Позиция найденной подстроки</text:p>
          </table:table-cell>
        </table:table-row>
        <table:table-row>
          <table:table-cell table:style-name="Таблица1.A2" office:value-type="string">
            <text:p text:style-name="P34">result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от -1 до 2147483647</text:p>
          </table:table-cell>
          <table:table-cell table:style-name="Таблица1.D2" office:value-type="string">
            <text:p text:style-name="Table_20_Contents">Результат поиска подстроки</text:p>
          </table:table-cell>
        </table:table-row>
        <table:table-row>
          <table:table-cell table:style-name="Таблица1.A2" office:value-type="string">
            <text:p text:style-name="P34">key</text:p>
          </table:table-cell>
          <table:table-cell table:style-name="Таблица1.A2" office:value-type="string">
            <text:p text:style-name="P34">float</text:p>
          </table:table-cell>
          <table:table-cell table:style-name="Таблица1.A2" office:value-type="string">
            <text:p text:style-name="P34">от -3,4E+38 до 3,4E+38</text:p>
          </table:table-cell>
          <table:table-cell table:style-name="Таблица1.D2" office:value-type="string">
            <text:p text:style-name="Table_20_Contents">Ключ узла красно-чёрного дерева</text:p>
          </table:table-cell>
        </table:table-row>
        <table:table-row>
          <table:table-cell table:style-name="Таблица1.A2" office:value-type="string">
            <text:p text:style-name="P34">color</text:p>
          </table:table-cell>
          <table:table-cell table:style-name="Таблица1.A2" office:value-type="string">
            <text:p text:style-name="P34">enum Color</text:p>
          </table:table-cell>
          <table:table-cell table:style-name="Таблица1.A2" office:value-type="string">
            <text:p text:style-name="P34">RED, BLACK</text:p>
          </table:table-cell>
          <table:table-cell table:style-name="Таблица1.D2" office:value-type="string">
            <text:p text:style-name="Table_20_Contents">Цвет узла красно-чёрного дерева</text:p>
          </table:table-cell>
        </table:table-row>
        <table:table-row>
          <table:table-cell table:style-name="Таблица1.A2" office:value-type="string">
            <text:p text:style-name="P34">left</text:p>
          </table:table-cell>
          <table:table-cell table:style-name="Таблица1.A2" office:value-type="string">
            <text:p text:style-name="P34">struct RB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левого потомка</text:p>
          </table:table-cell>
        </table:table-row>
        <table:table-row>
          <table:table-cell table:style-name="Таблица1.A2" office:value-type="string">
            <text:p text:style-name="P34">right</text:p>
          </table:table-cell>
          <table:table-cell table:style-name="Таблица1.A2" office:value-type="string">
            <text:p text:style-name="P34">struct RB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правого потомка</text:p>
          </table:table-cell>
        </table:table-row>
        <table:table-row>
          <table:table-cell table:style-name="Таблица1.A2" office:value-type="string">
            <text:p text:style-name="P34">parent</text:p>
          </table:table-cell>
          <table:table-cell table:style-name="Таблица1.A2" office:value-type="string">
            <text:p text:style-name="P34">struct RB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родительский узел</text:p>
          </table:table-cell>
        </table:table-row>
        <table:table-row>
          <table:table-cell table:style-name="Таблица1.A2" office:value-type="string">
            <text:p text:style-name="P34">root</text:p>
          </table:table-cell>
          <table:table-cell table:style-name="Таблица1.A2" office:value-type="string">
            <text:p text:style-name="P34">struct RB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Корень красно-чёрного дерева</text:p>
          </table:table-cell>
        </table:table-row>
        <table:table-row>
          <table:table-cell table:style-name="Таблица1.A2" office:value-type="string">
            <text:p text:style-name="P34">nil</text:p>
          </table:table-cell>
          <table:table-cell table:style-name="Таблица1.A2" office:value-type="string">
            <text:p text:style-name="P34">struct RB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Сторожевой NIL-узел дерева</text:p>
          </table:table-cell>
        </table:table-row>
        <table:table-row>
          <table:table-cell table:style-name="Таблица1.A2" office:value-type="string">
            <text:p text:style-name="P34">t</text:p>
          </table:table-cell>
          <table:table-cell table:style-name="Таблица1.A2" office:value-type="string">
            <text:p text:style-name="P34">struct RBTre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Указатель на структуру дерева</text:p>
          </table:table-cell>
        </table:table-row>
        <table:table-row>
          <table:table-cell table:style-name="Таблица1.A2" office:value-type="string">
            <text:p text:style-name="P34">z</text:p>
          </table:table-cell>
          <table:table-cell table:style-name="Таблица1.A2" office:value-type="string">
            <text:p text:style-name="P34">struct RB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Вставляемый узел дерева</text:p>
          </table:table-cell>
        </table:table-row>
        <table:table-row>
          <table:table-cell table:style-name="Таблица1.A2" office:value-type="string">
            <text:p text:style-name="P34">x</text:p>
          </table:table-cell>
          <table:table-cell table:style-name="Таблица1.A2" office:value-type="string">
            <text:p text:style-name="P34">struct RB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Рабочий указатель при операциях дерева</text:p>
          </table:table-cell>
        </table:table-row>
        <table:table-row>
          <table:table-cell table:style-name="Таблица1.A2" office:value-type="string">
            <text:p text:style-name="P34">y</text:p>
          </table:table-cell>
          <table:table-cell table:style-name="Таблица1.A2" office:value-type="string">
            <text:p text:style-name="P34">struct RBNod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Вспомогательный указатель при операциях дерева</text:p>
          </table:table-cell>
        </table:table-row>
        <table:table-row>
          <table:table-cell table:style-name="Таблица1.A2" office:value-type="string">
            <text:p text:style-name="P34">newPrefix</text:p>
          </table:table-cell>
          <table:table-cell table:style-name="Таблица1.A2" office:value-type="string">
            <text:p text:style-name="P34">char[512]</text:p>
          </table:table-cell>
          <table:table-cell table:style-name="Таблица1.A2" office:value-type="string">
            <text:p text:style-name="P34">до 511 символов</text:p>
          </table:table-cell>
          <table:table-cell table:style-name="Таблица1.D2" office:value-type="string">
            <text:p text:style-name="Table_20_Contents">Формируемый префикс для вывода дерева</text:p>
          </table:table-cell>
        </table:table-row>
        <table:table-row>
          <table:table-cell table:style-name="Таблица1.A2" office:value-type="string">
            <text:p text:style-name="P34">prefix</text:p>
          </table:table-cell>
          <table:table-cell table:style-name="Таблица1.A2" office:value-type="string">
            <text:p text:style-name="P34">const char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Текущий префикс при выводе дерева</text:p>
          </table:table-cell>
        </table:table-row>
        <table:table-row>
          <table:table-cell table:style-name="Таблица1.A2" office:value-type="string">
            <text:p text:style-name="P34">isLeft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0 или 1</text:p>
          </table:table-cell>
          <table:table-cell table:style-name="Таблица1.D2" office:value-type="string">
            <text:p text:style-name="Table_20_Contents">Признак левого поддерева при выводе</text:p>
          </table:table-cell>
        </table:table-row>
        <table:table-row>
          <table:table-cell table:style-name="Таблица1.A2" office:value-type="string">
            <text:p text:style-name="P34">fileContent</text:p>
          </table:table-cell>
          <table:table-cell table:style-name="Таблица1.A2" office:value-type="string">
            <text:p text:style-name="P34">char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Буфер с содержимым файла</text:p>
          </table:table-cell>
        </table:table-row>
        <table:table-row>
          <table:table-cell table:style-name="Таблица1.A2" office:value-type="string">
            <text:p text:style-name="P34">filename</text:p>
          </table:table-cell>
          <table:table-cell table:style-name="Таблица1.A2" office:value-type="string">
            <text:p text:style-name="P34">char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Имя входного файла</text:p>
          </table:table-cell>
        </table:table-row>
        <table:table-row>
          <table:table-cell table:style-name="Таблица1.A2" office:value-type="string">
            <text:p text:style-name="P34">file</text:p>
          </table:table-cell>
          <table:table-cell table:style-name="Таблица1.A2" office:value-type="string">
            <text:p text:style-name="P34">FILE*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Файловый поток для чтения файла</text:p>
          </table:table-cell>
        </table:table-row>
        <table:table-row>
          <table:table-cell table:style-name="Таблица1.A2" office:value-type="string">
            <text:p text:style-name="P34">buf</text:p>
          </table:table-cell>
          <table:table-cell table:style-name="Таблица1.A2" office:value-type="string">
            <text:p text:style-name="P34">char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Буфер для чтения содержимого файла</text:p>
          </table:table-cell>
        </table:table-row>
        <table:table-row>
          <table:table-cell table:style-name="Таблица1.A2" office:value-type="string">
            <text:p text:style-name="P34">ptr</text:p>
          </table:table-cell>
          <table:table-cell table:style-name="Таблица1.A2" office:value-type="string">
            <text:p text:style-name="P34">const char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Текущая позиция в буфере при разборе файла</text:p>
          </table:table-cell>
        </table:table-row>
        <table:table-row>
          <table:table-cell table:style-name="Таблица1.A2" office:value-type="string">
            <text:p text:style-name="P34">tmp</text:p>
          </table:table-cell>
          <table:table-cell table:style-name="Таблица1.A2" office:value-type="string">
            <text:p text:style-name="P34">float</text:p>
          </table:table-cell>
          <table:table-cell table:style-name="Таблица1.A2" office:value-type="string">
            <text:p text:style-name="P34">от -3,4E+38 до 3,4E+38</text:p>
          </table:table-cell>
          <table:table-cell table:style-name="Таблица1.D2" office:value-type="string">
            <text:p text:style-name="Table_20_Contents">Временная переменная для чтения чисел</text:p>
          </table:table-cell>
        </table:table-row>
        <table:table-row>
          <table:table-cell table:style-name="Таблица1.A2" office:value-type="string">
            <text:p text:style-name="P34">offset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от 0 до 2147483647</text:p>
          </table:table-cell>
          <table:table-cell table:style-name="Таблица1.D2" office:value-type="string">
            <text:p text:style-name="Table_20_Contents">Количество обработанных символов функцией sscanf</text:p>
          </table:table-cell>
        </table:table-row>
        <table:table-row>
          <table:table-cell table:style-name="Таблица1.A2" office:value-type="string">
            <text:p text:style-name="P34">argc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от 1 до 2147483647</text:p>
          </table:table-cell>
          <table:table-cell table:style-name="Таблица1.D2" office:value-type="string">
            <text:p text:style-name="Table_20_Contents">Количество аргументов командной строки</text:p>
          </table:table-cell>
        </table:table-row>
        <table:table-row>
          <table:table-cell table:style-name="Таблица1.A2" office:value-type="string">
            <text:p text:style-name="P34">argv</text:p>
          </table:table-cell>
          <table:table-cell table:style-name="Таблица1.A2" office:value-type="string">
            <text:p text:style-name="P34">char**</text:p>
          </table:table-cell>
          <table:table-cell table:style-name="Таблица1.A2" office:value-type="string">
            <text:p text:style-name="P34">адрес памяти</text:p>
          </table:table-cell>
          <table:table-cell table:style-name="Таблица1.D2" office:value-type="string">
            <text:p text:style-name="Table_20_Contents">Массив аргументов командной строки</text:p>
          </table:table-cell>
        </table:table-row>
        <text:soft-page-break/>
        <table:table-row>
          <table:table-cell table:style-name="Таблица1.A2" office:value-type="string">
            <text:p text:style-name="P34">tree</text:p>
          </table:table-cell>
          <table:table-cell table:style-name="Таблица1.A2" office:value-type="string">
            <text:p text:style-name="P34">struct RBTree</text:p>
          </table:table-cell>
          <table:table-cell table:style-name="Таблица1.A2" office:value-type="string">
            <text:p text:style-name="P34">-</text:p>
          </table:table-cell>
          <table:table-cell table:style-name="Таблица1.D2" office:value-type="string">
            <text:p text:style-name="Table_20_Contents">Красно-чёрное дерево</text:p>
          </table:table-cell>
        </table:table-row>
        <table:table-row>
          <table:table-cell table:style-name="Таблица1.A1" office:value-type="string">
            <text:p text:style-name="P34">tmp (очередь)</text:p>
          </table:table-cell>
          <table:table-cell table:style-name="Таблица1.A1" office:value-type="string">
            <text:p text:style-name="P34">struct Queue</text:p>
          </table:table-cell>
          <table:table-cell table:style-name="Таблица1.A1" office:value-type="string">
            <text:p text:style-name="P34">-</text:p>
          </table:table-cell>
          <table:table-cell table:style-name="Таблица1.D1" office:value-type="string">
            <text:p text:style-name="Table_20_Contents">Временная очередь для переноса данных</text:p>
          </table:table-cell>
        </table:table-row>
        <table:table-row>
          <table:table-cell table:style-name="Таблица1.A2" office:value-type="string">
            <text:p text:style-name="P34">i</text:p>
          </table:table-cell>
          <table:table-cell table:style-name="Таблица1.A2" office:value-type="string">
            <text:p text:style-name="P34">int</text:p>
          </table:table-cell>
          <table:table-cell table:style-name="Таблица1.A2" office:value-type="string">
            <text:p text:style-name="P34">от 0 до 2147483647</text:p>
          </table:table-cell>
          <table:table-cell table:style-name="Таблица1.D2" office:value-type="string">
            <text:p text:style-name="Table_20_Contents">Счётчик циклов</text:p>
          </table:table-cell>
        </table:table-row>
      </table:table>
      <text:p text:style-name="P33"/>
      <text:h text:style-name="P35" text:outline-level="1"><text:bookmark-start text:name="__RefHeading___Toc143_2058273410 Copy 1 Copy 2"/><text:span text:style-name="T22">3</text:span><text:span text:style-name="T15">. </text:span><text:span text:style-name="T26">БЛОК</text:span><text:span text:style-name="T27">-</text:span><text:span text:style-name="T26">СХЕМА АЛГОРИТМА</text:span><text:bookmark-end text:name="__RefHeading___Toc143_2058273410 Copy 1 Copy 2"/></text:h>
      <text:p text:style-name="P36">Блок<text:span text:style-name="T28">-</text:span>схема алгоритма представлена в Приложении А.</text:p>
      <text:p text:style-name="P36"/>
      <text:h text:style-name="P37" text:outline-level="1"><text:bookmark-start text:name="__RefHeading___Toc143_2058273410 Copy 1 Copy 2 Copy 1"/><text:span text:style-name="T22">4</text:span><text:span text:style-name="T15">. </text:span><text:span text:style-name="T26">ТЕСТИРОВАНИЕ АЛГОРИТМА</text:span><text:bookmark-end text:name="__RefHeading___Toc143_2058273410 Copy 1 Copy 2 Copy 1"/></text:h>
      <text:p text:style-name="P38"><draw:frame draw:style-name="fr1" draw:name="Frame1" text:anchor-type="paragraph" svg:x="0cm" svg:y="0.323cm" svg:width="16.591cm" draw:z-index="0"><draw:text-box fo:min-height="3.582cm"><text:p text:style-name="P39"><draw:frame draw:style-name="fr2" draw:name="Изображение1" text:anchor-type="char" svg:width="16.591cm" svg:height="8.865cm" draw:z-index="3"><draw:image xlink:href="Pictures/10000001000006890000037E73E05660.png" xlink:type="simple" xlink:show="embed" xlink:actuate="onLoad" draw:mime-type="image/png"/></draw:frame>Рисунок <text:sequence text:ref-name="refDrawing0" text:name="Drawing" text:formula="ooow:Drawing+1" style:num-format="1">1</text:sequence><text:span text:style-name="T29"><text:s/></text:span>— Результат успешной работы алгоритма </text:p></draw:text-box></draw:frame></text:p>
      <text:p text:style-name="P38"><draw:frame draw:style-name="fr3" draw:name="Frame2" text:anchor-type="char" svg:width="16.591cm" draw:z-index="1"><draw:text-box fo:min-height="1.843cm"><text:p text:style-name="P40"><draw:frame draw:style-name="fr2" draw:name="Изображение2" text:anchor-type="char" svg:width="16.591cm" svg:height="2.909cm" draw:z-index="4"><draw:image xlink:href="Pictures/100000010000028A00000072428E23D5.png" xlink:type="simple" xlink:show="embed" xlink:actuate="onLoad" draw:mime-type="image/png"/></draw:frame>Рисунок <text:sequence text:ref-name="refDrawing1" text:name="Drawing" text:formula="ooow:Drawing+1" style:num-format="1">2</text:sequence><text:span text:style-name="T30"><text:s/>—</text:span> Результат работы алгоритма при неуказанном входном файле<text:span text:style-name="T31"> или ошибке при открытии файла</text:span></text:p></draw:text-box></draw:frame></text:p>
      <text:h text:style-name="P41" text:outline-level="1"><text:bookmark-start text:name="__RefHeading___Toc143_2058273410 Copy 1 Copy 2 Copy 2"/><text:span text:style-name="T22">5</text:span><text:span text:style-name="T15">. </text:span><text:span text:style-name="T32">ИСХОДНЫЙ КОД АЛГОРИТМА</text:span><text:bookmark-end text:name="__RefHeading___Toc143_2058273410 Copy 1 Copy 2 Copy 2"/></text:h>
      <text:p text:style-name="P42">Программа написана на языке C, <text:span text:style-name="T33">для компиляции </text:span>использовался компилятор gcc.</text:p>
      <text:p text:style-name="P42">Исходный код Makefile:</text:p>
      <text:p text:style-name="P43"><text:span text:style-name="T34"><text:s/>1 <text:s/>| <text:s text:c="3"/></text:span><text:span text:style-name="T35">CC = gcc</text:span></text:p>
      <text:p text:style-name="P43"><text:span text:style-name="T34"><text:s/>2 <text:s/>| <text:s text:c="3"/></text:span><text:span text:style-name="T35">CFLAGS = -O3 -Wall -Wextra -Werror -fanalyzer</text:span></text:p>
      <text:p text:style-name="P43"><text:span text:style-name="T34"><text:s/>3 <text:s/>| <text:s text:c="3"/></text:span><text:span text:style-name="T35">TARGET = lab</text:span><text:span text:style-name="T36">4</text:span></text:p>
      <text:p text:style-name="P44"><text:s/>4 <text:s/>| <text:s text:c="3"/></text:p>
      <text:p text:style-name="P43"><text:span text:style-name="T34"><text:s/>5 <text:s/>| <text:s text:c="3"/></text:span><text:span text:style-name="T35">all: </text:span><text:span text:style-name="T37">$(</text:span><text:span text:style-name="T35">TARGET</text:span><text:span text:style-name="T37">)</text:span></text:p>
      <text:p text:style-name="P44"><text:s/>6 <text:s/>| <text:s text:c="3"/></text:p>
      <text:p text:style-name="P43"><text:span text:style-name="T34"><text:s/>7 <text:s/>| <text:s text:c="3"/></text:span><text:span text:style-name="T35">$(TARGET): lab</text:span><text:span text:style-name="T36">4</text:span><text:span text:style-name="T35">.c</text:span></text:p>
      <text:p text:style-name="P43"><text:span text:style-name="T34"><text:s/>8 <text:s/>| <text:s text:c="3"/></text:span><text:span text:style-name="T35"><text:tab/></text:span><text:span text:style-name="T37">$(</text:span><text:span text:style-name="T35">CC</text:span><text:span text:style-name="T37">)</text:span><text:span text:style-name="T35"> </text:span><text:span text:style-name="T37">$(</text:span><text:span text:style-name="T35">CFLAGS</text:span><text:span text:style-name="T37">)</text:span><text:span text:style-name="T35"> </text:span><text:span text:style-name="T37">$(</text:span><text:span text:style-name="T35">TARGET</text:span><text:span text:style-name="T37">)</text:span><text:span text:style-name="T35">.c -o </text:span><text:span text:style-name="T37">$(</text:span><text:span text:style-name="T35">TARGET</text:span><text:span text:style-name="T37">)</text:span></text:p>
      <text:p text:style-name="P44"><text:s/>9 <text:s/>| <text:s text:c="3"/></text:p>
      <text:p text:style-name="P43"><text:span text:style-name="T34">10 <text:s/>| <text:s text:c="3"/></text:span><text:span text:style-name="T35">clean:</text:span></text:p>
      <text:p text:style-name="P43"><text:span text:style-name="T34">11 <text:s/>| <text:s text:c="3"/></text:span><text:span text:style-name="T35"><text:tab/>rm -f </text:span><text:span text:style-name="T37">$(</text:span><text:span text:style-name="T35">TARGET</text:span><text:span text:style-name="T37">)</text:span></text:p>
      <text:p text:style-name="P45"/>
      <text:p text:style-name="P46"/>
      <text:p text:style-name="P42">Исходный код lab<text:span text:style-name="T38">4</text:span>.c:</text:p>
      <text:p text:style-name="P47"><text:span text:style-name="T39"><text:s text:c="2"/>1 <text:s/>| <text:s text:c="3"/></text:span><text:span text:style-name="T37">#include</text:span><text:span text:style-name="T35"> </text:span><text:span text:style-name="T39">&lt;stdio.h&gt;</text:span></text:p>
      <text:p text:style-name="P47"><text:span text:style-name="T39"><text:s text:c="2"/>2 <text:s/>| <text:s text:c="3"/></text:span><text:span text:style-name="T37">#include</text:span><text:span text:style-name="T35"> </text:span><text:span text:style-name="T39">&lt;stdlib.h&gt;</text:span></text:p>
      <text:p text:style-name="P47"><text:span text:style-name="T39"><text:s text:c="2"/>3 <text:s/>| <text:s text:c="3"/></text:span><text:span text:style-name="T37">#include</text:span><text:span text:style-name="T35"> </text:span><text:span text:style-name="T39">&lt;string.h&gt;</text:span></text:p>
      <text:p text:style-name="P47"><text:span text:style-name="T39"><text:s text:c="2"/>4 <text:s/>| <text:s text:c="3"/></text:span><text:span text:style-name="T37">#include</text:span><text:span text:style-name="T35"> </text:span><text:span text:style-name="T39">&lt;stdbool.h&gt;</text:span></text:p>
      <text:p text:style-name="P48"><text:s text:c="2"/>5 <text:s/>| <text:s text:c="3"/></text:p>
      <text:p text:style-name="P48"><text:s text:c="2"/>6 <text:s/>| <text:s text:c="3"/></text:p>
      <text:p text:style-name="P47"><text:span text:style-name="T39"><text:s text:c="2"/>7 <text:s/>| <text:s text:c="3"/></text:span><text:span text:style-name="T37">typedef</text:span><text:span text:style-name="T35"> </text:span><text:span text:style-name="T37">struct</text:span><text:span text:style-name="T35"> </text:span><text:span text:style-name="T40">QNode</text:span><text:span text:style-name="T35"> {</text:span></text:p>
      <text:p text:style-name="P47"><text:span text:style-name="T39"><text:s text:c="2"/>8 <text:s/>| <text:s text:c="3"/></text:span><text:span text:style-name="T35"><text:s text:c="4"/></text:span><text:span text:style-name="T40">float</text:span><text:span text:style-name="T35"> value;</text:span></text:p>
      <text:p text:style-name="P47"><text:span text:style-name="T39"><text:s text:c="2"/>9 <text:s/>| <text:s text:c="3"/></text:span><text:span text:style-name="T35"><text:s text:c="4"/></text:span><text:span text:style-name="T37">struct</text:span><text:span text:style-name="T35"> </text:span><text:span text:style-name="T40">QNode</text:span><text:span text:style-name="T35"> *next;</text:span></text:p>
      <text:p text:style-name="P47"><text:span text:style-name="T39"><text:s/>10 <text:s/>| <text:s text:c="3"/></text:span><text:span text:style-name="T35">} QNode;</text:span></text:p>
      <text:p text:style-name="P48"><text:s/>11 <text:s/>| <text:s text:c="3"/></text:p>
      <text:p text:style-name="P47"><text:span text:style-name="T39"><text:s/>12 <text:s/>| <text:s text:c="3"/></text:span><text:span text:style-name="T37">typedef</text:span><text:span text:style-name="T35"> </text:span><text:span text:style-name="T37">struct</text:span><text:span text:style-name="T35"> </text:span><text:span text:style-name="T40">Queue</text:span><text:span text:style-name="T35"> {</text:span></text:p>
      <text:p text:style-name="P47"><text:span text:style-name="T39"><text:s/>13 <text:s/>| <text:s text:c="3"/></text:span><text:span text:style-name="T35"><text:s text:c="4"/>QNode *head;</text:span></text:p>
      <text:p text:style-name="P47"><text:span text:style-name="T39"><text:s/>14 <text:s/>| <text:s text:c="3"/></text:span><text:span text:style-name="T35"><text:s text:c="4"/>QNode *tail;</text:span></text:p>
      <text:p text:style-name="P47"><text:span text:style-name="T39"><text:s/>15 <text:s/>| <text:s text:c="3"/></text:span><text:span text:style-name="T35"><text:s text:c="4"/></text:span><text:span text:style-name="T40">size_t</text:span><text:span text:style-name="T35"> size;</text:span></text:p>
      <text:p text:style-name="P47"><text:span text:style-name="T39"><text:s/>16 <text:s/>| <text:s text:c="3"/></text:span><text:span text:style-name="T35">} Queue;</text:span></text:p>
      <text:p text:style-name="P48"><text:s/>17 <text:s/>| <text:s text:c="3"/></text:p>
      <text:p text:style-name="P47"><text:span text:style-name="T39"><text:s/>18 <text:s/>| <text:s text:c="3"/></text:span><text:span text:style-name="T40">void</text:span><text:span text:style-name="T35"> qInit(Queue *q) {</text:span></text:p>
      <text:p text:style-name="P47"><text:span text:style-name="T39"><text:s/>19 <text:s/>| <text:s text:c="3"/></text:span><text:span text:style-name="T35"><text:s text:c="4"/>q-&gt;head = q-&gt;tail = NULL;</text:span></text:p>
      <text:p text:style-name="P47"><text:span text:style-name="T39"><text:s/>20 <text:s/>| <text:s text:c="3"/></text:span><text:span text:style-name="T35"><text:s text:c="4"/>q-&gt;size = 0;</text:span></text:p>
      <text:p text:style-name="P49"><text:span text:style-name="T39"><text:s/>21 <text:s/>| <text:s text:c="3"/></text:span>}</text:p>
      <text:p text:style-name="P48"><text:s/>22 <text:s/>| <text:s text:c="3"/></text:p>
      <text:p text:style-name="P47"><text:span text:style-name="T39"><text:s/>23 <text:s/>| <text:s text:c="3"/></text:span><text:span text:style-name="T40">void</text:span><text:span text:style-name="T35"> enqueue(Queue *q, </text:span><text:span text:style-name="T40">float</text:span><text:span text:style-name="T35"> value) {</text:span></text:p>
      <text:p text:style-name="P47"><text:span text:style-name="T39"><text:s/>24 <text:s/>| <text:s text:c="3"/></text:span><text:span text:style-name="T35"><text:s text:c="4"/>QNode *node = malloc(</text:span><text:span text:style-name="T37">sizeof</text:span><text:span text:style-name="T35">(QNode));</text:span></text:p>
      <text:p text:style-name="P47"><text:span text:style-name="T39"><text:s/>25 <text:s/>| <text:s text:c="3"/></text:span><text:span text:style-name="T35"><text:s text:c="4"/></text:span><text:span text:style-name="T37">if</text:span><text:span text:style-name="T35"> (!node) {</text:span></text:p>
      <text:p text:style-name="P47"><text:span text:style-name="T39"><text:s/>26 <text:s/>| <text:s text:c="3"/></text:span><text:span text:style-name="T35"><text:s text:c="8"/>fprintf(stderr, </text:span><text:span text:style-name="T41">"Ошибка: не удалось выделить память для узла очереди.\n"</text:span><text:span text:style-name="T35">);</text:span></text:p>
      <text:p text:style-name="P47"><text:span text:style-name="T39"><text:s/>27 <text:s/>| <text:s text:c="3"/></text:span><text:span text:style-name="T35"><text:s text:c="8"/>exit(1);</text:span></text:p>
      <text:p text:style-name="P47"><text:span text:style-name="T39"><text:s/>28 <text:s/>| <text:s text:c="3"/></text:span><text:span text:style-name="T35"><text:s text:c="4"/>}</text:span></text:p>
      <text:p text:style-name="P47"><text:span text:style-name="T39"><text:s/>29 <text:s/>| <text:s text:c="3"/></text:span><text:span text:style-name="T35"><text:s text:c="4"/>node-&gt;value = value;</text:span></text:p>
      <text:p text:style-name="P47"><text:span text:style-name="T39"><text:s/>30 <text:s/>| <text:s text:c="3"/></text:span><text:span text:style-name="T35"><text:s text:c="4"/>node-&gt;next <text:s/>= NULL;</text:span></text:p>
      <text:p text:style-name="P47"><text:span text:style-name="T39"><text:s/>31 <text:s/>| <text:s text:c="3"/></text:span><text:span text:style-name="T35"><text:s text:c="4"/></text:span><text:span text:style-name="T37">if</text:span><text:span text:style-name="T35"> (q-&gt;size == 0) {</text:span></text:p>
      <text:p text:style-name="P47"><text:span text:style-name="T39"><text:s/>32 <text:s/>| <text:s text:c="3"/></text:span><text:span text:style-name="T35"><text:s text:c="8"/>q-&gt;head = q-&gt;tail = node;</text:span></text:p>
      <text:p text:style-name="P47"><text:span text:style-name="T39"><text:s/>33 <text:s/>| <text:s text:c="3"/></text:span><text:span text:style-name="T35"><text:s text:c="4"/>} </text:span><text:span text:style-name="T37">else</text:span><text:span text:style-name="T35"> {</text:span></text:p>
      <text:p text:style-name="P47"><text:span text:style-name="T39"><text:s/>34 <text:s/>| <text:s text:c="3"/></text:span><text:span text:style-name="T35"><text:s text:c="8"/>q-&gt;tail-&gt;next = node;</text:span></text:p>
      <text:p text:style-name="P47"><text:span text:style-name="T39"><text:s/>35 <text:s/>| <text:s text:c="3"/></text:span><text:span text:style-name="T35"><text:s text:c="8"/>q-&gt;tail = node;</text:span></text:p>
      <text:p text:style-name="P47"><text:span text:style-name="T39"><text:s/>36 <text:s/>| <text:s text:c="3"/></text:span><text:span text:style-name="T35"><text:s text:c="4"/>}</text:span></text:p>
      <text:p text:style-name="P47"><text:span text:style-name="T39"><text:s/>37 <text:s/>| <text:s text:c="3"/></text:span><text:span text:style-name="T35"><text:s text:c="4"/>q-&gt;size++;</text:span></text:p>
      <text:p text:style-name="P49"><text:span text:style-name="T39"><text:s/>38 <text:s/>| <text:s text:c="3"/></text:span>}</text:p>
      <text:p text:style-name="P48"><text:s/>39 <text:s/>| <text:s text:c="3"/></text:p>
      <text:p text:style-name="P47"><text:span text:style-name="T39"><text:s/>40 <text:s/>| <text:s text:c="3"/></text:span><text:span text:style-name="T40">bool</text:span><text:span text:style-name="T35"> dequeue(Queue *q, </text:span><text:span text:style-name="T40">float</text:span><text:span text:style-name="T35"> *out) {</text:span></text:p>
      <text:p text:style-name="P47"><text:span text:style-name="T39"><text:s/>41 <text:s/>| <text:s text:c="3"/></text:span><text:span text:style-name="T35"><text:s text:c="4"/></text:span><text:span text:style-name="T37">if</text:span><text:span text:style-name="T35"> (q-&gt;size == 0) </text:span><text:span text:style-name="T37">return</text:span><text:span text:style-name="T35"> false;</text:span></text:p>
      <text:p text:style-name="P47"><text:span text:style-name="T39"><text:s/>42 <text:s/>| <text:s text:c="3"/></text:span><text:span text:style-name="T35"><text:s text:c="4"/>QNode *old = q-&gt;head;</text:span></text:p>
      <text:p text:style-name="P47"><text:span text:style-name="T39"><text:s/>43 <text:s/>| <text:s text:c="3"/></text:span><text:span text:style-name="T35"><text:s text:c="4"/>*out = old-&gt;value;</text:span></text:p>
      <text:p text:style-name="P47"><text:span text:style-name="T39"><text:s/>44 <text:s/>| <text:s text:c="3"/></text:span><text:span text:style-name="T35"><text:s text:c="4"/>q-&gt;head = old-&gt;next;</text:span></text:p>
      <text:p text:style-name="P47"><text:span text:style-name="T39"><text:s/>45 <text:s/>| <text:s text:c="3"/></text:span><text:span text:style-name="T35"><text:s text:c="4"/></text:span><text:span text:style-name="T37">if</text:span><text:span text:style-name="T35"> (q-&gt;head == NULL) q-&gt;tail = NULL;</text:span></text:p>
      <text:p text:style-name="P47"><text:span text:style-name="T39"><text:s/>46 <text:s/>| <text:s text:c="3"/></text:span><text:span text:style-name="T35"><text:s text:c="4"/>free(old);</text:span></text:p>
      <text:p text:style-name="P47"><text:soft-page-break/><text:span text:style-name="T39"><text:s/>47 <text:s/>| <text:s text:c="3"/></text:span><text:span text:style-name="T35"><text:s text:c="4"/>q-&gt;size--;</text:span></text:p>
      <text:p text:style-name="P47"><text:span text:style-name="T39"><text:s/>48 <text:s/>| <text:s text:c="3"/></text:span><text:span text:style-name="T35"><text:s text:c="4"/></text:span><text:span text:style-name="T37">return</text:span><text:span text:style-name="T35"> true;</text:span></text:p>
      <text:p text:style-name="P49"><text:span text:style-name="T39"><text:s/>49 <text:s/>| <text:s text:c="3"/></text:span>}</text:p>
      <text:p text:style-name="P48"><text:s/>50 <text:s/>| <text:s text:c="3"/></text:p>
      <text:p text:style-name="P47"><text:span text:style-name="T39"><text:s/>51 <text:s/>| <text:s text:c="3"/></text:span><text:span text:style-name="T40">void</text:span><text:span text:style-name="T35"> printQ(</text:span><text:span text:style-name="T37">const</text:span><text:span text:style-name="T35"> Queue *q) {</text:span></text:p>
      <text:p text:style-name="P47"><text:span text:style-name="T39"><text:s/>52 <text:s/>| <text:s text:c="3"/></text:span><text:span text:style-name="T35"><text:s text:c="4"/></text:span><text:span text:style-name="T37">if</text:span><text:span text:style-name="T35"> (q-&gt;size == 0) { printf(</text:span><text:span text:style-name="T41">"[ пусто ]\n"</text:span><text:span text:style-name="T35">); </text:span><text:span text:style-name="T37">return</text:span><text:span text:style-name="T35">; }</text:span></text:p>
      <text:p text:style-name="P47"><text:span text:style-name="T39"><text:s/>53 <text:s/>| <text:s text:c="3"/></text:span><text:span text:style-name="T35"><text:s text:c="4"/>QNode *cur = q-&gt;head;</text:span></text:p>
      <text:p text:style-name="P47"><text:span text:style-name="T39"><text:s/>54 <text:s/>| <text:s text:c="3"/></text:span><text:span text:style-name="T35"><text:s text:c="4"/>printf(</text:span><text:span text:style-name="T41">"[ "</text:span><text:span text:style-name="T35">);</text:span></text:p>
      <text:p text:style-name="P47"><text:span text:style-name="T39"><text:s/>55 <text:s/>| <text:s text:c="3"/></text:span><text:span text:style-name="T35"><text:s text:c="4"/></text:span><text:span text:style-name="T37">while</text:span><text:span text:style-name="T35"> (cur) {</text:span></text:p>
      <text:p text:style-name="P47"><text:span text:style-name="T39"><text:s/>56 <text:s/>| <text:s text:c="3"/></text:span><text:span text:style-name="T35"><text:s text:c="8"/>printf(</text:span><text:span text:style-name="T41">"%g"</text:span><text:span text:style-name="T35">, cur-&gt;value);</text:span></text:p>
      <text:p text:style-name="P47"><text:span text:style-name="T39"><text:s/>57 <text:s/>| <text:s text:c="3"/></text:span><text:span text:style-name="T35"><text:s text:c="8"/></text:span><text:span text:style-name="T37">if</text:span><text:span text:style-name="T35"> (cur-&gt;next) printf(</text:span><text:span text:style-name="T41">" -&gt; "</text:span><text:span text:style-name="T35">);</text:span></text:p>
      <text:p text:style-name="P47"><text:span text:style-name="T39"><text:s/>58 <text:s/>| <text:s text:c="3"/></text:span><text:span text:style-name="T35"><text:s text:c="8"/>cur = cur-&gt;next;</text:span></text:p>
      <text:p text:style-name="P47"><text:span text:style-name="T39"><text:s/>59 <text:s/>| <text:s text:c="3"/></text:span><text:span text:style-name="T35"><text:s text:c="4"/>}</text:span></text:p>
      <text:p text:style-name="P47"><text:span text:style-name="T39"><text:s/>60 <text:s/>| <text:s text:c="3"/></text:span><text:span text:style-name="T35"><text:s text:c="4"/>printf(</text:span><text:span text:style-name="T41">" ] (size=%zu)\n"</text:span><text:span text:style-name="T35">, q-&gt;size);</text:span></text:p>
      <text:p text:style-name="P49"><text:span text:style-name="T39"><text:s/>61 <text:s/>| <text:s text:c="3"/></text:span>}</text:p>
      <text:p text:style-name="P48"><text:s/>62 <text:s/>| <text:s text:c="3"/></text:p>
      <text:p text:style-name="P47"><text:span text:style-name="T39"><text:s/>63 <text:s/>| <text:s text:c="3"/></text:span><text:span text:style-name="T40">void</text:span><text:span text:style-name="T35"> insertionSortQueue(Queue *q)</text:span></text:p>
      <text:p text:style-name="P49"><text:span text:style-name="T39"><text:s/>64 <text:s/>| <text:s text:c="3"/></text:span>{</text:p>
      <text:p text:style-name="P47"><text:span text:style-name="T39"><text:s/>65 <text:s/>| <text:s text:c="3"/></text:span><text:span text:style-name="T35"><text:s text:c="4"/></text:span><text:span text:style-name="T37">if</text:span><text:span text:style-name="T35"> (q-&gt;size &lt;= 1)</text:span></text:p>
      <text:p text:style-name="P47"><text:span text:style-name="T39"><text:s/>66 <text:s/>| <text:s text:c="3"/></text:span><text:span text:style-name="T35"><text:s text:c="8"/></text:span><text:span text:style-name="T37">return</text:span><text:span text:style-name="T35">;</text:span></text:p>
      <text:p text:style-name="P48"><text:s/>67 <text:s/>| <text:s text:c="3"/></text:p>
      <text:p text:style-name="P47"><text:span text:style-name="T39"><text:s/>68 <text:s/>| <text:s text:c="3"/></text:span><text:span text:style-name="T35"><text:s text:c="4"/>QNode *sorted = NULL;</text:span></text:p>
      <text:p text:style-name="P47"><text:span text:style-name="T39"><text:s/>69 <text:s/>| <text:s text:c="3"/></text:span><text:span text:style-name="T35"><text:s text:c="4"/>QNode *cur = q-&gt;head;</text:span></text:p>
      <text:p text:style-name="P48"><text:s/>70 <text:s/>| <text:s text:c="3"/></text:p>
      <text:p text:style-name="P47"><text:span text:style-name="T39"><text:s/>71 <text:s/>| <text:s text:c="3"/></text:span><text:span text:style-name="T35"><text:s text:c="4"/></text:span><text:span text:style-name="T37">while</text:span><text:span text:style-name="T35"> (cur != NULL) {</text:span></text:p>
      <text:p text:style-name="P47"><text:span text:style-name="T39"><text:s/>72 <text:s/>| <text:s text:c="3"/></text:span><text:span text:style-name="T35"><text:s text:c="8"/>QNode *next = cur-&gt;next;</text:span></text:p>
      <text:p text:style-name="P48"><text:s/>73 <text:s/>| <text:s text:c="3"/></text:p>
      <text:p text:style-name="P47"><text:span text:style-name="T39"><text:s/>74 <text:s/>| <text:s text:c="3"/></text:span><text:span text:style-name="T35"><text:s text:c="8"/></text:span><text:span text:style-name="T37">if</text:span><text:span text:style-name="T35"> (sorted == NULL || cur-&gt;value &lt;= sorted-&gt;value) {</text:span></text:p>
      <text:p text:style-name="P47"><text:span text:style-name="T39"><text:s/>75 <text:s/>| <text:s text:c="3"/></text:span><text:span text:style-name="T35"><text:s text:c="12"/>cur-&gt;next = sorted;</text:span></text:p>
      <text:p text:style-name="P47"><text:span text:style-name="T39"><text:s/>76 <text:s/>| <text:s text:c="3"/></text:span><text:span text:style-name="T35"><text:s text:c="12"/>sorted = cur;</text:span></text:p>
      <text:p text:style-name="P47"><text:span text:style-name="T39"><text:s/>77 <text:s/>| <text:s text:c="3"/></text:span><text:span text:style-name="T35"><text:s text:c="8"/>}</text:span></text:p>
      <text:p text:style-name="P47"><text:span text:style-name="T39"><text:s/>78 <text:s/>| <text:s text:c="3"/></text:span><text:span text:style-name="T35"><text:s text:c="8"/></text:span><text:span text:style-name="T37">else</text:span><text:span text:style-name="T35"> {</text:span></text:p>
      <text:p text:style-name="P47"><text:span text:style-name="T39"><text:s/>79 <text:s/>| <text:s text:c="3"/></text:span><text:span text:style-name="T35"><text:s text:c="12"/>QNode *tmp = sorted;</text:span></text:p>
      <text:p text:style-name="P48"><text:s/>80 <text:s/>| <text:s text:c="3"/></text:p>
      <text:p text:style-name="P47"><text:span text:style-name="T39"><text:s/>81 <text:s/>| <text:s text:c="3"/></text:span><text:span text:style-name="T35"><text:s text:c="12"/></text:span><text:span text:style-name="T37">while</text:span><text:span text:style-name="T35"> (tmp-&gt;next != NULL &amp;&amp;</text:span></text:p>
      <text:p text:style-name="P47"><text:span text:style-name="T39"><text:s/>82 <text:s/>| <text:s text:c="3"/></text:span><text:span text:style-name="T35"><text:s text:c="19"/>tmp-&gt;next-&gt;value &lt; cur-&gt;value)</text:span></text:p>
      <text:p text:style-name="P47"><text:span text:style-name="T39"><text:s/>83 <text:s/>| <text:s text:c="3"/></text:span><text:span text:style-name="T35"><text:s text:c="12"/>{</text:span></text:p>
      <text:p text:style-name="P47"><text:span text:style-name="T39"><text:s/>84 <text:s/>| <text:s text:c="3"/></text:span><text:span text:style-name="T35"><text:s text:c="16"/>tmp = tmp-&gt;next;</text:span></text:p>
      <text:p text:style-name="P47"><text:span text:style-name="T39"><text:s/>85 <text:s/>| <text:s text:c="3"/></text:span><text:span text:style-name="T35"><text:s text:c="12"/>}</text:span></text:p>
      <text:p text:style-name="P48"><text:s/>86 <text:s/>| <text:s text:c="3"/></text:p>
      <text:p text:style-name="P47"><text:span text:style-name="T39"><text:s/>87 <text:s/>| <text:s text:c="3"/></text:span><text:span text:style-name="T35"><text:s text:c="12"/>cur-&gt;next = tmp-&gt;next;</text:span></text:p>
      <text:p text:style-name="P47"><text:span text:style-name="T39"><text:s/>88 <text:s/>| <text:s text:c="3"/></text:span><text:span text:style-name="T35"><text:s text:c="12"/>tmp-&gt;next = cur;</text:span></text:p>
      <text:p text:style-name="P47"><text:span text:style-name="T39"><text:s/>89 <text:s/>| <text:s text:c="3"/></text:span><text:span text:style-name="T35"><text:s text:c="8"/>}</text:span></text:p>
      <text:p text:style-name="P48"><text:s/>90 <text:s/>| <text:s text:c="3"/></text:p>
      <text:p text:style-name="P47"><text:span text:style-name="T39"><text:s/>91 <text:s/>| <text:s text:c="3"/></text:span><text:span text:style-name="T35"><text:s text:c="8"/>cur = next;</text:span></text:p>
      <text:p text:style-name="P47"><text:span text:style-name="T39"><text:s/>92 <text:s/>| <text:s text:c="3"/></text:span><text:span text:style-name="T35"><text:s text:c="4"/>}</text:span></text:p>
      <text:p text:style-name="P48"><text:s/>93 <text:s/>| <text:s text:c="3"/></text:p>
      <text:p text:style-name="P47"><text:span text:style-name="T39"><text:s/>94 <text:s/>| <text:s text:c="3"/></text:span><text:span text:style-name="T35"><text:s text:c="4"/>q-&gt;head = sorted;</text:span></text:p>
      <text:p text:style-name="P48"><text:s/>95 <text:s/>| <text:s text:c="3"/></text:p>
      <text:p text:style-name="P47"><text:span text:style-name="T39"><text:s/>96 <text:s/>| <text:s text:c="3"/></text:span><text:span text:style-name="T35"><text:s text:c="4"/>q-&gt;tail = sorted;</text:span></text:p>
      <text:p text:style-name="P47"><text:span text:style-name="T39"><text:s/>97 <text:s/>| <text:s text:c="3"/></text:span><text:span text:style-name="T35"><text:s text:c="4"/></text:span><text:span text:style-name="T37">while</text:span><text:span text:style-name="T35"> (q-&gt;tail != NULL &amp;&amp;</text:span></text:p>
      <text:p text:style-name="P47"><text:span text:style-name="T39"><text:s/>98 <text:s/>| <text:s text:c="3"/></text:span><text:span text:style-name="T35"><text:s text:c="11"/>q-&gt;tail-&gt;next != NULL)</text:span></text:p>
      <text:p text:style-name="P47"><text:span text:style-name="T39"><text:s/>99 <text:s/>| <text:s text:c="3"/></text:span><text:span text:style-name="T35"><text:s text:c="4"/>{</text:span></text:p>
      <text:p text:style-name="P47"><text:span text:style-name="T39">100 <text:s/>| <text:s text:c="3"/></text:span><text:span text:style-name="T35"><text:s text:c="8"/>q-&gt;tail = q-&gt;tail-&gt;next;</text:span></text:p>
      <text:p text:style-name="P47"><text:span text:style-name="T39">101 <text:s/>| <text:s text:c="3"/></text:span><text:span text:style-name="T35"><text:s text:c="4"/>}</text:span></text:p>
      <text:p text:style-name="P49"><text:span text:style-name="T39">102 <text:s/>| <text:s text:c="3"/></text:span>}</text:p>
      <text:p text:style-name="P48">103 <text:s/>| <text:s text:c="3"/></text:p>
      <text:p text:style-name="P47"><text:span text:style-name="T39">104 <text:s/>| <text:s text:c="3"/></text:span><text:span text:style-name="T40">void</text:span><text:span text:style-name="T35"> bucketSort(Queue *q) {</text:span></text:p>
      <text:p text:style-name="P47"><text:span text:style-name="T39">105 <text:s/>| <text:s text:c="3"/></text:span><text:span text:style-name="T35"><text:s text:c="4"/></text:span><text:span text:style-name="T40">size_t</text:span><text:span text:style-name="T35"> n = q-&gt;size;</text:span></text:p>
      <text:p text:style-name="P47"><text:span text:style-name="T39">106 <text:s/>| <text:s text:c="3"/></text:span><text:span text:style-name="T35"><text:s text:c="4"/></text:span><text:span text:style-name="T37">if</text:span><text:span text:style-name="T35"> (n &lt;= 1) </text:span><text:span text:style-name="T37">return</text:span><text:span text:style-name="T35">;</text:span></text:p>
      <text:p text:style-name="P48">107 <text:s/>| <text:s text:c="3"/></text:p>
      <text:p text:style-name="P47"><text:span text:style-name="T39">108 <text:s/>| <text:s text:c="3"/></text:span><text:span text:style-name="T35"><text:s text:c="4"/></text:span><text:span text:style-name="T40">float</text:span><text:span text:style-name="T35"> min, max;</text:span></text:p>
      <text:p text:style-name="P47"><text:span text:style-name="T39">109 <text:s/>| <text:s text:c="3"/></text:span><text:span text:style-name="T35"><text:s text:c="4"/>QNode *cur = q-&gt;head;</text:span></text:p>
      <text:p text:style-name="P48">110 <text:s/>| <text:s text:c="3"/></text:p>
      <text:p text:style-name="P47"><text:span text:style-name="T39">111 <text:s/>| <text:s text:c="3"/></text:span><text:span text:style-name="T35"><text:s text:c="4"/>min = max = cur-&gt;value;</text:span></text:p>
      <text:p text:style-name="P47"><text:span text:style-name="T39">112 <text:s/>| <text:s text:c="3"/></text:span><text:span text:style-name="T35"><text:s text:c="4"/>cur = cur-&gt;next;</text:span></text:p>
      <text:p text:style-name="P48">113 <text:s/>| <text:s text:c="3"/></text:p>
      <text:p text:style-name="P47"><text:span text:style-name="T39">114 <text:s/>| <text:s text:c="3"/></text:span><text:span text:style-name="T35"><text:s text:c="4"/></text:span><text:span text:style-name="T37">while</text:span><text:span text:style-name="T35"> (cur) {</text:span></text:p>
      <text:p text:style-name="P47"><text:span text:style-name="T39">115 <text:s/>| <text:s text:c="3"/></text:span><text:span text:style-name="T35"><text:s text:c="8"/></text:span><text:span text:style-name="T37">if</text:span><text:span text:style-name="T35"> (cur-&gt;value &lt; min) min = cur-&gt;value;</text:span></text:p>
      <text:p text:style-name="P47"><text:span text:style-name="T39">116 <text:s/>| <text:s text:c="3"/></text:span><text:span text:style-name="T35"><text:s text:c="8"/></text:span><text:span text:style-name="T37">if</text:span><text:span text:style-name="T35"> (cur-&gt;value &gt; max) max = cur-&gt;value;</text:span></text:p>
      <text:p text:style-name="P47"><text:span text:style-name="T39">117 <text:s/>| <text:s text:c="3"/></text:span><text:span text:style-name="T35"><text:s text:c="8"/>cur = cur-&gt;next;</text:span></text:p>
      <text:p text:style-name="P47"><text:soft-page-break/><text:span text:style-name="T39">118 <text:s/>| <text:s text:c="3"/></text:span><text:span text:style-name="T35"><text:s text:c="4"/>}</text:span></text:p>
      <text:p text:style-name="P47"><text:span text:style-name="T39">119 <text:s/>| <text:s text:c="3"/></text:span><text:span text:style-name="T35"><text:s text:c="4"/></text:span><text:span text:style-name="T37">if</text:span><text:span text:style-name="T35"> (min == max) </text:span><text:span text:style-name="T37">return</text:span><text:span text:style-name="T35">;</text:span></text:p>
      <text:p text:style-name="P48">120 <text:s/>| <text:s text:c="3"/></text:p>
      <text:p text:style-name="P47"><text:span text:style-name="T39">121 <text:s/>| <text:s text:c="3"/></text:span><text:span text:style-name="T35"><text:s text:c="4"/></text:span><text:span text:style-name="T40">int</text:span><text:span text:style-name="T35"> nb = (</text:span><text:span text:style-name="T40">int</text:span><text:span text:style-name="T35">)n;</text:span></text:p>
      <text:p text:style-name="P47"><text:span text:style-name="T39">122 <text:s/>| <text:s text:c="3"/></text:span><text:span text:style-name="T35"><text:s text:c="4"/>Queue *buckets = malloc(nb * </text:span><text:span text:style-name="T37">sizeof</text:span><text:span text:style-name="T35">(Queue));</text:span></text:p>
      <text:p text:style-name="P47"><text:span text:style-name="T39">123 <text:s/>| <text:s text:c="3"/></text:span><text:span text:style-name="T35"><text:s text:c="4"/></text:span><text:span text:style-name="T37">if</text:span><text:span text:style-name="T35"> (!buckets) {</text:span></text:p>
      <text:p text:style-name="P47"><text:span text:style-name="T39">124 <text:s/>| <text:s text:c="3"/></text:span><text:span text:style-name="T35"><text:s text:c="8"/>fprintf(stderr, </text:span><text:span text:style-name="T41">"Ошибка: не удалось выделить память для корзин.\n"</text:span><text:span text:style-name="T35">);</text:span></text:p>
      <text:p text:style-name="P47"><text:span text:style-name="T39">125 <text:s/>| <text:s text:c="3"/></text:span><text:span text:style-name="T35"><text:s text:c="8"/>exit(1);</text:span></text:p>
      <text:p text:style-name="P47"><text:span text:style-name="T39">126 <text:s/>| <text:s text:c="3"/></text:span><text:span text:style-name="T35"><text:s text:c="4"/>}</text:span></text:p>
      <text:p text:style-name="P47"><text:span text:style-name="T39">127 <text:s/>| <text:s text:c="3"/></text:span><text:span text:style-name="T35"><text:s text:c="4"/></text:span><text:span text:style-name="T37">for</text:span><text:span text:style-name="T35"> (</text:span><text:span text:style-name="T40">int</text:span><text:span text:style-name="T35"> i = 0; i &lt; nb; i++) qInit(&amp;buckets[i]);</text:span></text:p>
      <text:p text:style-name="P48">128 <text:s/>| <text:s text:c="3"/></text:p>
      <text:p text:style-name="P47"><text:span text:style-name="T39">129 <text:s/>| <text:s text:c="3"/></text:span><text:span text:style-name="T35"><text:s text:c="4"/></text:span><text:span text:style-name="T40">float</text:span><text:span text:style-name="T35"> val;</text:span></text:p>
      <text:p text:style-name="P47"><text:span text:style-name="T39">130 <text:s/>| <text:s text:c="3"/></text:span><text:span text:style-name="T35"><text:s text:c="4"/></text:span><text:span text:style-name="T37">while</text:span><text:span text:style-name="T35"> (dequeue(q, &amp;val)) {</text:span></text:p>
      <text:p text:style-name="P47"><text:span text:style-name="T39">131 <text:s/>| <text:s text:c="3"/></text:span><text:span text:style-name="T35"><text:s text:c="8"/></text:span><text:span text:style-name="T40">int</text:span><text:span text:style-name="T35"> idx = (</text:span><text:span text:style-name="T40">int</text:span><text:span text:style-name="T35">)((val - min) * (nb - 1) / (max - min));</text:span></text:p>
      <text:p text:style-name="P47"><text:span text:style-name="T39">132 <text:s/>| <text:s text:c="3"/></text:span><text:span text:style-name="T35"><text:s text:c="8"/></text:span><text:span text:style-name="T37">if</text:span><text:span text:style-name="T35"> (idx &lt; 0) <text:s text:c="3"/>idx = 0;</text:span></text:p>
      <text:p text:style-name="P47"><text:span text:style-name="T39">133 <text:s/>| <text:s text:c="3"/></text:span><text:span text:style-name="T35"><text:s text:c="8"/></text:span><text:span text:style-name="T37">if</text:span><text:span text:style-name="T35"> (idx &gt;= nb) <text:s/>idx = nb - 1;</text:span></text:p>
      <text:p text:style-name="P47"><text:span text:style-name="T39">134 <text:s/>| <text:s text:c="3"/></text:span><text:span text:style-name="T35"><text:s text:c="8"/>enqueue(&amp;buckets[idx], val);</text:span></text:p>
      <text:p text:style-name="P47"><text:span text:style-name="T39">135 <text:s/>| <text:s text:c="3"/></text:span><text:span text:style-name="T35"><text:s text:c="4"/>}</text:span></text:p>
      <text:p text:style-name="P48">136 <text:s/>| <text:s text:c="3"/></text:p>
      <text:p text:style-name="P47"><text:span text:style-name="T39">137 <text:s/>| <text:s text:c="3"/></text:span><text:span text:style-name="T35"><text:s text:c="4"/></text:span><text:span text:style-name="T37">for</text:span><text:span text:style-name="T35"> (</text:span><text:span text:style-name="T40">int</text:span><text:span text:style-name="T35"> i = 0; i &lt; nb; i++) {</text:span></text:p>
      <text:p text:style-name="P47"><text:span text:style-name="T39">138 <text:s/>| <text:s text:c="3"/></text:span><text:span text:style-name="T35"><text:s text:c="8"/></text:span><text:span text:style-name="T37">if</text:span><text:span text:style-name="T35"> (buckets[i].size == 0)</text:span></text:p>
      <text:p text:style-name="P47"><text:span text:style-name="T39">139 <text:s/>| <text:s text:c="3"/></text:span><text:span text:style-name="T35"><text:s text:c="12"/></text:span><text:span text:style-name="T37">continue</text:span><text:span text:style-name="T35">;</text:span></text:p>
      <text:p text:style-name="P48">140 <text:s/>| <text:s text:c="3"/></text:p>
      <text:p text:style-name="P47"><text:span text:style-name="T39">141 <text:s/>| <text:s text:c="3"/></text:span><text:span text:style-name="T35"><text:s text:c="8"/>insertionSortQueue(&amp;buckets[i]);</text:span></text:p>
      <text:p text:style-name="P48">142 <text:s/>| <text:s text:c="3"/></text:p>
      <text:p text:style-name="P47"><text:span text:style-name="T39">143 <text:s/>| <text:s text:c="3"/></text:span><text:span text:style-name="T35"><text:s text:c="8"/></text:span><text:span text:style-name="T37">while</text:span><text:span text:style-name="T35"> (buckets[i].size &gt; 0) {</text:span></text:p>
      <text:p text:style-name="P47"><text:span text:style-name="T39">144 <text:s/>| <text:s text:c="3"/></text:span><text:span text:style-name="T35"><text:s text:c="12"/>dequeue(&amp;buckets[i], &amp;val);</text:span></text:p>
      <text:p text:style-name="P47"><text:span text:style-name="T39">145 <text:s/>| <text:s text:c="3"/></text:span><text:span text:style-name="T35"><text:s text:c="12"/>enqueue(q, val);</text:span></text:p>
      <text:p text:style-name="P47"><text:span text:style-name="T39">146 <text:s/>| <text:s text:c="3"/></text:span><text:span text:style-name="T35"><text:s text:c="8"/>}</text:span></text:p>
      <text:p text:style-name="P47"><text:span text:style-name="T39">147 <text:s/>| <text:s text:c="3"/></text:span><text:span text:style-name="T35"><text:s text:c="4"/>}</text:span></text:p>
      <text:p text:style-name="P47"><text:span text:style-name="T39">148 <text:s/>| <text:s text:c="3"/></text:span><text:span text:style-name="T35"><text:s text:c="4"/>free(buckets);</text:span></text:p>
      <text:p text:style-name="P49"><text:span text:style-name="T39">149 <text:s/>| <text:s text:c="3"/></text:span>}</text:p>
      <text:p text:style-name="P48">150 <text:s/>| <text:s text:c="3"/></text:p>
      <text:p text:style-name="P47"><text:span text:style-name="T39">151 <text:s/>| <text:s text:c="3"/></text:span><text:span text:style-name="T37">static</text:span><text:span text:style-name="T35"> </text:span><text:span text:style-name="T40">int</text:span><text:span text:style-name="T35"> *buildPrefixTable(</text:span><text:span text:style-name="T37">const</text:span><text:span text:style-name="T35"> </text:span><text:span text:style-name="T40">char</text:span><text:span text:style-name="T35"> *pattern, </text:span><text:span text:style-name="T40">size_t</text:span><text:span text:style-name="T35"> m) {</text:span></text:p>
      <text:p text:style-name="P47"><text:span text:style-name="T39">152 <text:s/>| <text:s text:c="3"/></text:span><text:span text:style-name="T35"><text:s text:c="4"/></text:span><text:span text:style-name="T40">int</text:span><text:span text:style-name="T35"> *pi = malloc(m * </text:span><text:span text:style-name="T37">sizeof</text:span><text:span text:style-name="T35">(</text:span><text:span text:style-name="T40">int</text:span><text:span text:style-name="T35">));</text:span></text:p>
      <text:p text:style-name="P47"><text:span text:style-name="T39">153 <text:s/>| <text:s text:c="3"/></text:span><text:span text:style-name="T35"><text:s text:c="4"/></text:span><text:span text:style-name="T37">if</text:span><text:span text:style-name="T35"> (!pi) { fprintf(stderr, </text:span><text:span text:style-name="T41">"Ошибка malloc KMP.\n"</text:span><text:span text:style-name="T35">); exit(1); }</text:span></text:p>
      <text:p text:style-name="P47"><text:span text:style-name="T39">154 <text:s/>| <text:s text:c="3"/></text:span><text:span text:style-name="T35"><text:s text:c="4"/>pi[0] = 0;</text:span></text:p>
      <text:p text:style-name="P47"><text:span text:style-name="T39">155 <text:s/>| <text:s text:c="3"/></text:span><text:span text:style-name="T35"><text:s text:c="4"/></text:span><text:span text:style-name="T40">size_t</text:span><text:span text:style-name="T35"> k = 0;</text:span></text:p>
      <text:p text:style-name="P47"><text:span text:style-name="T39">156 <text:s/>| <text:s text:c="3"/></text:span><text:span text:style-name="T35"><text:s text:c="4"/></text:span><text:span text:style-name="T37">for</text:span><text:span text:style-name="T35"> (</text:span><text:span text:style-name="T40">size_t</text:span><text:span text:style-name="T35"> i = 1; i &lt; m; i++) {</text:span></text:p>
      <text:p text:style-name="P47"><text:span text:style-name="T39">157 <text:s/>| <text:s text:c="3"/></text:span><text:span text:style-name="T35"><text:s text:c="8"/></text:span><text:span text:style-name="T37">while</text:span><text:span text:style-name="T35"> (k &gt; 0 &amp;&amp; pattern[k] != pattern[i]) k = (</text:span><text:span text:style-name="T40">size_t</text:span><text:span text:style-name="T35">)pi[k - 1];</text:span></text:p>
      <text:p text:style-name="P47"><text:span text:style-name="T39">158 <text:s/>| <text:s text:c="3"/></text:span><text:span text:style-name="T35"><text:s text:c="8"/></text:span><text:span text:style-name="T37">if</text:span><text:span text:style-name="T35"> (pattern[k] == pattern[i]) k++;</text:span></text:p>
      <text:p text:style-name="P47"><text:span text:style-name="T39">159 <text:s/>| <text:s text:c="3"/></text:span><text:span text:style-name="T35"><text:s text:c="8"/>pi[i] = (</text:span><text:span text:style-name="T40">int</text:span><text:span text:style-name="T35">)k;</text:span></text:p>
      <text:p text:style-name="P47"><text:span text:style-name="T39">160 <text:s/>| <text:s text:c="3"/></text:span><text:span text:style-name="T35"><text:s text:c="4"/>}</text:span></text:p>
      <text:p text:style-name="P47"><text:span text:style-name="T39">161 <text:s/>| <text:s text:c="3"/></text:span><text:span text:style-name="T35"><text:s text:c="4"/></text:span><text:span text:style-name="T37">return</text:span><text:span text:style-name="T35"> pi;</text:span></text:p>
      <text:p text:style-name="P49"><text:span text:style-name="T39">162 <text:s/>| <text:s text:c="3"/></text:span>}</text:p>
      <text:p text:style-name="P48">163 <text:s/>| <text:s text:c="3"/></text:p>
      <text:p text:style-name="P47"><text:span text:style-name="T39">164 <text:s/>| <text:s text:c="3"/></text:span><text:span text:style-name="T40">int</text:span><text:span text:style-name="T35"> kmpSearch(</text:span><text:span text:style-name="T37">const</text:span><text:span text:style-name="T35"> </text:span><text:span text:style-name="T40">char</text:span><text:span text:style-name="T35"> *text, </text:span><text:span text:style-name="T37">const</text:span><text:span text:style-name="T35"> </text:span><text:span text:style-name="T40">char</text:span><text:span text:style-name="T35"> *pattern) {</text:span></text:p>
      <text:p text:style-name="P47"><text:span text:style-name="T39">165 <text:s/>| <text:s text:c="3"/></text:span><text:span text:style-name="T35"><text:s text:c="4"/></text:span><text:span text:style-name="T40">size_t</text:span><text:span text:style-name="T35"> n = strlen(text);</text:span></text:p>
      <text:p text:style-name="P47"><text:span text:style-name="T39">166 <text:s/>| <text:s text:c="3"/></text:span><text:span text:style-name="T35"><text:s text:c="4"/></text:span><text:span text:style-name="T40">size_t</text:span><text:span text:style-name="T35"> m = strlen(pattern);</text:span></text:p>
      <text:p text:style-name="P47"><text:span text:style-name="T39">167 <text:s/>| <text:s text:c="3"/></text:span><text:span text:style-name="T35"><text:s text:c="4"/></text:span><text:span text:style-name="T37">if</text:span><text:span text:style-name="T35"> (m == 0) </text:span><text:span text:style-name="T37">return</text:span><text:span text:style-name="T35"> 0;</text:span></text:p>
      <text:p text:style-name="P47"><text:span text:style-name="T39">168 <text:s/>| <text:s text:c="3"/></text:span><text:span text:style-name="T35"><text:s text:c="4"/></text:span><text:span text:style-name="T37">if</text:span><text:span text:style-name="T35"> (m &gt; n) <text:s/></text:span><text:span text:style-name="T37">return</text:span><text:span text:style-name="T35"> -1;</text:span></text:p>
      <text:p text:style-name="P48">169 <text:s/>| <text:s text:c="3"/></text:p>
      <text:p text:style-name="P47"><text:span text:style-name="T39">170 <text:s/>| <text:s text:c="3"/></text:span><text:span text:style-name="T35"><text:s text:c="4"/></text:span><text:span text:style-name="T40">int</text:span><text:span text:style-name="T35"> *pi = buildPrefixTable(pattern, m);</text:span></text:p>
      <text:p text:style-name="P47"><text:span text:style-name="T39">171 <text:s/>| <text:s text:c="3"/></text:span><text:span text:style-name="T35"><text:s text:c="4"/></text:span><text:span text:style-name="T40">size_t</text:span><text:span text:style-name="T35"> q = 0;</text:span></text:p>
      <text:p text:style-name="P47"><text:span text:style-name="T39">172 <text:s/>| <text:s text:c="3"/></text:span><text:span text:style-name="T35"><text:s text:c="4"/></text:span><text:span text:style-name="T40">int</text:span><text:span text:style-name="T35"> result = -1;</text:span></text:p>
      <text:p text:style-name="P47"><text:span text:style-name="T39">173 <text:s/>| <text:s text:c="3"/></text:span><text:span text:style-name="T35"><text:s text:c="4"/></text:span><text:span text:style-name="T37">for</text:span><text:span text:style-name="T35"> (</text:span><text:span text:style-name="T40">size_t</text:span><text:span text:style-name="T35"> i = 0; i &lt; n; i++) {</text:span></text:p>
      <text:p text:style-name="P47"><text:span text:style-name="T39">174 <text:s/>| <text:s text:c="3"/></text:span><text:span text:style-name="T35"><text:s text:c="8"/></text:span><text:span text:style-name="T37">while</text:span><text:span text:style-name="T35"> (q &gt; 0 &amp;&amp; pattern[q] != text[i]) q = (</text:span><text:span text:style-name="T40">size_t</text:span><text:span text:style-name="T35">)pi[q - 1];</text:span></text:p>
      <text:p text:style-name="P47"><text:span text:style-name="T39">175 <text:s/>| <text:s text:c="3"/></text:span><text:span text:style-name="T35"><text:s text:c="8"/></text:span><text:span text:style-name="T37">if</text:span><text:span text:style-name="T35"> (pattern[q] == text[i]) q++;</text:span></text:p>
      <text:p text:style-name="P47"><text:span text:style-name="T39">176 <text:s/>| <text:s text:c="3"/></text:span><text:span text:style-name="T35"><text:s text:c="8"/></text:span><text:span text:style-name="T37">if</text:span><text:span text:style-name="T35"> (q == m) {</text:span></text:p>
      <text:p text:style-name="P47"><text:span text:style-name="T39">177 <text:s/>| <text:s text:c="3"/></text:span><text:span text:style-name="T35"><text:s text:c="12"/>result = (</text:span><text:span text:style-name="T40">int</text:span><text:span text:style-name="T35">)(i - m + 1);</text:span></text:p>
      <text:p text:style-name="P47"><text:span text:style-name="T39">178 <text:s/>| <text:s text:c="3"/></text:span><text:span text:style-name="T35"><text:s text:c="12"/></text:span><text:span text:style-name="T37">break</text:span><text:span text:style-name="T35">;</text:span></text:p>
      <text:p text:style-name="P47"><text:span text:style-name="T39">179 <text:s/>| <text:s text:c="3"/></text:span><text:span text:style-name="T35"><text:s text:c="8"/>}</text:span></text:p>
      <text:p text:style-name="P47"><text:span text:style-name="T39">180 <text:s/>| <text:s text:c="3"/></text:span><text:span text:style-name="T35"><text:s text:c="4"/>}</text:span></text:p>
      <text:p text:style-name="P47"><text:span text:style-name="T39">181 <text:s/>| <text:s text:c="3"/></text:span><text:span text:style-name="T35"><text:s text:c="4"/>free(pi);</text:span></text:p>
      <text:p text:style-name="P47"><text:span text:style-name="T39">182 <text:s/>| <text:s text:c="3"/></text:span><text:span text:style-name="T35"><text:s text:c="4"/></text:span><text:span text:style-name="T37">return</text:span><text:span text:style-name="T35"> result;</text:span></text:p>
      <text:p text:style-name="P49"><text:span text:style-name="T39">183 <text:s/>| <text:s text:c="3"/></text:span>}</text:p>
      <text:p text:style-name="P48">184 <text:s/>| <text:s text:c="3"/></text:p>
      <text:p text:style-name="P48">185 <text:s/>| <text:s text:c="3"/></text:p>
      <text:p text:style-name="P47"><text:span text:style-name="T39">186 <text:s/>| <text:s text:c="3"/></text:span><text:span text:style-name="T37">typedef</text:span><text:span text:style-name="T35"> </text:span><text:span text:style-name="T37">enum</text:span><text:span text:style-name="T35"> { RED, BLACK } Color;</text:span></text:p>
      <text:p text:style-name="P48">187 <text:s/>| <text:s text:c="3"/></text:p>
      <text:p text:style-name="P47"><text:span text:style-name="T39">188 <text:s/>| <text:s text:c="3"/></text:span><text:span text:style-name="T37">typedef</text:span><text:span text:style-name="T35"> </text:span><text:span text:style-name="T37">struct</text:span><text:span text:style-name="T35"> </text:span><text:span text:style-name="T40">RBNode</text:span><text:span text:style-name="T35"> {</text:span></text:p>
      <text:p text:style-name="P47"><text:soft-page-break/><text:span text:style-name="T39">189 <text:s/>| <text:s text:c="3"/></text:span><text:span text:style-name="T35"><text:s text:c="4"/></text:span><text:span text:style-name="T40">float</text:span><text:span text:style-name="T35"> key;</text:span></text:p>
      <text:p text:style-name="P47"><text:span text:style-name="T39">190 <text:s/>| <text:s text:c="3"/></text:span><text:span text:style-name="T35"><text:s text:c="4"/>Color color;</text:span></text:p>
      <text:p text:style-name="P47"><text:span text:style-name="T39">191 <text:s/>| <text:s text:c="3"/></text:span><text:span text:style-name="T35"><text:s text:c="4"/></text:span><text:span text:style-name="T37">struct</text:span><text:span text:style-name="T35"> </text:span><text:span text:style-name="T40">RBNode</text:span><text:span text:style-name="T35"> *left, *right, *parent;</text:span></text:p>
      <text:p text:style-name="P47"><text:span text:style-name="T39">192 <text:s/>| <text:s text:c="3"/></text:span><text:span text:style-name="T35">} RBNode;</text:span></text:p>
      <text:p text:style-name="P48">193 <text:s/>| <text:s text:c="3"/></text:p>
      <text:p text:style-name="P47"><text:span text:style-name="T39">194 <text:s/>| <text:s text:c="3"/></text:span><text:span text:style-name="T37">typedef</text:span><text:span text:style-name="T35"> </text:span><text:span text:style-name="T37">struct</text:span><text:span text:style-name="T35"> </text:span><text:span text:style-name="T40">RBTree</text:span><text:span text:style-name="T35"> {</text:span></text:p>
      <text:p text:style-name="P47"><text:span text:style-name="T39">195 <text:s/>| <text:s text:c="3"/></text:span><text:span text:style-name="T35"><text:s text:c="4"/>RBNode *root;</text:span></text:p>
      <text:p text:style-name="P47"><text:span text:style-name="T39">196 <text:s/>| <text:s text:c="3"/></text:span><text:span text:style-name="T35"><text:s text:c="4"/>RBNode *nil;</text:span></text:p>
      <text:p text:style-name="P47"><text:span text:style-name="T39">197 <text:s/>| <text:s text:c="3"/></text:span><text:span text:style-name="T35">} RBTree;</text:span></text:p>
      <text:p text:style-name="P48">198 <text:s/>| <text:s text:c="3"/></text:p>
      <text:p text:style-name="P47"><text:span text:style-name="T39">199 <text:s/>| <text:s text:c="3"/></text:span><text:span text:style-name="T37">static</text:span><text:span text:style-name="T35"> RBNode *rbNewNode(RBTree *t, </text:span><text:span text:style-name="T40">float</text:span><text:span text:style-name="T35"> key) {</text:span></text:p>
      <text:p text:style-name="P47"><text:span text:style-name="T39">200 <text:s/>| <text:s text:c="3"/></text:span><text:span text:style-name="T35"><text:s text:c="4"/>RBNode *n = malloc(</text:span><text:span text:style-name="T37">sizeof</text:span><text:span text:style-name="T35">(RBNode));</text:span></text:p>
      <text:p text:style-name="P47"><text:span text:style-name="T39">201 <text:s/>| <text:s text:c="3"/></text:span><text:span text:style-name="T35"><text:s text:c="4"/></text:span><text:span text:style-name="T37">if</text:span><text:span text:style-name="T35"> (!n) { fprintf(stderr, </text:span><text:span text:style-name="T41">"Ошибка malloc RBNode.\n"</text:span><text:span text:style-name="T35">); exit(1); }</text:span></text:p>
      <text:p text:style-name="P47"><text:span text:style-name="T39">202 <text:s/>| <text:s text:c="3"/></text:span><text:span text:style-name="T35"><text:s text:c="4"/>n-&gt;key <text:s text:c="3"/>= key;</text:span></text:p>
      <text:p text:style-name="P47"><text:span text:style-name="T39">203 <text:s/>| <text:s text:c="3"/></text:span><text:span text:style-name="T35"><text:s text:c="4"/>n-&gt;color <text:s/>= RED;</text:span></text:p>
      <text:p text:style-name="P47"><text:span text:style-name="T39">204 <text:s/>| <text:s text:c="3"/></text:span><text:span text:style-name="T35"><text:s text:c="4"/>n-&gt;left <text:s text:c="2"/>= n-&gt;right = n-&gt;parent = t-&gt;nil;</text:span></text:p>
      <text:p text:style-name="P47"><text:span text:style-name="T39">205 <text:s/>| <text:s text:c="3"/></text:span><text:span text:style-name="T35"><text:s text:c="4"/></text:span><text:span text:style-name="T37">return</text:span><text:span text:style-name="T35"> n;</text:span></text:p>
      <text:p text:style-name="P49"><text:span text:style-name="T39">206 <text:s/>| <text:s text:c="3"/></text:span>}</text:p>
      <text:p text:style-name="P48">207 <text:s/>| <text:s text:c="3"/></text:p>
      <text:p text:style-name="P47"><text:span text:style-name="T39">208 <text:s/>| <text:s text:c="3"/></text:span><text:span text:style-name="T40">void</text:span><text:span text:style-name="T35"> rbInit(RBTree *t) {</text:span></text:p>
      <text:p text:style-name="P47"><text:span text:style-name="T39">209 <text:s/>| <text:s text:c="3"/></text:span><text:span text:style-name="T35"><text:s text:c="4"/>t-&gt;nil = malloc(</text:span><text:span text:style-name="T37">sizeof</text:span><text:span text:style-name="T35">(RBNode));</text:span></text:p>
      <text:p text:style-name="P47"><text:span text:style-name="T39">210 <text:s/>| <text:s text:c="3"/></text:span><text:span text:style-name="T35"><text:s text:c="4"/></text:span><text:span text:style-name="T37">if</text:span><text:span text:style-name="T35"> (!t-&gt;nil) { fprintf(stderr, </text:span><text:span text:style-name="T41">"Ошибка malloc nil.\n"</text:span><text:span text:style-name="T35">); exit(1); }</text:span></text:p>
      <text:p text:style-name="P47"><text:span text:style-name="T39">211 <text:s/>| <text:s text:c="3"/></text:span><text:span text:style-name="T35"><text:s text:c="4"/>t-&gt;nil-&gt;color <text:s/>= BLACK;</text:span></text:p>
      <text:p text:style-name="P47"><text:span text:style-name="T39">212 <text:s/>| <text:s text:c="3"/></text:span><text:span text:style-name="T35"><text:s text:c="4"/>t-&gt;nil-&gt;key <text:s text:c="3"/>= 0;</text:span></text:p>
      <text:p text:style-name="P47"><text:span text:style-name="T39">213 <text:s/>| <text:s text:c="3"/></text:span><text:span text:style-name="T35"><text:s text:c="4"/>t-&gt;nil-&gt;left <text:s text:c="2"/>= t-&gt;nil-&gt;right = t-&gt;nil-&gt;parent = t-&gt;nil;</text:span></text:p>
      <text:p text:style-name="P47"><text:span text:style-name="T39">214 <text:s/>| <text:s text:c="3"/></text:span><text:span text:style-name="T35"><text:s text:c="4"/>t-&gt;root <text:s text:c="7"/>= t-&gt;nil;</text:span></text:p>
      <text:p text:style-name="P49"><text:span text:style-name="T39">215 <text:s/>| <text:s text:c="3"/></text:span>}</text:p>
      <text:p text:style-name="P48">216 <text:s/>| <text:s text:c="3"/></text:p>
      <text:p text:style-name="P47"><text:span text:style-name="T39">217 <text:s/>| <text:s text:c="3"/></text:span><text:span text:style-name="T37">static</text:span><text:span text:style-name="T35"> </text:span><text:span text:style-name="T40">void</text:span><text:span text:style-name="T35"> leftRotate(RBTree *t, RBNode *x) {</text:span></text:p>
      <text:p text:style-name="P47"><text:span text:style-name="T39">218 <text:s/>| <text:s text:c="3"/></text:span><text:span text:style-name="T35"><text:s text:c="4"/>RBNode *y = x-&gt;right;</text:span></text:p>
      <text:p text:style-name="P47"><text:span text:style-name="T39">219 <text:s/>| <text:s text:c="3"/></text:span><text:span text:style-name="T35"><text:s text:c="4"/>x-&gt;right = y-&gt;left;</text:span></text:p>
      <text:p text:style-name="P47"><text:span text:style-name="T39">220 <text:s/>| <text:s text:c="3"/></text:span><text:span text:style-name="T35"><text:s text:c="4"/></text:span><text:span text:style-name="T37">if</text:span><text:span text:style-name="T35"> (y-&gt;left != t-&gt;nil) y-&gt;left-&gt;parent = x;</text:span></text:p>
      <text:p text:style-name="P47"><text:span text:style-name="T39">221 <text:s/>| <text:s text:c="3"/></text:span><text:span text:style-name="T35"><text:s text:c="4"/>y-&gt;parent = x-&gt;parent;</text:span></text:p>
      <text:p text:style-name="P47"><text:span text:style-name="T39">222 <text:s/>| <text:s text:c="3"/></text:span><text:span text:style-name="T35"><text:s text:c="4"/></text:span><text:span text:style-name="T37">if</text:span><text:span text:style-name="T35"> (x-&gt;parent == t-&gt;nil) <text:s text:c="9"/>t-&gt;root = y;</text:span></text:p>
      <text:p text:style-name="P47"><text:span text:style-name="T39">223 <text:s/>| <text:s text:c="3"/></text:span><text:span text:style-name="T35"><text:s text:c="4"/></text:span><text:span text:style-name="T37">else</text:span><text:span text:style-name="T35"> </text:span><text:span text:style-name="T37">if</text:span><text:span text:style-name="T35"> (x == x-&gt;parent-&gt;left) <text:s text:c="3"/>x-&gt;parent-&gt;left <text:s/>= y;</text:span></text:p>
      <text:p text:style-name="P47"><text:span text:style-name="T39">224 <text:s/>| <text:s text:c="3"/></text:span><text:span text:style-name="T35"><text:s text:c="4"/></text:span><text:span text:style-name="T37">else</text:span><text:span text:style-name="T35"> <text:s text:c="29"/>x-&gt;parent-&gt;right = y;</text:span></text:p>
      <text:p text:style-name="P47"><text:span text:style-name="T39">225 <text:s/>| <text:s text:c="3"/></text:span><text:span text:style-name="T35"><text:s text:c="4"/>y-&gt;left <text:s text:c="3"/>= x;</text:span></text:p>
      <text:p text:style-name="P47"><text:span text:style-name="T39">226 <text:s/>| <text:s text:c="3"/></text:span><text:span text:style-name="T35"><text:s text:c="4"/>x-&gt;parent <text:s/>= y;</text:span></text:p>
      <text:p text:style-name="P49"><text:span text:style-name="T39">227 <text:s/>| <text:s text:c="3"/></text:span>}</text:p>
      <text:p text:style-name="P48">228 <text:s/>| <text:s text:c="3"/></text:p>
      <text:p text:style-name="P47"><text:span text:style-name="T39">229 <text:s/>| <text:s text:c="3"/></text:span><text:span text:style-name="T37">static</text:span><text:span text:style-name="T35"> </text:span><text:span text:style-name="T40">void</text:span><text:span text:style-name="T35"> rightRotate(RBTree *t, RBNode *x) {</text:span></text:p>
      <text:p text:style-name="P47"><text:span text:style-name="T39">230 <text:s/>| <text:s text:c="3"/></text:span><text:span text:style-name="T35"><text:s text:c="4"/>RBNode *y = x-&gt;left;</text:span></text:p>
      <text:p text:style-name="P47"><text:span text:style-name="T39">231 <text:s/>| <text:s text:c="3"/></text:span><text:span text:style-name="T35"><text:s text:c="4"/>x-&gt;left = y-&gt;right;</text:span></text:p>
      <text:p text:style-name="P47"><text:span text:style-name="T39">232 <text:s/>| <text:s text:c="3"/></text:span><text:span text:style-name="T35"><text:s text:c="4"/></text:span><text:span text:style-name="T37">if</text:span><text:span text:style-name="T35"> (y-&gt;right != t-&gt;nil) y-&gt;right-&gt;parent = x;</text:span></text:p>
      <text:p text:style-name="P47"><text:span text:style-name="T39">233 <text:s/>| <text:s text:c="3"/></text:span><text:span text:style-name="T35"><text:s text:c="4"/>y-&gt;parent = x-&gt;parent;</text:span></text:p>
      <text:p text:style-name="P47"><text:span text:style-name="T39">234 <text:s/>| <text:s text:c="3"/></text:span><text:span text:style-name="T35"><text:s text:c="4"/></text:span><text:span text:style-name="T37">if</text:span><text:span text:style-name="T35"> (x-&gt;parent == t-&gt;nil) <text:s text:c="9"/>t-&gt;root = y;</text:span></text:p>
      <text:p text:style-name="P47"><text:span text:style-name="T39">235 <text:s/>| <text:s text:c="3"/></text:span><text:span text:style-name="T35"><text:s text:c="4"/></text:span><text:span text:style-name="T37">else</text:span><text:span text:style-name="T35"> </text:span><text:span text:style-name="T37">if</text:span><text:span text:style-name="T35"> (x == x-&gt;parent-&gt;right) <text:s text:c="2"/>x-&gt;parent-&gt;right = y;</text:span></text:p>
      <text:p text:style-name="P47"><text:span text:style-name="T39">236 <text:s/>| <text:s text:c="3"/></text:span><text:span text:style-name="T35"><text:s text:c="4"/></text:span><text:span text:style-name="T37">else</text:span><text:span text:style-name="T35"> <text:s text:c="29"/>x-&gt;parent-&gt;left <text:s/>= y;</text:span></text:p>
      <text:p text:style-name="P47"><text:span text:style-name="T39">237 <text:s/>| <text:s text:c="3"/></text:span><text:span text:style-name="T35"><text:s text:c="4"/>y-&gt;right <text:s text:c="2"/>= x;</text:span></text:p>
      <text:p text:style-name="P47"><text:span text:style-name="T39">238 <text:s/>| <text:s text:c="3"/></text:span><text:span text:style-name="T35"><text:s text:c="4"/>x-&gt;parent <text:s/>= y;</text:span></text:p>
      <text:p text:style-name="P49"><text:span text:style-name="T39">239 <text:s/>| <text:s text:c="3"/></text:span>}</text:p>
      <text:p text:style-name="P48">240 <text:s/>| <text:s text:c="3"/></text:p>
      <text:p text:style-name="P47"><text:span text:style-name="T39">241 <text:s/>| <text:s text:c="3"/></text:span><text:span text:style-name="T37">static</text:span><text:span text:style-name="T35"> </text:span><text:span text:style-name="T40">void</text:span><text:span text:style-name="T35"> rbInsertFixup(RBTree *t, RBNode *z) {</text:span></text:p>
      <text:p text:style-name="P47"><text:span text:style-name="T39">242 <text:s/>| <text:s text:c="3"/></text:span><text:span text:style-name="T35"><text:s text:c="4"/></text:span><text:span text:style-name="T37">while</text:span><text:span text:style-name="T35"> (z-&gt;parent-&gt;color == RED) {</text:span></text:p>
      <text:p text:style-name="P47"><text:span text:style-name="T39">243 <text:s/>| <text:s text:c="3"/></text:span><text:span text:style-name="T35"><text:s text:c="8"/></text:span><text:span text:style-name="T37">if</text:span><text:span text:style-name="T35"> (z-&gt;parent == z-&gt;parent-&gt;parent-&gt;left) {</text:span></text:p>
      <text:p text:style-name="P47"><text:span text:style-name="T39">244 <text:s/>| <text:s text:c="3"/></text:span><text:span text:style-name="T35"><text:s text:c="12"/>RBNode *y = z-&gt;parent-&gt;parent-&gt;right;</text:span></text:p>
      <text:p text:style-name="P47"><text:span text:style-name="T39">245 <text:s/>| <text:s text:c="3"/></text:span><text:span text:style-name="T35"><text:s text:c="12"/></text:span><text:span text:style-name="T37">if</text:span><text:span text:style-name="T35"> (y-&gt;color == RED) {</text:span></text:p>
      <text:p text:style-name="P47"><text:span text:style-name="T39">246 <text:s/>| <text:s text:c="3"/></text:span><text:span text:style-name="T35"><text:s text:c="16"/>z-&gt;parent-&gt;color <text:s text:c="9"/>= BLACK;</text:span></text:p>
      <text:p text:style-name="P47"><text:span text:style-name="T39">247 <text:s/>| <text:s text:c="3"/></text:span><text:span text:style-name="T35"><text:s text:c="16"/>y-&gt;color <text:s text:c="17"/>= BLACK;</text:span></text:p>
      <text:p text:style-name="P47"><text:span text:style-name="T39">248 <text:s/>| <text:s text:c="3"/></text:span><text:span text:style-name="T35"><text:s text:c="16"/>z-&gt;parent-&gt;parent-&gt;color <text:s/>= RED;</text:span></text:p>
      <text:p text:style-name="P47"><text:span text:style-name="T39">249 <text:s/>| <text:s text:c="3"/></text:span><text:span text:style-name="T35"><text:s text:c="16"/>z = z-&gt;parent-&gt;parent;</text:span></text:p>
      <text:p text:style-name="P47"><text:span text:style-name="T39">250 <text:s/>| <text:s text:c="3"/></text:span><text:span text:style-name="T35"><text:s text:c="12"/>} </text:span><text:span text:style-name="T37">else</text:span><text:span text:style-name="T35"> {</text:span></text:p>
      <text:p text:style-name="P47"><text:span text:style-name="T39">251 <text:s/>| <text:s text:c="3"/></text:span><text:span text:style-name="T35"><text:s text:c="16"/></text:span><text:span text:style-name="T37">if</text:span><text:span text:style-name="T35"> (z == z-&gt;parent-&gt;right) {</text:span></text:p>
      <text:p text:style-name="P47"><text:span text:style-name="T39">252 <text:s/>| <text:s text:c="3"/></text:span><text:span text:style-name="T35"><text:s text:c="20"/>z = z-&gt;parent;</text:span></text:p>
      <text:p text:style-name="P47"><text:span text:style-name="T39">253 <text:s/>| <text:s text:c="3"/></text:span><text:span text:style-name="T35"><text:s text:c="20"/>leftRotate(t, z);</text:span></text:p>
      <text:p text:style-name="P47"><text:span text:style-name="T39">254 <text:s/>| <text:s text:c="3"/></text:span><text:span text:style-name="T35"><text:s text:c="16"/>}</text:span></text:p>
      <text:p text:style-name="P47"><text:span text:style-name="T39">255 <text:s/>| <text:s text:c="3"/></text:span><text:span text:style-name="T35"><text:s text:c="16"/>z-&gt;parent-&gt;color <text:s text:c="9"/>= BLACK;</text:span></text:p>
      <text:p text:style-name="P47"><text:span text:style-name="T39">256 <text:s/>| <text:s text:c="3"/></text:span><text:span text:style-name="T35"><text:s text:c="16"/>z-&gt;parent-&gt;parent-&gt;color <text:s/>= RED;</text:span></text:p>
      <text:p text:style-name="P47"><text:span text:style-name="T39">257 <text:s/>| <text:s text:c="3"/></text:span><text:span text:style-name="T35"><text:s text:c="16"/>rightRotate(t, z-&gt;parent-&gt;parent);</text:span></text:p>
      <text:p text:style-name="P47"><text:span text:style-name="T39">258 <text:s/>| <text:s text:c="3"/></text:span><text:span text:style-name="T35"><text:s text:c="12"/>}</text:span></text:p>
      <text:p text:style-name="P47"><text:span text:style-name="T39">259 <text:s/>| <text:s text:c="3"/></text:span><text:span text:style-name="T35"><text:s text:c="8"/>} </text:span><text:span text:style-name="T37">else</text:span><text:span text:style-name="T35"> {</text:span></text:p>
      <text:p text:style-name="P47"><text:soft-page-break/><text:span text:style-name="T39">260 <text:s/>| <text:s text:c="3"/></text:span><text:span text:style-name="T35"><text:s text:c="12"/>RBNode *y = z-&gt;parent-&gt;parent-&gt;left;</text:span></text:p>
      <text:p text:style-name="P47"><text:span text:style-name="T39">261 <text:s/>| <text:s text:c="3"/></text:span><text:span text:style-name="T35"><text:s text:c="12"/></text:span><text:span text:style-name="T37">if</text:span><text:span text:style-name="T35"> (y-&gt;color == RED) {</text:span></text:p>
      <text:p text:style-name="P47"><text:span text:style-name="T39">262 <text:s/>| <text:s text:c="3"/></text:span><text:span text:style-name="T35"><text:s text:c="16"/>z-&gt;parent-&gt;color <text:s text:c="9"/>= BLACK;</text:span></text:p>
      <text:p text:style-name="P47"><text:span text:style-name="T39">263 <text:s/>| <text:s text:c="3"/></text:span><text:span text:style-name="T35"><text:s text:c="16"/>y-&gt;color <text:s text:c="17"/>= BLACK;</text:span></text:p>
      <text:p text:style-name="P47"><text:span text:style-name="T39">264 <text:s/>| <text:s text:c="3"/></text:span><text:span text:style-name="T35"><text:s text:c="16"/>z-&gt;parent-&gt;parent-&gt;color <text:s/>= RED;</text:span></text:p>
      <text:p text:style-name="P47"><text:span text:style-name="T39">265 <text:s/>| <text:s text:c="3"/></text:span><text:span text:style-name="T35"><text:s text:c="16"/>z = z-&gt;parent-&gt;parent;</text:span></text:p>
      <text:p text:style-name="P47"><text:span text:style-name="T39">266 <text:s/>| <text:s text:c="3"/></text:span><text:span text:style-name="T35"><text:s text:c="12"/>} </text:span><text:span text:style-name="T37">else</text:span><text:span text:style-name="T35"> {</text:span></text:p>
      <text:p text:style-name="P47"><text:span text:style-name="T39">267 <text:s/>| <text:s text:c="3"/></text:span><text:span text:style-name="T35"><text:s text:c="16"/></text:span><text:span text:style-name="T37">if</text:span><text:span text:style-name="T35"> (z == z-&gt;parent-&gt;left) {</text:span></text:p>
      <text:p text:style-name="P47"><text:span text:style-name="T39">268 <text:s/>| <text:s text:c="3"/></text:span><text:span text:style-name="T35"><text:s text:c="20"/>z = z-&gt;parent;</text:span></text:p>
      <text:p text:style-name="P47"><text:span text:style-name="T39">269 <text:s/>| <text:s text:c="3"/></text:span><text:span text:style-name="T35"><text:s text:c="20"/>rightRotate(t, z);</text:span></text:p>
      <text:p text:style-name="P47"><text:span text:style-name="T39">270 <text:s/>| <text:s text:c="3"/></text:span><text:span text:style-name="T35"><text:s text:c="16"/>}</text:span></text:p>
      <text:p text:style-name="P47"><text:span text:style-name="T39">271 <text:s/>| <text:s text:c="3"/></text:span><text:span text:style-name="T35"><text:s text:c="16"/>z-&gt;parent-&gt;color <text:s text:c="9"/>= BLACK;</text:span></text:p>
      <text:p text:style-name="P47"><text:span text:style-name="T39">272 <text:s/>| <text:s text:c="3"/></text:span><text:span text:style-name="T35"><text:s text:c="16"/>z-&gt;parent-&gt;parent-&gt;color <text:s/>= RED;</text:span></text:p>
      <text:p text:style-name="P47"><text:span text:style-name="T39">273 <text:s/>| <text:s text:c="3"/></text:span><text:span text:style-name="T35"><text:s text:c="16"/>leftRotate(t, z-&gt;parent-&gt;parent);</text:span></text:p>
      <text:p text:style-name="P47"><text:span text:style-name="T39">274 <text:s/>| <text:s text:c="3"/></text:span><text:span text:style-name="T35"><text:s text:c="12"/>}</text:span></text:p>
      <text:p text:style-name="P47"><text:span text:style-name="T39">275 <text:s/>| <text:s text:c="3"/></text:span><text:span text:style-name="T35"><text:s text:c="8"/>}</text:span></text:p>
      <text:p text:style-name="P47"><text:span text:style-name="T39">276 <text:s/>| <text:s text:c="3"/></text:span><text:span text:style-name="T35"><text:s text:c="4"/>}</text:span></text:p>
      <text:p text:style-name="P47"><text:span text:style-name="T39">277 <text:s/>| <text:s text:c="3"/></text:span><text:span text:style-name="T35"><text:s text:c="4"/>t-&gt;root-&gt;color = BLACK;</text:span></text:p>
      <text:p text:style-name="P49"><text:span text:style-name="T39">278 <text:s/>| <text:s text:c="3"/></text:span>}</text:p>
      <text:p text:style-name="P48">279 <text:s/>| <text:s text:c="3"/></text:p>
      <text:p text:style-name="P47"><text:span text:style-name="T39">280 <text:s/>| <text:s text:c="3"/></text:span><text:span text:style-name="T40">void</text:span><text:span text:style-name="T35"> rbInsert(RBTree *t, </text:span><text:span text:style-name="T40">float</text:span><text:span text:style-name="T35"> key) {</text:span></text:p>
      <text:p text:style-name="P47"><text:span text:style-name="T39">281 <text:s/>| <text:s text:c="3"/></text:span><text:span text:style-name="T35"><text:s text:c="4"/>RBNode *z = rbNewNode(t, key);</text:span></text:p>
      <text:p text:style-name="P47"><text:span text:style-name="T39">282 <text:s/>| <text:s text:c="3"/></text:span><text:span text:style-name="T35"><text:s text:c="4"/>RBNode *y = t-&gt;nil;</text:span></text:p>
      <text:p text:style-name="P47"><text:span text:style-name="T39">283 <text:s/>| <text:s text:c="3"/></text:span><text:span text:style-name="T35"><text:s text:c="4"/>RBNode *x = t-&gt;root;</text:span></text:p>
      <text:p text:style-name="P47"><text:span text:style-name="T39">284 <text:s/>| <text:s text:c="3"/></text:span><text:span text:style-name="T35"><text:s text:c="4"/></text:span><text:span text:style-name="T37">while</text:span><text:span text:style-name="T35"> (x != t-&gt;nil) {</text:span></text:p>
      <text:p text:style-name="P47"><text:span text:style-name="T39">285 <text:s/>| <text:s text:c="3"/></text:span><text:span text:style-name="T35"><text:s text:c="8"/>y = x;</text:span></text:p>
      <text:p text:style-name="P47"><text:span text:style-name="T39">286 <text:s/>| <text:s text:c="3"/></text:span><text:span text:style-name="T35"><text:s text:c="8"/></text:span><text:span text:style-name="T37">if</text:span><text:span text:style-name="T35"> (z-&gt;key &lt; x-&gt;key) x = x-&gt;left;</text:span></text:p>
      <text:p text:style-name="P47"><text:span text:style-name="T39">287 <text:s/>| <text:s text:c="3"/></text:span><text:span text:style-name="T35"><text:s text:c="8"/></text:span><text:span text:style-name="T37">else</text:span><text:span text:style-name="T35"> <text:s text:c="17"/>x = x-&gt;right;</text:span></text:p>
      <text:p text:style-name="P47"><text:span text:style-name="T39">288 <text:s/>| <text:s text:c="3"/></text:span><text:span text:style-name="T35"><text:s text:c="4"/>}</text:span></text:p>
      <text:p text:style-name="P47"><text:span text:style-name="T39">289 <text:s/>| <text:s text:c="3"/></text:span><text:span text:style-name="T35"><text:s text:c="4"/>z-&gt;parent = y;</text:span></text:p>
      <text:p text:style-name="P47"><text:span text:style-name="T39">290 <text:s/>| <text:s text:c="3"/></text:span><text:span text:style-name="T35"><text:s text:c="4"/></text:span><text:span text:style-name="T37">if</text:span><text:span text:style-name="T35"> (y == t-&gt;nil) <text:s text:c="9"/>t-&gt;root <text:s text:c="2"/>= z;</text:span></text:p>
      <text:p text:style-name="P47"><text:span text:style-name="T39">291 <text:s/>| <text:s text:c="3"/></text:span><text:span text:style-name="T35"><text:s text:c="4"/></text:span><text:span text:style-name="T37">else</text:span><text:span text:style-name="T35"> </text:span><text:span text:style-name="T37">if</text:span><text:span text:style-name="T35"> (z-&gt;key &lt; y-&gt;key) y-&gt;left <text:s text:c="2"/>= z;</text:span></text:p>
      <text:p text:style-name="P47"><text:span text:style-name="T39">292 <text:s/>| <text:s text:c="3"/></text:span><text:span text:style-name="T35"><text:s text:c="4"/></text:span><text:span text:style-name="T37">else</text:span><text:span text:style-name="T35"> <text:s text:c="21"/>y-&gt;right <text:s/>= z;</text:span></text:p>
      <text:p text:style-name="P47"><text:span text:style-name="T39">293 <text:s/>| <text:s text:c="3"/></text:span><text:span text:style-name="T35"><text:s text:c="4"/>rbInsertFixup(t, z);</text:span></text:p>
      <text:p text:style-name="P49"><text:span text:style-name="T39">294 <text:s/>| <text:s text:c="3"/></text:span>}</text:p>
      <text:p text:style-name="P48">295 <text:s/>| <text:s text:c="3"/></text:p>
      <text:p text:style-name="P47"><text:span text:style-name="T39">296 <text:s/>| <text:s text:c="3"/></text:span><text:span text:style-name="T37">static</text:span><text:span text:style-name="T35"> </text:span><text:span text:style-name="T40">void</text:span><text:span text:style-name="T35"> rbPrintHelper(</text:span><text:span text:style-name="T37">const</text:span><text:span text:style-name="T35"> RBTree *t,</text:span></text:p>
      <text:p text:style-name="P47"><text:span text:style-name="T39">297 <text:s/>| <text:s text:c="3"/></text:span><text:span text:style-name="T35"><text:s text:c="26"/></text:span><text:span text:style-name="T37">const</text:span><text:span text:style-name="T35"> RBNode *n,</text:span></text:p>
      <text:p text:style-name="P47"><text:span text:style-name="T39">298 <text:s/>| <text:s text:c="3"/></text:span><text:span text:style-name="T35"><text:s text:c="26"/></text:span><text:span text:style-name="T37">const</text:span><text:span text:style-name="T35"> </text:span><text:span text:style-name="T40">char</text:span><text:span text:style-name="T35"> *prefix,</text:span></text:p>
      <text:p text:style-name="P47"><text:span text:style-name="T39">299 <text:s/>| <text:s text:c="3"/></text:span><text:span text:style-name="T35"><text:s text:c="26"/></text:span><text:span text:style-name="T40">int</text:span><text:span text:style-name="T35"> isLeft)</text:span></text:p>
      <text:p text:style-name="P49"><text:span text:style-name="T39">300 <text:s/>| <text:s text:c="3"/></text:span>{</text:p>
      <text:p text:style-name="P47"><text:span text:style-name="T39">301 <text:s/>| <text:s text:c="3"/></text:span><text:span text:style-name="T35"><text:s text:c="4"/></text:span><text:span text:style-name="T37">if</text:span><text:span text:style-name="T35"> (n == t-&gt;nil)</text:span></text:p>
      <text:p text:style-name="P47"><text:span text:style-name="T39">302 <text:s/>| <text:s text:c="3"/></text:span><text:span text:style-name="T35"><text:s text:c="8"/></text:span><text:span text:style-name="T37">return</text:span><text:span text:style-name="T35">;</text:span></text:p>
      <text:p text:style-name="P48">303 <text:s/>| <text:s text:c="3"/></text:p>
      <text:p text:style-name="P47"><text:span text:style-name="T39">304 <text:s/>| <text:s text:c="3"/></text:span><text:span text:style-name="T35"><text:s text:c="4"/></text:span><text:span text:style-name="T40">char</text:span><text:span text:style-name="T35"> newPrefix[512];</text:span></text:p>
      <text:p text:style-name="P48">305 <text:s/>| <text:s text:c="3"/></text:p>
      <text:p text:style-name="P47"><text:span text:style-name="T39">306 <text:s/>| <text:s text:c="3"/></text:span><text:span text:style-name="T35"><text:s text:c="4"/>snprintf(newPrefix, </text:span><text:span text:style-name="T37">sizeof</text:span><text:span text:style-name="T35">(newPrefix), </text:span><text:span text:style-name="T41">"%s%s"</text:span><text:span text:style-name="T35">,</text:span></text:p>
      <text:p text:style-name="P47"><text:span text:style-name="T39">307 <text:s/>| <text:s text:c="3"/></text:span><text:span text:style-name="T35"><text:s text:c="13"/>prefix, isLeft ? </text:span><text:span text:style-name="T41">"│ <text:s text:c="2"/>"</text:span><text:span text:style-name="T35"> : </text:span><text:span text:style-name="T41">" <text:s text:c="3"/>"</text:span><text:span text:style-name="T35">);</text:span></text:p>
      <text:p text:style-name="P48">308 <text:s/>| <text:s text:c="3"/></text:p>
      <text:p text:style-name="P47"><text:span text:style-name="T39">309 <text:s/>| <text:s text:c="3"/></text:span><text:span text:style-name="T35"><text:s text:c="4"/>rbPrintHelper(t, n-&gt;right, newPrefix, 0);</text:span></text:p>
      <text:p text:style-name="P48">310 <text:s/>| <text:s text:c="3"/></text:p>
      <text:p text:style-name="P47"><text:span text:style-name="T39">311 <text:s/>| <text:s text:c="3"/></text:span><text:span text:style-name="T35"><text:s text:c="4"/>printf(</text:span><text:span text:style-name="T41">"%s%s%s %g\n"</text:span><text:span text:style-name="T35">,</text:span></text:p>
      <text:p text:style-name="P47"><text:span text:style-name="T39">312 <text:s/>| <text:s text:c="3"/></text:span><text:span text:style-name="T35"><text:s text:c="11"/>prefix,</text:span></text:p>
      <text:p text:style-name="P47"><text:span text:style-name="T39">313 <text:s/>| <text:s text:c="3"/></text:span><text:span text:style-name="T35"><text:s text:c="11"/>isLeft ? </text:span><text:span text:style-name="T41">"└── "</text:span><text:span text:style-name="T35"> : </text:span><text:span text:style-name="T41">"┌── "</text:span><text:span text:style-name="T35">,</text:span></text:p>
      <text:p text:style-name="P47"><text:span text:style-name="T39">314 <text:s/>| <text:s text:c="3"/></text:span><text:span text:style-name="T35"><text:s text:c="11"/>n-&gt;color == RED ? </text:span><text:span text:style-name="T41">"[R]"</text:span><text:span text:style-name="T35"> : </text:span><text:span text:style-name="T41">"[B]"</text:span><text:span text:style-name="T35">,</text:span></text:p>
      <text:p text:style-name="P47"><text:span text:style-name="T39">315 <text:s/>| <text:s text:c="3"/></text:span><text:span text:style-name="T35"><text:s text:c="11"/>n-&gt;key);</text:span></text:p>
      <text:p text:style-name="P48">316 <text:s/>| <text:s text:c="3"/></text:p>
      <text:p text:style-name="P47"><text:span text:style-name="T39">317 <text:s/>| <text:s text:c="3"/></text:span><text:span text:style-name="T35"><text:s text:c="4"/>snprintf(newPrefix, </text:span><text:span text:style-name="T37">sizeof</text:span><text:span text:style-name="T35">(newPrefix), </text:span><text:span text:style-name="T41">"%s%s"</text:span><text:span text:style-name="T35">,</text:span></text:p>
      <text:p text:style-name="P47"><text:span text:style-name="T39">318 <text:s/>| <text:s text:c="3"/></text:span><text:span text:style-name="T35"><text:s text:c="13"/>prefix, isLeft ? </text:span><text:span text:style-name="T41">" <text:s text:c="3"/>"</text:span><text:span text:style-name="T35"> : </text:span><text:span text:style-name="T41">"│ <text:s text:c="2"/>"</text:span><text:span text:style-name="T35">);</text:span></text:p>
      <text:p text:style-name="P48">319 <text:s/>| <text:s text:c="3"/></text:p>
      <text:p text:style-name="P47"><text:span text:style-name="T39">320 <text:s/>| <text:s text:c="3"/></text:span><text:span text:style-name="T35"><text:s text:c="4"/>rbPrintHelper(t, n-&gt;left, newPrefix, 1);</text:span></text:p>
      <text:p text:style-name="P49"><text:span text:style-name="T39">321 <text:s/>| <text:s text:c="3"/></text:span>}</text:p>
      <text:p text:style-name="P48">322 <text:s/>| <text:s text:c="3"/></text:p>
      <text:p text:style-name="P47"><text:span text:style-name="T39">323 <text:s/>| <text:s text:c="3"/></text:span><text:span text:style-name="T40">void</text:span><text:span text:style-name="T35"> rbPrint(</text:span><text:span text:style-name="T37">const</text:span><text:span text:style-name="T35"> RBTree *t) {</text:span></text:p>
      <text:p text:style-name="P47"><text:span text:style-name="T39">324 <text:s/>| <text:s text:c="3"/></text:span><text:span text:style-name="T35"><text:s text:c="4"/></text:span><text:span text:style-name="T37">if</text:span><text:span text:style-name="T35"> (t-&gt;root == t-&gt;nil) { printf(</text:span><text:span text:style-name="T41">"(дерево пусто)\n"</text:span><text:span text:style-name="T35">); </text:span><text:span text:style-name="T37">return</text:span><text:span text:style-name="T35">; }</text:span></text:p>
      <text:p text:style-name="P47"><text:span text:style-name="T39">325 <text:s/>| <text:s text:c="3"/></text:span><text:span text:style-name="T35"><text:s text:c="4"/>rbPrintHelper(t, t-&gt;root-&gt;right, </text:span><text:span text:style-name="T41">" <text:s text:c="3"/>"</text:span><text:span text:style-name="T35">, 0);</text:span></text:p>
      <text:p text:style-name="P47"><text:span text:style-name="T39">326 <text:s/>| <text:s text:c="3"/></text:span><text:span text:style-name="T35"><text:s text:c="4"/>printf(</text:span><text:span text:style-name="T41">"%s %g\n"</text:span><text:span text:style-name="T35">,</text:span></text:p>
      <text:p text:style-name="P47"><text:span text:style-name="T39">327 <text:s/>| <text:s text:c="3"/></text:span><text:span text:style-name="T35"><text:s text:c="11"/>t-&gt;root-&gt;color == RED ? </text:span><text:span text:style-name="T41">"[R]"</text:span><text:span text:style-name="T35"> : </text:span><text:span text:style-name="T41">"[B]"</text:span><text:span text:style-name="T35">,</text:span></text:p>
      <text:p text:style-name="P47"><text:span text:style-name="T39">328 <text:s/>| <text:s text:c="3"/></text:span><text:span text:style-name="T35"><text:s text:c="11"/>t-&gt;root-&gt;key);</text:span></text:p>
      <text:p text:style-name="P47"><text:span text:style-name="T39">329 <text:s/>| <text:s text:c="3"/></text:span><text:span text:style-name="T35"><text:s text:c="4"/>rbPrintHelper(t, t-&gt;root-&gt;left, <text:s/></text:span><text:span text:style-name="T41">" <text:s text:c="3"/>"</text:span><text:span text:style-name="T35">, 1);</text:span></text:p>
      <text:p text:style-name="P49"><text:span text:style-name="T39">330 <text:s/>| <text:s text:c="3"/></text:span>}</text:p>
      <text:p text:style-name="P48"><text:soft-page-break/>331 <text:s/>| <text:s text:c="3"/></text:p>
      <text:p text:style-name="P47"><text:span text:style-name="T39">332 <text:s/>| <text:s text:c="3"/></text:span><text:span text:style-name="T37">static</text:span><text:span text:style-name="T35"> </text:span><text:span text:style-name="T40">void</text:span><text:span text:style-name="T35"> rbFreeNode(RBTree *t, RBNode *n) {</text:span></text:p>
      <text:p text:style-name="P47"><text:span text:style-name="T39">333 <text:s/>| <text:s text:c="3"/></text:span><text:span text:style-name="T35"><text:s text:c="4"/></text:span><text:span text:style-name="T37">if</text:span><text:span text:style-name="T35"> (n == t-&gt;nil) </text:span><text:span text:style-name="T37">return</text:span><text:span text:style-name="T35">;</text:span></text:p>
      <text:p text:style-name="P47"><text:span text:style-name="T39">334 <text:s/>| <text:s text:c="3"/></text:span><text:span text:style-name="T35"><text:s text:c="4"/>rbFreeNode(t, n-&gt;left);</text:span></text:p>
      <text:p text:style-name="P47"><text:span text:style-name="T39">335 <text:s/>| <text:s text:c="3"/></text:span><text:span text:style-name="T35"><text:s text:c="4"/>rbFreeNode(t, n-&gt;right);</text:span></text:p>
      <text:p text:style-name="P47"><text:span text:style-name="T39">336 <text:s/>| <text:s text:c="3"/></text:span><text:span text:style-name="T35"><text:s text:c="4"/>free(n);</text:span></text:p>
      <text:p text:style-name="P49"><text:span text:style-name="T39">337 <text:s/>| <text:s text:c="3"/></text:span>}</text:p>
      <text:p text:style-name="P48">338 <text:s/>| <text:s text:c="3"/></text:p>
      <text:p text:style-name="P47"><text:span text:style-name="T39">339 <text:s/>| <text:s text:c="3"/></text:span><text:span text:style-name="T40">void</text:span><text:span text:style-name="T35"> rbFree(RBTree *t) {</text:span></text:p>
      <text:p text:style-name="P47"><text:span text:style-name="T39">340 <text:s/>| <text:s text:c="3"/></text:span><text:span text:style-name="T35"><text:s text:c="4"/>rbFreeNode(t, t-&gt;root);</text:span></text:p>
      <text:p text:style-name="P47"><text:span text:style-name="T39">341 <text:s/>| <text:s text:c="3"/></text:span><text:span text:style-name="T35"><text:s text:c="4"/>free(t-&gt;nil);</text:span></text:p>
      <text:p text:style-name="P47"><text:span text:style-name="T39">342 <text:s/>| <text:s text:c="3"/></text:span><text:span text:style-name="T35"><text:s text:c="4"/>t-&gt;root = t-&gt;nil = NULL;</text:span></text:p>
      <text:p text:style-name="P49"><text:span text:style-name="T39">343 <text:s/>| <text:s text:c="3"/></text:span>}</text:p>
      <text:p text:style-name="P48">344 <text:s/>| <text:s text:c="3"/></text:p>
      <text:p text:style-name="P47"><text:span text:style-name="T39">345 <text:s/>| <text:s text:c="3"/></text:span><text:span text:style-name="T40">char</text:span><text:span text:style-name="T35"> *readFileToString(</text:span><text:span text:style-name="T37">const</text:span><text:span text:style-name="T35"> </text:span><text:span text:style-name="T40">char</text:span><text:span text:style-name="T35"> *filename) {</text:span></text:p>
      <text:p text:style-name="P47"><text:span text:style-name="T39">346 <text:s/>| <text:s text:c="3"/></text:span><text:span text:style-name="T35"><text:s text:c="4"/></text:span><text:span text:style-name="T40">FILE</text:span><text:span text:style-name="T35"> *f = fopen(filename, </text:span><text:span text:style-name="T41">"r"</text:span><text:span text:style-name="T35">);</text:span></text:p>
      <text:p text:style-name="P47"><text:span text:style-name="T39">347 <text:s/>| <text:s text:c="3"/></text:span><text:span text:style-name="T35"><text:s text:c="4"/></text:span><text:span text:style-name="T37">if</text:span><text:span text:style-name="T35"> (!f) {</text:span></text:p>
      <text:p text:style-name="P47"><text:span text:style-name="T39">348 <text:s/>| <text:s text:c="3"/></text:span><text:span text:style-name="T35"><text:s text:c="8"/>fprintf(stderr, </text:span><text:span text:style-name="T41">"Ошибка: не удалось открыть файл %s\n"</text:span><text:span text:style-name="T35">, filename);</text:span></text:p>
      <text:p text:style-name="P47"><text:span text:style-name="T39">349 <text:s/>| <text:s text:c="3"/></text:span><text:span text:style-name="T35"><text:s text:c="8"/>exit(1);</text:span></text:p>
      <text:p text:style-name="P47"><text:span text:style-name="T39">350 <text:s/>| <text:s text:c="3"/></text:span><text:span text:style-name="T35"><text:s text:c="4"/>}</text:span></text:p>
      <text:p text:style-name="P47"><text:span text:style-name="T39">351 <text:s/>| <text:s text:c="3"/></text:span><text:span text:style-name="T35"><text:s text:c="4"/>fseek(f, 0, SEEK_END);</text:span></text:p>
      <text:p text:style-name="P47"><text:span text:style-name="T39">352 <text:s/>| <text:s text:c="3"/></text:span><text:span text:style-name="T35"><text:s text:c="4"/></text:span><text:span text:style-name="T40">long</text:span><text:span text:style-name="T35"> len = ftell(f);</text:span></text:p>
      <text:p text:style-name="P47"><text:span text:style-name="T39">353 <text:s/>| <text:s text:c="3"/></text:span><text:span text:style-name="T35"><text:s text:c="4"/>fseek(f, 0, SEEK_SET);</text:span></text:p>
      <text:p text:style-name="P47"><text:span text:style-name="T39">354 <text:s/>| <text:s text:c="3"/></text:span><text:span text:style-name="T35"><text:s text:c="4"/></text:span><text:span text:style-name="T40">char</text:span><text:span text:style-name="T35"> *buf = malloc(len + 1);</text:span></text:p>
      <text:p text:style-name="P47"><text:span text:style-name="T39">355 <text:s/>| <text:s text:c="3"/></text:span><text:span text:style-name="T35"><text:s text:c="4"/></text:span><text:span text:style-name="T37">if</text:span><text:span text:style-name="T35"> (!buf) { fclose(f); fprintf(stderr, </text:span><text:span text:style-name="T41">"Ошибка malloc.\n"</text:span><text:span text:style-name="T35">); exit(1); }</text:span></text:p>
      <text:p text:style-name="P47"><text:span text:style-name="T39">356 <text:s/>| <text:s text:c="3"/></text:span><text:span text:style-name="T35"><text:s text:c="4"/></text:span><text:span text:style-name="T40">size_t</text:span><text:span text:style-name="T35"> rb = fread(buf, 1, len, f);</text:span></text:p>
      <text:p text:style-name="P47"><text:span text:style-name="T39">357 <text:s/>| <text:s text:c="3"/></text:span><text:span text:style-name="T35"><text:s text:c="4"/>buf[rb] = </text:span><text:span text:style-name="T41">'\0'</text:span><text:span text:style-name="T35">;</text:span></text:p>
      <text:p text:style-name="P47"><text:span text:style-name="T39">358 <text:s/>| <text:s text:c="3"/></text:span><text:span text:style-name="T35"><text:s text:c="4"/>fclose(f);</text:span></text:p>
      <text:p text:style-name="P47"><text:span text:style-name="T39">359 <text:s/>| <text:s text:c="3"/></text:span><text:span text:style-name="T35"><text:s text:c="4"/></text:span><text:span text:style-name="T37">return</text:span><text:span text:style-name="T35"> buf;</text:span></text:p>
      <text:p text:style-name="P49"><text:span text:style-name="T39">360 <text:s/>| <text:s text:c="3"/></text:span>}</text:p>
      <text:p text:style-name="P48">361 <text:s/>| <text:s text:c="3"/></text:p>
      <text:p text:style-name="P47"><text:span text:style-name="T39">362 <text:s/>| <text:s text:c="3"/></text:span><text:span text:style-name="T40">void</text:span><text:span text:style-name="T35"> parseBufferToQueue(</text:span><text:span text:style-name="T37">const</text:span><text:span text:style-name="T35"> </text:span><text:span text:style-name="T40">char</text:span><text:span text:style-name="T35"> *buf, Queue *q) {</text:span></text:p>
      <text:p text:style-name="P47"><text:span text:style-name="T39">363 <text:s/>| <text:s text:c="3"/></text:span><text:span text:style-name="T35"><text:s text:c="4"/></text:span><text:span text:style-name="T37">const</text:span><text:span text:style-name="T35"> </text:span><text:span text:style-name="T40">char</text:span><text:span text:style-name="T35"> *ptr = buf;</text:span></text:p>
      <text:p text:style-name="P47"><text:span text:style-name="T39">364 <text:s/>| <text:s text:c="3"/></text:span><text:span text:style-name="T35"><text:s text:c="4"/></text:span><text:span text:style-name="T40">float</text:span><text:span text:style-name="T35"> tmp;</text:span></text:p>
      <text:p text:style-name="P47"><text:span text:style-name="T39">365 <text:s/>| <text:s text:c="3"/></text:span><text:span text:style-name="T35"><text:s text:c="4"/></text:span><text:span text:style-name="T40">int</text:span><text:span text:style-name="T35"> offset;</text:span></text:p>
      <text:p text:style-name="P47"><text:span text:style-name="T39">366 <text:s/>| <text:s text:c="3"/></text:span><text:span text:style-name="T35"><text:s text:c="4"/></text:span><text:span text:style-name="T37">while</text:span><text:span text:style-name="T35"> (sscanf(ptr, </text:span><text:span text:style-name="T41">"%f%n"</text:span><text:span text:style-name="T35">, &amp;tmp, &amp;offset) == 1) {</text:span></text:p>
      <text:p text:style-name="P47"><text:span text:style-name="T39">367 <text:s/>| <text:s text:c="3"/></text:span><text:span text:style-name="T35"><text:s text:c="8"/>enqueue(q, tmp);</text:span></text:p>
      <text:p text:style-name="P47"><text:span text:style-name="T39">368 <text:s/>| <text:s text:c="3"/></text:span><text:span text:style-name="T35"><text:s text:c="8"/>ptr += offset;</text:span></text:p>
      <text:p text:style-name="P47"><text:span text:style-name="T39">369 <text:s/>| <text:s text:c="3"/></text:span><text:span text:style-name="T35"><text:s text:c="4"/>}</text:span></text:p>
      <text:p text:style-name="P49"><text:span text:style-name="T39">370 <text:s/>| <text:s text:c="3"/></text:span>}</text:p>
      <text:p text:style-name="P48">371 <text:s/>| <text:s text:c="3"/></text:p>
      <text:p text:style-name="P48">372 <text:s/>| <text:s text:c="3"/></text:p>
      <text:p text:style-name="P47"><text:span text:style-name="T39">373 <text:s/>| <text:s text:c="3"/></text:span><text:span text:style-name="T40">int</text:span><text:span text:style-name="T35"> main(</text:span><text:span text:style-name="T40">int</text:span><text:span text:style-name="T35"> argc, </text:span><text:span text:style-name="T40">char</text:span><text:span text:style-name="T35"> **argv) {</text:span></text:p>
      <text:p text:style-name="P47"><text:span text:style-name="T39">374 <text:s/>| <text:s text:c="3"/></text:span><text:span text:style-name="T35"><text:s text:c="4"/></text:span><text:span text:style-name="T37">if</text:span><text:span text:style-name="T35"> (argc &lt; 2) {</text:span></text:p>
      <text:p text:style-name="P47"><text:span text:style-name="T39">375 <text:s/>| <text:s text:c="3"/></text:span><text:span text:style-name="T35"><text:s text:c="8"/>fprintf(stderr, </text:span><text:span text:style-name="T41">"Использование: %s &lt;имя_файла&gt; [подстрока]\n"</text:span><text:span text:style-name="T35">, argv[0]);</text:span></text:p>
      <text:p text:style-name="P47"><text:span text:style-name="T39">376 <text:s/>| <text:s text:c="3"/></text:span><text:span text:style-name="T35"><text:s text:c="8"/></text:span><text:span text:style-name="T37">return</text:span><text:span text:style-name="T35"> 1;</text:span></text:p>
      <text:p text:style-name="P47"><text:span text:style-name="T39">377 <text:s/>| <text:s text:c="3"/></text:span><text:span text:style-name="T35"><text:s text:c="4"/>}</text:span></text:p>
      <text:p text:style-name="P48">378 <text:s/>| <text:s text:c="3"/></text:p>
      <text:p text:style-name="P47"><text:span text:style-name="T39">379 <text:s/>| <text:s text:c="3"/></text:span><text:span text:style-name="T35"><text:s text:c="4"/></text:span><text:span text:style-name="T40">char</text:span><text:span text:style-name="T35"> *fileContent = readFileToString(argv[1]);</text:span></text:p>
      <text:p text:style-name="P48">380 <text:s/>| <text:s text:c="3"/></text:p>
      <text:p text:style-name="P47"><text:span text:style-name="T39">381 <text:s/>| <text:s text:c="3"/></text:span><text:span text:style-name="T35"><text:s text:c="4"/>Queue q;</text:span></text:p>
      <text:p text:style-name="P47"><text:span text:style-name="T39">382 <text:s/>| <text:s text:c="3"/></text:span><text:span text:style-name="T35"><text:s text:c="4"/>qInit(&amp;q);</text:span></text:p>
      <text:p text:style-name="P47"><text:span text:style-name="T39">383 <text:s/>| <text:s text:c="3"/></text:span><text:span text:style-name="T35"><text:s text:c="4"/>parseBufferToQueue(fileContent, &amp;q);</text:span></text:p>
      <text:p text:style-name="P48">384 <text:s/>| <text:s text:c="3"/></text:p>
      <text:p text:style-name="P47"><text:span text:style-name="T39">385 <text:s/>| <text:s text:c="3"/></text:span><text:span text:style-name="T35"><text:s text:c="4"/>printf(</text:span><text:span text:style-name="T41">"Исходный текст файла:\n%s\n"</text:span><text:span text:style-name="T35">, fileContent);</text:span></text:p>
      <text:p text:style-name="P47"><text:span text:style-name="T39">386 <text:s/>| <text:s text:c="3"/></text:span><text:span text:style-name="T35"><text:s text:c="4"/>printf(</text:span><text:span text:style-name="T41">"--- Исходные данные очереди ---\n"</text:span><text:span text:style-name="T35">);</text:span></text:p>
      <text:p text:style-name="P47"><text:span text:style-name="T39">387 <text:s/>| <text:s text:c="3"/></text:span><text:span text:style-name="T35"><text:s text:c="4"/>printQ(&amp;q);</text:span></text:p>
      <text:p text:style-name="P48">388 <text:s/>| <text:s text:c="3"/></text:p>
      <text:p text:style-name="P47"><text:span text:style-name="T39">389 <text:s/>| <text:s text:c="3"/></text:span><text:span text:style-name="T35"><text:s text:c="4"/></text:span><text:span text:style-name="T40">char</text:span><text:span text:style-name="T35"> pattern[256];</text:span></text:p>
      <text:p text:style-name="P47"><text:span text:style-name="T39">390 <text:s/>| <text:s text:c="3"/></text:span><text:span text:style-name="T35"><text:s text:c="4"/></text:span><text:span text:style-name="T37">if</text:span><text:span text:style-name="T35"> (argc &gt;= 3) {</text:span></text:p>
      <text:p text:style-name="P47"><text:span text:style-name="T39">391 <text:s/>| <text:s text:c="3"/></text:span><text:span text:style-name="T35"><text:s text:c="8"/>strncpy(pattern, argv[2], </text:span><text:span text:style-name="T37">sizeof</text:span><text:span text:style-name="T35">(pattern) - 1);</text:span></text:p>
      <text:p text:style-name="P47"><text:span text:style-name="T39">392 <text:s/>| <text:s text:c="3"/></text:span><text:span text:style-name="T35"><text:s text:c="8"/>pattern[</text:span><text:span text:style-name="T37">sizeof</text:span><text:span text:style-name="T35">(pattern) - 1] = </text:span><text:span text:style-name="T41">'\0'</text:span><text:span text:style-name="T35">;</text:span></text:p>
      <text:p text:style-name="P47"><text:span text:style-name="T39">393 <text:s/>| <text:s text:c="3"/></text:span><text:span text:style-name="T35"><text:s text:c="4"/>} </text:span><text:span text:style-name="T37">else</text:span><text:span text:style-name="T35"> {</text:span></text:p>
      <text:p text:style-name="P47"><text:span text:style-name="T39">394 <text:s/>| <text:s text:c="3"/></text:span><text:span text:style-name="T35"><text:s text:c="8"/>printf(</text:span><text:span text:style-name="T41">"Введите подстроку для поиска методом Кнута–Морриса–Пратта: "</text:span><text:span text:style-name="T35">);</text:span></text:p>
      <text:p text:style-name="P47"><text:span text:style-name="T39">395 <text:s/>| <text:s text:c="3"/></text:span><text:span text:style-name="T35"><text:s text:c="8"/></text:span><text:span text:style-name="T37">if</text:span><text:span text:style-name="T35"> (fgets(pattern, </text:span><text:span text:style-name="T37">sizeof</text:span><text:span text:style-name="T35">(pattern), stdin))</text:span></text:p>
      <text:p text:style-name="P47"><text:span text:style-name="T39">396 <text:s/>| <text:s text:c="3"/></text:span><text:span text:style-name="T35"><text:s text:c="12"/>pattern[strcspn(pattern, </text:span><text:span text:style-name="T41">"\n"</text:span><text:span text:style-name="T35">)] = </text:span><text:span text:style-name="T41">'\0'</text:span><text:span text:style-name="T35">;</text:span></text:p>
      <text:p text:style-name="P47"><text:span text:style-name="T39">397 <text:s/>| <text:s text:c="3"/></text:span><text:span text:style-name="T35"><text:s text:c="4"/>}</text:span></text:p>
      <text:p text:style-name="P48">398 <text:s/>| <text:s text:c="3"/></text:p>
      <text:p text:style-name="P47"><text:span text:style-name="T39">399 <text:s/>| <text:s text:c="3"/></text:span><text:span text:style-name="T35"><text:s text:c="4"/>printf(</text:span><text:span text:style-name="T41">"Поиск подстроки \"%s\" (КМП)...\n"</text:span><text:span text:style-name="T35">, pattern);</text:span></text:p>
      <text:p text:style-name="P47"><text:span text:style-name="T39">400 <text:s/>| <text:s text:c="3"/></text:span><text:span text:style-name="T35"><text:s text:c="4"/></text:span><text:span text:style-name="T40">int</text:span><text:span text:style-name="T35"> pos = kmpSearch(fileContent, pattern);</text:span></text:p>
      <text:p text:style-name="P47"><text:span text:style-name="T39">401 <text:s/>| <text:s text:c="3"/></text:span><text:span text:style-name="T35"><text:s text:c="4"/></text:span><text:span text:style-name="T37">if</text:span><text:span text:style-name="T35"> (pos != -1) printf(</text:span><text:span text:style-name="T41">"Подстрока найдена на позиции: %d\n"</text:span><text:span text:style-name="T35">, pos);</text:span></text:p>
      <text:p text:style-name="P47"><text:soft-page-break/><text:span text:style-name="T39">402 <text:s/>| <text:s text:c="3"/></text:span><text:span text:style-name="T35"><text:s text:c="4"/></text:span><text:span text:style-name="T37">else</text:span><text:span text:style-name="T35"> <text:s text:c="10"/>printf(</text:span><text:span text:style-name="T41">"Подстрока не найдена.\n"</text:span><text:span text:style-name="T35">);</text:span></text:p>
      <text:p text:style-name="P48">403 <text:s/>| <text:s text:c="3"/></text:p>
      <text:p text:style-name="P47"><text:span text:style-name="T39">404 <text:s/>| <text:s text:c="3"/></text:span><text:span text:style-name="T35"><text:s text:c="4"/>bucketSort(&amp;q);</text:span></text:p>
      <text:p text:style-name="P47"><text:span text:style-name="T39">405 <text:s/>| <text:s text:c="3"/></text:span><text:span text:style-name="T35"><text:s text:c="4"/>printf(</text:span><text:span text:style-name="T41">"\n--- Отсортированные данные очереди ---\n"</text:span><text:span text:style-name="T35">);</text:span></text:p>
      <text:p text:style-name="P47"><text:span text:style-name="T39">406 <text:s/>| <text:s text:c="3"/></text:span><text:span text:style-name="T35"><text:s text:c="4"/>printQ(&amp;q);</text:span></text:p>
      <text:p text:style-name="P48">407 <text:s/>| <text:s text:c="3"/></text:p>
      <text:p text:style-name="P47"><text:span text:style-name="T39">408 <text:s/>| <text:s text:c="3"/></text:span><text:span text:style-name="T35"><text:s text:c="4"/>RBTree tree;</text:span></text:p>
      <text:p text:style-name="P47"><text:span text:style-name="T39">409 <text:s/>| <text:s text:c="3"/></text:span><text:span text:style-name="T35"><text:s text:c="4"/>rbInit(&amp;tree);</text:span></text:p>
      <text:p text:style-name="P48">410 <text:s/>| <text:s text:c="3"/></text:p>
      <text:p text:style-name="P47"><text:span text:style-name="T39">411 <text:s/>| <text:s text:c="3"/></text:span><text:span text:style-name="T35"><text:s text:c="4"/></text:span><text:span text:style-name="T40">float</text:span><text:span text:style-name="T35"> val;</text:span></text:p>
      <text:p text:style-name="P47"><text:span text:style-name="T39">412 <text:s/>| <text:s text:c="3"/></text:span><text:span text:style-name="T35"><text:s text:c="4"/>Queue tmp;</text:span></text:p>
      <text:p text:style-name="P47"><text:span text:style-name="T39">413 <text:s/>| <text:s text:c="3"/></text:span><text:span text:style-name="T35"><text:s text:c="4"/>qInit(&amp;tmp);</text:span></text:p>
      <text:p text:style-name="P47"><text:span text:style-name="T39">414 <text:s/>| <text:s text:c="3"/></text:span><text:span text:style-name="T35"><text:s text:c="4"/>QNode *cur = q.head;</text:span></text:p>
      <text:p text:style-name="P47"><text:span text:style-name="T39">415 <text:s/>| <text:s text:c="3"/></text:span><text:span text:style-name="T35"><text:s text:c="4"/></text:span><text:span text:style-name="T37">while</text:span><text:span text:style-name="T35"> (cur) { enqueue(&amp;tmp, cur-&gt;value); cur = cur-&gt;next; }</text:span></text:p>
      <text:p text:style-name="P48">416 <text:s/>| <text:s text:c="3"/></text:p>
      <text:p text:style-name="P47"><text:span text:style-name="T39">417 <text:s/>| <text:s text:c="3"/></text:span><text:span text:style-name="T35"><text:s text:c="4"/></text:span><text:span text:style-name="T37">while</text:span><text:span text:style-name="T35"> (dequeue(&amp;tmp, &amp;val)) rbInsert(&amp;tree, val);</text:span></text:p>
      <text:p text:style-name="P48">418 <text:s/>| <text:s text:c="3"/></text:p>
      <text:p text:style-name="P47"><text:span text:style-name="T39">419 <text:s/>| <text:s text:c="3"/></text:span><text:span text:style-name="T35"><text:s text:c="4"/>printf(</text:span><text:span text:style-name="T41">"\n--- Красно-чёрное дерево (in-order, формат: значение [цвет]) ---\n"</text:span><text:span text:style-name="T35">);</text:span></text:p>
      <text:p text:style-name="P47"><text:span text:style-name="T39">420 <text:s/>| <text:s text:c="3"/></text:span><text:span text:style-name="T35"><text:s text:c="4"/>rbPrint(&amp;tree);</text:span></text:p>
      <text:p text:style-name="P48">421 <text:s/>| <text:s text:c="3"/></text:p>
      <text:p text:style-name="P47"><text:span text:style-name="T39">422 <text:s/>| <text:s text:c="3"/></text:span><text:span text:style-name="T35"><text:s text:c="4"/>free(fileContent);</text:span></text:p>
      <text:p text:style-name="P47"><text:span text:style-name="T39">423 <text:s/>| <text:s text:c="3"/></text:span><text:span text:style-name="T35"><text:s text:c="4"/></text:span><text:span text:style-name="T37">while</text:span><text:span text:style-name="T35"> (dequeue(&amp;q, &amp;val)) {}</text:span></text:p>
      <text:p text:style-name="P47"><text:span text:style-name="T39">424 <text:s/>| <text:s text:c="3"/></text:span><text:span text:style-name="T35"><text:s text:c="4"/>rbFree(&amp;tree);</text:span></text:p>
      <text:p text:style-name="P48">425 <text:s/>| <text:s text:c="3"/></text:p>
      <text:p text:style-name="P47"><text:span text:style-name="T39">426 <text:s/>| <text:s text:c="3"/></text:span><text:span text:style-name="T35"><text:s text:c="4"/></text:span><text:span text:style-name="T37">return</text:span><text:span text:style-name="T35"> 0;</text:span></text:p>
      <text:p text:style-name="P49"><text:span text:style-name="T39">427 <text:s/>| <text:s text:c="3"/></text:span>}</text:p>
      <text:p text:style-name="P46"/>
      <text:h text:style-name="P50" text:outline-level="1"><text:bookmark-start text:name="__RefHeading___Toc143_2058273410 Copy 1 Copy 2 Copy 6"/><text:span text:style-name="T26">З</text:span><text:span text:style-name="T13">АКЛЮЧЕНИЕ</text:span><text:bookmark-end text:name="__RefHeading___Toc143_2058273410 Copy 1 Copy 2 Copy 6"/></text:h>
      <text:p text:style-name="P51"><text:span text:style-name="T42">В ходе выполнения лабораторной работы была разработана программа на языке С</text:span><text:span text:style-name="T43"> </text:span><text:span text:style-name="T42">для сортировки последовательности чисел </text:span><text:span text:style-name="T43">с помощью алгоритма распределения</text:span><text:span text:style-name="T44"> (карманная сортировка)</text:span><text:span text:style-name="T45">, использующ</text:span><text:span text:style-name="T46">его</text:span><text:span text:style-name="T45"> </text:span><text:span text:style-name="T47">очередь</text:span><text:span text:style-name="T45">, построенн</text:span><text:span text:style-name="T48">ую</text:span><text:span text:style-name="T49"> </text:span><text:span text:style-name="T45">на базе связного списка</text:span><text:span text:style-name="T42">. Для</text:span><text:span text:style-name="T43"> </text:span><text:span text:style-name="T42">решения задачи также был реализован алгоритм </text:span><text:span text:style-name="T43">сортировки вставками</text:span><text:span text:style-name="T42">. Числа считывались из файла и хранились в очереди. После сортировки элементы последовательно вставлялись в красно-чёрное дерево для демонстрации работы данной структуры данных</text:span><text:span text:style-name="T47">.</text:span><text:span text:style-name="T49"> Помимо этого был реализован поиск подстроки в файле методом </text:span><text:span text:style-name="T47">Кнута-Морриса-Пратта</text:span><text:span text:style-name="T45">.</text:span></text:p>
      <text:p text:style-name="P52">Программа разрабатывалась в среде <text:span text:style-name="T43">VS Code</text:span><text:span text:style-name="T50">, компилировалась с</text:span> помощью <text:span text:style-name="T43">gcc </text:span><text:span text:style-name="T50">и запускалась </text:span><text:span text:style-name="T51">в ОС</text:span><text:span text:style-name="T43"> Arch Linux</text:span>.</text:p>
      <text:p text:style-name="P52">Тестирование <text:span text:style-name="T51">алгоритма </text:span>показало <text:span text:style-name="T52">его</text:span> корректную работу при различных входных<text:span text:style-name="T43"> </text:span>данных.<text:span text:style-name="T49"> </text:span>Выполнение работы позволило закрепить навыки разработки алгоритмов<text:span text:style-name="T43"> </text:span>сортировки<text:span text:style-name="T49"> и поиска подстрок</text:span>, а также углубить знания в области структур данных.</text:p>
      <text:h text:style-name="P53" text:outline-level="1"><text:bookmark-start text:name="__RefHeading___Toc143_2058273410 Copy 1 Copy 2 Copy 7"/><draw:frame draw:style-name="fr4" draw:name="Изображение3" text:anchor-type="char" svg:x="2.535cm" svg:y="0.889cm" svg:width="12.347cm" svg:height="21.498cm" draw:z-index="5"><draw:image xlink:href="Pictures/100000010000078A00000D203B5D2DDD.png" xlink:type="simple" xlink:show="embed" xlink:actuate="onLoad" draw:mime-type="image/png"/></draw:frame><text:span text:style-name="T26">П</text:span><text:span text:style-name="T13">РИЛОЖЕНИЕ А</text:span><text:bookmark-end text:name="__RefHeading___Toc143_2058273410 Copy 1 Copy 2 Copy 7"/></text:h>
      <text:p text:style-name="P54"><text:bookmark text:name="__RefHeading___Toc3854_349052029"/></text:p>
      <text:h text:style-name="P55" text:outline-level="1"><draw:frame draw:style-name="fr5" draw:name="Изображение4" text:anchor-type="char" svg:x="1.591cm" svg:y="-0.794cm" svg:width="15.466cm" svg:height="22.421cm" draw:z-index="6"><draw:image xlink:href="Pictures/100000010000095600000CE4829A46EE.png" xlink:type="simple" xlink:show="embed" xlink:actuate="onLoad" draw:mime-type="image/png"/></draw:frame><text:soft-page-break/></text:h>
      <text:p text:style-name="P56"><draw:frame draw:style-name="fr5" draw:name="Изображение7" text:anchor-type="char" svg:x="3.029cm" svg:y="-0.108cm" svg:width="11.887cm" svg:height="23.125cm" draw:z-index="9"><draw:image xlink:href="Pictures/1000000100000500000009BA4D4467F8.png" xlink:type="simple" xlink:show="embed" xlink:actuate="onLoad" draw:mime-type="image/png"/></draw:frame><text:soft-page-break/></text:p>
      <text:p text:style-name="P54"/>
      <text:p text:style-name="P57"><text:bookmark-start text:name="__RefHeading___Toc143_2058273410 Copy 1 Copy 1"/><draw:frame draw:style-name="fr6" draw:name="Изображение5" text:anchor-type="char" svg:x="9.971cm" svg:y="-0.146cm" svg:width="7.967cm" svg:height="18.697cm" draw:z-index="8"><draw:image xlink:href="Pictures/1000000100000550000009604241ADD6.png" xlink:type="simple" xlink:show="embed" xlink:actuate="onLoad" draw:mime-type="image/png"/></draw:frame><draw:frame draw:style-name="fr5" draw:name="Изображение6" text:anchor-type="char" svg:x="0.369cm" svg:y="0.03cm" svg:width="9.604cm" svg:height="17.886cm" draw:z-index="7"><draw:image xlink:href="Pictures/1000000100000442000007EEF8C9301A.png" xlink:type="simple" xlink:show="embed" xlink:actuate="onLoad" draw:mime-type="image/png"/></draw:frame><text:bookmark-end text:name="__RefHeading___Toc143_2058273410 Copy 1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 style:writing-mode-automatic="false"/>
      <style:text-properties style:font-name="Liberation Mono" fo:font-family="'Liberation Mono'" style:font-family-generic="modern" style:font-pitch="fixed" fo:font-size="8pt" officeooo:rsid="0096f977" style:font-size-asian="8pt" style:font-size-complex="8pt"/>
    </style:style>
    <style:style style:name="code" style:family="paragraph" style:parent-style-name="Code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3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4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andscape" style:page-layout-name="Mpm4" draw:style-name="Mdp1">
      <style:footer>
        <text:p text:style-name="MP1"><text:bookmark-start text:name="PageNumWizard_FOOTER_Landscape19"/><text:page-number text:select-page="current">19</text:page-number><text:bookmark-end text:name="PageNumWizard_FOOTER_Landscape19"/></text:p>
      </style:footer>
    </style:master-page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5-30T03:13:29.845156436</dc:date>
    <meta:editing-duration>P2DT35M1S</meta:editing-duration>
    <meta:editing-cycles>177</meta:editing-cycles>
    <meta:generator>LibreOffice/26.2.3.2$Linux_X86_64 LibreOffice_project/620$Build-2</meta:generator>
    <meta:print-date>2026-05-30T03:12:17.634148647</meta:print-date>
    <meta:printed-by>Файлы PDF</meta:printed-by>
    <meta:document-statistic meta:table-count="1" meta:image-count="7" meta:object-count="0" meta:page-count="19" meta:paragraph-count="709" meta:word-count="3216" meta:character-count="21805" meta:non-whitespace-character-count="15058"/>
  </office:meta>
</office:document-meta>
</file>