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40000036B51C505D6.png" manifest:media-type="image/png"/>
  <manifest:file-entry manifest:full-path="Pictures/10000001000001BD000000B058F72D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0.751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50%" fo:text-align="end" style:justify-single-word="false" fo:padding="0cm" fo:border="none" style:shadow="none" style:join-border="false"/>
    </style:style>
    <style:style style:name="P10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text-indent="0.25cm" style:auto-text-indent="false" fo:background-color="#ffffff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0.25cm" style:auto-text-indent="false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reak-before="page" fo:background-color="#ffffff"/>
      <style:text-properties fo:font-size="14pt" style:font-size-asian="14pt" style:font-size-complex="14pt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7cm" style:auto-text-indent="false" fo:background-color="#ffffff"/>
    </style:style>
    <style:style style:name="P16" style:family="paragraph" style:parent-style-name="Standard" style:list-style-name="WWNum1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1.27cm" fo:margin-top="0cm" fo:margin-bottom="0cm" style:contextual-spacing="false" fo:line-height="150%" fo:text-align="justify" style:justify-single-word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0.635cm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left="1.27cm" fo:margin-top="0cm" fo:margin-bottom="0cm" style:contextual-spacing="false" fo:line-height="150%" fo:text-align="justify" style:justify-single-word="false" fo:text-indent="-0.635cm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margin-left="1.27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22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23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 fo:padding="0cm" fo:border="none" style:shadow="none" style:join-border="false"/>
    </style:style>
    <style:style style:name="P24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 fo:padding="0cm" fo:border="none" style:shadow="none" style:join-border="false"/>
      <style:text-properties fo:color="#000000" loext:opacity="100%" style:font-name="Times New Roman" fo:font-size="14pt" fo:background-color="#ffff00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 fo:padding="0cm" fo:border="none" style:shadow="none" style:join-border="false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 fo:padding="0cm" fo:border="none" style:shadow="none" style:join-border="false"/>
      <style:text-properties fo:color="#000000" loext:opacity="100%" style:font-name="Times New Roman" fo:font-size="14pt" fo:font-style="italic" officeooo:rsid="00207223" officeooo:paragraph-rsid="00207223" fo:background-color="#ffffff" style:font-name-asian="Times New Roman1" style:font-size-asian="14pt" style:font-style-asian="italic" style:font-name-complex="Times New Roman1" style:font-size-complex="14pt"/>
    </style:style>
    <style:style style:name="P27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#ffffff" fo:padding="0cm" fo:border="none" style:shadow="none" style:writing-mode="lr-tb" style:join-border="false"/>
      <style:text-properties fo:color="#000000" loext:opacity="100%" style:font-name="Times New Roman" fo:font-size="14pt" fo:font-style="italic" officeooo:rsid="00207223" officeooo:paragraph-rsid="00207223" fo:background-color="#ffffff" style:font-name-asian="Times New Roman1" style:font-size-asian="14pt" style:font-style-asian="italic" style:font-name-complex="Times New Roman1" style:font-size-complex="14pt"/>
    </style:style>
    <style:style style:name="P28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#ffffff" fo:padding="0cm" fo:border="none" style:shadow="none" style:writing-mode="lr-tb" style:join-border="false"/>
      <style:text-properties fo:color="#000000" loext:opacity="100%" style:font-name="Times New Roman" fo:font-size="14pt" fo:font-style="italic" officeooo:rsid="00207223" officeooo:paragraph-rsid="0025d472" fo:background-color="#ffffff" style:font-name-asian="Times New Roman1" style:font-size-asian="14pt" style:font-style-asian="italic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#ffffff" fo:padding="0cm" fo:border="none" style:shadow="none" style:writing-mode="lr-tb" style:join-border="false"/>
      <style:text-properties fo:color="#000000" loext:opacity="100%" style:font-name="Times New Roman" fo:font-size="14pt" fo:font-style="italic" officeooo:rsid="00207223" officeooo:paragraph-rsid="00207223" fo:background-color="#ffffff" style:font-name-asian="Times New Roman1" style:font-size-asian="14pt" style:font-style-asian="italic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ackground-color="#ffffff"/>
    </style:style>
    <style:style style:name="P31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7cm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 style:master-page-name="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7cm" style:auto-text-indent="false" style:page-number="auto" fo:break-before="auto" fo:break-after="auto" fo:background-color="#ffffff"/>
    </style:style>
    <style:style style:name="P33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 New Roman" fo:font-size="14pt" fo:font-style="italic" officeooo:paragraph-rsid="0028160c" fo:background-color="#ffffff" style:font-name-asian="Times New Roman1" style:font-size-asian="14pt" style:font-style-asian="italic" style:font-name-complex="Times New Roman1" style:font-size-complex="14pt"/>
    </style:style>
    <style:style style:name="P34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#ffffff" style:writing-mode="lr-tb"/>
      <style:text-properties style:font-name="Times New Roman" fo:font-size="14pt" fo:font-style="italic" officeooo:rsid="0028160c" officeooo:paragraph-rsid="0028160c" fo:background-color="#ffffff" style:font-name-asian="Times New Roman1" style:font-size-asian="14pt" style:font-style-asian="italic" style:font-name-complex="Times New Roman1" style:font-size-complex="14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officeooo:rsid="001e18a7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e18a7" style:font-name-asian="Times New Roman1" style:font-size-asian="12pt" style:font-name-complex="Times New Roman1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style="italic" fo:background-color="#ffffff" loext:char-shading-value="0" style:font-name-asian="Times New Roman1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background-color="#ffff00" loext:char-shading-value="0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background-color="#ffff00" loext:char-shading-value="0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6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17" style:family="text">
      <style:text-properties fo:color="#000000" loext:opacity="100%" style:font-name="Times New Roman" fo:font-size="14pt" fo:font-style="italic" fo:background-color="#ffffff" loext:char-shading-value="0" style:font-name-asian="Times New Roman1" style:font-size-asian="14pt" style:font-style-asian="italic" style:font-name-complex="Times New Roman1" style:font-size-complex="14pt"/>
    </style:style>
    <style:style style:name="T18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9" style:family="text">
      <style:text-properties officeooo:rsid="00219fe5"/>
    </style:style>
    <style:style style:name="T20" style:family="text">
      <style:text-properties officeooo:rsid="00243935"/>
    </style:style>
    <style:style style:name="T21" style:family="text">
      <style:text-properties officeooo:rsid="0025d472"/>
    </style:style>
    <style:style style:name="T22" style:family="text">
      <style:text-properties officeooo:rsid="0021b04b"/>
    </style:style>
    <style:style style:name="T23" style:family="text">
      <style:text-properties officeooo:rsid="002220d2"/>
    </style:style>
    <style:style style:name="T24" style:family="text">
      <style:text-properties fo:color="#1155cc" loext:opacity="100%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25" style:family="text">
      <style:text-properties style:font-name="Times New Roman" fo:font-size="14pt" fo:font-weight="bold" officeooo:rsid="001e5ae3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3" loext:marker-style-name="T1"><text:span text:style-name="T1">«НАЦИОНАЛЬНЫЙ ИССЛЕДОВАТЕЛЬСКИЙ УНИВЕРСИТЕТ ИТМО»</text:span><text:span text:style-name="T1"/></text:p>
      <text:p text:style-name="P4" loext:marker-style-name="T3"/>
      <text:p text:style-name="P5" loext:marker-style-name="T4"/>
      <text:p text:style-name="P6" loext:marker-style-name="T2"/>
      <text:p text:style-name="P7" loext:marker-style-name="T1"/>
      <text:p text:style-name="P7" loext:marker-style-name="T1"/>
      <text:p text:style-name="P8" loext:marker-style-name="T1"><text:span text:style-name="T1">Отчет</text:span><text:span text:style-name="T1"/></text:p>
      <text:p text:style-name="P8" loext:marker-style-name="T2"><text:span text:style-name="T2">по лабораторной работе «Анализ личностных стратегий построения отношений: завершение отношений» «</text:span><text:span text:style-name="T1">Безопасность жизнедеятельности</text:span><text:span text:style-name="T2">»</text:span></text:p>
      <text:p text:style-name="P6" loext:marker-style-name="T2"/>
      <text:p text:style-name="P6" loext:marker-style-name="T2"><text:bookmark text:name="_heading=h.gjdgxs"/></text:p>
      <text:p text:style-name="P9" loext:marker-style-name="T3"><text:span text:style-name="T3">Автор: </text:span><text:span text:style-name="T5">Пахомов Владимир Юрьевич</text:span></text:p>
      <text:p text:style-name="P9" loext:marker-style-name="T3"><text:span text:style-name="T3">Факультет: </text:span><text:span text:style-name="T5">ФБИТ</text:span></text:p>
      <text:p text:style-name="P9" loext:marker-style-name="T3"><text:span text:style-name="T3">Группа: </text:span><text:span text:style-name="T5">N3150</text:span></text:p>
      <text:p text:style-name="P9" loext:marker-style-name="T3"><text:span text:style-name="T3">Преподавател</text:span><text:span text:style-name="T2">ь</text:span><text:span text:style-name="T3">:</text:span></text:p>
      <text:p text:style-name="P10" loext:marker-style-name="T2"><text:span text:style-name="T2">Федорова Антонина Владимировна</text:span><text:span text:style-name="T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 loext:marker-style-name="T2"><draw:frame draw:style-name="fr1" draw:name="image1.png" text:anchor-type="as-char" svg:width="5.136cm" svg:height="2.028cm" draw:z-index="0"><draw:image xlink:href="Pictures/10000001000001BD000000B058F72D2D.png" xlink:type="simple" xlink:show="embed" xlink:actuate="onLoad" draw:mime-type="image/png"/></draw:frame></text:p>
      <text:p text:style-name="P11" loext:marker-style-name="T2"><text:span text:style-name="T2">Санкт-Петербург</text:span></text:p>
      <text:p text:style-name="P11" loext:marker-style-name="T2"><text:span text:style-name="T2">202</text:span><text:span text:style-name="T6">5</text:span></text:p>
      <text:p text:style-name="P12" loext:marker-style-name="T2"/>
      <text:p text:style-name="P13" loext:marker-style-name="T7"/>
      <text:p text:style-name="P14" loext:marker-style-name="T7"/>
      <text:p text:style-name="P15" loext:marker-style-name="T8"><text:span text:style-name="T9">Цель работы:</text:span><text:span text:style-name="T8"> проанализировать личностные стратегии построения отношений.</text:span></text:p>
      <text:p text:style-name="P15" loext:marker-style-name="T9"><text:span text:style-name="T9">Задачи работы:</text:span></text:p>
      <text:list xml:id="list4249917102" text:style-name="WWNum1">
        <text:list-item>
          <text:p text:style-name="P16" loext:marker-style-name="T8"><text:span text:style-name="T8">выбрать стадию отношений для анализа;</text:span></text:p>
        </text:list-item>
        <text:list-item>
          <text:p text:style-name="P16" loext:marker-style-name="T8"><text:span text:style-name="T8">проанализировать выбранную стадию отношений в соответствии с предложенным заданием;</text:span></text:p>
        </text:list-item>
        <text:list-item>
          <text:p text:style-name="P16" loext:marker-style-name="T8"><text:span text:style-name="T8">проанализировать полученные результаты;</text:span></text:p>
        </text:list-item>
      </text:list>
      <text:p text:style-name="P17" loext:marker-style-name="T8"/>
      <text:p text:style-name="P18" loext:marker-style-name="T9"><text:span text:style-name="T9">Задание №1. Заполнение опросника </text:span></text:p>
      <text:p text:style-name="P19" loext:marker-style-name="T8"><text:span text:style-name="T8">Пройдите опросник и обведите то, что вам ближе из двух вариантов.</text:span></text:p>
      <text:p text:style-name="P20" loext:marker-style-name="T8"/>
      <text:p text:style-name="P21" loext:marker-style-name="T10"><text:span text:style-name="T10">«В отношениях я …» </text:span></text:p>
      <text:list xml:id="list3448545042" text:style-name="WWNum2">
        <text:list-item>
          <text:p text:style-name="P22" loext:marker-style-name="T11"><text:span text:style-name="T11">больше уделял(а) внимание себе/</text:span><text:span text:style-name="T12">больше уделял(а) внимание партнеру</text:span><text:span text:style-name="T11">; </text:span></text:p>
        </text:list-item>
        <text:list-item>
          <text:p text:style-name="P22" loext:marker-style-name="T11"><text:span text:style-name="T12">развивался(ась), учился(ась) чему-то</text:span><text:span text:style-name="T11"> /деградировал(а), терял(а) навыки;</text:span></text:p>
        </text:list-item>
      </text:list>
      <text:list text:continue-list="list4249917102" text:style-name="WWNum1">
        <text:list-item>
          <text:p text:style-name="P16" loext:marker-style-name="T2"><text:span text:style-name="T12">стыдился(ась) с</text:span><text:span text:style-name="T13">воего тела</text:span><text:span text:style-name="T14"> / кайфовал(а) от своего тела; </text:span></text:p>
        </text:list-item>
      </text:list>
      <text:list text:continue-list="list3448545042" text:style-name="WWNum2">
        <text:list-item>
          <text:p text:style-name="P23" loext:marker-style-name="T14"><text:span text:style-name="T14">сдерживал(а) свое недовольство/</text:span><text:span text:style-name="T13">говорил (а) честно, что не нравится</text:span><text:span text:style-name="T14">; </text:span></text:p>
        </text:list-item>
        <text:list-item>
          <text:p text:style-name="P23" loext:marker-style-name="T14"><text:span text:style-name="T14">был(а) в паре лидером, управлял(а)/</text:span><text:span text:style-name="T13">был (а) ведомым(ой), подчинялся(ась)</text:span><text:span text:style-name="T14">; </text:span></text:p>
        </text:list-item>
        <text:list-item>
          <text:p text:style-name="P24">чаще шел(шла) на уступки и компромисс</text:p>
        </text:list-item>
        <text:list-item>
          <text:p text:style-name="P23" loext:marker-style-name="T14"><text:span text:style-name="T14">больше соревновался(ась)/</text:span><text:span text:style-name="T13">больше сотрудничал(а)</text:span></text:p>
        </text:list-item>
        <text:list-item>
          <text:p text:style-name="P23" loext:marker-style-name="T14"><text:span text:style-name="T13">больше спрашивал(а)</text:span><text:span text:style-name="T14">/больше отвечал(а) на вопросы; </text:span></text:p>
        </text:list-item>
        <text:list-item>
          <text:p text:style-name="P23" loext:marker-style-name="T14"><text:span text:style-name="T14">больше ревновал(а)/</text:span><text:span text:style-name="T13">больше доверял(а)</text:span><text:span text:style-name="T14">; </text:span></text:p>
        </text:list-item>
        <text:list-item>
          <text:p text:style-name="P23" loext:marker-style-name="T14"><text:span text:style-name="T13">больше хвалил(а) и восхищался(ась)</text:span><text:span text:style-name="T14">/больше критиковал(а) и придирался(ась);</text:span></text:p>
        </text:list-item>
        <text:list-item>
          <text:p text:style-name="P23" loext:marker-style-name="T14"><text:span text:style-name="T13">чаще говорил(а), что в партнере ценю</text:span><text:span text:style-name="T14">/чаще обесценивал(а) партнера; </text:span></text:p>
        </text:list-item>
        <text:list-item>
          <text:p text:style-name="P23" loext:marker-style-name="T14"><text:span text:style-name="T13">больше наслаждался(ась) отношениями</text:span><text:span text:style-name="T14">/больше страдал(а) в них; </text:span></text:p>
        </text:list-item>
        <text:list-item>
          <text:p text:style-name="P23" loext:marker-style-name="T14"><text:span text:style-name="T14">больше ожидал(а) от партнера чего-то/</text:span><text:span text:style-name="T13">больше рассчитывал(а) только на себя</text:span><text:span text:style-name="T14">;</text:span></text:p>
        </text:list-item>
        <text:list-item>
          <text:p text:style-name="P23" loext:marker-style-name="T15"><text:soft-page-break/><text:span text:style-name="T13">чувствовал(а) себя живым(ой)</text:span><text:span text:style-name="T14">/чувствовал(а) себя онемевшим(ей), мертвым(ой); </text:span></text:p>
        </text:list-item>
        <text:list-item>
          <text:p text:style-name="P23" loext:marker-style-name="T15"><text:span text:style-name="T13">проявлял(а) больше инициативы в отношениях</text:span><text:span text:style-name="T14">/в основном только соглашался(ась) с предложенным; </text:span></text:p>
        </text:list-item>
        <text:list-item>
          <text:p text:style-name="P23" loext:marker-style-name="T14"><text:span text:style-name="T14">чаще старался(ась) держать партнера рядом/</text:span><text:span text:style-name="T13">чаще давал(а) партнеру свободу</text:span><text:span text:style-name="T14">; </text:span></text:p>
        </text:list-item>
        <text:list-item>
          <text:p text:style-name="P23" loext:marker-style-name="T14"><text:span text:style-name="T14">чаще помнил(а) обиды/</text:span><text:span text:style-name="T13">чаще забывал(а) обиды</text:span><text:span text:style-name="T14">; </text:span></text:p>
        </text:list-item>
        <text:list-item>
          <text:p text:style-name="P23" loext:marker-style-name="T14"><text:span text:style-name="T13">чаще долго над чем-то думал(а)</text:span><text:span text:style-name="T14">/чаще поступал(а) спонтанно, необдуманно; </text:span></text:p>
        </text:list-item>
        <text:list-item>
          <text:p text:style-name="P23" loext:marker-style-name="T14"><text:span text:style-name="T13">чаще был(а) собой</text:span><text:span text:style-name="T14">/чаще играл(а) роль и носил(а) маску; </text:span></text:p>
        </text:list-item>
        <text:list-item>
          <text:p text:style-name="P23" loext:marker-style-name="T14"><text:span text:style-name="T13">больше верил(а) в партнера и его успех</text:span><text:span text:style-name="T14">/больше сомневался(ась) в нем и его способностях;</text:span></text:p>
        </text:list-item>
        <text:list-item>
          <text:p text:style-name="P23" loext:marker-style-name="T14"><text:span text:style-name="T13">чаще благодарил(а)</text:span><text:span text:style-name="T14">/чаще принимал(а) как должное; </text:span></text:p>
        </text:list-item>
        <text:list-item>
          <text:p text:style-name="P23" loext:marker-style-name="T14"><text:span text:style-name="T13">чаще просил(а) прощения первым(ой)</text:span><text:span text:style-name="T14">/чаще ждал(а) извинений от партнера;</text:span></text:p>
        </text:list-item>
        <text:list-item>
          <text:p text:style-name="P23" loext:marker-style-name="T14"><text:span text:style-name="T13">чаще заботился(ась) о партнере</text:span><text:span text:style-name="T14">/чаще пренебрегал(а) его потребностями; </text:span></text:p>
        </text:list-item>
        <text:list-item>
          <text:p text:style-name="P23" loext:marker-style-name="T14"><text:span text:style-name="T13">чаще защищался(ась) от партнера</text:span><text:span text:style-name="T14">/чаще на него нападал(а); </text:span></text:p>
        </text:list-item>
        <text:list-item>
          <text:p text:style-name="P23" loext:marker-style-name="T14"><text:span text:style-name="T14">больше контролировал(а) действия партнера/</text:span><text:span text:style-name="T13">больше доверял(а) ему делать самому</text:span><text:span text:style-name="T14">; </text:span></text:p>
        </text:list-item>
        <text:list-item>
          <text:p text:style-name="P23" loext:marker-style-name="T14"><text:span text:style-name="T13">больше напитывался(ась) отношениями</text:span><text:span text:style-name="T14">/больше истощался(ась) в них; </text:span></text:p>
        </text:list-item>
        <text:list-item>
          <text:p text:style-name="P23" loext:marker-style-name="T15"><text:span text:style-name="T14">чаще переключался(ась) с проблем и трудностей/</text:span><text:span text:style-name="T13">чаще на них зацикливался(ась)</text:span><text:span text:style-name="T14">; </text:span></text:p>
        </text:list-item>
        <text:list-item>
          <text:p text:style-name="P23" loext:marker-style-name="T15"><text:span text:style-name="T13">больше отдавал(а)</text:span><text:span text:style-name="T14">/больше получал(а); </text:span></text:p>
        </text:list-item>
        <text:list-item>
          <text:p text:style-name="P23" loext:marker-style-name="T14"><text:span text:style-name="T13">больше мотивировал(а), поощрял(а) и вдохновлял(а)</text:span><text:span text:style-name="T14">/больше укорял(а) и делал(а) замечания; </text:span></text:p>
        </text:list-item>
        <text:list-item>
          <text:p text:style-name="P23" loext:marker-style-name="T14"><text:span text:style-name="T13">чаще принимал(а) предложения партнера</text:span><text:span text:style-name="T14">/чаще их отвергал(а); </text:span></text:p>
        </text:list-item>
        <text:list-item>
          <text:p text:style-name="P23" loext:marker-style-name="T14"><text:span text:style-name="T14">чаще обвинял(а)/</text:span><text:span text:style-name="T13">чаще брал(а) вину на себя</text:span><text:span text:style-name="T14">; </text:span></text:p>
        </text:list-item>
        <text:list-item>
          <text:p text:style-name="P23" loext:marker-style-name="T14"><text:span text:style-name="T14">чаще сопротивлялся(ась) тому, что не нравится/ </text:span><text:span text:style-name="T13">чаще смирялся(ась) с неприятным</text:span></text:p>
        </text:list-item>
      </text:list>
      <text:p text:style-name="P19" loext:marker-style-name="T16"><text:soft-page-break/><text:span text:style-name="T9">Выводы к заданию №1</text:span><text:span text:style-name="T16"/></text:p>
      <text:p text:style-name="P25" loext:marker-style-name="T17"><text:span text:style-name="T10">О</text:span><text:span text:style-name="T17">тветьте на 4 вопроса: как вам то, что вы выделили? </text:span><text:span text:style-name="T10"><text:s/></text:span><text:span text:style-name="T17">Нравится или хочется изменить?</text:span><text:span text:style-name="T18"> </text:span><text:span text:style-name="T17">Мог ли/ может ли этот перекос стать причиной разрыва?</text:span><text:span text:style-name="T18"> </text:span><text:span text:style-name="T17">Что вы собираетесь делать, чтобы не достичь подобного перекоса в будущем?</text:span></text:p>
      <text:p text:style-name="P26" loext:marker-style-name="T17"/>
      <text:p text:style-name="P27" loext:marker-style-name="T17">Не скажу, что мне не нравился порядок моих отношений. Скорее наоборот, я старался сделать всё, чтобы было меньше разногласий. Я всегда старался действовать согласно по мнению партнёра, чтобы всё было так, как он хочет. <text:span text:style-name="T19">Для меня на первом месте всегда был партнёр, и мне это не доставляло дискомфорта. </text:span><text:span text:style-name="T20">Я бы вряд ли что-то менял.</text:span></text:p>
      <text:p text:style-name="P28" loext:marker-style-name="T17">Одними из оглашённых причин разрыва отношений было отсутствие проявления инициативы с моей стороны и недостатка меня в жизни моего партнёра. <text:span text:style-name="T21">Это в основном и стало причиной разрыва отношений. </text:span>Я допускаю такого варианта, <text:span text:style-name="T19">но </text:span><text:span text:style-name="T22">после </text:span><text:span text:style-name="T21">разрыва</text:span><text:span text:style-name="T22"> выяснилось, что сам партнёр не особо горел желанием выполнять то, чего он же сам требует.</text:span></text:p>
      <text:p text:style-name="P27" loext:marker-style-name="T17">Пообщавшись со своими родителями и друзьями, которые знали нас обоих, я сделал вывод, что причина была не в моём поведении, <text:span text:style-name="T19">а в нашем недостатке опыта и в странном поведении моего партнёра. В будущем я не планирую </text:span><text:span text:style-name="T23">кардинально</text:span><text:span text:style-name="T19"> менять своё поведение, так как объективно дело было не во мне, однако </text:span><text:span text:style-name="T22">впредь </text:span><text:span text:style-name="T19">я </text:span><text:span text:style-name="T22">буду держать нас на равных и не буду ставить кого-то из нас на пьедестал.</text:span></text:p>
      <text:p text:style-name="P29" loext:marker-style-name="T17"/>
      <text:p text:style-name="P30" loext:marker-style-name="T8"><text:span text:style-name="T9">Задание №2. Прохождение теста </text:span><text:span text:style-name="T8"><text:s/></text:span></text:p>
      <text:p text:style-name="P15" loext:marker-style-name="T8"><text:span text:style-name="T8">Выполните </text:span><text:a xlink:type="simple" xlink:href="https://onlinetestpad.com/ru/test/169318-koping-test-lazarusa" text:style-name="ListLabel_20_19" text:visited-style-name="ListLabel_20_19"><text:span text:style-name="T24">онлайн-тест Лазаруса</text:span></text:a><text:span text:style-name="T8"> по определению ведущих стратегий поведения в трудной жизненной ситуации и напишите </text:span><text:bookmark text:name="_GoBack"/><text:span text:style-name="T8">3 наиболее важных стратегии: </text:span></text:p>
      <text:p text:style-name="P18" loext:marker-style-name="T9"><text:span text:style-name="T9">Стратегия 1: <text:s/></text:span><text:span text:style-name="T25">Планирование решения проблемы</text:span></text:p>
      <text:p text:style-name="P18" loext:marker-style-name="T9"><text:span text:style-name="T9">Стратегия </text:span><text:span text:style-name="T25">2: <text:s/>Самоконтроль</text:span></text:p>
      <text:p text:style-name="P18" loext:marker-style-name="T8"><text:span text:style-name="T9">Стратегия 3: <text:s/></text:span><text:span text:style-name="T25">Бегство-избегание</text:span></text:p>
      <text:p text:style-name="P31" loext:marker-style-name="T8"><draw:frame draw:style-name="fr2" draw:name="Image1" text:anchor-type="char" svg:width="16.501cm" svg:height="13.621cm" draw:z-index="1"><draw:image xlink:href="Pictures/10000000000004240000036B51C505D6.png" xlink:type="simple" xlink:show="embed" xlink:actuate="onLoad" draw:mime-type="image/png"/></draw:frame><text:soft-page-break/></text:p>
      <text:p text:style-name="P32" loext:marker-style-name="T2"><text:span text:style-name="T9">Выводы к заданию №2</text:span></text:p>
      <text:p text:style-name="P33" loext:marker-style-name="T2">Замечаете ли вы свои <text:bookmark-start text:name="__DdeLink__559_2097828858"/>копинг-стратегии<text:bookmark-end text:name="__DdeLink__559_2097828858"/>? Как вы относитесь к тому, что они у вас такие?</text:p>
      <text:p text:style-name="P34" loext:marker-style-name="T2"/>
      <text:p text:style-name="P34" loext:marker-style-name="T2">Я довольно часто стал замечать свои копинг-стратегии. Особенно после разрыва отношений, потому что это позволило мне лучше разобраться в себе. Часто я их замечаю тогда, когда нужно что-то организовать или сделать во время. В принципе мне нравятся мои стратегии, потому что они хорошо ценятся в обществе и позволяют мне «быть на плаву». Меня чаще других могут выбрать для помощи в какой-либо работе или доверить мне какое-либо де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swiss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swiss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pple-tab-span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10</meta:editing-cycles>
    <meta:creation-date>2023-08-09T12:03:00</meta:creation-date>
    <dc:date>2025-03-15T18:05:50.991752216</dc:date>
    <meta:editing-duration>PT42M42S</meta:editing-duration>
    <meta:generator>LibreOffice/25.2.1.2$Linux_X86_64 LibreOffice_project/520$Build-2</meta:generator>
    <meta:document-statistic meta:table-count="0" meta:image-count="2" meta:object-count="0" meta:page-count="5" meta:paragraph-count="66" meta:word-count="677" meta:character-count="4973" meta:non-whitespace-character-count="4363"/>
    <meta:user-defined meta:name="AppVersion">16.0000</meta:user-defined>
    <meta:template xlink:type="simple" xlink:actuate="onRequest" xlink:title="Normal" xlink:href=""/>
  </office:meta>
</office:document-meta>
</file>