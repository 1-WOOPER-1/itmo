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C0000011D042FFED0.png" manifest:media-type="image/png"/>
  <manifest:file-entry manifest:full-path="Pictures/100000010000014D000000F064F00BB2.png" manifest:media-type="image/png"/>
  <manifest:file-entry manifest:full-path="Pictures/100000010000014D000002494EF1E707.png" manifest:media-type="image/png"/>
  <manifest:file-entry manifest:full-path="Pictures/100000010000047A00000217731613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master-page-name="First_20_Page">
      <style:paragraph-properties fo:margin-top="0cm" fo:margin-bottom="0cm" style:contextual-spacing="false" fo:line-height="150%" fo:text-align="center" style:justify-single-word="false" style:page-number="auto"/>
      <style:text-properties fo:font-weight="bold" officeooo:paragraph-rsid="000d823a" style:font-weight-asian="bold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0d823a"/>
    </style:style>
    <style:style style:name="P3" style:family="paragraph" style:parent-style-name="Text_20_body">
      <style:paragraph-properties fo:margin-top="0cm" fo:margin-bottom="0cm" style:contextual-spacing="false" fo:line-height="150%"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98dad8"/>
    </style:style>
    <style:style style:name="P6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rsid="0098dad8" officeooo:paragraph-rsid="0098dad8"/>
    </style:style>
    <style:style style:name="P7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paragraph-rsid="000ca6c1"/>
    </style:style>
    <style:style style:name="P8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rsid="004a596f" officeooo:paragraph-rsid="004a596f"/>
    </style:style>
    <style:style style:name="P9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officeooo:rsid="000ca6c1" officeooo:paragraph-rsid="000d823a"/>
    </style:style>
    <style:style style:name="P10" style:family="paragraph" style:parent-style-name="Text_20_body" style:master-page-name="">
      <loext:graphic-properties draw:fill="none"/>
      <style:paragraph-properties fo:margin-left="0cm" fo:margin-right="1cm" fo:margin-top="0cm" fo:margin-bottom="0cm" style:contextual-spacing="false" fo:line-height="100%" fo:text-align="right" style:justify-single-word="false" fo:text-indent="0cm" style:auto-text-indent="false" style:page-number="auto" fo:background-color="transparent"/>
      <style:text-properties fo:font-size="10pt" officeooo:paragraph-rsid="000d823a" style:font-size-asian="10pt" style:font-size-complex="10pt"/>
    </style:style>
    <style:style style:name="P11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fo:font-size="10pt" officeooo:paragraph-rsid="000ca6c1" style:font-size-asian="10pt" style:font-size-complex="10pt"/>
    </style:style>
    <style:style style:name="P12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394161"/>
    </style:style>
    <style:style style:name="P13" style:family="paragraph" style:parent-style-name="Text_20_body" style:list-style-name="" style:master-page-name="">
      <style:paragraph-properties fo:margin-top="0cm" fo:margin-bottom="0cm" style:contextual-spacing="false" fo:line-height="150%" fo:text-align="center" style:justify-single-word="false" style:page-number="auto" fo:break-before="page"/>
      <style:text-properties fo:font-weight="bold" officeooo:rsid="000f2314" officeooo:paragraph-rsid="000f2314" style:font-weight-asian="bold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50%" fo:text-align="left" style:justify-single-word="false"/>
      <style:text-properties officeooo:paragraph-rsid="000d823a"/>
    </style:style>
    <style:style style:name="P15" style:family="paragraph" style:parent-style-name="Contents_20_1">
      <style:paragraph-properties fo:line-height="150%">
        <style:tab-stops>
          <style:tab-stop style:position="16.589cm" style:type="right" style:leader-style="dotted" style:leader-text="."/>
        </style:tab-stops>
      </style:paragraph-properties>
    </style:style>
    <style:style style:name="P16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fo:font-weight="bold" officeooo:rsid="0090def4" officeooo:paragraph-rsid="0090def4" style:font-weight-asian="bold" style:font-weight-complex="bold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style:page-number="auto" fo:background-color="transparent"/>
      <style:text-properties officeooo:rsid="0090def4" officeooo:paragraph-rsid="0090def4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fo:font-weight="bold" officeooo:rsid="0090def4" officeooo:paragraph-rsid="0090def4" style:font-weight-asian="bold" style:font-weight-complex="bold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90def4" officeooo:paragraph-rsid="0090def4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911619" officeooo:paragraph-rsid="0090def4"/>
    </style:style>
    <style:style style:name="P21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fo:font-weight="bold" officeooo:rsid="009515c5" officeooo:paragraph-rsid="009515c5" style:font-weight-asian="bold" style:font-weight-complex="bold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911619" officeooo:paragraph-rsid="00911619"/>
    </style:style>
    <style:style style:name="P23" style:family="paragraph" style:parent-style-name="Text_20_body" style:list-style-name="L1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925e2e" officeooo:paragraph-rsid="00925e2e"/>
    </style:style>
    <style:style style:name="P24" style:family="paragraph" style:parent-style-name="Text_20_body" style:list-style-name="L1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9bab2f" officeooo:paragraph-rsid="009bab2f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979256" officeooo:paragraph-rsid="009d1f2d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9d1f2d" officeooo:paragraph-rsid="009d1f2d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979256" officeooo:paragraph-rsid="00979256"/>
    </style:style>
    <style:style style:name="P28" style:family="paragraph" style:parent-style-name="Drawing">
      <style:paragraph-properties fo:text-align="center" style:justify-single-word="false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reak-before="page" fo:background-color="transparent"/>
      <style:text-properties officeooo:rsid="00911619" officeooo:paragraph-rsid="00911619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97f467" officeooo:paragraph-rsid="0097f467"/>
    </style:style>
    <style:style style:name="P31" style:family="paragraph" style:parent-style-name="Code">
      <style:paragraph-properties ch2_options="{'Style': 'emacs', 'Language': 'JSON', 'UseCharStyles': 0, 'LineNumberRatio': 100, 'LineNumberStart': 1, 'MasterCharStyle': '', 'ShowLineNumbers': 1, 'ColourizeBackground': 0, 'LineNumberSeparator': '  |    ', 'LineNumberPaddingSymbol': '', 'StoreOptionsWithSnippet': 1}"/>
      <style:text-properties fo:color="#000000" loext:opacity="100%" fo:language="zxx" fo:country="none" fo:font-style="normal" style:text-underline-style="none" fo:font-weight="normal" fo:background-color="transparent"/>
    </style:style>
    <style:style style:name="P32" style:family="paragraph" style:parent-style-name="Code">
      <style:paragraph-properties ch2_options="{'Style': 'emacs', 'Language': 'JSON', 'UseCharStyles': 0, 'LineNumberRatio': 100, 'LineNumberStart': 1, 'MasterCharStyle': '', 'ShowLineNumbers': 1, 'ColourizeBackground': 0, 'LineNumberSeparator': '  |  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3" style:family="paragraph" style:parent-style-name="Code">
      <style:paragraph-properties ch2_options="{'Style': 'emacs', 'Language': 'JSON', 'UseCharStyles': 0, 'LineNumberRatio': 100, 'LineNumberStart': 1, 'MasterCharStyle': '', 'ShowLineNumbers': 1, 'ColourizeBackground': 0, 'LineNumberSeparator': '  |    ', 'LineNumberPaddingSymbol': '', 'StoreOptionsWithSnippet': 1}"/>
      <style:text-properties fo:color="#008800" loext:opacity="100%" fo:font-size="8pt" fo:language="zxx" fo:country="none" fo:font-style="normal" style:text-underline-style="none" fo:font-weight="normal" fo:background-color="transparent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reak-before="page" fo:background-color="transparent"/>
      <style:text-properties officeooo:rsid="0097f467" officeooo:paragraph-rsid="0097f467"/>
    </style:style>
    <style:style style:name="P35" style:family="paragraph" style:parent-style-name="Code">
      <style:paragraph-properties ch2_options="{'Style': 'emacs', 'Language': 'HTML', 'UseCharStyles': 0, 'LineNumberRatio': 100, 'LineNumberStart': 1, 'MasterCharStyle': '', 'ShowLineNumbers': 1, 'ColourizeBackground': 0, 'LineNumberSeparator': '  |    ', 'LineNumberPaddingSymbol': '', 'StoreOptionsWithSnippet': 1}"/>
      <style:text-properties fo:color="#008800" loext:opacity="100%" fo:language="zxx" fo:country="none" fo:font-style="normal" style:text-underline-style="none" fo:font-weight="normal" fo:background-color="transparent"/>
    </style:style>
    <style:style style:name="P36" style:family="paragraph" style:parent-style-name="Code">
      <style:paragraph-properties ch2_options="{'Style': 'emacs', 'Language': 'HTML', 'UseCharStyles': 0, 'LineNumberRatio': 100, 'LineNumberStart': 1, 'MasterCharStyle': '', 'ShowLineNumbers': 1, 'ColourizeBackground': 0, 'LineNumberSeparator': '  |  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7" style:family="paragraph" style:parent-style-name="Code">
      <style:paragraph-properties ch2_options="{'Style': 'emacs', 'Language': 'HTML', 'UseCharStyles': 0, 'LineNumberRatio': 100, 'LineNumberStart': 1, 'MasterCharStyle': '', 'ShowLineNumbers': 1, 'ColourizeBackground': 0, 'LineNumberSeparator': '  |    ', 'LineNumberPaddingSymbol': '', 'StoreOptionsWithSnippet': 1}"/>
      <style:text-properties fo:color="#008800" loext:opacity="100%" fo:font-size="8pt" fo:language="zxx" fo:country="none" fo:font-style="normal" style:text-underline-style="none" fo:font-weight="normal" fo:background-color="transparent"/>
    </style:style>
    <style:style style:name="P38" style:family="paragraph" style:parent-style-name="Code">
      <style:paragraph-properties ch2_options="{'Style': 'emacs', 'Language': 'JavaScript', 'UseCharStyles': 0, 'LineNumberRatio': 100, 'LineNumberStart': 1, 'MasterCharStyle': '', 'ShowLineNumbers': 1, 'ColourizeBackground': 0, 'LineNumberSeparator': '  |  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9" style:family="paragraph" style:parent-style-name="Code">
      <style:paragraph-properties ch2_options="{'Style': 'emacs', 'Language': 'JavaScript', 'UseCharStyles': 0, 'LineNumberRatio': 100, 'LineNumberStart': 1, 'MasterCharStyle': '', 'ShowLineNumbers': 1, 'ColourizeBackground': 0, 'LineNumberSeparator': '  |    ', 'LineNumberPaddingSymbol': '', 'StoreOptionsWithSnippet': 1}"/>
      <style:text-properties fo:color="#008800" loext:opacity="100%" fo:font-size="8pt" fo:language="zxx" fo:country="none" fo:font-style="normal" style:text-underline-style="none" fo:font-weight="normal" fo:background-color="transparent"/>
    </style:style>
    <style:style style:name="P40" style:family="paragraph" style:parent-style-name="Code">
      <style:paragraph-properties ch2_options="{'Style': 'emacs', 'Language': 'JavaScript', 'UseCharStyles': 0, 'LineNumberRatio': 100, 'LineNumberStart': 1, 'MasterCharStyle': '', 'ShowLineNumbers': 1, 'ColourizeBackground': 0, 'LineNumberSeparator': '  |    ', 'LineNumberPaddingSymbol': '', 'StoreOptionsWithSnippet': 1}"/>
      <style:text-properties fo:color="#000000" loext:opacity="100%" fo:language="zxx" fo:country="none" fo:font-style="normal" style:text-underline-style="none" fo:font-weight="normal" fo:background-color="transparent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0cm" style:auto-text-indent="false" fo:background-color="transparent"/>
      <style:text-properties officeooo:rsid="0028636d" officeooo:paragraph-rsid="0097f467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0cm" style:auto-text-indent="false" fo:background-color="transparent"/>
      <style:text-properties officeooo:rsid="009e935c" officeooo:paragraph-rsid="009e935c"/>
    </style:style>
    <style:style style:name="P43" style:family="paragraph" style:parent-style-name="Code">
      <style:paragraph-properties ch2_options="{'Style': 'emacs', 'Language': 'CSS', 'UseCharStyles': 0, 'LineNumberRatio': 100, 'LineNumberStart': 1, 'MasterCharStyle': '', 'ShowLineNumbers': 1, 'ColourizeBackground': 0, 'LineNumberSeparator': '  |  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44" style:family="paragraph" style:parent-style-name="Code">
      <style:paragraph-properties ch2_options="{'Style': 'emacs', 'Language': 'CSS', 'UseCharStyles': 0, 'LineNumberRatio': 100, 'LineNumberStart': 1, 'MasterCharStyle': '', 'ShowLineNumbers': 1, 'ColourizeBackground': 0, 'LineNumberSeparator': '  |    ', 'LineNumberPaddingSymbol': '', 'StoreOptionsWithSnippet': 1}"/>
      <style:text-properties fo:color="#000000" loext:opacity="100%" fo:language="zxx" fo:country="none" fo:font-style="normal" style:text-underline-style="none" fo:font-weight="normal" fo:background-color="transparent"/>
    </style:style>
    <style:style style:name="P45" style:family="paragraph" style:parent-style-name="Code">
      <style:paragraph-properties ch2_options="{'Style': 'emacs', 'Language': 'CSS', 'UseCharStyles': 0, 'LineNumberRatio': 100, 'LineNumberStart': 1, 'MasterCharStyle': '', 'ShowLineNumbers': 1, 'ColourizeBackground': 0, 'LineNumberSeparator': '  |    ', 'LineNumberPaddingSymbol': '', 'StoreOptionsWithSnippet': 1}"/>
      <style:text-properties fo:color="#008800" loext:opacity="100%" fo:font-size="8pt" fo:language="zxx" fo:country="none" fo:font-style="normal" style:text-underline-style="none" fo:font-weight="normal"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98dad8"/>
    </style:style>
    <style:style style:name="T3" style:family="text">
      <style:text-properties officeooo:rsid="00394161"/>
    </style:style>
    <style:style style:name="T4" style:family="text">
      <style:text-properties officeooo:rsid="009bab2f"/>
    </style:style>
    <style:style style:name="T5" style:family="text">
      <style:text-properties officeooo:rsid="0016960e"/>
    </style:style>
    <style:style style:name="T6" style:family="text">
      <style:text-properties officeooo:rsid="0097f467"/>
    </style:style>
    <style:style style:name="T7" style:family="text">
      <style:text-properties officeooo:rsid="00925e2e"/>
    </style:style>
    <style:style style:name="T8" style:family="text">
      <style:text-properties officeooo:rsid="009d1f2d"/>
    </style:style>
    <style:style style:name="T9" style:family="text">
      <style:text-properties officeooo:rsid="00989a03"/>
    </style:style>
    <style:style style:name="T10" style:family="text">
      <style:text-properties officeooo:rsid="009e776a"/>
    </style:style>
    <style:style style:name="T11" style:family="text">
      <style:text-properties fo:color="#008800" loext:opacity="100%" fo:font-size="8pt"/>
    </style:style>
    <style:style style:name="T12" style:family="text">
      <style:text-properties fo:color="#bbbbbb" loext:opacity="100%"/>
    </style:style>
    <style:style style:name="T13" style:family="text">
      <style:text-properties fo:color="#008000" loext:opacity="100%" fo:font-weight="bold"/>
    </style:style>
    <style:style style:name="T14" style:family="text">
      <style:text-properties fo:color="#000000" loext:opacity="100%"/>
    </style:style>
    <style:style style:name="T15" style:family="text">
      <style:text-properties fo:color="#666666" loext:opacity="100%"/>
    </style:style>
    <style:style style:name="T16" style:family="text">
      <style:text-properties fo:color="#bb4444" loext:opacity="100%"/>
    </style:style>
    <style:style style:name="T17" style:family="text">
      <style:text-properties fo:font-size="8pt"/>
    </style:style>
    <style:style style:name="T18" style:family="text">
      <style:text-properties fo:color="#aa22ff" loext:opacity="100%" fo:font-weight="bold"/>
    </style:style>
    <style:style style:name="T19" style:family="text">
      <style:text-properties fo:color="#aa22ff" loext:opacity="100%"/>
    </style:style>
    <style:style style:name="T20" style:family="text">
      <style:text-properties fo:color="#bb6688" loext:opacity="100%" fo:font-weight="bold"/>
    </style:style>
    <style:style style:name="T21" style:family="text">
      <style:text-properties fo:color="#00bb00" loext:opacity="100%" fo:font-weight="bold"/>
    </style:style>
    <style:style style:name="T22" style:family="text">
      <style:text-properties fo:color="#0000ff" loext:opacity="100%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<text:span text:style-name="T1">ФЕДЕРАЛЬНОЕ </text:span>ГОСУДАРСТВЕННОЕ АВТОНОМНОЕ ОБРАЗОВАТЕЛЬНОЕ</text:p>
      <text:p text:style-name="P3">УЧРЕЖДЕНИЕ ВЫСШЕГО ОБРАЗОВАНИЯ</text:p>
      <text:p text:style-name="P4">НАЦИОНАЛЬНЫЙ ИССЛЕДОВАТЕЛЬСКИЙ УНИВЕРСИТЕТ ИТМО</text:p>
      <text:p text:style-name="P4"/>
      <text:p text:style-name="P4"/>
      <text:p text:style-name="P3">Факультет безопасности информационных технологий</text:p>
      <text:p text:style-name="P3"/>
      <text:p text:style-name="P3">Дисциплина:</text:p>
      <text:p text:style-name="P3">«<text:span text:style-name="T2">Веб-технологии</text:span>»</text:p>
      <text:p text:style-name="P3"/>
      <text:p text:style-name="P3"/>
      <text:p text:style-name="P5">ОТЧ<text:span text:style-name="T3">Ё</text:span>Т ПО <text:span text:style-name="T2">РАЗРАБОТКЕ БРАУЗЕРНОГО</text:span></text:p>
      <text:p text:style-name="P6">РАСШИРЕНИЯ УРОВНЯ <text:span text:style-name="T4">MIDDLE</text:span></text:p>
      <text:p text:style-name="P3"/>
      <text:p text:style-name="P7">Выполнил:</text:p>
      <text:p text:style-name="P7">Пахомов Владимир Юрьевич, студент группы N3250</text:p>
      <text:p text:style-name="P7"><draw:frame draw:style-name="fr1" draw:name="Изображение4" text:anchor-type="char" svg:x="13.548cm" svg:y="-0.093cm" svg:width="3.212cm" svg:height="1.499cm" draw:z-index="3"><draw:image xlink:href="Pictures/100000010000047A0000021773161342.png" xlink:type="simple" xlink:show="embed" xlink:actuate="onLoad" draw:mime-type="image/png"/></draw:frame></text:p>
      <text:p text:style-name="P8"/>
      <text:p text:style-name="P9">________________</text:p>
      <text:p text:style-name="P10">(подпись)</text:p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/>
      <text:p text:style-name="P2"/>
      <text:p text:style-name="P12">Санкт-Петербург</text:p>
      <text:p text:style-name="P12">202<text:span text:style-name="T5">6</text:span>.</text:p>
      <text:h text:style-name="P13" text:outline-level="1"><text:bookmark-start text:name="__RefHeading___Toc80_2058273410"/>СОДЕРЖАНИЕ<text:bookmark-end text:name="__RefHeading___Toc80_2058273410"/></text:h>
      <text:p text:style-name="P14"/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"><text:a xlink:type="simple" xlink:href="#__RefHeading___Toc80_2058273410" office:name="СОДЕРЖАНИЕ" text:style-name="Index_20_Link" text:visited-style-name="Index_20_Link">СОДЕРЖАНИЕ<text:tab/>2</text:a></text:p>
          <text:p text:style-name="P15"><text:a xlink:type="simple" xlink:href="#__RefHeading___Toc82_2058273410" office:name="ЗАДАНИЕ MIDDLE" text:style-name="Index_20_Link" text:visited-style-name="Index_20_Link">ЗАДАНИЕ MIDDLE<text:tab/>3</text:a></text:p>
          <text:p text:style-name="P15"><text:a xlink:type="simple" xlink:href="#__RefHeading___Toc82_2058273410%20%D0%9A%D0%BE%D0%BF%D0%B8%D1%8F%203" office:name="ОПИСАНИЕ АЛГОРИТМА РАБОТЫ" text:style-name="Index_20_Link" text:visited-style-name="Index_20_Link">ОПИСАНИЕ АЛГОРИТМА РАБОТЫ<text:tab/>4</text:a></text:p>
        </text:index-body>
      </text:table-of-content>
      <text:p text:style-name="P14"/>
      <text:h text:style-name="P16" text:outline-level="1"><text:bookmark-start text:name="__RefHeading___Toc82_2058273410"/>ЗАДАНИЕ <text:span text:style-name="T4">MIDDLE</text:span><text:bookmark-end text:name="__RefHeading___Toc82_2058273410"/></text:h>
      <text:p text:style-name="P17">Вариант задания: (467036 mod 5) + 1 = 2</text:p>
      <text:p text:style-name="P18">Вариант №2 – генератор QR-кода</text:p>
      <text:p text:style-name="P19">Необходимо написать браузерное расширение, которое будет генерировать QR-код. В интерфейсе расширения будет текстовое поле, куда нужно ввести ссылку, и кнопка “Сгенерировать”. После ввода ссылки и нажатия на кнопки будет генерироваться QR-код. Важно: на кнопку “Сгенерировать” нельзя нажать, пока не будет введена ссылка (не просто текст)<text:span text:style-name="T4">.</text:span></text:p>
      <text:p text:style-name="P19"/>
      <text:p text:style-name="P20"/>
      <text:h text:style-name="P21" text:outline-level="1"><text:bookmark-start text:name="__RefHeading___Toc82_2058273410 Копия 3"/>ОПИСАНИЕ АЛГОРИТМА РАБОТЫ<text:bookmark-end text:name="__RefHeading___Toc82_2058273410 Копия 3"/></text:h>
      <text:p text:style-name="P22"><text:span text:style-name="T6">Расширение было написано для браузеров на основе Chromium и Firefox (в браузере Safari возможности протестировать не было). Структура файлов</text:span><text:span text:style-name="T7">:</text:span></text:p>
      <text:list text:style-name="L1">
        <text:list-item>
          <text:p text:style-name="P23">manifest.json - конфигурационный файл расширения;</text:p>
        </text:list-item>
        <text:list-item>
          <text:p text:style-name="P23">popup.html - файл разметки главного окна;</text:p>
        </text:list-item>
        <text:list-item>
          <text:p text:style-name="P23">popup.js - скрипт, реализующий весь функционал расширения<text:span text:style-name="T4">;</text:span></text:p>
        </text:list-item>
        <text:list-item>
          <text:p text:style-name="P24">style.css - файл с описанием стилей для элементов интерфейса.</text:p>
        </text:list-item>
      </text:list>
      <text:p text:style-name="P25">При нажатии на иконку расширения появляется небольшое окно, <text:span text:style-name="T8">в котором присутствует текстовое поле для ввода ссылки. Также под ним присутствует кнопка "Сгенерировать", которая всегда находится в состоянии disabled, пока пользователь не введёт в текстовое поле правильную ссылку. Ссылка валидируется при помощи конструктора new URL(link) и проверкой наличия протокола и имени хоста. Проверка происходит каждый раз при вводе символов в текстовое поле.</text:span></text:p>
      <text:p text:style-name="P26">При вводе правильной ссылки, пользователь может нажать на кнопку и сгенерировать QR-код, который появится ниже. Также при нажатии на сам QR-код можно скопировать его изображение в буфер обмена. Для получения QR-кода используется сторонний сервис api.qrserver.com, который отправляет изображение кода. Если связаться с сервером для генерации кода не удалось, будет выводиться соответствующее сообщение.</text:p>
      <text:p text:style-name="P27"><draw:frame draw:style-name="fr2" draw:name="Врезка1" text:anchor-type="char" svg:x="0.042cm" svg:y="0.434cm" svg:width="8.333cm" draw:z-index="0"><draw:text-box fo:min-height="7.142cm"><text:p text:style-name="P28"><draw:frame draw:style-name="fr3" draw:name="Изображение1" text:anchor-type="char" svg:width="8.333cm" svg:height="6.004cm" draw:z-index="4"><draw:image xlink:href="Pictures/100000010000014D000000F064F00BB2.png" xlink:type="simple" xlink:show="embed" xlink:actuate="onLoad" draw:mime-type="image/png"/></draw:frame>Рисунок <text:span text:style-name="T9">1</text:span>: Окно расширения</text:p></draw:text-box></draw:frame><draw:frame draw:style-name="fr4" draw:name="Врезка2" text:anchor-type="char" svg:x="8.761cm" svg:y="0.037cm" svg:width="8.306cm" draw:z-index="1"><draw:text-box fo:min-height="7.565cm"><text:p text:style-name="P28"><draw:frame draw:style-name="fr5" draw:name="Изображение2" text:anchor-type="char" svg:width="8.306cm" svg:height="14.593cm" draw:z-index="5"><draw:image xlink:href="Pictures/100000010000014D000002494EF1E707.png" xlink:type="simple" xlink:show="embed" xlink:actuate="onLoad" draw:mime-type="image/png"/></draw:frame>Рисунок <text:span text:style-name="T9">2</text:span>: Пример успешной работы</text:p></draw:text-box></draw:frame><text:soft-page-break/></text:p>
      <text:p text:style-name="P22"/>
      <text:p text:style-name="P29"><draw:frame draw:style-name="fr6" draw:name="Врезка3" text:anchor-type="char" svg:width="8.306cm" draw:z-index="2"><draw:text-box fo:min-height="7.962cm"><text:p text:style-name="P28"><draw:frame draw:style-name="fr3" draw:name="Изображение3" text:anchor-type="char" svg:width="8.306cm" svg:height="7.13cm" draw:z-index="6"><draw:image xlink:href="Pictures/100000010000014C0000011D042FFED0.png" xlink:type="simple" xlink:show="embed" xlink:actuate="onLoad" draw:mime-type="image/png"/></draw:frame>Рисунок <text:span text:style-name="T10">3</text:span>: Обработка <text:span text:style-name="T10">неудачной генерации</text:span></text:p></draw:text-box></draw:frame></text:p>
      <text:p text:style-name="P30">Исходный код manifest.json:</text:p>
      <text:p text:style-name="P31"><text:span text:style-name="T11"><text:s/>1 <text:s/>| <text:s text:c="3"/></text:span>{</text:p>
      <text:p text:style-name="P32"><text:span text:style-name="T11"><text:s/>2 <text:s/>| <text:s text:c="3"/></text:span><text:span text:style-name="T12"><text:s text:c="2"/></text:span><text:span text:style-name="T13">"manifest_version"</text:span><text:span text:style-name="T14">:</text:span><text:span text:style-name="T12"> </text:span><text:span text:style-name="T15">3</text:span><text:span text:style-name="T14">,</text:span></text:p>
      <text:p text:style-name="P32"><text:span text:style-name="T11"><text:s/>3 <text:s/>| <text:s text:c="3"/></text:span><text:span text:style-name="T12"><text:s text:c="2"/></text:span><text:span text:style-name="T13">"name"</text:span><text:span text:style-name="T14">:</text:span><text:span text:style-name="T12"> </text:span><text:span text:style-name="T16">"Генератор QR-кодов"</text:span><text:span text:style-name="T14">,</text:span></text:p>
      <text:p text:style-name="P32"><text:span text:style-name="T11"><text:s/>4 <text:s/>| <text:s text:c="3"/></text:span><text:span text:style-name="T12"><text:s text:c="2"/></text:span><text:span text:style-name="T13">"version"</text:span><text:span text:style-name="T14">:</text:span><text:span text:style-name="T12"> </text:span><text:span text:style-name="T16">"1.0"</text:span><text:span text:style-name="T14">,</text:span></text:p>
      <text:p text:style-name="P32"><text:span text:style-name="T11"><text:s/>5 <text:s/>| <text:s text:c="3"/></text:span><text:span text:style-name="T12"><text:s text:c="2"/></text:span><text:span text:style-name="T13">"permissions"</text:span><text:span text:style-name="T14">:</text:span><text:span text:style-name="T12"> </text:span><text:span text:style-name="T14">[</text:span><text:span text:style-name="T16">"storage"</text:span><text:span text:style-name="T14">,</text:span><text:span text:style-name="T12"> </text:span><text:span text:style-name="T16">"clipboardWrite"</text:span><text:span text:style-name="T14">],</text:span></text:p>
      <text:p text:style-name="P32"><text:span text:style-name="T11"><text:s/>6 <text:s/>| <text:s text:c="3"/></text:span><text:span text:style-name="T12"><text:s text:c="2"/></text:span><text:span text:style-name="T13">"author"</text:span><text:span text:style-name="T14">:</text:span><text:span text:style-name="T12"> </text:span><text:span text:style-name="T16">"Пахомов Владимир Юрьевич 467036"</text:span><text:span text:style-name="T14">,</text:span></text:p>
      <text:p text:style-name="P33"><text:s/>7 <text:s/>| <text:s text:c="3"/></text:p>
      <text:p text:style-name="P32"><text:span text:style-name="T11"><text:s/>8 <text:s/>| <text:s text:c="3"/></text:span><text:span text:style-name="T12"><text:s text:c="2"/></text:span><text:span text:style-name="T13">"description"</text:span><text:span text:style-name="T14">:</text:span><text:span text:style-name="T12"> </text:span><text:span text:style-name="T16">"Генератор QR-кодов для ссылок"</text:span><text:span text:style-name="T14">,</text:span></text:p>
      <text:p text:style-name="P33"><text:s/>9 <text:s/>| <text:s text:c="3"/></text:p>
      <text:p text:style-name="P32"><text:span text:style-name="T11">10 <text:s/>| <text:s text:c="3"/></text:span><text:span text:style-name="T12"><text:s text:c="2"/></text:span><text:span text:style-name="T13">"action"</text:span><text:span text:style-name="T14">:</text:span><text:span text:style-name="T12"> </text:span><text:span text:style-name="T14">{</text:span></text:p>
      <text:p text:style-name="P32"><text:span text:style-name="T11">11 <text:s/>| <text:s text:c="3"/></text:span><text:span text:style-name="T12"><text:s text:c="4"/></text:span><text:span text:style-name="T13">"default_popup"</text:span><text:span text:style-name="T14">:</text:span><text:span text:style-name="T12"> </text:span><text:span text:style-name="T16">"popup.html"</text:span><text:span text:style-name="T14">,</text:span></text:p>
      <text:p text:style-name="P32"><text:span text:style-name="T11">12 <text:s/>| <text:s text:c="3"/></text:span><text:span text:style-name="T12"><text:s text:c="4"/></text:span><text:span text:style-name="T13">"default_title"</text:span><text:span text:style-name="T14">:</text:span><text:span text:style-name="T12"> </text:span><text:span text:style-name="T16">"QR-code generator"</text:span></text:p>
      <text:p text:style-name="P32"><text:span text:style-name="T11">13 <text:s/>| <text:s text:c="3"/></text:span><text:span text:style-name="T12"><text:s text:c="2"/></text:span><text:span text:style-name="T14">}</text:span></text:p>
      <text:p text:style-name="P31"><text:span text:style-name="T11">14 <text:s/>| <text:s text:c="3"/></text:span>}</text:p>
      <text:p text:style-name="P30"/>
      <text:p text:style-name="P34">Исходный код popup.html:</text:p>
      <text:p text:style-name="P35"><text:span text:style-name="T17"><text:s/>1 <text:s/>| <text:s text:c="3"/></text:span>&lt;!doctype html&gt;</text:p>
      <text:p text:style-name="P36"><text:span text:style-name="T11"><text:s/>2 <text:s/>| <text:s text:c="3"/></text:span><text:span text:style-name="T14">&lt;</text:span><text:span text:style-name="T13">html</text:span><text:span text:style-name="T14"> </text:span><text:span text:style-name="T16">lang</text:span><text:span text:style-name="T15">=</text:span><text:span text:style-name="T16">"ru"</text:span><text:span text:style-name="T14">&gt;</text:span></text:p>
      <text:p text:style-name="P36"><text:span text:style-name="T11"><text:s/>3 <text:s/>| <text:s text:c="3"/></text:span><text:span text:style-name="T14"><text:s text:c="2"/>&lt;</text:span><text:span text:style-name="T13">head</text:span><text:span text:style-name="T14">&gt;</text:span></text:p>
      <text:p text:style-name="P36"><text:span text:style-name="T11"><text:s/>4 <text:s/>| <text:s text:c="3"/></text:span><text:span text:style-name="T14"><text:s text:c="4"/>&lt;</text:span><text:span text:style-name="T13">meta</text:span><text:span text:style-name="T14"> </text:span><text:span text:style-name="T16">charset</text:span><text:span text:style-name="T15">=</text:span><text:span text:style-name="T16">"UTF-8"</text:span><text:span text:style-name="T14"> /&gt;</text:span></text:p>
      <text:p text:style-name="P36"><text:span text:style-name="T11"><text:s/>5 <text:s/>| <text:s text:c="3"/></text:span><text:span text:style-name="T14"><text:s text:c="4"/>&lt;</text:span><text:span text:style-name="T13">meta</text:span><text:span text:style-name="T14"> </text:span><text:span text:style-name="T16">name</text:span><text:span text:style-name="T15">=</text:span><text:span text:style-name="T16">"viewport"</text:span><text:span text:style-name="T14"> </text:span><text:span text:style-name="T16">content</text:span><text:span text:style-name="T15">=</text:span><text:span text:style-name="T16">"width=device-width, initial-scale=1.0"</text:span><text:span text:style-name="T14"> /&gt;</text:span></text:p>
      <text:p text:style-name="P36"><text:span text:style-name="T11"><text:s/>6 <text:s/>| <text:s text:c="3"/></text:span><text:span text:style-name="T14"><text:s text:c="4"/>&lt;</text:span><text:span text:style-name="T13">link</text:span><text:span text:style-name="T14"> </text:span><text:span text:style-name="T16">rel</text:span><text:span text:style-name="T15">=</text:span><text:span text:style-name="T16">"stylesheet"</text:span><text:span text:style-name="T14"> </text:span><text:span text:style-name="T16">href</text:span><text:span text:style-name="T15">=</text:span><text:span text:style-name="T16">"style.css"</text:span><text:span text:style-name="T14"> /&gt;</text:span></text:p>
      <text:p text:style-name="P36"><text:span text:style-name="T11"><text:s/>7 <text:s/>| <text:s text:c="3"/></text:span><text:span text:style-name="T14"><text:s text:c="4"/>&lt;</text:span><text:span text:style-name="T13">title</text:span><text:span text:style-name="T14">&gt;Генератор QR-кодов&lt;/</text:span><text:span text:style-name="T13">title</text:span><text:span text:style-name="T14">&gt;</text:span></text:p>
      <text:p text:style-name="P36"><text:span text:style-name="T11"><text:s/>8 <text:s/>| <text:s text:c="3"/></text:span><text:span text:style-name="T14"><text:s text:c="2"/>&lt;/</text:span><text:span text:style-name="T13">head</text:span><text:span text:style-name="T14">&gt;</text:span></text:p>
      <text:p text:style-name="P36"><text:span text:style-name="T11"><text:s/>9 <text:s/>| <text:s text:c="3"/></text:span><text:span text:style-name="T14"><text:s text:c="2"/>&lt;</text:span><text:span text:style-name="T13">body</text:span><text:span text:style-name="T14">&gt;</text:span></text:p>
      <text:p text:style-name="P36"><text:span text:style-name="T11">10 <text:s/>| <text:s text:c="3"/></text:span><text:span text:style-name="T14"><text:s text:c="4"/>&lt;</text:span><text:span text:style-name="T13">h1</text:span><text:span text:style-name="T14">&gt;Генератор QR-кодов&lt;/</text:span><text:span text:style-name="T13">h1</text:span><text:span text:style-name="T14">&gt;</text:span></text:p>
      <text:p text:style-name="P36"><text:span text:style-name="T11">11 <text:s/>| <text:s text:c="3"/></text:span><text:span text:style-name="T14"><text:s text:c="4"/>&lt;</text:span><text:span text:style-name="T13">label</text:span><text:span text:style-name="T14"> </text:span><text:span text:style-name="T16">for</text:span><text:span text:style-name="T15">=</text:span><text:span text:style-name="T16">"link-input"</text:span><text:span text:style-name="T14">&gt;Ссылка&lt;/</text:span><text:span text:style-name="T13">label</text:span><text:span text:style-name="T14">&gt;</text:span></text:p>
      <text:p text:style-name="P36"><text:span text:style-name="T11">12 <text:s/>| <text:s text:c="3"/></text:span><text:span text:style-name="T14"><text:s text:c="4"/>&lt;</text:span><text:span text:style-name="T13">input</text:span><text:span text:style-name="T14"> </text:span><text:span text:style-name="T16">type</text:span><text:span text:style-name="T15">=</text:span><text:span text:style-name="T16">"text"</text:span><text:span text:style-name="T14"> </text:span><text:span text:style-name="T16">id</text:span><text:span text:style-name="T15">=</text:span><text:span text:style-name="T16">"link-input"</text:span><text:span text:style-name="T14"> </text:span><text:span text:style-name="T16">placeholder</text:span><text:span text:style-name="T15">=</text:span><text:span text:style-name="T16">"Вставьте ссылку"</text:span><text:span text:style-name="T14"> /&gt;</text:span></text:p>
      <text:p text:style-name="P37">13 <text:s/>| <text:s text:c="3"/></text:p>
      <text:p text:style-name="P36"><text:span text:style-name="T11">14 <text:s/>| <text:s text:c="3"/></text:span><text:span text:style-name="T14"><text:s text:c="4"/>&lt;</text:span><text:span text:style-name="T13">button</text:span><text:span text:style-name="T14"> </text:span><text:span text:style-name="T16">id</text:span><text:span text:style-name="T15">=</text:span><text:span text:style-name="T16">"generate-btn"</text:span><text:span text:style-name="T14"> </text:span><text:span text:style-name="T16">disabled</text:span><text:span text:style-name="T14">&gt;Сгенерировать&lt;/</text:span><text:span text:style-name="T13">button</text:span><text:span text:style-name="T14">&gt;</text:span></text:p>
      <text:p text:style-name="P36"><text:span text:style-name="T11">15 <text:s/>| <text:s text:c="3"/></text:span><text:span text:style-name="T14"><text:s text:c="4"/>&lt;</text:span><text:span text:style-name="T13">p</text:span><text:span text:style-name="T14"> </text:span><text:span text:style-name="T16">id</text:span><text:span text:style-name="T15">=</text:span><text:span text:style-name="T16">"status-message"</text:span><text:span text:style-name="T14">&gt;&lt;/</text:span><text:span text:style-name="T13">p</text:span><text:span text:style-name="T14">&gt;</text:span></text:p>
      <text:p text:style-name="P36"><text:span text:style-name="T11">16 <text:s/>| <text:s text:c="3"/></text:span><text:span text:style-name="T14"><text:s text:c="4"/>&lt;</text:span><text:span text:style-name="T13">img</text:span><text:span text:style-name="T14"> </text:span><text:span text:style-name="T16">src</text:span><text:span text:style-name="T15">=</text:span><text:span text:style-name="T16">""</text:span><text:span text:style-name="T14"> </text:span><text:span text:style-name="T16">id</text:span><text:span text:style-name="T15">=</text:span><text:span text:style-name="T16">"qr-code"</text:span><text:span text:style-name="T14"> /&gt;</text:span></text:p>
      <text:p text:style-name="P37">17 <text:s/>| <text:s text:c="3"/></text:p>
      <text:p text:style-name="P36"><text:span text:style-name="T11">18 <text:s/>| <text:s text:c="3"/></text:span><text:span text:style-name="T14"><text:s text:c="4"/>&lt;</text:span><text:span text:style-name="T13">script</text:span><text:span text:style-name="T14"> </text:span><text:span text:style-name="T16">src</text:span><text:span text:style-name="T15">=</text:span><text:span text:style-name="T16">"popup.js"</text:span><text:span text:style-name="T14">&gt;&lt;/</text:span><text:span text:style-name="T13">script</text:span><text:span text:style-name="T14">&gt;</text:span></text:p>
      <text:p text:style-name="P36"><text:span text:style-name="T11">19 <text:s/>| <text:s text:c="3"/></text:span><text:span text:style-name="T14"><text:s text:c="2"/>&lt;/</text:span><text:span text:style-name="T13">body</text:span><text:span text:style-name="T14">&gt;</text:span></text:p>
      <text:p text:style-name="P36"><text:span text:style-name="T11">20 <text:s/>| <text:s text:c="3"/></text:span><text:span text:style-name="T14">&lt;/</text:span><text:span text:style-name="T13">html</text:span><text:span text:style-name="T14">&gt;</text:span></text:p>
      <text:p text:style-name="P30"/>
      <text:p text:style-name="P30">Исходный код popup.js:</text:p>
      <text:p text:style-name="P38"><text:span text:style-name="T11"><text:s/>1 <text:s/>| <text:s text:c="3"/></text:span><text:span text:style-name="T18">const</text:span><text:span text:style-name="T12"> </text:span><text:span text:style-name="T14">button</text:span><text:span text:style-name="T12"> </text:span><text:span text:style-name="T15">=</text:span><text:span text:style-name="T12"> </text:span><text:span text:style-name="T19">document</text:span><text:span text:style-name="T14">.getElementById(</text:span><text:span text:style-name="T16">"generate-btn"</text:span><text:span text:style-name="T14">);</text:span></text:p>
      <text:p text:style-name="P38"><text:span text:style-name="T11"><text:s/>2 <text:s/>| <text:s text:c="3"/></text:span><text:span text:style-name="T18">const</text:span><text:span text:style-name="T12"> </text:span><text:span text:style-name="T14">linkInput</text:span><text:span text:style-name="T12"> </text:span><text:span text:style-name="T15">=</text:span><text:span text:style-name="T12"> </text:span><text:span text:style-name="T19">document</text:span><text:span text:style-name="T14">.getElementById(</text:span><text:span text:style-name="T16">"link-input"</text:span><text:span text:style-name="T14">);</text:span></text:p>
      <text:p text:style-name="P38"><text:span text:style-name="T11"><text:s/>3 <text:s/>| <text:s text:c="3"/></text:span><text:span text:style-name="T18">const</text:span><text:span text:style-name="T12"> </text:span><text:span text:style-name="T14">qrCodeImg</text:span><text:span text:style-name="T12"> </text:span><text:span text:style-name="T15">=</text:span><text:span text:style-name="T12"> </text:span><text:span text:style-name="T19">document</text:span><text:span text:style-name="T14">.getElementById(</text:span><text:span text:style-name="T16">"qr-code"</text:span><text:span text:style-name="T14">);</text:span></text:p>
      <text:p text:style-name="P38"><text:span text:style-name="T11"><text:s/>4 <text:s/>| <text:s text:c="3"/></text:span><text:span text:style-name="T18">const</text:span><text:span text:style-name="T12"> </text:span><text:span text:style-name="T14">statusMessage</text:span><text:span text:style-name="T12"> </text:span><text:span text:style-name="T15">=</text:span><text:span text:style-name="T12"> </text:span><text:span text:style-name="T19">document</text:span><text:span text:style-name="T14">.getElementById(</text:span><text:span text:style-name="T16">"status-message"</text:span><text:span text:style-name="T14">);</text:span></text:p>
      <text:p text:style-name="P39"><text:s/>5 <text:s/>| <text:s text:c="3"/></text:p>
      <text:p text:style-name="P38"><text:span text:style-name="T11"><text:s/>6 <text:s/>| <text:s text:c="3"/></text:span><text:span text:style-name="T18">let</text:span><text:span text:style-name="T12"> </text:span><text:span text:style-name="T14">blob;</text:span></text:p>
      <text:p text:style-name="P39"><text:s/>7 <text:s/>| <text:s text:c="3"/></text:p>
      <text:p text:style-name="P38"><text:span text:style-name="T11"><text:s/>8 <text:s/>| <text:s text:c="3"/></text:span><text:span text:style-name="T18">function</text:span><text:span text:style-name="T12"> </text:span><text:span text:style-name="T14">copyToClipboard()</text:span><text:span text:style-name="T12"> </text:span><text:span text:style-name="T14">{</text:span></text:p>
      <text:p text:style-name="P38"><text:span text:style-name="T11"><text:s/>9 <text:s/>| <text:s text:c="3"/></text:span><text:span text:style-name="T12"><text:s text:c="2"/></text:span><text:span text:style-name="T18">if</text:span><text:span text:style-name="T12"> </text:span><text:span text:style-name="T14">(</text:span><text:span text:style-name="T15">!</text:span><text:span text:style-name="T14">blob)</text:span><text:span text:style-name="T12"> </text:span><text:span text:style-name="T18">return</text:span><text:span text:style-name="T14">;</text:span></text:p>
      <text:p text:style-name="P38"><text:span text:style-name="T11">10 <text:s/>| <text:s text:c="3"/></text:span><text:span text:style-name="T12"><text:s text:c="2"/></text:span><text:span text:style-name="T14">navigator.clipboard.write([</text:span></text:p>
      <text:p text:style-name="P38"><text:span text:style-name="T11">11 <text:s/>| <text:s text:c="3"/></text:span><text:span text:style-name="T12"><text:s text:c="4"/></text:span><text:span text:style-name="T18">new</text:span><text:span text:style-name="T12"> </text:span><text:span text:style-name="T14">ClipboardItem({</text:span></text:p>
      <text:p text:style-name="P38"><text:span text:style-name="T11">12 <text:s/>| <text:s text:c="3"/></text:span><text:span text:style-name="T12"><text:s text:c="6"/></text:span><text:span text:style-name="T16">"image/png"</text:span><text:span text:style-name="T15">:</text:span><text:span text:style-name="T12"> </text:span><text:span text:style-name="T14">blob,</text:span></text:p>
      <text:p text:style-name="P38"><text:span text:style-name="T11">13 <text:s/>| <text:s text:c="3"/></text:span><text:span text:style-name="T12"><text:s text:c="4"/></text:span><text:span text:style-name="T14">}),</text:span></text:p>
      <text:p text:style-name="P38"><text:span text:style-name="T11">14 <text:s/>| <text:s text:c="3"/></text:span><text:span text:style-name="T12"><text:s text:c="2"/></text:span><text:span text:style-name="T14">]);</text:span></text:p>
      <text:p text:style-name="P40"><text:span text:style-name="T11">15 <text:s/>| <text:s text:c="3"/></text:span>}</text:p>
      <text:p text:style-name="P39">16 <text:s/>| <text:s text:c="3"/></text:p>
      <text:p text:style-name="P38"><text:span text:style-name="T11">17 <text:s/>| <text:s text:c="3"/></text:span><text:span text:style-name="T18">function</text:span><text:span text:style-name="T12"> </text:span><text:span text:style-name="T14">validateURL(link)</text:span><text:span text:style-name="T12"> </text:span><text:span text:style-name="T14">{</text:span></text:p>
      <text:p text:style-name="P38"><text:span text:style-name="T11">18 <text:s/>| <text:s text:c="3"/></text:span><text:span text:style-name="T12"><text:s text:c="2"/></text:span><text:span text:style-name="T18">try</text:span><text:span text:style-name="T12"> </text:span><text:span text:style-name="T14">{</text:span></text:p>
      <text:p text:style-name="P38"><text:span text:style-name="T11">19 <text:s/>| <text:s text:c="3"/></text:span><text:span text:style-name="T12"><text:s text:c="4"/></text:span><text:span text:style-name="T18">const</text:span><text:span text:style-name="T12"> </text:span><text:span text:style-name="T14">url</text:span><text:span text:style-name="T12"> </text:span><text:span text:style-name="T15">=</text:span><text:span text:style-name="T12"> </text:span><text:span text:style-name="T18">new</text:span><text:span text:style-name="T12"> </text:span><text:span text:style-name="T14">URL(link);</text:span></text:p>
      <text:p text:style-name="P38"><text:span text:style-name="T11">20 <text:s/>| <text:s text:c="3"/></text:span><text:span text:style-name="T12"><text:s text:c="4"/></text:span><text:span text:style-name="T18">return</text:span><text:span text:style-name="T12"> </text:span><text:span text:style-name="T14">url.protocol</text:span><text:span text:style-name="T12"> </text:span><text:span text:style-name="T15">&amp;&amp;</text:span><text:span text:style-name="T12"> </text:span><text:span text:style-name="T14">url.hostname;</text:span></text:p>
      <text:p text:style-name="P38"><text:span text:style-name="T11">21 <text:s/>| <text:s text:c="3"/></text:span><text:span text:style-name="T12"><text:s text:c="2"/></text:span><text:span text:style-name="T14">}</text:span><text:span text:style-name="T12"> </text:span><text:span text:style-name="T18">catch</text:span><text:span text:style-name="T12"> </text:span><text:span text:style-name="T14">(e)</text:span><text:span text:style-name="T12"> </text:span><text:span text:style-name="T14">{</text:span></text:p>
      <text:p text:style-name="P38"><text:span text:style-name="T11">22 <text:s/>| <text:s text:c="3"/></text:span><text:span text:style-name="T12"><text:s text:c="4"/></text:span><text:span text:style-name="T18">return</text:span><text:span text:style-name="T12"> </text:span><text:span text:style-name="T18">false</text:span><text:span text:style-name="T14">;</text:span></text:p>
      <text:p text:style-name="P38"><text:span text:style-name="T11">23 <text:s/>| <text:s text:c="3"/></text:span><text:span text:style-name="T12"><text:s text:c="2"/></text:span><text:span text:style-name="T14">}</text:span></text:p>
      <text:p text:style-name="P40"><text:span text:style-name="T11">24 <text:s/>| <text:s text:c="3"/></text:span>}</text:p>
      <text:p text:style-name="P39">25 <text:s/>| <text:s text:c="3"/></text:p>
      <text:p text:style-name="P38"><text:span text:style-name="T11">26 <text:s/>| <text:s text:c="3"/></text:span><text:span text:style-name="T18">async</text:span><text:span text:style-name="T12"> </text:span><text:span text:style-name="T18">function</text:span><text:span text:style-name="T12"> </text:span><text:span text:style-name="T14">fetchQR(link)</text:span><text:span text:style-name="T12"> </text:span><text:span text:style-name="T14">{</text:span></text:p>
      <text:p text:style-name="P38"><text:span text:style-name="T11">27 <text:s/>| <text:s text:c="3"/></text:span><text:span text:style-name="T12"><text:s text:c="2"/></text:span><text:span text:style-name="T18">const</text:span><text:span text:style-name="T12"> </text:span><text:span text:style-name="T14">qrURL</text:span><text:span text:style-name="T12"> </text:span><text:span text:style-name="T15">=</text:span><text:span text:style-name="T12"> </text:span><text:span text:style-name="T16">`https://api.qrserver.com/v1/create-qr-code/?size=300x300&amp;data=</text:span><text:span text:style-name="T20">${</text:span><text:span text:style-name="T14">link</text:span><text:span text:style-name="T20">}</text:span><text:span text:style-name="T16">`</text:span><text:span text:style-name="T14">;</text:span></text:p>
      <text:p text:style-name="P39">28 <text:s/>| <text:s text:c="3"/></text:p>
      <text:p text:style-name="P38"><text:span text:style-name="T11">29 <text:s/>| <text:s text:c="3"/></text:span><text:span text:style-name="T12"><text:s text:c="2"/></text:span><text:span text:style-name="T18">try</text:span><text:span text:style-name="T12"> </text:span><text:span text:style-name="T14">{</text:span></text:p>
      <text:p text:style-name="P38"><text:span text:style-name="T11">30 <text:s/>| <text:s text:c="3"/></text:span><text:span text:style-name="T12"><text:s text:c="4"/></text:span><text:span text:style-name="T18">const</text:span><text:span text:style-name="T12"> </text:span><text:span text:style-name="T14">response</text:span><text:span text:style-name="T12"> </text:span><text:span text:style-name="T15">=</text:span><text:span text:style-name="T12"> </text:span><text:span text:style-name="T18">await</text:span><text:span text:style-name="T12"> </text:span><text:span text:style-name="T14">fetch(qrURL);</text:span></text:p>
      <text:p text:style-name="P38"><text:span text:style-name="T11">31 <text:s/>| <text:s text:c="3"/></text:span><text:span text:style-name="T12"><text:s text:c="4"/></text:span><text:span text:style-name="T14">blob</text:span><text:span text:style-name="T12"> </text:span><text:span text:style-name="T15">=</text:span><text:span text:style-name="T12"> </text:span><text:span text:style-name="T18">await</text:span><text:span text:style-name="T12"> </text:span><text:span text:style-name="T14">response.blob();</text:span></text:p>
      <text:p text:style-name="P38"><text:span text:style-name="T11">32 <text:s/>| <text:s text:c="3"/></text:span><text:span text:style-name="T12"><text:s text:c="4"/></text:span><text:span text:style-name="T18">const</text:span><text:span text:style-name="T12"> </text:span><text:span text:style-name="T14">imgURL</text:span><text:span text:style-name="T12"> </text:span><text:span text:style-name="T15">=</text:span><text:span text:style-name="T12"> </text:span><text:span text:style-name="T14">URL.createObjectURL(blob);</text:span></text:p>
      <text:p text:style-name="P39">33 <text:s/>| <text:s text:c="3"/></text:p>
      <text:p text:style-name="P38"><text:span text:style-name="T11">34 <text:s/>| <text:s text:c="3"/></text:span><text:span text:style-name="T12"><text:s text:c="4"/></text:span><text:span text:style-name="T14">qrCodeImg.src</text:span><text:span text:style-name="T12"> </text:span><text:span text:style-name="T15">=</text:span><text:span text:style-name="T12"> </text:span><text:span text:style-name="T14">imgURL;</text:span></text:p>
      <text:p text:style-name="P39">35 <text:s/>| <text:s text:c="3"/></text:p>
      <text:p text:style-name="P38"><text:span text:style-name="T11">36 <text:s/>| <text:s text:c="3"/></text:span><text:span text:style-name="T12"><text:s text:c="4"/></text:span><text:span text:style-name="T14">statusMessage.textContent</text:span><text:span text:style-name="T12"> </text:span><text:span text:style-name="T15">=</text:span><text:span text:style-name="T12"> </text:span><text:span text:style-name="T16">"Нажмите для копирования QR-кода"</text:span><text:span text:style-name="T14">;</text:span></text:p>
      <text:p text:style-name="P38"><text:span text:style-name="T11">37 <text:s/>| <text:s text:c="3"/></text:span><text:span text:style-name="T12"><text:s text:c="2"/></text:span><text:span text:style-name="T14">}</text:span><text:span text:style-name="T12"> </text:span><text:span text:style-name="T18">catch</text:span><text:span text:style-name="T12"> </text:span><text:span text:style-name="T14">(e)</text:span><text:span text:style-name="T12"> </text:span><text:span text:style-name="T14">{</text:span></text:p>
      <text:p text:style-name="P38"><text:span text:style-name="T11">38 <text:s/>| <text:s text:c="3"/></text:span><text:span text:style-name="T12"><text:s text:c="4"/></text:span><text:span text:style-name="T14">statusMessage.textContent</text:span><text:span text:style-name="T12"> </text:span><text:span text:style-name="T15">=</text:span><text:span text:style-name="T12"> </text:span><text:span text:style-name="T16">"Ошибка загрузки QR-кода: "</text:span><text:span text:style-name="T12"> </text:span><text:span text:style-name="T15">+</text:span><text:span text:style-name="T12"> </text:span><text:span text:style-name="T14">e.message;</text:span></text:p>
      <text:p text:style-name="P38"><text:span text:style-name="T11">39 <text:s/>| <text:s text:c="3"/></text:span><text:span text:style-name="T12"><text:s text:c="2"/></text:span><text:span text:style-name="T14">}</text:span></text:p>
      <text:p text:style-name="P40"><text:span text:style-name="T11">40 <text:s/>| <text:s text:c="3"/></text:span>}</text:p>
      <text:p text:style-name="P39">41 <text:s/>| <text:s text:c="3"/></text:p>
      <text:p text:style-name="P38"><text:span text:style-name="T11">42 <text:s/>| <text:s text:c="3"/></text:span><text:span text:style-name="T14">button.addEventListener(</text:span><text:span text:style-name="T16">"click"</text:span><text:span text:style-name="T14">,</text:span><text:span text:style-name="T12"> </text:span><text:span text:style-name="T14">()</text:span><text:span text:style-name="T12"> </text:span><text:span text:style-name="T14">=&gt;</text:span><text:span text:style-name="T12"> </text:span><text:span text:style-name="T14">{</text:span></text:p>
      <text:p text:style-name="P38"><text:soft-page-break/><text:span text:style-name="T11">43 <text:s/>| <text:s text:c="3"/></text:span><text:span text:style-name="T12"><text:s text:c="2"/></text:span><text:span text:style-name="T18">const</text:span><text:span text:style-name="T12"> </text:span><text:span text:style-name="T14">link</text:span><text:span text:style-name="T12"> </text:span><text:span text:style-name="T15">=</text:span><text:span text:style-name="T12"> </text:span><text:span text:style-name="T14">linkInput.value;</text:span></text:p>
      <text:p text:style-name="P39">44 <text:s/>| <text:s text:c="3"/></text:p>
      <text:p text:style-name="P38"><text:span text:style-name="T11">45 <text:s/>| <text:s text:c="3"/></text:span><text:span text:style-name="T12"><text:s text:c="2"/></text:span><text:span text:style-name="T18">if</text:span><text:span text:style-name="T12"> </text:span><text:span text:style-name="T14">(</text:span><text:span text:style-name="T15">!</text:span><text:span text:style-name="T14">validateURL(link))</text:span><text:span text:style-name="T12"> </text:span><text:span text:style-name="T14">{</text:span></text:p>
      <text:p text:style-name="P38"><text:span text:style-name="T11">46 <text:s/>| <text:s text:c="3"/></text:span><text:span text:style-name="T12"><text:s text:c="4"/></text:span><text:span text:style-name="T14">statusMessage.textContent</text:span><text:span text:style-name="T12"> </text:span><text:span text:style-name="T15">=</text:span><text:span text:style-name="T12"> </text:span><text:span text:style-name="T16">"Пожалуйста, введите корректную ссылку"</text:span><text:span text:style-name="T14">;</text:span></text:p>
      <text:p text:style-name="P38"><text:span text:style-name="T11">47 <text:s/>| <text:s text:c="3"/></text:span><text:span text:style-name="T12"><text:s text:c="4"/></text:span><text:span text:style-name="T14">qrCodeImg.src</text:span><text:span text:style-name="T12"> </text:span><text:span text:style-name="T15">=</text:span><text:span text:style-name="T12"> </text:span><text:span text:style-name="T16">""</text:span><text:span text:style-name="T14">;</text:span></text:p>
      <text:p text:style-name="P38"><text:span text:style-name="T11">48 <text:s/>| <text:s text:c="3"/></text:span><text:span text:style-name="T12"><text:s text:c="4"/></text:span><text:span text:style-name="T18">return</text:span><text:span text:style-name="T14">;</text:span></text:p>
      <text:p text:style-name="P38"><text:span text:style-name="T11">49 <text:s/>| <text:s text:c="3"/></text:span><text:span text:style-name="T12"><text:s text:c="2"/></text:span><text:span text:style-name="T14">}</text:span><text:span text:style-name="T12"> </text:span><text:span text:style-name="T18">else</text:span><text:span text:style-name="T12"> </text:span><text:span text:style-name="T14">{</text:span></text:p>
      <text:p text:style-name="P38"><text:span text:style-name="T11">50 <text:s/>| <text:s text:c="3"/></text:span><text:span text:style-name="T12"><text:s text:c="4"/></text:span><text:span text:style-name="T14">fetchQR(link);</text:span></text:p>
      <text:p text:style-name="P38"><text:span text:style-name="T11">51 <text:s/>| <text:s text:c="3"/></text:span><text:span text:style-name="T12"><text:s text:c="2"/></text:span><text:span text:style-name="T14">}</text:span></text:p>
      <text:p text:style-name="P40"><text:span text:style-name="T11">52 <text:s/>| <text:s text:c="3"/></text:span>});</text:p>
      <text:p text:style-name="P39">53 <text:s/>| <text:s text:c="3"/></text:p>
      <text:p text:style-name="P38"><text:span text:style-name="T11">54 <text:s/>| <text:s text:c="3"/></text:span><text:span text:style-name="T14">qrCodeImg.addEventListener(</text:span><text:span text:style-name="T16">"mouseover"</text:span><text:span text:style-name="T14">,</text:span><text:span text:style-name="T12"> </text:span><text:span text:style-name="T14">()</text:span><text:span text:style-name="T12"> </text:span><text:span text:style-name="T14">=&gt;</text:span><text:span text:style-name="T12"> </text:span><text:span text:style-name="T14">{</text:span></text:p>
      <text:p text:style-name="P38"><text:span text:style-name="T11">55 <text:s/>| <text:s text:c="3"/></text:span><text:span text:style-name="T12"><text:s text:c="2"/></text:span><text:span text:style-name="T14">qrCodeImg.title</text:span><text:span text:style-name="T12"> </text:span><text:span text:style-name="T15">=</text:span><text:span text:style-name="T12"> </text:span><text:span text:style-name="T16">"Скопировать"</text:span><text:span text:style-name="T14">;</text:span></text:p>
      <text:p text:style-name="P40"><text:span text:style-name="T11">56 <text:s/>| <text:s text:c="3"/></text:span>});</text:p>
      <text:p text:style-name="P39">57 <text:s/>| <text:s text:c="3"/></text:p>
      <text:p text:style-name="P38"><text:span text:style-name="T11">58 <text:s/>| <text:s text:c="3"/></text:span><text:span text:style-name="T14">qrCodeImg.addEventListener(</text:span><text:span text:style-name="T16">"click"</text:span><text:span text:style-name="T14">,</text:span><text:span text:style-name="T12"> </text:span><text:span text:style-name="T18">async</text:span><text:span text:style-name="T12"> </text:span><text:span text:style-name="T14">()</text:span><text:span text:style-name="T12"> </text:span><text:span text:style-name="T14">=&gt;</text:span><text:span text:style-name="T12"> </text:span><text:span text:style-name="T14">{</text:span></text:p>
      <text:p text:style-name="P38"><text:span text:style-name="T11">59 <text:s/>| <text:s text:c="3"/></text:span><text:span text:style-name="T12"><text:s text:c="2"/></text:span><text:span text:style-name="T18">if</text:span><text:span text:style-name="T12"> </text:span><text:span text:style-name="T14">(</text:span><text:span text:style-name="T15">!</text:span><text:span text:style-name="T14">blob</text:span><text:span text:style-name="T12"> </text:span><text:span text:style-name="T15">||</text:span><text:span text:style-name="T12"> </text:span><text:span text:style-name="T14">qrCodeImg.src</text:span><text:span text:style-name="T12"> </text:span><text:span text:style-name="T15">===</text:span><text:span text:style-name="T12"> </text:span><text:span text:style-name="T16">""</text:span><text:span text:style-name="T14">)</text:span><text:span text:style-name="T12"> </text:span><text:span text:style-name="T18">return</text:span><text:span text:style-name="T14">;</text:span></text:p>
      <text:p text:style-name="P38"><text:span text:style-name="T11">60 <text:s/>| <text:s text:c="3"/></text:span><text:span text:style-name="T12"><text:s text:c="2"/></text:span><text:span text:style-name="T14">copyToClipboard();</text:span></text:p>
      <text:p text:style-name="P38"><text:span text:style-name="T11">61 <text:s/>| <text:s text:c="3"/></text:span><text:span text:style-name="T12"><text:s text:c="2"/></text:span><text:span text:style-name="T14">statusMessage.textContent</text:span><text:span text:style-name="T12"> </text:span><text:span text:style-name="T15">=</text:span><text:span text:style-name="T12"> </text:span><text:span text:style-name="T16">"QR-код скопирован в буфер обмена!"</text:span><text:span text:style-name="T14">;</text:span></text:p>
      <text:p text:style-name="P40"><text:span text:style-name="T11">62 <text:s/>| <text:s text:c="3"/></text:span>});</text:p>
      <text:p text:style-name="P39">63 <text:s/>| <text:s text:c="3"/></text:p>
      <text:p text:style-name="P38"><text:span text:style-name="T11">64 <text:s/>| <text:s text:c="3"/></text:span><text:span text:style-name="T14">linkInput.addEventListener(</text:span><text:span text:style-name="T16">"input"</text:span><text:span text:style-name="T14">,</text:span><text:span text:style-name="T12"> </text:span><text:span text:style-name="T14">()</text:span><text:span text:style-name="T12"> </text:span><text:span text:style-name="T14">=&gt;</text:span><text:span text:style-name="T12"> </text:span><text:span text:style-name="T14">{</text:span></text:p>
      <text:p text:style-name="P38"><text:span text:style-name="T11">65 <text:s/>| <text:s text:c="3"/></text:span><text:span text:style-name="T12"><text:s text:c="2"/></text:span><text:span text:style-name="T18">if</text:span><text:span text:style-name="T12"> </text:span><text:span text:style-name="T14">(validateURL(linkInput.value))</text:span><text:span text:style-name="T12"> </text:span><text:span text:style-name="T14">{</text:span></text:p>
      <text:p text:style-name="P38"><text:span text:style-name="T11">66 <text:s/>| <text:s text:c="3"/></text:span><text:span text:style-name="T12"><text:s text:c="4"/></text:span><text:span text:style-name="T14">button.disabled</text:span><text:span text:style-name="T12"> </text:span><text:span text:style-name="T15">=</text:span><text:span text:style-name="T12"> </text:span><text:span text:style-name="T18">false</text:span><text:span text:style-name="T14">;</text:span></text:p>
      <text:p text:style-name="P38"><text:span text:style-name="T11">67 <text:s/>| <text:s text:c="3"/></text:span><text:span text:style-name="T12"><text:s text:c="2"/></text:span><text:span text:style-name="T14">}</text:span><text:span text:style-name="T12"> </text:span><text:span text:style-name="T18">else</text:span><text:span text:style-name="T12"> </text:span><text:span text:style-name="T14">{</text:span></text:p>
      <text:p text:style-name="P38"><text:span text:style-name="T11">68 <text:s/>| <text:s text:c="3"/></text:span><text:span text:style-name="T12"><text:s text:c="4"/></text:span><text:span text:style-name="T14">button.disabled</text:span><text:span text:style-name="T12"> </text:span><text:span text:style-name="T15">=</text:span><text:span text:style-name="T12"> </text:span><text:span text:style-name="T18">true</text:span><text:span text:style-name="T14">;</text:span></text:p>
      <text:p text:style-name="P38"><text:span text:style-name="T11">69 <text:s/>| <text:s text:c="3"/></text:span><text:span text:style-name="T12"><text:s text:c="2"/></text:span><text:span text:style-name="T14">}</text:span></text:p>
      <text:p text:style-name="P40"><text:span text:style-name="T11">70 <text:s/>| <text:s text:c="3"/></text:span>});</text:p>
      <text:p text:style-name="P41"/>
      <text:p text:style-name="P42">Исходный код style.css:</text:p>
      <text:p text:style-name="P43"><text:span text:style-name="T11"><text:s/>1 <text:s/>| <text:s text:c="3"/></text:span><text:span text:style-name="T13">body</text:span><text:span text:style-name="T12"> </text:span><text:span text:style-name="T14">{</text:span></text:p>
      <text:p text:style-name="P43"><text:span text:style-name="T11"><text:s/>2 <text:s/>| <text:s text:c="3"/></text:span><text:span text:style-name="T12"><text:s text:c="2"/></text:span><text:span text:style-name="T18">width</text:span><text:span text:style-name="T14">:</text:span><text:span text:style-name="T12"> </text:span><text:span text:style-name="T15">300</text:span><text:span text:style-name="T21">px</text:span><text:span text:style-name="T14">;</text:span></text:p>
      <text:p text:style-name="P43"><text:span text:style-name="T11"><text:s/>3 <text:s/>| <text:s text:c="3"/></text:span><text:span text:style-name="T12"><text:s text:c="2"/></text:span><text:span text:style-name="T18">display</text:span><text:span text:style-name="T14">:</text:span><text:span text:style-name="T12"> </text:span><text:span text:style-name="T18">flex</text:span><text:span text:style-name="T14">;</text:span></text:p>
      <text:p text:style-name="P43"><text:span text:style-name="T11"><text:s/>4 <text:s/>| <text:s text:c="3"/></text:span><text:span text:style-name="T12"><text:s text:c="2"/></text:span><text:span text:style-name="T18">flex-direction</text:span><text:span text:style-name="T14">:</text:span><text:span text:style-name="T12"> </text:span><text:span text:style-name="T18">column</text:span><text:span text:style-name="T14">;</text:span></text:p>
      <text:p text:style-name="P43"><text:span text:style-name="T11"><text:s/>5 <text:s/>| <text:s text:c="3"/></text:span><text:span text:style-name="T12"><text:s text:c="2"/></text:span><text:span text:style-name="T18">gap</text:span><text:span text:style-name="T14">:</text:span><text:span text:style-name="T12"> </text:span><text:span text:style-name="T15">10</text:span><text:span text:style-name="T21">px</text:span><text:span text:style-name="T14">;</text:span></text:p>
      <text:p text:style-name="P43"><text:span text:style-name="T11"><text:s/>6 <text:s/>| <text:s text:c="3"/></text:span><text:span text:style-name="T12"><text:s text:c="2"/></text:span><text:span text:style-name="T18">padding</text:span><text:span text:style-name="T14">:</text:span><text:span text:style-name="T12"> </text:span><text:span text:style-name="T15">10</text:span><text:span text:style-name="T21">px</text:span><text:span text:style-name="T14">;</text:span></text:p>
      <text:p text:style-name="P43"><text:span text:style-name="T11"><text:s/>7 <text:s/>| <text:s text:c="3"/></text:span><text:span text:style-name="T12"><text:s text:c="2"/></text:span><text:span text:style-name="T18">border-radius</text:span><text:span text:style-name="T14">:</text:span><text:span text:style-name="T12"> </text:span><text:span text:style-name="T15">0.5</text:span><text:span text:style-name="T21">rem</text:span><text:span text:style-name="T14">;</text:span></text:p>
      <text:p text:style-name="P43"><text:span text:style-name="T11"><text:s/>8 <text:s/>| <text:s text:c="3"/></text:span><text:span text:style-name="T12"><text:s text:c="2"/></text:span><text:span text:style-name="T18">font-family</text:span><text:span text:style-name="T14">:</text:span><text:span text:style-name="T12"> </text:span><text:span text:style-name="T18">monospace</text:span><text:span text:style-name="T14">;</text:span></text:p>
      <text:p text:style-name="P43"><text:span text:style-name="T11"><text:s/>9 <text:s/>| <text:s text:c="3"/></text:span><text:span text:style-name="T12"><text:s text:c="2"/></text:span><text:span text:style-name="T18">font-size</text:span><text:span text:style-name="T14">:</text:span><text:span text:style-name="T12"> </text:span><text:span text:style-name="T15">1.03</text:span><text:span text:style-name="T21">rem</text:span><text:span text:style-name="T14">;</text:span></text:p>
      <text:p text:style-name="P44"><text:span text:style-name="T11">10 <text:s/>| <text:s text:c="3"/></text:span>}</text:p>
      <text:p text:style-name="P45">11 <text:s/>| <text:s text:c="3"/></text:p>
      <text:p text:style-name="P43"><text:span text:style-name="T11">12 <text:s/>| <text:s text:c="3"/></text:span><text:span text:style-name="T13">h1</text:span><text:span text:style-name="T12"> </text:span><text:span text:style-name="T14">{</text:span></text:p>
      <text:p text:style-name="P43"><text:span text:style-name="T11">13 <text:s/>| <text:s text:c="3"/></text:span><text:span text:style-name="T12"><text:s text:c="2"/></text:span><text:span text:style-name="T18">font-size</text:span><text:span text:style-name="T14">:</text:span><text:span text:style-name="T12"> </text:span><text:span text:style-name="T15">24</text:span><text:span text:style-name="T21">px</text:span><text:span text:style-name="T14">;</text:span></text:p>
      <text:p text:style-name="P43"><text:span text:style-name="T11">14 <text:s/>| <text:s text:c="3"/></text:span><text:span text:style-name="T12"><text:s text:c="2"/></text:span><text:span text:style-name="T18">margin</text:span><text:span text:style-name="T14">:</text:span><text:span text:style-name="T12"> </text:span><text:span text:style-name="T15">0</text:span><text:span text:style-name="T14">;</text:span></text:p>
      <text:p text:style-name="P43"><text:span text:style-name="T11">15 <text:s/>| <text:s text:c="3"/></text:span><text:span text:style-name="T12"><text:s text:c="2"/></text:span><text:span text:style-name="T18">text-align</text:span><text:span text:style-name="T14">:</text:span><text:span text:style-name="T12"> </text:span><text:span text:style-name="T18">center</text:span><text:span text:style-name="T14">;</text:span></text:p>
      <text:p text:style-name="P44"><text:span text:style-name="T11">16 <text:s/>| <text:s text:c="3"/></text:span>}</text:p>
      <text:p text:style-name="P45">17 <text:s/>| <text:s text:c="3"/></text:p>
      <text:p text:style-name="P43"><text:span text:style-name="T11">18 <text:s/>| <text:s text:c="3"/></text:span><text:span text:style-name="T14">#</text:span><text:span text:style-name="T22">link-input</text:span><text:span text:style-name="T12"> </text:span><text:span text:style-name="T14">{</text:span></text:p>
      <text:p text:style-name="P43"><text:span text:style-name="T11">19 <text:s/>| <text:s text:c="3"/></text:span><text:span text:style-name="T12"><text:s text:c="2"/></text:span><text:span text:style-name="T18">padding</text:span><text:span text:style-name="T14">:</text:span><text:span text:style-name="T12"> </text:span><text:span text:style-name="T15">0.5</text:span><text:span text:style-name="T21">rem</text:span><text:span text:style-name="T14">;</text:span></text:p>
      <text:p text:style-name="P43"><text:span text:style-name="T11">20 <text:s/>| <text:s text:c="3"/></text:span><text:span text:style-name="T12"><text:s text:c="2"/></text:span><text:span text:style-name="T18">border-radius</text:span><text:span text:style-name="T14">:</text:span><text:span text:style-name="T12"> </text:span><text:span text:style-name="T15">0.5</text:span><text:span text:style-name="T21">rem</text:span><text:span text:style-name="T14">;</text:span></text:p>
      <text:p text:style-name="P43"><text:span text:style-name="T11">21 <text:s/>| <text:s text:c="3"/></text:span><text:span text:style-name="T12"><text:s text:c="2"/></text:span><text:span text:style-name="T18">border</text:span><text:span text:style-name="T14">:</text:span><text:span text:style-name="T12"> </text:span><text:span text:style-name="T15">1</text:span><text:span text:style-name="T21">px</text:span><text:span text:style-name="T12"> </text:span><text:span text:style-name="T18">solid</text:span><text:span text:style-name="T12"> </text:span><text:span text:style-name="T15">#ccc</text:span><text:span text:style-name="T14">;</text:span></text:p>
      <text:p text:style-name="P44"><text:span text:style-name="T11">22 <text:s/>| <text:s text:c="3"/></text:span>}</text:p>
      <text:p text:style-name="P45">23 <text:s/>| <text:s text:c="3"/></text:p>
      <text:p text:style-name="P43"><text:span text:style-name="T11">24 <text:s/>| <text:s text:c="3"/></text:span><text:span text:style-name="T14">#</text:span><text:span text:style-name="T22">qr-code</text:span><text:span text:style-name="T12"> </text:span><text:span text:style-name="T14">{</text:span></text:p>
      <text:p text:style-name="P43"><text:span text:style-name="T11">25 <text:s/>| <text:s text:c="3"/></text:span><text:span text:style-name="T12"><text:s text:c="2"/></text:span><text:span text:style-name="T18">cursor</text:span><text:span text:style-name="T14">:</text:span><text:span text:style-name="T12"> </text:span><text:span text:style-name="T18">pointer</text:span><text:span text:style-name="T14">;</text:span></text:p>
      <text:p text:style-name="P44"><text:span text:style-name="T11">26 <text:s/>| <text:s text:c="3"/></text:span>}</text:p>
      <text:p text:style-name="P45">27 <text:s/>| <text:s text:c="3"/></text:p>
      <text:p text:style-name="P43"><text:span text:style-name="T11">28 <text:s/>| <text:s text:c="3"/></text:span><text:span text:style-name="T14">#</text:span><text:span text:style-name="T22">generate-btn</text:span><text:span text:style-name="T12"> </text:span><text:span text:style-name="T14">{</text:span></text:p>
      <text:p text:style-name="P43"><text:span text:style-name="T11">29 <text:s/>| <text:s text:c="3"/></text:span><text:span text:style-name="T12"><text:s text:c="2"/></text:span><text:span text:style-name="T18">width</text:span><text:span text:style-name="T14">:</text:span><text:span text:style-name="T12"> </text:span><text:span text:style-name="T14">fit-content;</text:span></text:p>
      <text:p text:style-name="P43"><text:span text:style-name="T11">30 <text:s/>| <text:s text:c="3"/></text:span><text:span text:style-name="T12"><text:s text:c="2"/></text:span><text:span text:style-name="T18">align-self</text:span><text:span text:style-name="T14">:</text:span><text:span text:style-name="T12"> </text:span><text:span text:style-name="T18">center</text:span><text:span text:style-name="T14">;</text:span></text:p>
      <text:p text:style-name="P43"><text:span text:style-name="T11">31 <text:s/>| <text:s text:c="3"/></text:span><text:span text:style-name="T12"><text:s text:c="2"/></text:span><text:span text:style-name="T18">border-radius</text:span><text:span text:style-name="T14">:</text:span><text:span text:style-name="T12"> </text:span><text:span text:style-name="T15">1</text:span><text:span text:style-name="T21">rem</text:span><text:span text:style-name="T14">;</text:span></text:p>
      <text:p text:style-name="P43"><text:span text:style-name="T11">32 <text:s/>| <text:s text:c="3"/></text:span><text:span text:style-name="T12"><text:s text:c="2"/></text:span><text:span text:style-name="T18">border</text:span><text:span text:style-name="T14">:</text:span><text:span text:style-name="T12"> </text:span><text:span text:style-name="T18">none</text:span><text:span text:style-name="T14">;</text:span></text:p>
      <text:p text:style-name="P43"><text:span text:style-name="T11">33 <text:s/>| <text:s text:c="3"/></text:span><text:span text:style-name="T12"><text:s text:c="2"/></text:span><text:span text:style-name="T18">padding</text:span><text:span text:style-name="T14">:</text:span><text:span text:style-name="T12"> </text:span><text:span text:style-name="T15">0.5</text:span><text:span text:style-name="T21">rem</text:span><text:span text:style-name="T12"> </text:span><text:span text:style-name="T15">1</text:span><text:span text:style-name="T21">rem</text:span><text:span text:style-name="T14">;</text:span></text:p>
      <text:p text:style-name="P43"><text:span text:style-name="T11">34 <text:s/>| <text:s text:c="3"/></text:span><text:span text:style-name="T12"><text:s text:c="2"/></text:span><text:span text:style-name="T18">background-color</text:span><text:span text:style-name="T14">:</text:span><text:span text:style-name="T12"> </text:span><text:span text:style-name="T18">deepskyblue</text:span><text:span text:style-name="T14">;</text:span></text:p>
      <text:p text:style-name="P43"><text:span text:style-name="T11">35 <text:s/>| <text:s text:c="3"/></text:span><text:span text:style-name="T12"><text:s text:c="2"/></text:span><text:span text:style-name="T18">transition</text:span><text:span text:style-name="T14">:</text:span><text:span text:style-name="T12"> </text:span><text:span text:style-name="T18">background-color</text:span><text:span text:style-name="T12"> </text:span><text:span text:style-name="T15">0.3</text:span><text:span text:style-name="T21">s</text:span><text:span text:style-name="T14">;</text:span></text:p>
      <text:p text:style-name="P43"><text:span text:style-name="T11">36 <text:s/>| <text:s text:c="3"/></text:span><text:span text:style-name="T12"><text:s text:c="2"/></text:span><text:span text:style-name="T18">cursor</text:span><text:span text:style-name="T14">:</text:span><text:span text:style-name="T12"> </text:span><text:span text:style-name="T18">pointer</text:span><text:span text:style-name="T14">;</text:span></text:p>
      <text:p text:style-name="P43"><text:span text:style-name="T11">37 <text:s/>| <text:s text:c="3"/></text:span><text:span text:style-name="T12"><text:s text:c="2"/></text:span><text:span text:style-name="T18">font-family</text:span><text:span text:style-name="T14">:</text:span><text:span text:style-name="T12"> </text:span><text:span text:style-name="T18">monospace</text:span><text:span text:style-name="T14">;</text:span></text:p>
      <text:p text:style-name="P44"><text:soft-page-break/><text:span text:style-name="T11">38 <text:s/>| <text:s text:c="3"/></text:span>}</text:p>
      <text:p text:style-name="P45">39 <text:s/>| <text:s text:c="3"/></text:p>
      <text:p text:style-name="P43"><text:span text:style-name="T11">40 <text:s/>| <text:s text:c="3"/></text:span><text:span text:style-name="T14">#</text:span><text:span text:style-name="T22">generate-btn</text:span><text:span text:style-name="T14">:</text:span><text:span text:style-name="T19">hover</text:span><text:span text:style-name="T12"> </text:span><text:span text:style-name="T14">{</text:span></text:p>
      <text:p text:style-name="P43"><text:span text:style-name="T11">41 <text:s/>| <text:s text:c="3"/></text:span><text:span text:style-name="T12"><text:s text:c="2"/></text:span><text:span text:style-name="T18">background-color</text:span><text:span text:style-name="T14">:</text:span><text:span text:style-name="T12"> </text:span><text:span text:style-name="T18">dodgerblue</text:span><text:span text:style-name="T14">;</text:span></text:p>
      <text:p text:style-name="P44"><text:span text:style-name="T11">42 <text:s/>| <text:s text:c="3"/></text:span>}</text:p>
      <text:p text:style-name="P41"/>
      <text:p text:style-name="P41"><text:bookmark text:name="__RefHeading___Toc143_2058273410 Copy 1 Copy 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ца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Code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style:font-name="Liberation Mono" fo:font-family="'Liberation Mono'" style:font-family-generic="modern" style:font-pitch="fixed" fo:font-size="8pt" officeooo:rsid="0097f467" style:font-size-asian="8pt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3.5cm" fo:margin-right="1.499cm" style:writing-mode="lr-tb" style:layout-grid-color="#c0c0c0" style:layout-grid-lines="43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3.5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9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Landscape" style:page-layout-name="Mpm4" draw:style-name="Mdp1">
      <style:footer>
        <text:p text:style-name="MP1"><text:bookmark-start text:name="PageNumWizard_FOOTER_Landscape19"/><text:page-number text:select-page="current">0</text:page-number><text:bookmark-end text:name="PageNumWizard_FOOTER_Landscape19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6T15:54:10.970395995</meta:creation-date>
    <dc:date>2026-05-27T01:24:05.200135308</dc:date>
    <meta:editing-duration>P1DT10H7M34S</meta:editing-duration>
    <meta:editing-cycles>107</meta:editing-cycles>
    <meta:generator>LibreOffice/26.2.3.2$Linux_X86_64 LibreOffice_project/620$Build-2</meta:generator>
    <meta:print-date>2026-03-14T12:41:01.714635128</meta:print-date>
    <meta:printed-by>PDF files</meta:printed-by>
    <meta:document-statistic meta:table-count="0" meta:image-count="4" meta:object-count="0" meta:page-count="9" meta:paragraph-count="186" meta:word-count="918" meta:character-count="6724" meta:non-whitespace-character-count="5112"/>
  </office:meta>
</office:document-meta>
</file>