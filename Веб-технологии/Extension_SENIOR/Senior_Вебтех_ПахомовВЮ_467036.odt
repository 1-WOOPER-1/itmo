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9000000C5999E6DF6.png" manifest:media-type="image/png"/>
  <manifest:file-entry manifest:full-path="Pictures/100000010000009D000000CCA3B43538.png" manifest:media-type="image/png"/>
  <manifest:file-entry manifest:full-path="Pictures/10000001000002940000011F78FEF2CF.png" manifest:media-type="image/png"/>
  <manifest:file-entry manifest:full-path="Pictures/100000010000009E000000CC9B8B2180.png" manifest:media-type="image/png"/>
  <manifest:file-entry manifest:full-path="Pictures/100000010000047A00000217731613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98dad8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98dad8" officeooo:paragraph-rsid="0098dad8"/>
    </style:style>
    <style:style style:name="P7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8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9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10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3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5" style:family="paragraph" style:parent-style-name="Contents_20_1">
      <style:paragraph-properties fo:line-height="150%">
        <style:tab-stops>
          <style:tab-stop style:position="16.5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90def4" officeooo:paragraph-rsid="0090def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90def4" officeooo:paragraph-rsid="0090def4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font-weight="bold" officeooo:rsid="0090def4" officeooo:paragraph-rsid="0090def4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0def4" officeooo:paragraph-rsid="0090def4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90def4"/>
    </style:style>
    <style:style style:name="P2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9515c5" officeooo:paragraph-rsid="009515c5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911619"/>
    </style:style>
    <style:style style:name="P23" style:family="paragraph" style:parent-style-name="Text_20_body" style:list-style-name="L1">
      <loext:graphic-properties draw:fill="none"/>
      <style:paragraph-properties fo:margin-top="0cm" fo:margin-bottom="0.25cm" style:contextual-spacing="false" fo:line-height="150%" fo:text-align="justify" style:justify-single-word="false" fo:background-color="transparent"/>
      <style:text-properties officeooo:rsid="00925e2e" officeooo:paragraph-rsid="00925e2e"/>
    </style:style>
    <style:style style:name="P24" style:family="paragraph" style:parent-style-name="Text_20_body" style:list-style-name="L1">
      <loext:graphic-properties draw:fill="none"/>
      <style:paragraph-properties fo:margin-top="0cm" fo:margin-bottom="0.25cm" style:contextual-spacing="false" fo:line-height="150%" fo:text-align="justify" style:justify-single-word="false" fo:background-color="transparent"/>
      <style:text-properties officeooo:rsid="00a1af26" officeooo:paragraph-rsid="00a1af26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9256" officeooo:paragraph-rsid="009d1f2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a1af26" officeooo:paragraph-rsid="00a1af26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11619" officeooo:paragraph-rsid="00a1af26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a276e0" officeooo:paragraph-rsid="00a276e0"/>
    </style:style>
    <style:style style:name="P29" style:family="paragraph" style:parent-style-name="Drawing">
      <style:paragraph-properties fo:text-align="center" style:justify-single-word="false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a276e0" officeooo:paragraph-rsid="00a276e0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a2e8d7" officeooo:paragraph-rsid="00a2e8d7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 fo:background-color="transparent"/>
      <style:text-properties officeooo:rsid="0097f467" officeooo:paragraph-rsid="0097f467"/>
    </style:style>
    <style:style style:name="P33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4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5" style:family="paragraph" style:parent-style-name="Code">
      <style:paragraph-properties ch2_options="{'Style': 'emacs', 'Language': 'JSON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97f467" officeooo:paragraph-rsid="0097f467"/>
    </style:style>
    <style:style style:name="P37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language="zxx" fo:country="none" fo:font-style="normal" style:text-underline-style="none" fo:font-weight="normal" fo:background-color="transparent"/>
    </style:style>
    <style:style style:name="P38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9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40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1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8800" loext:opacity="100%" fo:font-size="8pt" fo:language="zxx" fo:country="none" fo:font-style="normal" style:text-underline-style="none" fo:font-weight="normal" fo:background-color="transparent"/>
    </style:style>
    <style:style style:name="P42" style:family="paragraph" style:parent-style-name="Code">
      <style:paragraph-properties ch2_options="{'Style': 'emacs', 'Language': 'JavaScript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28636d" officeooo:paragraph-rsid="0097f467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9e935c" officeooo:paragraph-rsid="009e935c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officeooo:rsid="00a48277" officeooo:paragraph-rsid="00a48277"/>
    </style:style>
    <style:style style:name="P46" style:family="paragraph" style:parent-style-name="Code">
      <style:paragraph-properties ch2_options="{'Style': 'emacs', 'Language': 'HTML', 'UseCharStyles': 0, 'LineNumberRatio': 100, 'LineNumberStart': 1, 'MasterCharStyle': '', 'ShowLineNumbers': 1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98dad8"/>
    </style:style>
    <style:style style:name="T3" style:family="text">
      <style:text-properties officeooo:rsid="00394161"/>
    </style:style>
    <style:style style:name="T4" style:family="text">
      <style:text-properties officeooo:rsid="00a01da2"/>
    </style:style>
    <style:style style:name="T5" style:family="text">
      <style:text-properties officeooo:rsid="0016960e"/>
    </style:style>
    <style:style style:name="T6" style:family="text">
      <style:text-properties officeooo:rsid="0097f467"/>
    </style:style>
    <style:style style:name="T7" style:family="text">
      <style:text-properties officeooo:rsid="00925e2e"/>
    </style:style>
    <style:style style:name="T8" style:family="text">
      <style:text-properties officeooo:rsid="00a1af26"/>
    </style:style>
    <style:style style:name="T9" style:family="text">
      <style:text-properties officeooo:rsid="009d1f2d"/>
    </style:style>
    <style:style style:name="T10" style:family="text">
      <style:text-properties officeooo:rsid="00a276e0"/>
    </style:style>
    <style:style style:name="T11" style:family="text">
      <style:text-properties fo:color="#008800" loext:opacity="100%" fo:font-size="8pt"/>
    </style:style>
    <style:style style:name="T12" style:family="text">
      <style:text-properties fo:color="#bbbbbb" loext:opacity="100%"/>
    </style:style>
    <style:style style:name="T13" style:family="text">
      <style:text-properties fo:color="#008000" loext:opacity="100%" fo:font-weight="bold"/>
    </style:style>
    <style:style style:name="T14" style:family="text">
      <style:text-properties fo:color="#000000" loext:opacity="100%"/>
    </style:style>
    <style:style style:name="T15" style:family="text">
      <style:text-properties fo:color="#666666" loext:opacity="100%"/>
    </style:style>
    <style:style style:name="T16" style:family="text">
      <style:text-properties fo:color="#bb4444" loext:opacity="100%"/>
    </style:style>
    <style:style style:name="T17" style:family="text">
      <style:text-properties fo:color="#aa22ff" loext:opacity="100%" fo:font-weight="bold"/>
    </style:style>
    <style:style style:name="T18" style:family="text">
      <style:text-properties fo:font-size="8pt"/>
    </style:style>
    <style:style style:name="T19" style:family="text">
      <style:text-properties fo:color="#aa22ff" loext:opacity="100%"/>
    </style:style>
    <style:style style:name="T20" style:family="text">
      <style:text-properties fo:color="#bb6688" loext:opacity="100%"/>
    </style:style>
    <style:style style:name="T21" style:family="text">
      <style:text-properties officeooo:rsid="00a48277"/>
    </style:style>
    <style:style style:name="T22" style:family="text">
      <style:text-properties fo:color="#bb6688" loext:opacity="100%" fo:font-weight="bold"/>
    </style:style>
    <style:style style:name="T23" style:family="text">
      <style:text-properties fo:color="#00bb00" loext:opacity="100%" fo:font-weight="bold"/>
    </style:style>
    <style:style style:name="T24" style:family="text">
      <style:text-properties fo:color="#008800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ListLabel_20_1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ListLabel_20_2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Веб-технологии</text:span>»</text:p>
      <text:p text:style-name="P3"/>
      <text:p text:style-name="P3"/>
      <text:p text:style-name="P5">ОТЧ<text:span text:style-name="T3">Ё</text:span>Т ПО <text:span text:style-name="T2">РАЗРАБОТКЕ БРАУЗЕРНОГО</text:span></text:p>
      <text:p text:style-name="P6">РАСШИРЕНИЯ УРОВНЯ <text:span text:style-name="T4">SENIOR</text:span></text:p>
      <text:p text:style-name="P3"/>
      <text:p text:style-name="P7">Выполнил:</text:p>
      <text:p text:style-name="P7">Пахомов Владимир Юрьевич, студент группы N3250</text:p>
      <text:p text:style-name="P7"><draw:frame draw:style-name="fr1" draw:name="Изображение4" text:anchor-type="char" svg:x="13.548cm" svg:y="-0.093cm" svg:width="3.212cm" svg:height="1.499cm" draw:z-index="0"><draw:image xlink:href="Pictures/100000010000047A0000021773161342.png" xlink:type="simple" xlink:show="embed" xlink:actuate="onLoad" draw:mime-type="image/png"/></draw:frame></text:p>
      <text:p text:style-name="P8"/>
      <text:p text:style-name="P9">________________</text:p>
      <text:p text:style-name="P10">(подпись)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/>
      <text:p text:style-name="P12">Санкт-Петербург</text:p>
      <text:p text:style-name="P12">202<text:span text:style-name="T5">6</text:span>.</text:p>
      <text:h text:style-name="P13" text:outline-level="1"><text:bookmark-start text:name="__RefHeading___Toc80_2058273410"/>СОДЕРЖАНИЕ<text:bookmark-end text:name="__RefHeading___Toc80_2058273410"/></text:h>
      <text:p text:style-name="P14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80_2058273410" office:name="СОДЕРЖАНИЕ" text:style-name="Index_20_Link" text:visited-style-name="Index_20_Link">СОДЕРЖАНИЕ<text:tab/>2</text:a></text:p>
          <text:p text:style-name="P15"><text:a xlink:type="simple" xlink:href="#__RefHeading___Toc82_2058273410" office:name="ЗАДАНИЕ SENIOR" text:style-name="Index_20_Link" text:visited-style-name="Index_20_Link">ЗАДАНИЕ SENIOR<text:tab/>3</text:a></text:p>
          <text:p text:style-name="P15"><text:a xlink:type="simple" xlink:href="#__RefHeading___Toc82_2058273410%20%D0%9A%D0%BE%D0%BF%D0%B8%D1%8F%203" office:name="ОПИСАНИЕ АЛГОРИТМА РАБОТЫ" text:style-name="Index_20_Link" text:visited-style-name="Index_20_Link">ОПИСАНИЕ АЛГОРИТМА РАБОТЫ<text:tab/>4</text:a></text:p>
        </text:index-body>
      </text:table-of-content>
      <text:p text:style-name="P14"/>
      <text:h text:style-name="P16" text:outline-level="1"><text:bookmark-start text:name="__RefHeading___Toc82_2058273410"/>ЗАДАНИЕ <text:span text:style-name="T4">SENIOR</text:span><text:bookmark-end text:name="__RefHeading___Toc82_2058273410"/></text:h>
      <text:p text:style-name="P17">Вариант задания: (467036 mod <text:span text:style-name="T4">3</text:span>) + 1 = <text:span text:style-name="T4">3</text:span></text:p>
      <text:p text:style-name="P18">Вариант №3 – контроль активности</text:p>
      <text:p text:style-name="P19">Необходимо написать браузерное расширение, которое считает сколько времени пользователь провел на определенном сайте. Также должна быть страница настроек, где можно добавлять или убирать ранее добавленные URL с указанием времени, например 10 минут в день. Если времени на этом URL проведено больше, чем указано, то страницу больше невозможно открыть и пользователю выводится информация, что его лимит на сегодня исчерпан. Если он находится сейчас на этой странице, то тогда информация выводится моментально и просмотр страницы прекращается. Важно, чтобы указанные URL работали на весь сайт, то есть если пользователь укажет, например, ссылку на конкретное видео в YouTube, то ограничение будет все равно на весь YouTube. </text:p>
      <text:p text:style-name="P19"/>
      <text:p text:style-name="P20"/>
      <text:h text:style-name="P21" text:outline-level="1"><text:bookmark-start text:name="__RefHeading___Toc82_2058273410 Копия 3"/>ОПИСАНИЕ АЛГОРИТМА РАБОТЫ<text:bookmark-end text:name="__RefHeading___Toc82_2058273410 Копия 3"/></text:h>
      <text:p text:style-name="P22"><text:span text:style-name="T6">Расширение было написано для браузеров на основе Chromium и Firefox (в браузере Safari возможности протестировать не было). Структура файлов</text:span><text:span text:style-name="T7">:</text:span></text:p>
      <text:list text:style-name="L1">
        <text:list-item>
          <text:p text:style-name="P23">manifest.json - конфигурационный файл расширения;</text:p>
        </text:list-item>
        <text:list-item>
          <text:p text:style-name="P23">popup.html - файл разметки главного окна;</text:p>
        </text:list-item>
        <text:list-item>
          <text:p text:style-name="P23">popup.js - <text:span text:style-name="T8">скрипт для реализации функционала главного окна;</text:span></text:p>
        </text:list-item>
        <text:list-item>
          <text:p text:style-name="P24">background.js - скрипт для работы в фоне (проверка лимитов, реагирование на открытие, закрытие и обновление вкладок и т.д.);</text:p>
        </text:list-item>
        <text:list-item>
          <text:p text:style-name="P24">settings - папка с файлами страницы настроек;</text:p>
          <text:list>
            <text:list-item>
              <text:p text:style-name="P24">options.html - файл разметки страницы;</text:p>
            </text:list-item>
            <text:list-item>
              <text:p text:style-name="P24">options.js - скрипт с функционалом (добавление и удаление ссылок, настройка времени, сохранение настроек и т.д.);</text:p>
            </text:list-item>
          </text:list>
        </text:list-item>
        <text:list-item>
          <text:p text:style-name="P24">blocked - папка с файлами страницы блокировки;</text:p>
          <text:list>
            <text:list-item>
              <text:p text:style-name="P24">blocked.html - файл разметки;</text:p>
            </text:list-item>
            <text:list-item>
              <text:p text:style-name="P24">blocked.js - скрипт с функционалом (определение заблокированного ресурса и вывод информации);</text:p>
            </text:list-item>
          </text:list>
        </text:list-item>
      </text:list>
      <text:p text:style-name="P25">При нажатии на иконку расширения появляется небольшое окно, <text:span text:style-name="T9">в котором присутствует </text:span><text:span text:style-name="T8">кнопка "Открыть настройки", которая открывает страницу настроек расширения.</text:span></text:p>
      <text:p text:style-name="P26">На странице настроек можно добавить новые ссылки для отслеживания активности, также указать максимальное количество минут в день<text:span text:style-name="T10">, доступное</text:span> для посещения сайта. <text:span text:style-name="T10">При нажатии "Сохранить настройки" вся информация сохраняется в storage.sync.</text:span></text:p>
      <text:p text:style-name="P27"/>
      <text:p text:style-name="P27"/>
      <text:p text:style-name="P28"><draw:frame draw:style-name="fr2" draw:name="Врезка1" text:anchor-type="char" svg:width="16.591cm" draw:z-index="1"><draw:text-box fo:min-height="7.213cm"><text:p text:style-name="P29"><draw:frame draw:style-name="fr3" draw:name="Изображение1" text:anchor-type="paragraph" svg:width="16.591cm" style:rel-width="100%" svg:height="7.213cm" style:rel-height="scale" draw:z-index="2"><draw:image xlink:href="Pictures/10000001000002940000011F78FEF2CF.png" xlink:type="simple" xlink:show="embed" xlink:actuate="onLoad" draw:mime-type="image/png"/></draw:frame>Рисунок <text:sequence text:ref-name="refDrawing0" text:name="Drawing" text:formula="ooow:Drawing+1" style:num-format="1">1</text:sequence>: Страница настроек</text:p></draw:text-box></draw:frame>Главное окно расширения отображает информацию о текущем посещении страницы: время посещения и оставшееся время в минутах.</text:p>
      <text:p text:style-name="P30"><draw:frame draw:style-name="fr4" draw:name="Врезка2" text:anchor-type="char" svg:x="1.669cm" svg:y="-0.236cm" svg:width="5.549cm" draw:z-index="3"><draw:text-box fo:min-height="7.766cm"><text:p text:style-name="P29"><draw:frame draw:style-name="fr3" draw:name="Изображение2" text:anchor-type="paragraph" svg:width="4.662cm" style:rel-width="84%" svg:height="6.057cm" style:rel-height="scale" draw:z-index="4"><draw:image xlink:href="Pictures/100000010000009D000000CCA3B43538.png" xlink:type="simple" xlink:show="embed" xlink:actuate="onLoad" draw:mime-type="image/png"/></draw:frame>Рисунок <text:sequence text:ref-name="refDrawing1" text:name="Drawing" text:formula="ooow:Drawing+1" style:num-format="1">2</text:sequence>: Окно с временем для отслеживаемого сайта</text:p></draw:text-box></draw:frame><draw:frame draw:style-name="fr5" draw:name="Врезка3" text:anchor-type="char" svg:x="9.333cm" svg:y="-0.185cm" svg:width="4.817cm" draw:z-index="5"><draw:text-box fo:min-height="7.627cm"><text:p text:style-name="P29"><draw:frame draw:style-name="fr3" draw:name="Изображение3" text:anchor-type="paragraph" svg:width="4.576cm" style:rel-width="95%" svg:height="5.907cm" style:rel-height="scale" draw:z-index="6"><draw:image xlink:href="Pictures/100000010000009E000000CC9B8B2180.png" xlink:type="simple" xlink:show="embed" xlink:actuate="onLoad" draw:mime-type="image/png"/></draw:frame>Рисунок <text:sequence text:ref-name="refDrawing2" text:name="Drawing" text:formula="ooow:Drawing+1" style:num-format="1">3</text:sequence>: Окно для неотслеживаемого сайта</text:p></draw:text-box></draw:frame>При достижении лимита по времени алгоритм будет постоянно перебрасывать пользователя на страницу с информацией о блокировке ресурса. Счётчик сбрасывается каждый день, поэтому для открытия страницы вновь нужно либо выжидать время, либо удалить сайт из настроек.</text:p>
      <text:p text:style-name="P27"><draw:frame draw:style-name="fr2" draw:name="Врезка4" text:anchor-type="char" svg:width="16.591cm" draw:z-index="7"><draw:text-box fo:min-height="5.161cm"><text:p text:style-name="P29"><draw:frame draw:style-name="fr3" draw:name="Изображение5" text:anchor-type="paragraph" svg:width="16.591cm" style:rel-width="100%" svg:height="5.161cm" style:rel-height="scale" draw:z-index="8"><draw:image xlink:href="Pictures/1000000100000279000000C5999E6DF6.png" xlink:type="simple" xlink:show="embed" xlink:actuate="onLoad" draw:mime-type="image/png"/></draw:frame>Рисунок <text:sequence text:ref-name="refDrawing3" text:name="Drawing" text:formula="ooow:Drawing+1" style:num-format="1">4</text:sequence>: Страница блокировки</text:p></draw:text-box></draw:frame><text:soft-page-break/></text:p>
      <text:p text:style-name="P31">Алгоритм работает на весь домен, а не на одну ссылку из домена. То есть при вводе ссылки https://www.youtube.com/watch?v=dQw4w9WgXcQ&amp;pp=ygUIcmlja3JvbGw%3D в настройках алгоритм будет работать для всего домена youtube.com. Также минуты не будут считаться, если вкладка не находится в активном состоянии.</text:p>
      <text:p text:style-name="P31">Расширение постоянно работает в фоне (background.js), чтобы слушать события открытия, обновления и закрытия вкладок, а также проверки на исчерпанные лимиты. Вся информация сохраняется в storage.sync (данные настроек) и в storage.local (данные об потраченных лимитах). Проверка происходит каждую секунду при срабатывании setInterval.</text:p>
      <text:p text:style-name="P27"/>
      <text:p text:style-name="P32">Исходный код manifest.json:</text:p>
      <text:p text:style-name="P33"><text:span text:style-name="T11"><text:s/>1 <text:s/>| <text:s text:c="3"/></text:span>{</text:p>
      <text:p text:style-name="P34"><text:span text:style-name="T11"><text:s/>2 <text:s/>| <text:s text:c="3"/></text:span><text:span text:style-name="T12"><text:s text:c="2"/></text:span><text:span text:style-name="T13">"manifest_version"</text:span><text:span text:style-name="T14">:</text:span><text:span text:style-name="T12"> </text:span><text:span text:style-name="T15">3</text:span><text:span text:style-name="T14">,</text:span></text:p>
      <text:p text:style-name="P34"><text:span text:style-name="T11"><text:s/>3 <text:s/>| <text:s text:c="3"/></text:span><text:span text:style-name="T12"><text:s text:c="2"/></text:span><text:span text:style-name="T13">"name"</text:span><text:span text:style-name="T14">:</text:span><text:span text:style-name="T12"> </text:span><text:span text:style-name="T16">"Контроль активности"</text:span><text:span text:style-name="T14">,</text:span></text:p>
      <text:p text:style-name="P34"><text:span text:style-name="T11"><text:s/>4 <text:s/>| <text:s text:c="3"/></text:span><text:span text:style-name="T12"><text:s text:c="2"/></text:span><text:span text:style-name="T13">"version"</text:span><text:span text:style-name="T14">:</text:span><text:span text:style-name="T12"> </text:span><text:span text:style-name="T16">"1.0"</text:span><text:span text:style-name="T14">,</text:span></text:p>
      <text:p text:style-name="P34"><text:span text:style-name="T11"><text:s/>5 <text:s/>| <text:s text:c="3"/></text:span><text:span text:style-name="T12"><text:s text:c="2"/></text:span><text:span text:style-name="T13">"permissions"</text:span><text:span text:style-name="T14">:</text:span><text:span text:style-name="T12"> </text:span><text:span text:style-name="T14">[</text:span><text:span text:style-name="T16">"storage"</text:span><text:span text:style-name="T14">,</text:span><text:span text:style-name="T12"> </text:span><text:span text:style-name="T16">"tabs"</text:span><text:span text:style-name="T14">,</text:span><text:span text:style-name="T12"> </text:span><text:span text:style-name="T16">"activeTab"</text:span><text:span text:style-name="T14">],</text:span></text:p>
      <text:p text:style-name="P34"><text:span text:style-name="T11"><text:s/>6 <text:s/>| <text:s text:c="3"/></text:span><text:span text:style-name="T12"><text:s text:c="2"/></text:span><text:span text:style-name="T13">"author"</text:span><text:span text:style-name="T14">:</text:span><text:span text:style-name="T12"> </text:span><text:span text:style-name="T16">"Пахомов Владимир Юрьевич 467036"</text:span><text:span text:style-name="T14">,</text:span></text:p>
      <text:p text:style-name="P34"><text:span text:style-name="T11"><text:s/>7 <text:s/>| <text:s text:c="3"/></text:span><text:span text:style-name="T12"><text:s text:c="2"/></text:span><text:span text:style-name="T13">"description"</text:span><text:span text:style-name="T14">:</text:span><text:span text:style-name="T12"> </text:span><text:span text:style-name="T16">"Расширение для контроля активности пользователя на определенных сайтах"</text:span><text:span text:style-name="T14">,</text:span></text:p>
      <text:p text:style-name="P35"><text:s/>8 <text:s/>| <text:s text:c="3"/></text:p>
      <text:p text:style-name="P34"><text:span text:style-name="T11"><text:s/>9 <text:s/>| <text:s text:c="3"/></text:span><text:span text:style-name="T12"><text:s text:c="2"/></text:span><text:span text:style-name="T13">"action"</text:span><text:span text:style-name="T14">:</text:span><text:span text:style-name="T12"> </text:span><text:span text:style-name="T14">{</text:span></text:p>
      <text:p text:style-name="P34"><text:span text:style-name="T11">10 <text:s/>| <text:s text:c="3"/></text:span><text:span text:style-name="T12"><text:s text:c="4"/></text:span><text:span text:style-name="T13">"default_popup"</text:span><text:span text:style-name="T14">:</text:span><text:span text:style-name="T12"> </text:span><text:span text:style-name="T16">"popup.html"</text:span><text:span text:style-name="T14">,</text:span></text:p>
      <text:p text:style-name="P34"><text:span text:style-name="T11">11 <text:s/>| <text:s text:c="3"/></text:span><text:span text:style-name="T12"><text:s text:c="4"/></text:span><text:span text:style-name="T13">"default_title"</text:span><text:span text:style-name="T14">:</text:span><text:span text:style-name="T12"> </text:span><text:span text:style-name="T16">"Control Activity"</text:span></text:p>
      <text:p text:style-name="P34"><text:span text:style-name="T11">12 <text:s/>| <text:s text:c="3"/></text:span><text:span text:style-name="T12"><text:s text:c="2"/></text:span><text:span text:style-name="T14">},</text:span></text:p>
      <text:p text:style-name="P35">13 <text:s/>| <text:s text:c="3"/></text:p>
      <text:p text:style-name="P34"><text:span text:style-name="T11">14 <text:s/>| <text:s text:c="3"/></text:span><text:span text:style-name="T12"><text:s text:c="2"/></text:span><text:span text:style-name="T13">"background"</text:span><text:span text:style-name="T14">:</text:span><text:span text:style-name="T12"> </text:span><text:span text:style-name="T14">{</text:span></text:p>
      <text:p text:style-name="P34"><text:span text:style-name="T11">15 <text:s/>| <text:s text:c="3"/></text:span><text:span text:style-name="T12"><text:s text:c="4"/></text:span><text:span text:style-name="T13">"service_worker"</text:span><text:span text:style-name="T14">:</text:span><text:span text:style-name="T12"> </text:span><text:span text:style-name="T16">"background.js"</text:span><text:span text:style-name="T14">,</text:span></text:p>
      <text:p text:style-name="P34"><text:span text:style-name="T11">16 <text:s/>| <text:s text:c="3"/></text:span><text:span text:style-name="T12"><text:s text:c="4"/></text:span><text:span text:style-name="T13">"scripts"</text:span><text:span text:style-name="T14">:</text:span><text:span text:style-name="T12"> </text:span><text:span text:style-name="T14">[</text:span><text:span text:style-name="T16">"background.js"</text:span><text:span text:style-name="T14">]</text:span></text:p>
      <text:p text:style-name="P34"><text:span text:style-name="T11">17 <text:s/>| <text:s text:c="3"/></text:span><text:span text:style-name="T12"><text:s text:c="2"/></text:span><text:span text:style-name="T14">},</text:span></text:p>
      <text:p text:style-name="P35">18 <text:s/>| <text:s text:c="3"/></text:p>
      <text:p text:style-name="P34"><text:span text:style-name="T11">19 <text:s/>| <text:s text:c="3"/></text:span><text:span text:style-name="T12"><text:s text:c="2"/></text:span><text:span text:style-name="T13">"options_ui"</text:span><text:span text:style-name="T14">:</text:span><text:span text:style-name="T12"> </text:span><text:span text:style-name="T14">{</text:span></text:p>
      <text:p text:style-name="P34"><text:span text:style-name="T11">20 <text:s/>| <text:s text:c="3"/></text:span><text:span text:style-name="T12"><text:s text:c="4"/></text:span><text:span text:style-name="T13">"page"</text:span><text:span text:style-name="T14">:</text:span><text:span text:style-name="T12"> </text:span><text:span text:style-name="T16">"settings/options.html"</text:span><text:span text:style-name="T14">,</text:span></text:p>
      <text:p text:style-name="P34"><text:span text:style-name="T11">21 <text:s/>| <text:s text:c="3"/></text:span><text:span text:style-name="T12"><text:s text:c="4"/></text:span><text:span text:style-name="T13">"open_in_tab"</text:span><text:span text:style-name="T14">:</text:span><text:span text:style-name="T12"> </text:span><text:span text:style-name="T17">true</text:span></text:p>
      <text:p text:style-name="P34"><text:span text:style-name="T11">22 <text:s/>| <text:s text:c="3"/></text:span><text:span text:style-name="T12"><text:s text:c="2"/></text:span><text:span text:style-name="T14">},</text:span></text:p>
      <text:p text:style-name="P35">23 <text:s/>| <text:s text:c="3"/></text:p>
      <text:p text:style-name="P34"><text:span text:style-name="T11">24 <text:s/>| <text:s text:c="3"/></text:span><text:span text:style-name="T12"><text:s text:c="2"/></text:span><text:span text:style-name="T13">"browser_specific_settings"</text:span><text:span text:style-name="T14">:</text:span><text:span text:style-name="T12"> </text:span><text:span text:style-name="T14">{</text:span></text:p>
      <text:p text:style-name="P34"><text:span text:style-name="T11">25 <text:s/>| <text:s text:c="3"/></text:span><text:span text:style-name="T12"><text:s text:c="4"/></text:span><text:span text:style-name="T13">"gecko"</text:span><text:span text:style-name="T14">:</text:span><text:span text:style-name="T12"> </text:span><text:span text:style-name="T14">{</text:span></text:p>
      <text:p text:style-name="P34"><text:span text:style-name="T11">26 <text:s/>| <text:s text:c="3"/></text:span><text:span text:style-name="T12"><text:s text:c="6"/></text:span><text:span text:style-name="T13">"id"</text:span><text:span text:style-name="T14">:</text:span><text:span text:style-name="T12"> </text:span><text:span text:style-name="T16">"@vladimir_pahomov_control_activity"</text:span></text:p>
      <text:p text:style-name="P34"><text:span text:style-name="T11">27 <text:s/>| <text:s text:c="3"/></text:span><text:span text:style-name="T12"><text:s text:c="4"/></text:span><text:span text:style-name="T14">}</text:span></text:p>
      <text:p text:style-name="P34"><text:span text:style-name="T11">28 <text:s/>| <text:s text:c="3"/></text:span><text:span text:style-name="T12"><text:s text:c="2"/></text:span><text:span text:style-name="T14">}</text:span></text:p>
      <text:p text:style-name="P33"><text:span text:style-name="T11">29 <text:s/>| <text:s text:c="3"/></text:span>}</text:p>
      <text:p text:style-name="P36"/>
      <text:p text:style-name="P32">Исходный код popup.html:</text:p>
      <text:p text:style-name="P37"><text:span text:style-name="T18"><text:s/>1 <text:s/>| <text:s text:c="3"/></text:span>&lt;!doctype html&gt;</text:p>
      <text:p text:style-name="P38"><text:span text:style-name="T11"><text:s/>2 <text:s/>| <text:s text:c="3"/></text:span><text:span text:style-name="T14">&lt;</text:span><text:span text:style-name="T13">html</text:span><text:span text:style-name="T14"> </text:span><text:span text:style-name="T16">lang</text:span><text:span text:style-name="T15">=</text:span><text:span text:style-name="T16">"ru"</text:span><text:span text:style-name="T14">&gt;</text:span></text:p>
      <text:p text:style-name="P38"><text:span text:style-name="T11"><text:s/>3 <text:s/>| <text:s text:c="3"/></text:span><text:span text:style-name="T14"><text:s text:c="2"/>&lt;</text:span><text:span text:style-name="T13">head</text:span><text:span text:style-name="T14">&gt;</text:span></text:p>
      <text:p text:style-name="P38"><text:span text:style-name="T11"><text:s/>4 <text:s/>| <text:s text:c="3"/></text:span><text:span text:style-name="T14"><text:s text:c="4"/>&lt;</text:span><text:span text:style-name="T13">meta</text:span><text:span text:style-name="T14"> </text:span><text:span text:style-name="T16">charset</text:span><text:span text:style-name="T15">=</text:span><text:span text:style-name="T16">"UTF-8"</text:span><text:span text:style-name="T14"> /&gt;</text:span></text:p>
      <text:p text:style-name="P38"><text:span text:style-name="T11"><text:s/>5 <text:s/>| <text:s text:c="3"/></text:span><text:span text:style-name="T14"><text:s text:c="4"/>&lt;</text:span><text:span text:style-name="T13">meta</text:span><text:span text:style-name="T14"> </text:span><text:span text:style-name="T16">name</text:span><text:span text:style-name="T15">=</text:span><text:span text:style-name="T16">"viewport"</text:span><text:span text:style-name="T14"> </text:span><text:span text:style-name="T16">content</text:span><text:span text:style-name="T15">=</text:span><text:span text:style-name="T16">"width=device-width, initial-scale=1.0"</text:span><text:span text:style-name="T14"> /&gt;</text:span></text:p>
      <text:p text:style-name="P38"><text:span text:style-name="T11"><text:s/>6 <text:s/>| <text:s text:c="3"/></text:span><text:span text:style-name="T14"><text:s text:c="4"/>&lt;</text:span><text:span text:style-name="T13">link</text:span><text:span text:style-name="T14"> </text:span><text:span text:style-name="T16">rel</text:span><text:span text:style-name="T15">=</text:span><text:span text:style-name="T16">"stylesheet"</text:span><text:span text:style-name="T14"> </text:span><text:span text:style-name="T16">href</text:span><text:span text:style-name="T15">=</text:span><text:span text:style-name="T16">"style.css"</text:span><text:span text:style-name="T14"> /&gt;</text:span></text:p>
      <text:p text:style-name="P38"><text:span text:style-name="T11"><text:s/>7 <text:s/>| <text:s text:c="3"/></text:span><text:span text:style-name="T14"><text:s text:c="4"/>&lt;</text:span><text:span text:style-name="T13">title</text:span><text:span text:style-name="T14">&gt;Контроль активности&lt;/</text:span><text:span text:style-name="T13">title</text:span><text:span text:style-name="T14">&gt;</text:span></text:p>
      <text:p text:style-name="P38"><text:span text:style-name="T11"><text:s/>8 <text:s/>| <text:s text:c="3"/></text:span><text:span text:style-name="T14"><text:s text:c="2"/>&lt;/</text:span><text:span text:style-name="T13">head</text:span><text:span text:style-name="T14">&gt;</text:span></text:p>
      <text:p text:style-name="P38"><text:span text:style-name="T11"><text:s/>9 <text:s/>| <text:s text:c="3"/></text:span><text:span text:style-name="T14"><text:s text:c="2"/>&lt;</text:span><text:span text:style-name="T13">body</text:span><text:span text:style-name="T14">&gt;</text:span></text:p>
      <text:p text:style-name="P38"><text:span text:style-name="T11">10 <text:s/>| <text:s text:c="3"/></text:span><text:span text:style-name="T14"><text:s text:c="4"/>&lt;</text:span><text:span text:style-name="T13">h1</text:span><text:span text:style-name="T14">&gt;Контроль активности&lt;/</text:span><text:span text:style-name="T13">h1</text:span><text:span text:style-name="T14">&gt;</text:span></text:p>
      <text:p text:style-name="P38"><text:span text:style-name="T11">11 <text:s/>| <text:s text:c="3"/></text:span><text:span text:style-name="T14"><text:s text:c="4"/>&lt;</text:span><text:span text:style-name="T13">button</text:span><text:span text:style-name="T14"> </text:span><text:span text:style-name="T16">id</text:span><text:span text:style-name="T15">=</text:span><text:span text:style-name="T16">"open-options-btn"</text:span><text:span text:style-name="T14">&gt;Открыть настройки&lt;/</text:span><text:span text:style-name="T13">button</text:span><text:span text:style-name="T14">&gt;</text:span></text:p>
      <text:p text:style-name="P38"><text:span text:style-name="T11">12 <text:s/>| <text:s text:c="3"/></text:span><text:span text:style-name="T14"><text:s text:c="4"/>&lt;</text:span><text:span text:style-name="T13">p</text:span><text:span text:style-name="T14">&gt;Времени проведено на странице: &lt;</text:span><text:span text:style-name="T13">span</text:span><text:span text:style-name="T14"> </text:span><text:span text:style-name="T16">id</text:span><text:span text:style-name="T15">=</text:span><text:span text:style-name="T16">"time-spent"</text:span><text:span text:style-name="T14">&gt;&lt;/</text:span><text:span text:style-name="T13">span</text:span><text:span text:style-name="T14">&gt; мин.&lt;/</text:span><text:span text:style-name="T13">p</text:span><text:span text:style-name="T14">&gt;</text:span></text:p>
      <text:p text:style-name="P38"><text:span text:style-name="T11">13 <text:s/>| <text:s text:c="3"/></text:span><text:span text:style-name="T14"><text:s text:c="4"/>&lt;</text:span><text:span text:style-name="T13">p</text:span><text:span text:style-name="T14">&gt;Осталось: &lt;</text:span><text:span text:style-name="T13">span</text:span><text:span text:style-name="T14"> </text:span><text:span text:style-name="T16">id</text:span><text:span text:style-name="T15">=</text:span><text:span text:style-name="T16">"time-left"</text:span><text:span text:style-name="T14">&gt;&lt;/</text:span><text:span text:style-name="T13">span</text:span><text:span text:style-name="T14">&gt; мин.&lt;/</text:span><text:span text:style-name="T13">p</text:span><text:span text:style-name="T14">&gt;</text:span></text:p>
      <text:p text:style-name="P39">14 <text:s/>| <text:s text:c="3"/></text:p>
      <text:p text:style-name="P38"><text:span text:style-name="T11">15 <text:s/>| <text:s text:c="3"/></text:span><text:span text:style-name="T14"><text:s text:c="4"/>&lt;</text:span><text:span text:style-name="T13">script</text:span><text:span text:style-name="T14"> </text:span><text:span text:style-name="T16">src</text:span><text:span text:style-name="T15">=</text:span><text:span text:style-name="T16">"popup.js"</text:span><text:span text:style-name="T14">&gt;&lt;/</text:span><text:span text:style-name="T13">script</text:span><text:span text:style-name="T14">&gt;</text:span></text:p>
      <text:p text:style-name="P38"><text:span text:style-name="T11">16 <text:s/>| <text:s text:c="3"/></text:span><text:span text:style-name="T14"><text:s text:c="2"/>&lt;/</text:span><text:span text:style-name="T13">body</text:span><text:span text:style-name="T14">&gt;</text:span></text:p>
      <text:p text:style-name="P38"><text:span text:style-name="T11">17 <text:s/>| <text:s text:c="3"/></text:span><text:span text:style-name="T14">&lt;/</text:span><text:span text:style-name="T13">html</text:span><text:span text:style-name="T14">&gt;</text:span></text:p>
      <text:p text:style-name="P36"/>
      <text:p text:style-name="P36">Исходный код popup.js:</text:p>
      <text:p text:style-name="P40"><text:span text:style-name="T11"><text:s/>1 <text:s/>| <text:s text:c="3"/></text:span><text:span text:style-name="T17">const</text:span><text:span text:style-name="T12"> </text:span><text:span text:style-name="T14">browserAPI</text:span><text:span text:style-name="T12"> </text:span><text:span text:style-name="T15">=</text:span><text:span text:style-name="T12"> </text:span><text:span text:style-name="T17">typeof</text:span><text:span text:style-name="T12"> </text:span><text:span text:style-name="T14">browser</text:span><text:span text:style-name="T12"> </text:span><text:span text:style-name="T15">!==</text:span><text:span text:style-name="T12"> </text:span><text:span text:style-name="T16">"undefined"</text:span><text:span text:style-name="T12"> </text:span><text:span text:style-name="T15">?</text:span><text:span text:style-name="T12"> </text:span><text:span text:style-name="T14">browser</text:span><text:span text:style-name="T12"> </text:span><text:span text:style-name="T15">:</text:span><text:span text:style-name="T12"> </text:span><text:span text:style-name="T14">chrome;</text:span></text:p>
      <text:p text:style-name="P41"><text:s/>2 <text:s/>| <text:s text:c="3"/></text:p>
      <text:p text:style-name="P40"><text:span text:style-name="T11"><text:s/>3 <text:s/>| <text:s text:c="3"/></text:span><text:span text:style-name="T17">const</text:span><text:span text:style-name="T12"> </text:span><text:span text:style-name="T14">openOptionsBtn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open-options-btn"</text:span><text:span text:style-name="T14">);</text:span></text:p>
      <text:p text:style-name="P40"><text:span text:style-name="T11"><text:s/>4 <text:s/>| <text:s text:c="3"/></text:span><text:span text:style-name="T17">const</text:span><text:span text:style-name="T12"> </text:span><text:span text:style-name="T14">timeSpentSpan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time-spent"</text:span><text:span text:style-name="T14">);</text:span></text:p>
      <text:p text:style-name="P40"><text:span text:style-name="T11"><text:s/>5 <text:s/>| <text:s text:c="3"/></text:span><text:span text:style-name="T17">const</text:span><text:span text:style-name="T12"> </text:span><text:span text:style-name="T14">timeLeftSpan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time-left"</text:span><text:span text:style-name="T14">);</text:span></text:p>
      <text:p text:style-name="P41"><text:s/>6 <text:s/>| <text:s text:c="3"/></text:p>
      <text:p text:style-name="P40"><text:span text:style-name="T11"><text:s/>7 <text:s/>| <text:s text:c="3"/></text:span><text:span text:style-name="T14">openOptionsBtn.addEventListener(</text:span><text:span text:style-name="T16">"click"</text:span><text:span text:style-name="T14">,</text:span><text:span text:style-name="T12"> </text:span><text:span text:style-name="T14">(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<text:s/>8 <text:s/>| <text:s text:c="3"/></text:span><text:span text:style-name="T12"><text:s text:c="2"/></text:span><text:span text:style-name="T17">if</text:span><text:span text:style-name="T12"> </text:span><text:span text:style-name="T14">(browserAPI.runtime.openOptionsPage)</text:span><text:span text:style-name="T12"> </text:span><text:span text:style-name="T14">{</text:span></text:p>
      <text:p text:style-name="P40"><text:span text:style-name="T11"><text:s/>9 <text:s/>| <text:s text:c="3"/></text:span><text:span text:style-name="T12"><text:s text:c="4"/></text:span><text:span text:style-name="T14">browserAPI.runtime.openOptionsPage();</text:span></text:p>
      <text:p text:style-name="P40"><text:span text:style-name="T11">10 <text:s/>| <text:s text:c="3"/></text:span><text:span text:style-name="T12"><text:s text:c="2"/></text:span><text:span text:style-name="T14">}</text:span><text:span text:style-name="T12"> </text:span><text:span text:style-name="T17">else</text:span><text:span text:style-name="T12"> </text:span><text:span text:style-name="T14">{</text:span></text:p>
      <text:p text:style-name="P40"><text:span text:style-name="T11">11 <text:s/>| <text:s text:c="3"/></text:span><text:span text:style-name="T12"><text:s text:c="4"/></text:span><text:span text:style-name="T19">window</text:span><text:span text:style-name="T14">.open(browserAPI.runtime.getURL(</text:span><text:span text:style-name="T16">"settings/options.html"</text:span><text:span text:style-name="T14">));</text:span></text:p>
      <text:p text:style-name="P40"><text:span text:style-name="T11">12 <text:s/>| <text:s text:c="3"/></text:span><text:span text:style-name="T12"><text:s text:c="2"/></text:span><text:span text:style-name="T14">}</text:span></text:p>
      <text:p text:style-name="P42"><text:span text:style-name="T11">13 <text:s/>| <text:s text:c="3"/></text:span>});</text:p>
      <text:p text:style-name="P41">14 <text:s/>| <text:s text:c="3"/></text:p>
      <text:p text:style-name="P40"><text:span text:style-name="T11">15 <text:s/>| <text:s text:c="3"/></text:span><text:span text:style-name="T17">function</text:span><text:span text:style-name="T12"> </text:span><text:span text:style-name="T14">getDomain(url)</text:span><text:span text:style-name="T12"> </text:span><text:span text:style-name="T14">{</text:span></text:p>
      <text:p text:style-name="P40"><text:span text:style-name="T11">16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url)</text:span><text:span text:style-name="T12"> </text:span><text:span text:style-name="T17">return</text:span><text:span text:style-name="T12"> </text:span><text:span text:style-name="T17">null</text:span><text:span text:style-name="T14">;</text:span></text:p>
      <text:p text:style-name="P41">17 <text:s/>| <text:s text:c="3"/></text:p>
      <text:p text:style-name="P40"><text:span text:style-name="T11">18 <text:s/>| <text:s text:c="3"/></text:span><text:span text:style-name="T12"><text:s text:c="2"/></text:span><text:span text:style-name="T17">let</text:span><text:span text:style-name="T12"> </text:span><text:span text:style-name="T14">cleanUrl</text:span><text:span text:style-name="T12"> </text:span><text:span text:style-name="T15">=</text:span><text:span text:style-name="T12"> </text:span><text:span text:style-name="T14">url.trim();</text:span></text:p>
      <text:p text:style-name="P40"><text:span text:style-name="T11">19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cleanUrl.includes(</text:span><text:span text:style-name="T16">"://"</text:span><text:span text:style-name="T14">))</text:span><text:span text:style-name="T12"> </text:span><text:span text:style-name="T14">{</text:span></text:p>
      <text:p text:style-name="P40"><text:span text:style-name="T11">20 <text:s/>| <text:s text:c="3"/></text:span><text:span text:style-name="T12"><text:s text:c="4"/></text:span><text:span text:style-name="T14">cleanUrl</text:span><text:span text:style-name="T12"> </text:span><text:span text:style-name="T15">=</text:span><text:span text:style-name="T12"> </text:span><text:span text:style-name="T16">"http://"</text:span><text:span text:style-name="T12"> </text:span><text:span text:style-name="T15">+</text:span><text:span text:style-name="T12"> </text:span><text:span text:style-name="T14">cleanUrl;</text:span></text:p>
      <text:p text:style-name="P40"><text:span text:style-name="T11">21 <text:s/>| <text:s text:c="3"/></text:span><text:span text:style-name="T12"><text:s text:c="2"/></text:span><text:span text:style-name="T14">}</text:span></text:p>
      <text:p text:style-name="P41">22 <text:s/>| <text:s text:c="3"/></text:p>
      <text:p text:style-name="P40"><text:span text:style-name="T11">23 <text:s/>| <text:s text:c="3"/></text:span><text:span text:style-name="T12"><text:s text:c="2"/></text:span><text:span text:style-name="T17">try</text:span><text:span text:style-name="T12"> </text:span><text:span text:style-name="T14">{</text:span></text:p>
      <text:p text:style-name="P40"><text:span text:style-name="T11">24 <text:s/>| <text:s text:c="3"/></text:span><text:span text:style-name="T12"><text:s text:c="4"/></text:span><text:span text:style-name="T17">const</text:span><text:span text:style-name="T12"> </text:span><text:span text:style-name="T14">parsed</text:span><text:span text:style-name="T12"> </text:span><text:span text:style-name="T15">=</text:span><text:span text:style-name="T12"> </text:span><text:span text:style-name="T17">new</text:span><text:span text:style-name="T12"> </text:span><text:span text:style-name="T14">URL(cleanUrl);</text:span></text:p>
      <text:p text:style-name="P40"><text:span text:style-name="T11">25 <text:s/>| <text:s text:c="3"/></text:span><text:span text:style-name="T12"><text:s text:c="4"/></text:span><text:span text:style-name="T17">return</text:span><text:span text:style-name="T12"> </text:span><text:span text:style-name="T14">parsed.hostname.replace(</text:span><text:span text:style-name="T20">/^www\./</text:span><text:span text:style-name="T14">,</text:span><text:span text:style-name="T12"> </text:span><text:span text:style-name="T16">""</text:span><text:span text:style-name="T14">).toLowerCase();</text:span></text:p>
      <text:p text:style-name="P40"><text:span text:style-name="T11">26 <text:s/>| <text:s text:c="3"/></text:span><text:span text:style-name="T12"><text:s text:c="2"/></text:span><text:span text:style-name="T14">}</text:span><text:span text:style-name="T12"> </text:span><text:span text:style-name="T17">catch</text:span><text:span text:style-name="T12"> </text:span><text:span text:style-name="T14">(e)</text:span><text:span text:style-name="T12"> </text:span><text:span text:style-name="T14">{</text:span></text:p>
      <text:p text:style-name="P40"><text:span text:style-name="T11">27 <text:s/>| <text:s text:c="3"/></text:span><text:span text:style-name="T12"><text:s text:c="4"/></text:span><text:span text:style-name="T17">return</text:span><text:span text:style-name="T12"> </text:span><text:span text:style-name="T17">null</text:span><text:span text:style-name="T14">;</text:span></text:p>
      <text:p text:style-name="P40"><text:span text:style-name="T11">28 <text:s/>| <text:s text:c="3"/></text:span><text:span text:style-name="T12"><text:s text:c="2"/></text:span><text:span text:style-name="T14">}</text:span></text:p>
      <text:p text:style-name="P42"><text:span text:style-name="T11">29 <text:s/>| <text:s text:c="3"/></text:span>}</text:p>
      <text:p text:style-name="P41">30 <text:s/>| <text:s text:c="3"/></text:p>
      <text:p text:style-name="P40"><text:span text:style-name="T11">31 <text:s/>| <text:s text:c="3"/></text:span><text:span text:style-name="T17">function</text:span><text:span text:style-name="T12"> </text:span><text:span text:style-name="T14">findMatchRule(visitedDomain,</text:span><text:span text:style-name="T12"> </text:span><text:span text:style-name="T14">urls)</text:span><text:span text:style-name="T12"> </text:span><text:span text:style-name="T14">{</text:span></text:p>
      <text:p text:style-name="P40"><text:span text:style-name="T11">32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visitedDomain</text:span><text:span text:style-name="T12"> </text:span><text:span text:style-name="T15">||</text:span><text:span text:style-name="T12"> </text:span><text:span text:style-name="T15">!</text:span><text:span text:style-name="T19">Array</text:span><text:span text:style-name="T14">.isArray(urls))</text:span><text:span text:style-name="T12"> </text:span><text:span text:style-name="T17">return</text:span><text:span text:style-name="T12"> </text:span><text:span text:style-name="T17">null</text:span><text:span text:style-name="T14">;</text:span></text:p>
      <text:p text:style-name="P40"><text:span text:style-name="T11">33 <text:s/>| <text:s text:c="3"/></text:span><text:span text:style-name="T12"><text:s text:c="2"/></text:span><text:span text:style-name="T17">return</text:span><text:span text:style-name="T12"> </text:span><text:span text:style-name="T14">urls.find((rule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34 <text:s/>| <text:s text:c="3"/></text:span><text:span text:style-name="T12"><text:s text:c="4"/></text:span><text:span text:style-name="T17">const</text:span><text:span text:style-name="T12"> </text:span><text:span text:style-name="T14">limitDomain</text:span><text:span text:style-name="T12"> </text:span><text:span text:style-name="T15">=</text:span><text:span text:style-name="T12"> </text:span><text:span text:style-name="T14">getDomain(rule.url);</text:span></text:p>
      <text:p text:style-name="P40"><text:span text:style-name="T11">35 <text:s/>| <text:s text:c="3"/></text:span><text:span text:style-name="T12"><text:s text:c="4"/></text:span><text:span text:style-name="T17">if</text:span><text:span text:style-name="T12"> </text:span><text:span text:style-name="T14">(</text:span><text:span text:style-name="T15">!</text:span><text:span text:style-name="T14">limitDomain)</text:span><text:span text:style-name="T12"> </text:span><text:span text:style-name="T17">return</text:span><text:span text:style-name="T12"> </text:span><text:span text:style-name="T17">false</text:span><text:span text:style-name="T14">;</text:span></text:p>
      <text:p text:style-name="P40"><text:span text:style-name="T11">36 <text:s/>| <text:s text:c="3"/></text:span><text:span text:style-name="T12"><text:s text:c="4"/></text:span><text:span text:style-name="T17">return</text:span><text:span text:style-name="T12"> </text:span><text:span text:style-name="T14">(</text:span></text:p>
      <text:p text:style-name="P40"><text:span text:style-name="T11">37 <text:s/>| <text:s text:c="3"/></text:span><text:span text:style-name="T12"><text:s text:c="6"/></text:span><text:span text:style-name="T14">visitedDomain</text:span><text:span text:style-name="T12"> </text:span><text:span text:style-name="T15">===</text:span><text:span text:style-name="T12"> </text:span><text:span text:style-name="T14">limitDomain</text:span><text:span text:style-name="T12"> </text:span><text:span text:style-name="T15">||</text:span><text:span text:style-name="T12"> </text:span><text:span text:style-name="T14">visitedDomain.endsWith(</text:span><text:span text:style-name="T16">"."</text:span><text:span text:style-name="T12"> </text:span><text:span text:style-name="T15">+</text:span><text:span text:style-name="T12"> </text:span><text:span text:style-name="T14">limitDomain)</text:span></text:p>
      <text:p text:style-name="P40"><text:span text:style-name="T11">38 <text:s/>| <text:s text:c="3"/></text:span><text:span text:style-name="T12"><text:s text:c="4"/></text:span><text:span text:style-name="T14">);</text:span></text:p>
      <text:p text:style-name="P40"><text:span text:style-name="T11">39 <text:s/>| <text:s text:c="3"/></text:span><text:span text:style-name="T12"><text:s text:c="2"/></text:span><text:span text:style-name="T14">});</text:span></text:p>
      <text:p text:style-name="P42"><text:span text:style-name="T11">40 <text:s/>| <text:s text:c="3"/></text:span>}</text:p>
      <text:p text:style-name="P41">41 <text:s/>| <text:s text:c="3"/></text:p>
      <text:p text:style-name="P40"><text:span text:style-name="T11">42 <text:s/>| <text:s text:c="3"/></text:span><text:span text:style-name="T17">async</text:span><text:span text:style-name="T12"> </text:span><text:span text:style-name="T17">function</text:span><text:span text:style-name="T12"> </text:span><text:span text:style-name="T14">updatePopup()</text:span><text:span text:style-name="T12"> </text:span><text:span text:style-name="T14">{</text:span></text:p>
      <text:p text:style-name="P40"><text:span text:style-name="T11">43 <text:s/>| <text:s text:c="3"/></text:span><text:span text:style-name="T12"><text:s text:c="2"/></text:span><text:span text:style-name="T14">browserAPI.tabs.query({</text:span><text:span text:style-name="T12"> </text:span><text:span text:style-name="T14">active</text:span><text:span text:style-name="T15">:</text:span><text:span text:style-name="T12"> </text:span><text:span text:style-name="T17">true</text:span><text:span text:style-name="T14">,</text:span><text:span text:style-name="T12"> </text:span><text:span text:style-name="T14">currentWindow</text:span><text:span text:style-name="T15">:</text:span><text:span text:style-name="T12"> </text:span><text:span text:style-name="T17">true</text:span><text:span text:style-name="T12"> </text:span><text:span text:style-name="T14">},</text:span><text:span text:style-name="T12"> </text:span><text:span text:style-name="T17">async</text:span><text:span text:style-name="T12"> </text:span><text:span text:style-name="T14">(tabs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44 <text:s/>| <text:s text:c="3"/></text:span><text:span text:style-name="T12"><text:s text:c="4"/></text:span><text:span text:style-name="T17">if</text:span><text:span text:style-name="T12"> </text:span><text:span text:style-name="T14">(tabs.length</text:span><text:span text:style-name="T12"> </text:span><text:span text:style-name="T15">===</text:span><text:span text:style-name="T12"> </text:span><text:span text:style-name="T15">0</text:span><text:span text:style-name="T14">)</text:span><text:span text:style-name="T12"> </text:span><text:span text:style-name="T17">return</text:span><text:span text:style-name="T14">;</text:span></text:p>
      <text:p text:style-name="P41">45 <text:s/>| <text:s text:c="3"/></text:p>
      <text:p text:style-name="P40"><text:soft-page-break/><text:span text:style-name="T11">46 <text:s/>| <text:s text:c="3"/></text:span><text:span text:style-name="T12"><text:s text:c="4"/></text:span><text:span text:style-name="T17">const</text:span><text:span text:style-name="T12"> </text:span><text:span text:style-name="T14">domain</text:span><text:span text:style-name="T12"> </text:span><text:span text:style-name="T15">=</text:span><text:span text:style-name="T12"> </text:span><text:span text:style-name="T14">getDomain(tabs[</text:span><text:span text:style-name="T15">0</text:span><text:span text:style-name="T14">].url);</text:span></text:p>
      <text:p text:style-name="P40"><text:span text:style-name="T11">47 <text:s/>| <text:s text:c="3"/></text:span><text:span text:style-name="T12"><text:s text:c="4"/></text:span><text:span text:style-name="T17">if</text:span><text:span text:style-name="T12"> </text:span><text:span text:style-name="T14">(</text:span><text:span text:style-name="T15">!</text:span><text:span text:style-name="T14">domain)</text:span><text:span text:style-name="T12"> </text:span><text:span text:style-name="T14">{</text:span></text:p>
      <text:p text:style-name="P40"><text:span text:style-name="T11">48 <text:s/>| <text:s text:c="3"/></text:span><text:span text:style-name="T12"><text:s text:c="6"/></text:span><text:span text:style-name="T14">timeSpentSpan.textContent</text:span><text:span text:style-name="T12"> </text:span><text:span text:style-name="T15">=</text:span><text:span text:style-name="T12"> </text:span><text:span text:style-name="T16">"—"</text:span><text:span text:style-name="T14">;</text:span></text:p>
      <text:p text:style-name="P40"><text:span text:style-name="T11">49 <text:s/>| <text:s text:c="3"/></text:span><text:span text:style-name="T12"><text:s text:c="6"/></text:span><text:span text:style-name="T14">timeLeftSpan.textContent</text:span><text:span text:style-name="T12"> </text:span><text:span text:style-name="T15">=</text:span><text:span text:style-name="T12"> </text:span><text:span text:style-name="T16">"—"</text:span><text:span text:style-name="T14">;</text:span></text:p>
      <text:p text:style-name="P40"><text:span text:style-name="T11">50 <text:s/>| <text:s text:c="3"/></text:span><text:span text:style-name="T12"><text:s text:c="6"/></text:span><text:span text:style-name="T17">return</text:span><text:span text:style-name="T14">;</text:span></text:p>
      <text:p text:style-name="P40"><text:span text:style-name="T11">51 <text:s/>| <text:s text:c="3"/></text:span><text:span text:style-name="T12"><text:s text:c="4"/></text:span><text:span text:style-name="T14">}</text:span></text:p>
      <text:p text:style-name="P41">52 <text:s/>| <text:s text:c="3"/></text:p>
      <text:p text:style-name="P40"><text:span text:style-name="T11">53 <text:s/>| <text:s text:c="3"/></text:span><text:span text:style-name="T12"><text:s text:c="4"/></text:span><text:span text:style-name="T17">const</text:span><text:span text:style-name="T12"> </text:span><text:span text:style-name="T14">syncData</text:span><text:span text:style-name="T12"> </text:span><text:span text:style-name="T15">=</text:span><text:span text:style-name="T12"> </text:span><text:span text:style-name="T17">await</text:span><text:span text:style-name="T12"> </text:span><text:span text:style-name="T14">browserAPI.storage.sync.get(</text:span><text:span text:style-name="T16">"urls"</text:span><text:span text:style-name="T14">);</text:span></text:p>
      <text:p text:style-name="P40"><text:span text:style-name="T11">54 <text:s/>| <text:s text:c="3"/></text:span><text:span text:style-name="T12"><text:s text:c="4"/></text:span><text:span text:style-name="T17">const</text:span><text:span text:style-name="T12"> </text:span><text:span text:style-name="T14">localData</text:span><text:span text:style-name="T12"> </text:span><text:span text:style-name="T15">=</text:span><text:span text:style-name="T12"> </text:span><text:span text:style-name="T17">await</text:span><text:span text:style-name="T12"> </text:span><text:span text:style-name="T14">browserAPI.storage.local.get(</text:span><text:span text:style-name="T16">"stats"</text:span><text:span text:style-name="T14">);</text:span></text:p>
      <text:p text:style-name="P41">55 <text:s/>| <text:s text:c="3"/></text:p>
      <text:p text:style-name="P40"><text:span text:style-name="T11">56 <text:s/>| <text:s text:c="3"/></text:span><text:span text:style-name="T12"><text:s text:c="4"/></text:span><text:span text:style-name="T17">const</text:span><text:span text:style-name="T12"> </text:span><text:span text:style-name="T14">urls</text:span><text:span text:style-name="T12"> </text:span><text:span text:style-name="T15">=</text:span><text:span text:style-name="T12"> </text:span><text:span text:style-name="T14">syncData.urls</text:span><text:span text:style-name="T12"> </text:span><text:span text:style-name="T15">||</text:span><text:span text:style-name="T12"> </text:span><text:span text:style-name="T14">[];</text:span></text:p>
      <text:p text:style-name="P40"><text:span text:style-name="T11">57 <text:s/>| <text:s text:c="3"/></text:span><text:span text:style-name="T12"><text:s text:c="4"/></text:span><text:span text:style-name="T17">const</text:span><text:span text:style-name="T12"> </text:span><text:span text:style-name="T14">stats</text:span><text:span text:style-name="T12"> </text:span><text:span text:style-name="T15">=</text:span><text:span text:style-name="T12"> </text:span><text:span text:style-name="T14">localData.stats</text:span><text:span text:style-name="T12"> </text:span><text:span text:style-name="T15">||</text:span><text:span text:style-name="T12"> </text:span><text:span text:style-name="T14">{};</text:span></text:p>
      <text:p text:style-name="P41">58 <text:s/>| <text:s text:c="3"/></text:p>
      <text:p text:style-name="P40"><text:span text:style-name="T11">59 <text:s/>| <text:s text:c="3"/></text:span><text:span text:style-name="T12"><text:s text:c="4"/></text:span><text:span text:style-name="T17">const</text:span><text:span text:style-name="T12"> </text:span><text:span text:style-name="T14">rule</text:span><text:span text:style-name="T12"> </text:span><text:span text:style-name="T15">=</text:span><text:span text:style-name="T12"> </text:span><text:span text:style-name="T14">findMatchRule(domain,</text:span><text:span text:style-name="T12"> </text:span><text:span text:style-name="T14">urls);</text:span></text:p>
      <text:p text:style-name="P41">60 <text:s/>| <text:s text:c="3"/></text:p>
      <text:p text:style-name="P40"><text:span text:style-name="T11">61 <text:s/>| <text:s text:c="3"/></text:span><text:span text:style-name="T12"><text:s text:c="4"/></text:span><text:span text:style-name="T17">if</text:span><text:span text:style-name="T12"> </text:span><text:span text:style-name="T14">(rule)</text:span><text:span text:style-name="T12"> </text:span><text:span text:style-name="T14">{</text:span></text:p>
      <text:p text:style-name="P40"><text:span text:style-name="T11">62 <text:s/>| <text:s text:c="3"/></text:span><text:span text:style-name="T12"><text:s text:c="6"/></text:span><text:span text:style-name="T17">const</text:span><text:span text:style-name="T12"> </text:span><text:span text:style-name="T14">limitDomain</text:span><text:span text:style-name="T12"> </text:span><text:span text:style-name="T15">=</text:span><text:span text:style-name="T12"> </text:span><text:span text:style-name="T14">getDomain(rule.url);</text:span></text:p>
      <text:p text:style-name="P40"><text:span text:style-name="T11">63 <text:s/>| <text:s text:c="3"/></text:span><text:span text:style-name="T12"><text:s text:c="6"/></text:span><text:span text:style-name="T17">const</text:span><text:span text:style-name="T12"> </text:span><text:span text:style-name="T14">spentSeconds</text:span><text:span text:style-name="T12"> </text:span><text:span text:style-name="T15">=</text:span><text:span text:style-name="T12"> </text:span><text:span text:style-name="T14">stats[limitDomain]</text:span><text:span text:style-name="T12"> </text:span><text:span text:style-name="T15">||</text:span><text:span text:style-name="T12"> </text:span><text:span text:style-name="T15">0</text:span><text:span text:style-name="T14">;</text:span></text:p>
      <text:p text:style-name="P40"><text:span text:style-name="T11">64 <text:s/>| <text:s text:c="3"/></text:span><text:span text:style-name="T12"><text:s text:c="6"/></text:span><text:span text:style-name="T17">const</text:span><text:span text:style-name="T12"> </text:span><text:span text:style-name="T14">spentMinutes</text:span><text:span text:style-name="T12"> </text:span><text:span text:style-name="T15">=</text:span><text:span text:style-name="T12"> </text:span><text:span text:style-name="T14">(spentSeconds</text:span><text:span text:style-name="T12"> </text:span><text:span text:style-name="T15">/</text:span><text:span text:style-name="T12"> </text:span><text:span text:style-name="T15">60</text:span><text:span text:style-name="T14">).toFixed(</text:span><text:span text:style-name="T15">1</text:span><text:span text:style-name="T14">);</text:span></text:p>
      <text:p text:style-name="P40"><text:span text:style-name="T11">65 <text:s/>| <text:s text:c="3"/></text:span><text:span text:style-name="T12"><text:s text:c="6"/></text:span><text:span text:style-name="T17">const</text:span><text:span text:style-name="T12"> </text:span><text:span text:style-name="T14">limitMinutes</text:span><text:span text:style-name="T12"> </text:span><text:span text:style-name="T15">=</text:span><text:span text:style-name="T12"> </text:span><text:span text:style-name="T14">rule.time;</text:span></text:p>
      <text:p text:style-name="P40"><text:span text:style-name="T11">66 <text:s/>| <text:s text:c="3"/></text:span><text:span text:style-name="T12"><text:s text:c="6"/></text:span><text:span text:style-name="T17">const</text:span><text:span text:style-name="T12"> </text:span><text:span text:style-name="T14">leftMinutes</text:span><text:span text:style-name="T12"> </text:span><text:span text:style-name="T15">=</text:span><text:span text:style-name="T12"> </text:span><text:span text:style-name="T19">Math</text:span><text:span text:style-name="T14">.max(</text:span><text:span text:style-name="T15">0</text:span><text:span text:style-name="T14">,</text:span><text:span text:style-name="T12"> </text:span><text:span text:style-name="T14">limitMinutes</text:span><text:span text:style-name="T12"> </text:span><text:span text:style-name="T15">-</text:span><text:span text:style-name="T12"> </text:span><text:span text:style-name="T14">spentSeconds</text:span><text:span text:style-name="T12"> </text:span><text:span text:style-name="T15">/</text:span><text:span text:style-name="T12"> </text:span><text:span text:style-name="T15">60</text:span><text:span text:style-name="T14">).toFixed(</text:span></text:p>
      <text:p text:style-name="P40"><text:span text:style-name="T11">67 <text:s/>| <text:s text:c="3"/></text:span><text:span text:style-name="T12"><text:s text:c="8"/></text:span><text:span text:style-name="T15">1</text:span><text:span text:style-name="T14">,</text:span></text:p>
      <text:p text:style-name="P40"><text:span text:style-name="T11">68 <text:s/>| <text:s text:c="3"/></text:span><text:span text:style-name="T12"><text:s text:c="6"/></text:span><text:span text:style-name="T14">);</text:span></text:p>
      <text:p text:style-name="P41">69 <text:s/>| <text:s text:c="3"/></text:p>
      <text:p text:style-name="P40"><text:span text:style-name="T11">70 <text:s/>| <text:s text:c="3"/></text:span><text:span text:style-name="T12"><text:s text:c="6"/></text:span><text:span text:style-name="T14">timeSpentSpan.textContent</text:span><text:span text:style-name="T12"> </text:span><text:span text:style-name="T15">=</text:span><text:span text:style-name="T12"> </text:span><text:span text:style-name="T14">spentMinutes;</text:span></text:p>
      <text:p text:style-name="P40"><text:span text:style-name="T11">71 <text:s/>| <text:s text:c="3"/></text:span><text:span text:style-name="T12"><text:s text:c="6"/></text:span><text:span text:style-name="T14">timeLeftSpan.textContent</text:span><text:span text:style-name="T12"> </text:span><text:span text:style-name="T15">=</text:span><text:span text:style-name="T12"> </text:span><text:span text:style-name="T14">leftMinutes;</text:span></text:p>
      <text:p text:style-name="P40"><text:span text:style-name="T11">72 <text:s/>| <text:s text:c="3"/></text:span><text:span text:style-name="T12"><text:s text:c="4"/></text:span><text:span text:style-name="T14">}</text:span><text:span text:style-name="T12"> </text:span><text:span text:style-name="T17">else</text:span><text:span text:style-name="T12"> </text:span><text:span text:style-name="T14">{</text:span></text:p>
      <text:p text:style-name="P40"><text:span text:style-name="T11">73 <text:s/>| <text:s text:c="3"/></text:span><text:span text:style-name="T12"><text:s text:c="6"/></text:span><text:span text:style-name="T14">timeSpentSpan.textContent</text:span><text:span text:style-name="T12"> </text:span><text:span text:style-name="T15">=</text:span><text:span text:style-name="T12"> </text:span><text:span text:style-name="T16">" <text:s/>— <text:s/>"</text:span><text:span text:style-name="T14">;</text:span></text:p>
      <text:p text:style-name="P40"><text:span text:style-name="T11">74 <text:s/>| <text:s text:c="3"/></text:span><text:span text:style-name="T12"><text:s text:c="6"/></text:span><text:span text:style-name="T14">timeLeftSpan.textContent</text:span><text:span text:style-name="T12"> </text:span><text:span text:style-name="T15">=</text:span><text:span text:style-name="T12"> </text:span><text:span text:style-name="T16">"∞"</text:span><text:span text:style-name="T14">;</text:span></text:p>
      <text:p text:style-name="P40"><text:span text:style-name="T11">75 <text:s/>| <text:s text:c="3"/></text:span><text:span text:style-name="T12"><text:s text:c="4"/></text:span><text:span text:style-name="T14">}</text:span></text:p>
      <text:p text:style-name="P40"><text:span text:style-name="T11">76 <text:s/>| <text:s text:c="3"/></text:span><text:span text:style-name="T12"><text:s text:c="2"/></text:span><text:span text:style-name="T14">});</text:span></text:p>
      <text:p text:style-name="P42"><text:span text:style-name="T11">77 <text:s/>| <text:s text:c="3"/></text:span>}</text:p>
      <text:p text:style-name="P41">78 <text:s/>| <text:s text:c="3"/></text:p>
      <text:p text:style-name="P40"><text:span text:style-name="T11">79 <text:s/>| <text:s text:c="3"/></text:span><text:span text:style-name="T14">updatePopup();</text:span></text:p>
      <text:p text:style-name="P43"/>
      <text:p text:style-name="P44">Исходный код <text:span text:style-name="T21">background.js</text:span>:</text:p>
      <text:p text:style-name="P40"><text:span text:style-name="T11"><text:s text:c="2"/>1 <text:s/>| <text:s text:c="3"/></text:span><text:span text:style-name="T17">const</text:span><text:span text:style-name="T12"> </text:span><text:span text:style-name="T14">browserAPI</text:span><text:span text:style-name="T12"> </text:span><text:span text:style-name="T15">=</text:span><text:span text:style-name="T12"> </text:span><text:span text:style-name="T17">typeof</text:span><text:span text:style-name="T12"> </text:span><text:span text:style-name="T14">browser</text:span><text:span text:style-name="T12"> </text:span><text:span text:style-name="T15">!==</text:span><text:span text:style-name="T12"> </text:span><text:span text:style-name="T16">"undefined"</text:span><text:span text:style-name="T12"> </text:span><text:span text:style-name="T15">?</text:span><text:span text:style-name="T12"> </text:span><text:span text:style-name="T14">browser</text:span><text:span text:style-name="T12"> </text:span><text:span text:style-name="T15">:</text:span><text:span text:style-name="T12"> </text:span><text:span text:style-name="T14">chrome;</text:span></text:p>
      <text:p text:style-name="P41"><text:s text:c="2"/>2 <text:s/>| <text:s text:c="3"/></text:p>
      <text:p text:style-name="P40"><text:span text:style-name="T11"><text:s text:c="2"/>3 <text:s/>| <text:s text:c="3"/></text:span><text:span text:style-name="T17">let</text:span><text:span text:style-name="T12"> </text:span><text:span text:style-name="T14">activeTabId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0"><text:span text:style-name="T11"><text:s text:c="2"/>4 <text:s/>| <text:s text:c="3"/></text:span><text:span text:style-name="T17">let</text:span><text:span text:style-name="T12"> </text:span><text:span text:style-name="T14">activeDomain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0"><text:span text:style-name="T11"><text:s text:c="2"/>5 <text:s/>| <text:s text:c="3"/></text:span><text:span text:style-name="T17">let</text:span><text:span text:style-name="T12"> </text:span><text:span text:style-name="T14">timerInterval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1"><text:s text:c="2"/>6 <text:s/>| <text:s text:c="3"/></text:p>
      <text:p text:style-name="P40"><text:span text:style-name="T11"><text:s text:c="2"/>7 <text:s/>| <text:s text:c="3"/></text:span><text:span text:style-name="T17">function</text:span><text:span text:style-name="T12"> </text:span><text:span text:style-name="T14">getDomain(url)</text:span><text:span text:style-name="T12"> </text:span><text:span text:style-name="T14">{</text:span></text:p>
      <text:p text:style-name="P40"><text:span text:style-name="T11"><text:s text:c="2"/>8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url)</text:span><text:span text:style-name="T12"> </text:span><text:span text:style-name="T17">return</text:span><text:span text:style-name="T12"> </text:span><text:span text:style-name="T17">null</text:span><text:span text:style-name="T14">;</text:span></text:p>
      <text:p text:style-name="P41"><text:s text:c="2"/>9 <text:s/>| <text:s text:c="3"/></text:p>
      <text:p text:style-name="P40"><text:span text:style-name="T11"><text:s/>10 <text:s/>| <text:s text:c="3"/></text:span><text:span text:style-name="T12"><text:s text:c="2"/></text:span><text:span text:style-name="T17">let</text:span><text:span text:style-name="T12"> </text:span><text:span text:style-name="T14">cleanUrl</text:span><text:span text:style-name="T12"> </text:span><text:span text:style-name="T15">=</text:span><text:span text:style-name="T12"> </text:span><text:span text:style-name="T14">url.trim();</text:span></text:p>
      <text:p text:style-name="P40"><text:span text:style-name="T11"><text:s/>11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cleanUrl.includes(</text:span><text:span text:style-name="T16">"://"</text:span><text:span text:style-name="T14">))</text:span><text:span text:style-name="T12"> </text:span><text:span text:style-name="T14">{</text:span></text:p>
      <text:p text:style-name="P40"><text:span text:style-name="T11"><text:s/>12 <text:s/>| <text:s text:c="3"/></text:span><text:span text:style-name="T12"><text:s text:c="4"/></text:span><text:span text:style-name="T14">cleanUrl</text:span><text:span text:style-name="T12"> </text:span><text:span text:style-name="T15">=</text:span><text:span text:style-name="T12"> </text:span><text:span text:style-name="T16">"http://"</text:span><text:span text:style-name="T12"> </text:span><text:span text:style-name="T15">+</text:span><text:span text:style-name="T12"> </text:span><text:span text:style-name="T14">cleanUrl;</text:span></text:p>
      <text:p text:style-name="P40"><text:span text:style-name="T11"><text:s/>13 <text:s/>| <text:s text:c="3"/></text:span><text:span text:style-name="T12"><text:s text:c="2"/></text:span><text:span text:style-name="T14">}</text:span></text:p>
      <text:p text:style-name="P41"><text:s/>14 <text:s/>| <text:s text:c="3"/></text:p>
      <text:p text:style-name="P40"><text:span text:style-name="T11"><text:s/>15 <text:s/>| <text:s text:c="3"/></text:span><text:span text:style-name="T12"><text:s text:c="2"/></text:span><text:span text:style-name="T17">try</text:span><text:span text:style-name="T12"> </text:span><text:span text:style-name="T14">{</text:span></text:p>
      <text:p text:style-name="P40"><text:span text:style-name="T11"><text:s/>16 <text:s/>| <text:s text:c="3"/></text:span><text:span text:style-name="T12"><text:s text:c="4"/></text:span><text:span text:style-name="T17">const</text:span><text:span text:style-name="T12"> </text:span><text:span text:style-name="T14">parsed</text:span><text:span text:style-name="T12"> </text:span><text:span text:style-name="T15">=</text:span><text:span text:style-name="T12"> </text:span><text:span text:style-name="T17">new</text:span><text:span text:style-name="T12"> </text:span><text:span text:style-name="T14">URL(cleanUrl);</text:span></text:p>
      <text:p text:style-name="P40"><text:span text:style-name="T11"><text:s/>17 <text:s/>| <text:s text:c="3"/></text:span><text:span text:style-name="T12"><text:s text:c="4"/></text:span><text:span text:style-name="T17">return</text:span><text:span text:style-name="T12"> </text:span><text:span text:style-name="T14">parsed.hostname.replace(</text:span><text:span text:style-name="T20">/^www\./</text:span><text:span text:style-name="T14">,</text:span><text:span text:style-name="T12"> </text:span><text:span text:style-name="T16">""</text:span><text:span text:style-name="T14">).toLowerCase();</text:span></text:p>
      <text:p text:style-name="P40"><text:span text:style-name="T11"><text:s/>18 <text:s/>| <text:s text:c="3"/></text:span><text:span text:style-name="T12"><text:s text:c="2"/></text:span><text:span text:style-name="T14">}</text:span><text:span text:style-name="T12"> </text:span><text:span text:style-name="T17">catch</text:span><text:span text:style-name="T12"> </text:span><text:span text:style-name="T14">(e)</text:span><text:span text:style-name="T12"> </text:span><text:span text:style-name="T14">{</text:span></text:p>
      <text:p text:style-name="P40"><text:span text:style-name="T11"><text:s/>19 <text:s/>| <text:s text:c="3"/></text:span><text:span text:style-name="T12"><text:s text:c="4"/></text:span><text:span text:style-name="T17">return</text:span><text:span text:style-name="T12"> </text:span><text:span text:style-name="T17">null</text:span><text:span text:style-name="T14">;</text:span></text:p>
      <text:p text:style-name="P40"><text:span text:style-name="T11"><text:s/>20 <text:s/>| <text:s text:c="3"/></text:span><text:span text:style-name="T12"><text:s text:c="2"/></text:span><text:span text:style-name="T14">}</text:span></text:p>
      <text:p text:style-name="P42"><text:span text:style-name="T11"><text:s/>21 <text:s/>| <text:s text:c="3"/></text:span>}</text:p>
      <text:p text:style-name="P41"><text:s/>22 <text:s/>| <text:s text:c="3"/></text:p>
      <text:p text:style-name="P40"><text:span text:style-name="T11"><text:s/>23 <text:s/>| <text:s text:c="3"/></text:span><text:span text:style-name="T17">function</text:span><text:span text:style-name="T12"> </text:span><text:span text:style-name="T14">findMatchRule(visitedDomain,</text:span><text:span text:style-name="T12"> </text:span><text:span text:style-name="T14">urls)</text:span><text:span text:style-name="T12"> </text:span><text:span text:style-name="T14">{</text:span></text:p>
      <text:p text:style-name="P40"><text:span text:style-name="T11"><text:s/>24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visitedDomain</text:span><text:span text:style-name="T12"> </text:span><text:span text:style-name="T15">||</text:span><text:span text:style-name="T12"> </text:span><text:span text:style-name="T15">!</text:span><text:span text:style-name="T19">Array</text:span><text:span text:style-name="T14">.isArray(urls))</text:span><text:span text:style-name="T12"> </text:span><text:span text:style-name="T17">return</text:span><text:span text:style-name="T12"> </text:span><text:span text:style-name="T17">null</text:span><text:span text:style-name="T14">;</text:span></text:p>
      <text:p text:style-name="P40"><text:span text:style-name="T11"><text:s/>25 <text:s/>| <text:s text:c="3"/></text:span><text:span text:style-name="T12"><text:s text:c="2"/></text:span><text:span text:style-name="T17">return</text:span><text:span text:style-name="T12"> </text:span><text:span text:style-name="T14">urls.find((rule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<text:s/>26 <text:s/>| <text:s text:c="3"/></text:span><text:span text:style-name="T12"><text:s text:c="4"/></text:span><text:span text:style-name="T17">const</text:span><text:span text:style-name="T12"> </text:span><text:span text:style-name="T14">limitDomain</text:span><text:span text:style-name="T12"> </text:span><text:span text:style-name="T15">=</text:span><text:span text:style-name="T12"> </text:span><text:span text:style-name="T14">getDomain(rule.url);</text:span></text:p>
      <text:p text:style-name="P40"><text:span text:style-name="T11"><text:s/>27 <text:s/>| <text:s text:c="3"/></text:span><text:span text:style-name="T12"><text:s text:c="4"/></text:span><text:span text:style-name="T17">if</text:span><text:span text:style-name="T12"> </text:span><text:span text:style-name="T14">(</text:span><text:span text:style-name="T15">!</text:span><text:span text:style-name="T14">limitDomain)</text:span><text:span text:style-name="T12"> </text:span><text:span text:style-name="T17">return</text:span><text:span text:style-name="T12"> </text:span><text:span text:style-name="T17">false</text:span><text:span text:style-name="T14">;</text:span></text:p>
      <text:p text:style-name="P40"><text:span text:style-name="T11"><text:s/>28 <text:s/>| <text:s text:c="3"/></text:span><text:span text:style-name="T12"><text:s text:c="4"/></text:span><text:span text:style-name="T17">return</text:span><text:span text:style-name="T12"> </text:span><text:span text:style-name="T14">(</text:span></text:p>
      <text:p text:style-name="P40"><text:span text:style-name="T11"><text:s/>29 <text:s/>| <text:s text:c="3"/></text:span><text:span text:style-name="T12"><text:s text:c="6"/></text:span><text:span text:style-name="T14">visitedDomain</text:span><text:span text:style-name="T12"> </text:span><text:span text:style-name="T15">===</text:span><text:span text:style-name="T12"> </text:span><text:span text:style-name="T14">limitDomain</text:span><text:span text:style-name="T12"> </text:span><text:span text:style-name="T15">||</text:span><text:span text:style-name="T12"> </text:span><text:span text:style-name="T14">visitedDomain.endsWith(</text:span><text:span text:style-name="T16">"."</text:span><text:span text:style-name="T12"> </text:span><text:span text:style-name="T15">+</text:span><text:span text:style-name="T12"> </text:span><text:span text:style-name="T14">limitDomain)</text:span></text:p>
      <text:p text:style-name="P40"><text:span text:style-name="T11"><text:s/>30 <text:s/>| <text:s text:c="3"/></text:span><text:span text:style-name="T12"><text:s text:c="4"/></text:span><text:span text:style-name="T14">);</text:span></text:p>
      <text:p text:style-name="P40"><text:span text:style-name="T11"><text:s/>31 <text:s/>| <text:s text:c="3"/></text:span><text:span text:style-name="T12"><text:s text:c="2"/></text:span><text:span text:style-name="T14">});</text:span></text:p>
      <text:p text:style-name="P42"><text:soft-page-break/><text:span text:style-name="T11"><text:s/>32 <text:s/>| <text:s text:c="3"/></text:span>}</text:p>
      <text:p text:style-name="P41"><text:s/>33 <text:s/>| <text:s text:c="3"/></text:p>
      <text:p text:style-name="P40"><text:span text:style-name="T11"><text:s/>34 <text:s/>| <text:s text:c="3"/></text:span><text:span text:style-name="T17">async</text:span><text:span text:style-name="T12"> </text:span><text:span text:style-name="T17">function</text:span><text:span text:style-name="T12"> </text:span><text:span text:style-name="T14">checkLimitAndBlock(tabId,</text:span><text:span text:style-name="T12"> </text:span><text:span text:style-name="T14">domain)</text:span><text:span text:style-name="T12"> </text:span><text:span text:style-name="T14">{</text:span></text:p>
      <text:p text:style-name="P40"><text:span text:style-name="T11"><text:s/>35 <text:s/>| <text:s text:c="3"/></text:span><text:span text:style-name="T12"><text:s text:c="2"/></text:span><text:span text:style-name="T17">if</text:span><text:span text:style-name="T12"> </text:span><text:span text:style-name="T14">(</text:span><text:span text:style-name="T15">!</text:span><text:span text:style-name="T14">domain)</text:span><text:span text:style-name="T12"> </text:span><text:span text:style-name="T17">return</text:span><text:span text:style-name="T14">;</text:span></text:p>
      <text:p text:style-name="P41"><text:s/>36 <text:s/>| <text:s text:c="3"/></text:p>
      <text:p text:style-name="P40"><text:span text:style-name="T11"><text:s/>37 <text:s/>| <text:s text:c="3"/></text:span><text:span text:style-name="T12"><text:s text:c="2"/></text:span><text:span text:style-name="T17">const</text:span><text:span text:style-name="T12"> </text:span><text:span text:style-name="T14">syncData</text:span><text:span text:style-name="T12"> </text:span><text:span text:style-name="T15">=</text:span><text:span text:style-name="T12"> </text:span><text:span text:style-name="T17">await</text:span><text:span text:style-name="T12"> </text:span><text:span text:style-name="T14">browserAPI.storage.sync.get(</text:span><text:span text:style-name="T16">"urls"</text:span><text:span text:style-name="T14">);</text:span></text:p>
      <text:p text:style-name="P40"><text:span text:style-name="T11"><text:s/>38 <text:s/>| <text:s text:c="3"/></text:span><text:span text:style-name="T12"><text:s text:c="2"/></text:span><text:span text:style-name="T17">const</text:span><text:span text:style-name="T12"> </text:span><text:span text:style-name="T14">localData</text:span><text:span text:style-name="T12"> </text:span><text:span text:style-name="T15">=</text:span><text:span text:style-name="T12"> </text:span><text:span text:style-name="T17">await</text:span><text:span text:style-name="T12"> </text:span><text:span text:style-name="T14">browserAPI.storage.local.get([</text:span></text:p>
      <text:p text:style-name="P40"><text:span text:style-name="T11"><text:s/>39 <text:s/>| <text:s text:c="3"/></text:span><text:span text:style-name="T12"><text:s text:c="4"/></text:span><text:span text:style-name="T16">"stats"</text:span><text:span text:style-name="T14">,</text:span></text:p>
      <text:p text:style-name="P40"><text:span text:style-name="T11"><text:s/>40 <text:s/>| <text:s text:c="3"/></text:span><text:span text:style-name="T12"><text:s text:c="4"/></text:span><text:span text:style-name="T16">"lastResetDate"</text:span><text:span text:style-name="T14">,</text:span></text:p>
      <text:p text:style-name="P40"><text:span text:style-name="T11"><text:s/>41 <text:s/>| <text:s text:c="3"/></text:span><text:span text:style-name="T12"><text:s text:c="2"/></text:span><text:span text:style-name="T14">]);</text:span></text:p>
      <text:p text:style-name="P41"><text:s/>42 <text:s/>| <text:s text:c="3"/></text:p>
      <text:p text:style-name="P40"><text:span text:style-name="T11"><text:s/>43 <text:s/>| <text:s text:c="3"/></text:span><text:span text:style-name="T12"><text:s text:c="2"/></text:span><text:span text:style-name="T17">const</text:span><text:span text:style-name="T12"> </text:span><text:span text:style-name="T14">urls</text:span><text:span text:style-name="T12"> </text:span><text:span text:style-name="T15">=</text:span><text:span text:style-name="T12"> </text:span><text:span text:style-name="T14">syncData.urls</text:span><text:span text:style-name="T12"> </text:span><text:span text:style-name="T15">||</text:span><text:span text:style-name="T12"> </text:span><text:span text:style-name="T14">[];</text:span></text:p>
      <text:p text:style-name="P40"><text:span text:style-name="T11"><text:s/>44 <text:s/>| <text:s text:c="3"/></text:span><text:span text:style-name="T12"><text:s text:c="2"/></text:span><text:span text:style-name="T17">const</text:span><text:span text:style-name="T12"> </text:span><text:span text:style-name="T14">stats</text:span><text:span text:style-name="T12"> </text:span><text:span text:style-name="T15">=</text:span><text:span text:style-name="T12"> </text:span><text:span text:style-name="T14">localData.stats</text:span><text:span text:style-name="T12"> </text:span><text:span text:style-name="T15">||</text:span><text:span text:style-name="T12"> </text:span><text:span text:style-name="T14">{};</text:span></text:p>
      <text:p text:style-name="P40"><text:span text:style-name="T11"><text:s/>45 <text:s/>| <text:s text:c="3"/></text:span><text:span text:style-name="T12"><text:s text:c="2"/></text:span><text:span text:style-name="T17">const</text:span><text:span text:style-name="T12"> </text:span><text:span text:style-name="T14">lastResetDate</text:span><text:span text:style-name="T12"> </text:span><text:span text:style-name="T15">=</text:span><text:span text:style-name="T12"> </text:span><text:span text:style-name="T14">localData.lastResetDate;</text:span></text:p>
      <text:p text:style-name="P41"><text:s/>46 <text:s/>| <text:s text:c="3"/></text:p>
      <text:p text:style-name="P40"><text:span text:style-name="T11"><text:s/>47 <text:s/>| <text:s text:c="3"/></text:span><text:span text:style-name="T12"><text:s text:c="2"/></text:span><text:span text:style-name="T17">const</text:span><text:span text:style-name="T12"> </text:span><text:span text:style-name="T14">today</text:span><text:span text:style-name="T12"> </text:span><text:span text:style-name="T15">=</text:span><text:span text:style-name="T12"> </text:span><text:span text:style-name="T17">new</text:span><text:span text:style-name="T12"> </text:span><text:span text:style-name="T19">Date</text:span><text:span text:style-name="T14">().toDateString();</text:span></text:p>
      <text:p text:style-name="P40"><text:span text:style-name="T11"><text:s/>48 <text:s/>| <text:s text:c="3"/></text:span><text:span text:style-name="T12"><text:s text:c="2"/></text:span><text:span text:style-name="T17">if</text:span><text:span text:style-name="T12"> </text:span><text:span text:style-name="T14">(lastResetDate</text:span><text:span text:style-name="T12"> </text:span><text:span text:style-name="T15">!==</text:span><text:span text:style-name="T12"> </text:span><text:span text:style-name="T14">today)</text:span><text:span text:style-name="T12"> </text:span><text:span text:style-name="T14">{</text:span></text:p>
      <text:p text:style-name="P40"><text:span text:style-name="T11"><text:s/>49 <text:s/>| <text:s text:c="3"/></text:span><text:span text:style-name="T12"><text:s text:c="4"/></text:span><text:span text:style-name="T17">await</text:span><text:span text:style-name="T12"> </text:span><text:span text:style-name="T14">browserAPI.storage.local.set({</text:span><text:span text:style-name="T12"> </text:span><text:span text:style-name="T14">stats</text:span><text:span text:style-name="T15">:</text:span><text:span text:style-name="T12"> </text:span><text:span text:style-name="T14">{},</text:span><text:span text:style-name="T12"> </text:span><text:span text:style-name="T14">lastResetDate</text:span><text:span text:style-name="T15">:</text:span><text:span text:style-name="T12"> </text:span><text:span text:style-name="T14">today</text:span><text:span text:style-name="T12"> </text:span><text:span text:style-name="T14">});</text:span></text:p>
      <text:p text:style-name="P40"><text:span text:style-name="T11"><text:s/>50 <text:s/>| <text:s text:c="3"/></text:span><text:span text:style-name="T12"><text:s text:c="2"/></text:span><text:span text:style-name="T14">}</text:span></text:p>
      <text:p text:style-name="P41"><text:s/>51 <text:s/>| <text:s text:c="3"/></text:p>
      <text:p text:style-name="P40"><text:span text:style-name="T11"><text:s/>52 <text:s/>| <text:s text:c="3"/></text:span><text:span text:style-name="T12"><text:s text:c="2"/></text:span><text:span text:style-name="T17">const</text:span><text:span text:style-name="T12"> </text:span><text:span text:style-name="T14">rule</text:span><text:span text:style-name="T12"> </text:span><text:span text:style-name="T15">=</text:span><text:span text:style-name="T12"> </text:span><text:span text:style-name="T14">findMatchRule(domain,</text:span><text:span text:style-name="T12"> </text:span><text:span text:style-name="T14">urls);</text:span></text:p>
      <text:p text:style-name="P40"><text:span text:style-name="T11"><text:s/>53 <text:s/>| <text:s text:c="3"/></text:span><text:span text:style-name="T12"><text:s text:c="2"/></text:span><text:span text:style-name="T17">if</text:span><text:span text:style-name="T12"> </text:span><text:span text:style-name="T14">(rule)</text:span><text:span text:style-name="T12"> </text:span><text:span text:style-name="T14">{</text:span></text:p>
      <text:p text:style-name="P40"><text:span text:style-name="T11"><text:s/>54 <text:s/>| <text:s text:c="3"/></text:span><text:span text:style-name="T12"><text:s text:c="4"/></text:span><text:span text:style-name="T17">const</text:span><text:span text:style-name="T12"> </text:span><text:span text:style-name="T14">limitDomain</text:span><text:span text:style-name="T12"> </text:span><text:span text:style-name="T15">=</text:span><text:span text:style-name="T12"> </text:span><text:span text:style-name="T14">getDomain(rule.url);</text:span></text:p>
      <text:p text:style-name="P40"><text:span text:style-name="T11"><text:s/>55 <text:s/>| <text:s text:c="3"/></text:span><text:span text:style-name="T12"><text:s text:c="4"/></text:span><text:span text:style-name="T17">const</text:span><text:span text:style-name="T12"> </text:span><text:span text:style-name="T14">spentSeconds</text:span><text:span text:style-name="T12"> </text:span><text:span text:style-name="T15">=</text:span><text:span text:style-name="T12"> </text:span><text:span text:style-name="T14">stats[limitDomain]</text:span><text:span text:style-name="T12"> </text:span><text:span text:style-name="T15">||</text:span><text:span text:style-name="T12"> </text:span><text:span text:style-name="T15">0</text:span><text:span text:style-name="T14">;</text:span></text:p>
      <text:p text:style-name="P40"><text:span text:style-name="T11"><text:s/>56 <text:s/>| <text:s text:c="3"/></text:span><text:span text:style-name="T12"><text:s text:c="4"/></text:span><text:span text:style-name="T17">const</text:span><text:span text:style-name="T12"> </text:span><text:span text:style-name="T14">allowedSeconds</text:span><text:span text:style-name="T12"> </text:span><text:span text:style-name="T15">=</text:span><text:span text:style-name="T12"> </text:span><text:span text:style-name="T14">rule.time</text:span><text:span text:style-name="T12"> </text:span><text:span text:style-name="T15">*</text:span><text:span text:style-name="T12"> </text:span><text:span text:style-name="T15">60</text:span><text:span text:style-name="T14">;</text:span></text:p>
      <text:p text:style-name="P41"><text:s/>57 <text:s/>| <text:s text:c="3"/></text:p>
      <text:p text:style-name="P40"><text:span text:style-name="T11"><text:s/>58 <text:s/>| <text:s text:c="3"/></text:span><text:span text:style-name="T12"><text:s text:c="4"/></text:span><text:span text:style-name="T17">if</text:span><text:span text:style-name="T12"> </text:span><text:span text:style-name="T14">(spentSeconds</text:span><text:span text:style-name="T12"> </text:span><text:span text:style-name="T15">&gt;=</text:span><text:span text:style-name="T12"> </text:span><text:span text:style-name="T14">allowedSeconds)</text:span><text:span text:style-name="T12"> </text:span><text:span text:style-name="T14">{</text:span></text:p>
      <text:p text:style-name="P40"><text:span text:style-name="T11"><text:s/>59 <text:s/>| <text:s text:c="3"/></text:span><text:span text:style-name="T12"><text:s text:c="6"/></text:span><text:span text:style-name="T14">blockTab(tabId,</text:span><text:span text:style-name="T12"> </text:span><text:span text:style-name="T14">limitDomain);</text:span></text:p>
      <text:p text:style-name="P40"><text:span text:style-name="T11"><text:s/>60 <text:s/>| <text:s text:c="3"/></text:span><text:span text:style-name="T12"><text:s text:c="4"/></text:span><text:span text:style-name="T14">}</text:span></text:p>
      <text:p text:style-name="P40"><text:span text:style-name="T11"><text:s/>61 <text:s/>| <text:s text:c="3"/></text:span><text:span text:style-name="T12"><text:s text:c="2"/></text:span><text:span text:style-name="T14">}</text:span></text:p>
      <text:p text:style-name="P42"><text:span text:style-name="T11"><text:s/>62 <text:s/>| <text:s text:c="3"/></text:span>}</text:p>
      <text:p text:style-name="P41"><text:s/>63 <text:s/>| <text:s text:c="3"/></text:p>
      <text:p text:style-name="P40"><text:span text:style-name="T11"><text:s/>64 <text:s/>| <text:s text:c="3"/></text:span><text:span text:style-name="T17">function</text:span><text:span text:style-name="T12"> </text:span><text:span text:style-name="T14">blockTab(tabId,</text:span><text:span text:style-name="T12"> </text:span><text:span text:style-name="T14">domain)</text:span><text:span text:style-name="T12"> </text:span><text:span text:style-name="T14">{</text:span></text:p>
      <text:p text:style-name="P40"><text:span text:style-name="T11"><text:s/>65 <text:s/>| <text:s text:c="3"/></text:span><text:span text:style-name="T12"><text:s text:c="2"/></text:span><text:span text:style-name="T17">const</text:span><text:span text:style-name="T12"> </text:span><text:span text:style-name="T14">blockUrl</text:span><text:span text:style-name="T12"> </text:span><text:span text:style-name="T15">=</text:span></text:p>
      <text:p text:style-name="P40"><text:span text:style-name="T11"><text:s/>66 <text:s/>| <text:s text:c="3"/></text:span><text:span text:style-name="T12"><text:s text:c="4"/></text:span><text:span text:style-name="T14">browserAPI.runtime.getURL(</text:span><text:span text:style-name="T16">"blocked/blocked.html"</text:span><text:span text:style-name="T14">)</text:span><text:span text:style-name="T12"> </text:span><text:span text:style-name="T15">+</text:span></text:p>
      <text:p text:style-name="P40"><text:span text:style-name="T11"><text:s/>67 <text:s/>| <text:s text:c="3"/></text:span><text:span text:style-name="T12"><text:s text:c="4"/></text:span><text:span text:style-name="T16">`?domain=</text:span><text:span text:style-name="T22">${</text:span><text:span text:style-name="T19">encodeURIComponent</text:span><text:span text:style-name="T14">(domain)</text:span><text:span text:style-name="T22">}</text:span><text:span text:style-name="T16">`</text:span><text:span text:style-name="T14">;</text:span></text:p>
      <text:p text:style-name="P40"><text:span text:style-name="T11"><text:s/>68 <text:s/>| <text:s text:c="3"/></text:span><text:span text:style-name="T12"><text:s text:c="2"/></text:span><text:span text:style-name="T14">browserAPI.tabs.update(tabId,</text:span><text:span text:style-name="T12"> </text:span><text:span text:style-name="T14">{</text:span><text:span text:style-name="T12"> </text:span><text:span text:style-name="T14">url</text:span><text:span text:style-name="T15">:</text:span><text:span text:style-name="T12"> </text:span><text:span text:style-name="T14">blockUrl</text:span><text:span text:style-name="T12"> </text:span><text:span text:style-name="T14">});</text:span></text:p>
      <text:p text:style-name="P42"><text:span text:style-name="T11"><text:s/>69 <text:s/>| <text:s text:c="3"/></text:span>}</text:p>
      <text:p text:style-name="P41"><text:s/>70 <text:s/>| <text:s text:c="3"/></text:p>
      <text:p text:style-name="P40"><text:span text:style-name="T11"><text:s/>71 <text:s/>| <text:s text:c="3"/></text:span><text:span text:style-name="T17">function</text:span><text:span text:style-name="T12"> </text:span><text:span text:style-name="T14">startTracking()</text:span><text:span text:style-name="T12"> </text:span><text:span text:style-name="T14">{</text:span></text:p>
      <text:p text:style-name="P40"><text:span text:style-name="T11"><text:s/>72 <text:s/>| <text:s text:c="3"/></text:span><text:span text:style-name="T12"><text:s text:c="2"/></text:span><text:span text:style-name="T17">if</text:span><text:span text:style-name="T12"> </text:span><text:span text:style-name="T14">(timerInterval)</text:span><text:span text:style-name="T12"> </text:span><text:span text:style-name="T14">clearInterval(timerInterval);</text:span></text:p>
      <text:p text:style-name="P41"><text:s/>73 <text:s/>| <text:s text:c="3"/></text:p>
      <text:p text:style-name="P40"><text:span text:style-name="T11"><text:s/>74 <text:s/>| <text:s text:c="3"/></text:span><text:span text:style-name="T12"><text:s text:c="2"/></text:span><text:span text:style-name="T14">timerInterval</text:span><text:span text:style-name="T12"> </text:span><text:span text:style-name="T15">=</text:span><text:span text:style-name="T12"> </text:span><text:span text:style-name="T14">setInterval(</text:span><text:span text:style-name="T17">async</text:span><text:span text:style-name="T12"> </text:span><text:span text:style-name="T14">(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<text:s/>75 <text:s/>| <text:s text:c="3"/></text:span><text:span text:style-name="T12"><text:s text:c="4"/></text:span><text:span text:style-name="T17">if</text:span><text:span text:style-name="T12"> </text:span><text:span text:style-name="T14">(</text:span><text:span text:style-name="T15">!</text:span><text:span text:style-name="T14">activeDomain</text:span><text:span text:style-name="T12"> </text:span><text:span text:style-name="T15">||</text:span><text:span text:style-name="T12"> </text:span><text:span text:style-name="T15">!</text:span><text:span text:style-name="T14">activeTabId)</text:span><text:span text:style-name="T12"> </text:span><text:span text:style-name="T17">return</text:span><text:span text:style-name="T14">;</text:span></text:p>
      <text:p text:style-name="P41"><text:s/>76 <text:s/>| <text:s text:c="3"/></text:p>
      <text:p text:style-name="P40"><text:span text:style-name="T11"><text:s/>77 <text:s/>| <text:s text:c="3"/></text:span><text:span text:style-name="T12"><text:s text:c="4"/></text:span><text:span text:style-name="T17">const</text:span><text:span text:style-name="T12"> </text:span><text:span text:style-name="T14">syncData</text:span><text:span text:style-name="T12"> </text:span><text:span text:style-name="T15">=</text:span><text:span text:style-name="T12"> </text:span><text:span text:style-name="T17">await</text:span><text:span text:style-name="T12"> </text:span><text:span text:style-name="T14">browserAPI.storage.sync.get(</text:span><text:span text:style-name="T16">"urls"</text:span><text:span text:style-name="T14">);</text:span></text:p>
      <text:p text:style-name="P40"><text:span text:style-name="T11"><text:s/>78 <text:s/>| <text:s text:c="3"/></text:span><text:span text:style-name="T12"><text:s text:c="4"/></text:span><text:span text:style-name="T17">const</text:span><text:span text:style-name="T12"> </text:span><text:span text:style-name="T14">localData</text:span><text:span text:style-name="T12"> </text:span><text:span text:style-name="T15">=</text:span><text:span text:style-name="T12"> </text:span><text:span text:style-name="T17">await</text:span><text:span text:style-name="T12"> </text:span><text:span text:style-name="T14">browserAPI.storage.local.get([</text:span></text:p>
      <text:p text:style-name="P40"><text:span text:style-name="T11"><text:s/>79 <text:s/>| <text:s text:c="3"/></text:span><text:span text:style-name="T12"><text:s text:c="6"/></text:span><text:span text:style-name="T16">"stats"</text:span><text:span text:style-name="T14">,</text:span></text:p>
      <text:p text:style-name="P40"><text:span text:style-name="T11"><text:s/>80 <text:s/>| <text:s text:c="3"/></text:span><text:span text:style-name="T12"><text:s text:c="6"/></text:span><text:span text:style-name="T16">"lastResetDate"</text:span><text:span text:style-name="T14">,</text:span></text:p>
      <text:p text:style-name="P40"><text:span text:style-name="T11"><text:s/>81 <text:s/>| <text:s text:c="3"/></text:span><text:span text:style-name="T12"><text:s text:c="4"/></text:span><text:span text:style-name="T14">]);</text:span></text:p>
      <text:p text:style-name="P41"><text:s/>82 <text:s/>| <text:s text:c="3"/></text:p>
      <text:p text:style-name="P40"><text:span text:style-name="T11"><text:s/>83 <text:s/>| <text:s text:c="3"/></text:span><text:span text:style-name="T12"><text:s text:c="4"/></text:span><text:span text:style-name="T17">const</text:span><text:span text:style-name="T12"> </text:span><text:span text:style-name="T14">urls</text:span><text:span text:style-name="T12"> </text:span><text:span text:style-name="T15">=</text:span><text:span text:style-name="T12"> </text:span><text:span text:style-name="T14">syncData.urls</text:span><text:span text:style-name="T12"> </text:span><text:span text:style-name="T15">||</text:span><text:span text:style-name="T12"> </text:span><text:span text:style-name="T14">[];</text:span></text:p>
      <text:p text:style-name="P40"><text:span text:style-name="T11"><text:s/>84 <text:s/>| <text:s text:c="3"/></text:span><text:span text:style-name="T12"><text:s text:c="4"/></text:span><text:span text:style-name="T17">let</text:span><text:span text:style-name="T12"> </text:span><text:span text:style-name="T14">stats</text:span><text:span text:style-name="T12"> </text:span><text:span text:style-name="T15">=</text:span><text:span text:style-name="T12"> </text:span><text:span text:style-name="T14">localData.stats</text:span><text:span text:style-name="T12"> </text:span><text:span text:style-name="T15">||</text:span><text:span text:style-name="T12"> </text:span><text:span text:style-name="T14">{};</text:span></text:p>
      <text:p text:style-name="P40"><text:span text:style-name="T11"><text:s/>85 <text:s/>| <text:s text:c="3"/></text:span><text:span text:style-name="T12"><text:s text:c="4"/></text:span><text:span text:style-name="T17">const</text:span><text:span text:style-name="T12"> </text:span><text:span text:style-name="T14">today</text:span><text:span text:style-name="T12"> </text:span><text:span text:style-name="T15">=</text:span><text:span text:style-name="T12"> </text:span><text:span text:style-name="T17">new</text:span><text:span text:style-name="T12"> </text:span><text:span text:style-name="T19">Date</text:span><text:span text:style-name="T14">().toDateString();</text:span></text:p>
      <text:p text:style-name="P41"><text:s/>86 <text:s/>| <text:s text:c="3"/></text:p>
      <text:p text:style-name="P40"><text:span text:style-name="T11"><text:s/>87 <text:s/>| <text:s text:c="3"/></text:span><text:span text:style-name="T12"><text:s text:c="4"/></text:span><text:span text:style-name="T17">if</text:span><text:span text:style-name="T12"> </text:span><text:span text:style-name="T14">(localData.lastResetDate</text:span><text:span text:style-name="T12"> </text:span><text:span text:style-name="T15">!==</text:span><text:span text:style-name="T12"> </text:span><text:span text:style-name="T14">today)</text:span><text:span text:style-name="T12"> </text:span><text:span text:style-name="T14">{</text:span></text:p>
      <text:p text:style-name="P40"><text:span text:style-name="T11"><text:s/>88 <text:s/>| <text:s text:c="3"/></text:span><text:span text:style-name="T12"><text:s text:c="6"/></text:span><text:span text:style-name="T14">stats</text:span><text:span text:style-name="T12"> </text:span><text:span text:style-name="T15">=</text:span><text:span text:style-name="T12"> </text:span><text:span text:style-name="T14">{};</text:span></text:p>
      <text:p text:style-name="P40"><text:span text:style-name="T11"><text:s/>89 <text:s/>| <text:s text:c="3"/></text:span><text:span text:style-name="T12"><text:s text:c="6"/></text:span><text:span text:style-name="T17">await</text:span><text:span text:style-name="T12"> </text:span><text:span text:style-name="T14">browserAPI.storage.local.set({</text:span><text:span text:style-name="T12"> </text:span><text:span text:style-name="T14">stats</text:span><text:span text:style-name="T15">:</text:span><text:span text:style-name="T12"> </text:span><text:span text:style-name="T14">{},</text:span><text:span text:style-name="T12"> </text:span><text:span text:style-name="T14">lastResetDate</text:span><text:span text:style-name="T15">:</text:span><text:span text:style-name="T12"> </text:span><text:span text:style-name="T14">today</text:span><text:span text:style-name="T12"> </text:span><text:span text:style-name="T14">});</text:span></text:p>
      <text:p text:style-name="P40"><text:span text:style-name="T11"><text:s/>90 <text:s/>| <text:s text:c="3"/></text:span><text:span text:style-name="T12"><text:s text:c="4"/></text:span><text:span text:style-name="T14">}</text:span></text:p>
      <text:p text:style-name="P40"><text:span text:style-name="T11"><text:s/>91 <text:s/>| <text:s text:c="3"/></text:span><text:span text:style-name="T12"><text:s text:c="4"/></text:span><text:span text:style-name="T17">const</text:span><text:span text:style-name="T12"> </text:span><text:span text:style-name="T14">rule</text:span><text:span text:style-name="T12"> </text:span><text:span text:style-name="T15">=</text:span><text:span text:style-name="T12"> </text:span><text:span text:style-name="T14">findMatchRule(activeDomain,</text:span><text:span text:style-name="T12"> </text:span><text:span text:style-name="T14">urls);</text:span></text:p>
      <text:p text:style-name="P41"><text:s/>92 <text:s/>| <text:s text:c="3"/></text:p>
      <text:p text:style-name="P40"><text:span text:style-name="T11"><text:s/>93 <text:s/>| <text:s text:c="3"/></text:span><text:span text:style-name="T12"><text:s text:c="4"/></text:span><text:span text:style-name="T17">if</text:span><text:span text:style-name="T12"> </text:span><text:span text:style-name="T14">(rule)</text:span><text:span text:style-name="T12"> </text:span><text:span text:style-name="T14">{</text:span></text:p>
      <text:p text:style-name="P40"><text:span text:style-name="T11"><text:s/>94 <text:s/>| <text:s text:c="3"/></text:span><text:span text:style-name="T12"><text:s text:c="6"/></text:span><text:span text:style-name="T17">const</text:span><text:span text:style-name="T12"> </text:span><text:span text:style-name="T14">limitDomain</text:span><text:span text:style-name="T12"> </text:span><text:span text:style-name="T15">=</text:span><text:span text:style-name="T12"> </text:span><text:span text:style-name="T14">getDomain(rule.url);</text:span></text:p>
      <text:p text:style-name="P40"><text:span text:style-name="T11"><text:s/>95 <text:s/>| <text:s text:c="3"/></text:span><text:span text:style-name="T12"><text:s text:c="6"/></text:span><text:span text:style-name="T14">stats[limitDomain]</text:span><text:span text:style-name="T12"> </text:span><text:span text:style-name="T15">=</text:span><text:span text:style-name="T12"> </text:span><text:span text:style-name="T14">(stats[limitDomain]</text:span><text:span text:style-name="T12"> </text:span><text:span text:style-name="T15">||</text:span><text:span text:style-name="T12"> </text:span><text:span text:style-name="T15">0</text:span><text:span text:style-name="T14">)</text:span><text:span text:style-name="T12"> </text:span><text:span text:style-name="T15">+</text:span><text:span text:style-name="T12"> </text:span><text:span text:style-name="T15">1</text:span><text:span text:style-name="T14">;</text:span></text:p>
      <text:p text:style-name="P41"><text:s/>96 <text:s/>| <text:s text:c="3"/></text:p>
      <text:p text:style-name="P40"><text:span text:style-name="T11"><text:s/>97 <text:s/>| <text:s text:c="3"/></text:span><text:span text:style-name="T12"><text:s text:c="6"/></text:span><text:span text:style-name="T17">await</text:span><text:span text:style-name="T12"> </text:span><text:span text:style-name="T14">browserAPI.storage.local.set({</text:span><text:span text:style-name="T12"> </text:span><text:span text:style-name="T14">stats</text:span><text:span text:style-name="T12"> </text:span><text:span text:style-name="T14">});</text:span></text:p>
      <text:p text:style-name="P41"><text:s/>98 <text:s/>| <text:s text:c="3"/></text:p>
      <text:p text:style-name="P40"><text:span text:style-name="T11"><text:s/>99 <text:s/>| <text:s text:c="3"/></text:span><text:span text:style-name="T12"><text:s text:c="6"/></text:span><text:span text:style-name="T17">if</text:span><text:span text:style-name="T12"> </text:span><text:span text:style-name="T14">(stats[limitDomain]</text:span><text:span text:style-name="T12"> </text:span><text:span text:style-name="T15">&gt;=</text:span><text:span text:style-name="T12"> </text:span><text:span text:style-name="T14">rule.time</text:span><text:span text:style-name="T12"> </text:span><text:span text:style-name="T15">*</text:span><text:span text:style-name="T12"> </text:span><text:span text:style-name="T15">60</text:span><text:span text:style-name="T14">)</text:span><text:span text:style-name="T12"> </text:span><text:span text:style-name="T14">{</text:span></text:p>
      <text:p text:style-name="P40"><text:span text:style-name="T11">100 <text:s/>| <text:s text:c="3"/></text:span><text:span text:style-name="T12"><text:s text:c="8"/></text:span><text:span text:style-name="T14">blockTab(activeTabId,</text:span><text:span text:style-name="T12"> </text:span><text:span text:style-name="T14">limitDomain);</text:span></text:p>
      <text:p text:style-name="P40"><text:span text:style-name="T11">101 <text:s/>| <text:s text:c="3"/></text:span><text:span text:style-name="T12"><text:s text:c="6"/></text:span><text:span text:style-name="T14">}</text:span></text:p>
      <text:p text:style-name="P40"><text:span text:style-name="T11">102 <text:s/>| <text:s text:c="3"/></text:span><text:span text:style-name="T12"><text:s text:c="4"/></text:span><text:span text:style-name="T14">}</text:span></text:p>
      <text:p text:style-name="P40"><text:soft-page-break/><text:span text:style-name="T11">103 <text:s/>| <text:s text:c="3"/></text:span><text:span text:style-name="T12"><text:s text:c="2"/></text:span><text:span text:style-name="T14">},</text:span><text:span text:style-name="T12"> </text:span><text:span text:style-name="T15">1000</text:span><text:span text:style-name="T14">);</text:span></text:p>
      <text:p text:style-name="P42"><text:span text:style-name="T11">104 <text:s/>| <text:s text:c="3"/></text:span>}</text:p>
      <text:p text:style-name="P41">105 <text:s/>| <text:s text:c="3"/></text:p>
      <text:p text:style-name="P40"><text:span text:style-name="T11">106 <text:s/>| <text:s text:c="3"/></text:span><text:span text:style-name="T17">async</text:span><text:span text:style-name="T12"> </text:span><text:span text:style-name="T17">function</text:span><text:span text:style-name="T12"> </text:span><text:span text:style-name="T14">updateActiveTab()</text:span><text:span text:style-name="T12"> </text:span><text:span text:style-name="T14">{</text:span></text:p>
      <text:p text:style-name="P40"><text:span text:style-name="T11">107 <text:s/>| <text:s text:c="3"/></text:span><text:span text:style-name="T12"><text:s text:c="2"/></text:span><text:span text:style-name="T14">browserAPI.tabs.query({</text:span><text:span text:style-name="T12"> </text:span><text:span text:style-name="T14">active</text:span><text:span text:style-name="T15">:</text:span><text:span text:style-name="T12"> </text:span><text:span text:style-name="T17">true</text:span><text:span text:style-name="T14">,</text:span><text:span text:style-name="T12"> </text:span><text:span text:style-name="T14">currentWindow</text:span><text:span text:style-name="T15">:</text:span><text:span text:style-name="T12"> </text:span><text:span text:style-name="T17">true</text:span><text:span text:style-name="T12"> </text:span><text:span text:style-name="T14">},</text:span><text:span text:style-name="T12"> </text:span><text:span text:style-name="T17">async</text:span><text:span text:style-name="T12"> </text:span><text:span text:style-name="T14">(tabs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108 <text:s/>| <text:s text:c="3"/></text:span><text:span text:style-name="T12"><text:s text:c="4"/></text:span><text:span text:style-name="T17">if</text:span><text:span text:style-name="T12"> </text:span><text:span text:style-name="T14">(tabs.length</text:span><text:span text:style-name="T12"> </text:span><text:span text:style-name="T15">===</text:span><text:span text:style-name="T12"> </text:span><text:span text:style-name="T15">0</text:span><text:span text:style-name="T14">)</text:span><text:span text:style-name="T12"> </text:span><text:span text:style-name="T14">{</text:span></text:p>
      <text:p text:style-name="P40"><text:span text:style-name="T11">109 <text:s/>| <text:s text:c="3"/></text:span><text:span text:style-name="T12"><text:s text:c="6"/></text:span><text:span text:style-name="T14">activeTabId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0"><text:span text:style-name="T11">110 <text:s/>| <text:s text:c="3"/></text:span><text:span text:style-name="T12"><text:s text:c="6"/></text:span><text:span text:style-name="T14">activeDomain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0"><text:span text:style-name="T11">111 <text:s/>| <text:s text:c="3"/></text:span><text:span text:style-name="T12"><text:s text:c="6"/></text:span><text:span text:style-name="T17">return</text:span><text:span text:style-name="T14">;</text:span></text:p>
      <text:p text:style-name="P40"><text:span text:style-name="T11">112 <text:s/>| <text:s text:c="3"/></text:span><text:span text:style-name="T12"><text:s text:c="4"/></text:span><text:span text:style-name="T14">}</text:span></text:p>
      <text:p text:style-name="P40"><text:span text:style-name="T11">113 <text:s/>| <text:s text:c="3"/></text:span><text:span text:style-name="T12"><text:s text:c="4"/></text:span><text:span text:style-name="T17">const</text:span><text:span text:style-name="T12"> </text:span><text:span text:style-name="T14">tab</text:span><text:span text:style-name="T12"> </text:span><text:span text:style-name="T15">=</text:span><text:span text:style-name="T12"> </text:span><text:span text:style-name="T14">tabs[</text:span><text:span text:style-name="T15">0</text:span><text:span text:style-name="T14">];</text:span></text:p>
      <text:p text:style-name="P40"><text:span text:style-name="T11">114 <text:s/>| <text:s text:c="3"/></text:span><text:span text:style-name="T12"><text:s text:c="4"/></text:span><text:span text:style-name="T14">activeTabId</text:span><text:span text:style-name="T12"> </text:span><text:span text:style-name="T15">=</text:span><text:span text:style-name="T12"> </text:span><text:span text:style-name="T14">tab.id;</text:span></text:p>
      <text:p text:style-name="P40"><text:span text:style-name="T11">115 <text:s/>| <text:s text:c="3"/></text:span><text:span text:style-name="T12"><text:s text:c="4"/></text:span><text:span text:style-name="T14">activeDomain</text:span><text:span text:style-name="T12"> </text:span><text:span text:style-name="T15">=</text:span><text:span text:style-name="T12"> </text:span><text:span text:style-name="T14">getDomain(tab.url);</text:span></text:p>
      <text:p text:style-name="P41">116 <text:s/>| <text:s text:c="3"/></text:p>
      <text:p text:style-name="P40"><text:span text:style-name="T11">117 <text:s/>| <text:s text:c="3"/></text:span><text:span text:style-name="T12"><text:s text:c="4"/></text:span><text:span text:style-name="T17">if</text:span><text:span text:style-name="T12"> </text:span><text:span text:style-name="T14">(activeDomain)</text:span><text:span text:style-name="T12"> </text:span><text:span text:style-name="T14">{</text:span></text:p>
      <text:p text:style-name="P40"><text:span text:style-name="T11">118 <text:s/>| <text:s text:c="3"/></text:span><text:span text:style-name="T12"><text:s text:c="6"/></text:span><text:span text:style-name="T17">await</text:span><text:span text:style-name="T12"> </text:span><text:span text:style-name="T14">checkLimitAndBlock(activeTabId,</text:span><text:span text:style-name="T12"> </text:span><text:span text:style-name="T14">activeDomain);</text:span></text:p>
      <text:p text:style-name="P40"><text:span text:style-name="T11">119 <text:s/>| <text:s text:c="3"/></text:span><text:span text:style-name="T12"><text:s text:c="4"/></text:span><text:span text:style-name="T14">}</text:span></text:p>
      <text:p text:style-name="P40"><text:span text:style-name="T11">120 <text:s/>| <text:s text:c="3"/></text:span><text:span text:style-name="T12"><text:s text:c="2"/></text:span><text:span text:style-name="T14">});</text:span></text:p>
      <text:p text:style-name="P42"><text:span text:style-name="T11">121 <text:s/>| <text:s text:c="3"/></text:span>}</text:p>
      <text:p text:style-name="P41">122 <text:s/>| <text:s text:c="3"/></text:p>
      <text:p text:style-name="P40"><text:span text:style-name="T11">123 <text:s/>| <text:s text:c="3"/></text:span><text:span text:style-name="T14">browserAPI.tabs.onActivated.addListener(updateActiveTab);</text:span></text:p>
      <text:p text:style-name="P40"><text:span text:style-name="T11">124 <text:s/>| <text:s text:c="3"/></text:span><text:span text:style-name="T14">browserAPI.tabs.onUpdated.addListener((tabId,</text:span><text:span text:style-name="T12"> </text:span><text:span text:style-name="T14">changeInfo,</text:span><text:span text:style-name="T12"> </text:span><text:span text:style-name="T14">tab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125 <text:s/>| <text:s text:c="3"/></text:span><text:span text:style-name="T12"><text:s text:c="2"/></text:span><text:span text:style-name="T17">if</text:span><text:span text:style-name="T12"> </text:span><text:span text:style-name="T14">(changeInfo.status</text:span><text:span text:style-name="T12"> </text:span><text:span text:style-name="T15">===</text:span><text:span text:style-name="T12"> </text:span><text:span text:style-name="T16">"complete"</text:span><text:span text:style-name="T12"> </text:span><text:span text:style-name="T15">||</text:span><text:span text:style-name="T12"> </text:span><text:span text:style-name="T14">changeInfo.url)</text:span><text:span text:style-name="T12"> </text:span><text:span text:style-name="T14">{</text:span></text:p>
      <text:p text:style-name="P40"><text:span text:style-name="T11">126 <text:s/>| <text:s text:c="3"/></text:span><text:span text:style-name="T12"><text:s text:c="4"/></text:span><text:span text:style-name="T14">updateActiveTab();</text:span></text:p>
      <text:p text:style-name="P40"><text:span text:style-name="T11">127 <text:s/>| <text:s text:c="3"/></text:span><text:span text:style-name="T12"><text:s text:c="2"/></text:span><text:span text:style-name="T14">}</text:span></text:p>
      <text:p text:style-name="P42"><text:span text:style-name="T11">128 <text:s/>| <text:s text:c="3"/></text:span>});</text:p>
      <text:p text:style-name="P41">129 <text:s/>| <text:s text:c="3"/></text:p>
      <text:p text:style-name="P40"><text:span text:style-name="T11">130 <text:s/>| <text:s text:c="3"/></text:span><text:span text:style-name="T14">browserAPI.windows.onFocusChanged.addListener((windowId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131 <text:s/>| <text:s text:c="3"/></text:span><text:span text:style-name="T12"><text:s text:c="2"/></text:span><text:span text:style-name="T17">if</text:span><text:span text:style-name="T12"> </text:span><text:span text:style-name="T14">(windowId</text:span><text:span text:style-name="T12"> </text:span><text:span text:style-name="T15">===</text:span><text:span text:style-name="T12"> </text:span><text:span text:style-name="T14">browserAPI.windows.WINDOW_ID_NONE)</text:span><text:span text:style-name="T12"> </text:span><text:span text:style-name="T14">{</text:span></text:p>
      <text:p text:style-name="P40"><text:span text:style-name="T11">132 <text:s/>| <text:s text:c="3"/></text:span><text:span text:style-name="T12"><text:s text:c="4"/></text:span><text:span text:style-name="T14">activeDomain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0"><text:span text:style-name="T11">133 <text:s/>| <text:s text:c="3"/></text:span><text:span text:style-name="T12"><text:s text:c="4"/></text:span><text:span text:style-name="T14">activeTabId</text:span><text:span text:style-name="T12"> </text:span><text:span text:style-name="T15">=</text:span><text:span text:style-name="T12"> </text:span><text:span text:style-name="T17">null</text:span><text:span text:style-name="T14">;</text:span></text:p>
      <text:p text:style-name="P40"><text:span text:style-name="T11">134 <text:s/>| <text:s text:c="3"/></text:span><text:span text:style-name="T12"><text:s text:c="2"/></text:span><text:span text:style-name="T14">}</text:span><text:span text:style-name="T12"> </text:span><text:span text:style-name="T17">else</text:span><text:span text:style-name="T12"> </text:span><text:span text:style-name="T14">{</text:span></text:p>
      <text:p text:style-name="P40"><text:span text:style-name="T11">135 <text:s/>| <text:s text:c="3"/></text:span><text:span text:style-name="T12"><text:s text:c="4"/></text:span><text:span text:style-name="T14">updateActiveTab();</text:span></text:p>
      <text:p text:style-name="P40"><text:span text:style-name="T11">136 <text:s/>| <text:s text:c="3"/></text:span><text:span text:style-name="T12"><text:s text:c="2"/></text:span><text:span text:style-name="T14">}</text:span></text:p>
      <text:p text:style-name="P42"><text:span text:style-name="T11">137 <text:s/>| <text:s text:c="3"/></text:span>});</text:p>
      <text:p text:style-name="P41">138 <text:s/>| <text:s text:c="3"/></text:p>
      <text:p text:style-name="P40"><text:span text:style-name="T11">139 <text:s/>| <text:s text:c="3"/></text:span><text:span text:style-name="T14">startTracking();</text:span></text:p>
      <text:p text:style-name="P43"/>
      <text:p text:style-name="P45">Исходный код settings/options.html:</text:p>
      <text:p text:style-name="P37"><text:span text:style-name="T18"><text:s/>1 <text:s/>| <text:s text:c="3"/></text:span>&lt;!doctype html&gt;</text:p>
      <text:p text:style-name="P38"><text:span text:style-name="T11"><text:s/>2 <text:s/>| <text:s text:c="3"/></text:span><text:span text:style-name="T14">&lt;</text:span><text:span text:style-name="T13">html</text:span><text:span text:style-name="T14"> </text:span><text:span text:style-name="T16">lang</text:span><text:span text:style-name="T15">=</text:span><text:span text:style-name="T16">"ru"</text:span><text:span text:style-name="T14">&gt;</text:span></text:p>
      <text:p text:style-name="P38"><text:span text:style-name="T11"><text:s/>3 <text:s/>| <text:s text:c="3"/></text:span><text:span text:style-name="T14"><text:s text:c="2"/>&lt;</text:span><text:span text:style-name="T13">head</text:span><text:span text:style-name="T14">&gt;</text:span></text:p>
      <text:p text:style-name="P38"><text:span text:style-name="T11"><text:s/>4 <text:s/>| <text:s text:c="3"/></text:span><text:span text:style-name="T14"><text:s text:c="4"/>&lt;</text:span><text:span text:style-name="T13">meta</text:span><text:span text:style-name="T14"> </text:span><text:span text:style-name="T16">charset</text:span><text:span text:style-name="T15">=</text:span><text:span text:style-name="T16">"UTF-8"</text:span><text:span text:style-name="T14"> /&gt;</text:span></text:p>
      <text:p text:style-name="P38"><text:span text:style-name="T11"><text:s/>5 <text:s/>| <text:s text:c="3"/></text:span><text:span text:style-name="T14"><text:s text:c="4"/>&lt;</text:span><text:span text:style-name="T13">meta</text:span><text:span text:style-name="T14"> </text:span><text:span text:style-name="T16">name</text:span><text:span text:style-name="T15">=</text:span><text:span text:style-name="T16">"viewport"</text:span><text:span text:style-name="T14"> </text:span><text:span text:style-name="T16">content</text:span><text:span text:style-name="T15">=</text:span><text:span text:style-name="T16">"width=device-width, initial-scale=1.0"</text:span><text:span text:style-name="T14"> /&gt;</text:span></text:p>
      <text:p text:style-name="P39"><text:s/>6 <text:s/>| <text:s text:c="3"/></text:p>
      <text:p text:style-name="P38"><text:span text:style-name="T11"><text:s/>7 <text:s/>| <text:s text:c="3"/></text:span><text:span text:style-name="T14"><text:s text:c="4"/>&lt;</text:span><text:span text:style-name="T13">title</text:span><text:span text:style-name="T14">&gt;Настройки Активности&lt;/</text:span><text:span text:style-name="T13">title</text:span><text:span text:style-name="T14">&gt;</text:span></text:p>
      <text:p text:style-name="P38"><text:span text:style-name="T11"><text:s/>8 <text:s/>| <text:s text:c="3"/></text:span><text:span text:style-name="T14"><text:s text:c="2"/>&lt;/</text:span><text:span text:style-name="T13">head</text:span><text:span text:style-name="T14">&gt;</text:span></text:p>
      <text:p text:style-name="P38"><text:span text:style-name="T11"><text:s/>9 <text:s/>| <text:s text:c="3"/></text:span><text:span text:style-name="T14"><text:s text:c="2"/>&lt;</text:span><text:span text:style-name="T13">body</text:span><text:span text:style-name="T14">&gt;</text:span></text:p>
      <text:p text:style-name="P38"><text:span text:style-name="T11">10 <text:s/>| <text:s text:c="3"/></text:span><text:span text:style-name="T14"><text:s text:c="4"/>&lt;</text:span><text:span text:style-name="T13">style</text:span><text:span text:style-name="T14">&gt;</text:span></text:p>
      <text:p text:style-name="P38"><text:span text:style-name="T11">11 <text:s/>| <text:s text:c="3"/></text:span><text:span text:style-name="T12"><text:s text:c="6"/></text:span><text:span text:style-name="T13">ul</text:span><text:span text:style-name="T12"> </text:span><text:span text:style-name="T14">{</text:span></text:p>
      <text:p text:style-name="P38"><text:span text:style-name="T11">12 <text:s/>| <text:s text:c="3"/></text:span><text:span text:style-name="T12"><text:s text:c="8"/></text:span><text:span text:style-name="T17">list-style</text:span><text:span text:style-name="T14">:</text:span><text:span text:style-name="T12"> </text:span><text:span text:style-name="T17">none</text:span><text:span text:style-name="T14">;</text:span></text:p>
      <text:p text:style-name="P38"><text:span text:style-name="T11">13 <text:s/>| <text:s text:c="3"/></text:span><text:span text:style-name="T12"><text:s text:c="6"/></text:span><text:span text:style-name="T14">}</text:span></text:p>
      <text:p text:style-name="P38"><text:span text:style-name="T11">14 <text:s/>| <text:s text:c="3"/></text:span><text:span text:style-name="T12"><text:s text:c="6"/></text:span><text:span text:style-name="T13">fieldset</text:span><text:span text:style-name="T12"> </text:span><text:span text:style-name="T14">{</text:span></text:p>
      <text:p text:style-name="P38"><text:span text:style-name="T11">15 <text:s/>| <text:s text:c="3"/></text:span><text:span text:style-name="T12"><text:s text:c="8"/></text:span><text:span text:style-name="T17">width</text:span><text:span text:style-name="T14">:</text:span><text:span text:style-name="T12"> </text:span><text:span text:style-name="T15">600</text:span><text:span text:style-name="T23">px</text:span><text:span text:style-name="T14">;</text:span></text:p>
      <text:p text:style-name="P38"><text:span text:style-name="T11">16 <text:s/>| <text:s text:c="3"/></text:span><text:span text:style-name="T12"><text:s text:c="6"/></text:span><text:span text:style-name="T14">}</text:span></text:p>
      <text:p text:style-name="P38"><text:span text:style-name="T11">17 <text:s/>| <text:s text:c="3"/></text:span><text:span text:style-name="T12"><text:s text:c="6"/></text:span><text:span text:style-name="T13">input</text:span><text:span text:style-name="T15">[</text:span><text:span text:style-name="T13">type</text:span><text:span text:style-name="T15">=</text:span><text:span text:style-name="T16">"number"</text:span><text:span text:style-name="T15">]</text:span><text:span text:style-name="T12"> </text:span><text:span text:style-name="T14">{</text:span></text:p>
      <text:p text:style-name="P38"><text:span text:style-name="T11">18 <text:s/>| <text:s text:c="3"/></text:span><text:span text:style-name="T12"><text:s text:c="8"/></text:span><text:span text:style-name="T17">margin-left</text:span><text:span text:style-name="T14">:</text:span><text:span text:style-name="T12"> </text:span><text:span text:style-name="T15">2</text:span><text:span text:style-name="T23">rem</text:span><text:span text:style-name="T14">;</text:span></text:p>
      <text:p text:style-name="P38"><text:span text:style-name="T11">19 <text:s/>| <text:s text:c="3"/></text:span><text:span text:style-name="T12"><text:s text:c="8"/></text:span><text:span text:style-name="T17">width</text:span><text:span text:style-name="T14">:</text:span><text:span text:style-name="T12"> </text:span><text:span text:style-name="T15">4</text:span><text:span text:style-name="T23">rem</text:span><text:span text:style-name="T14">;</text:span></text:p>
      <text:p text:style-name="P38"><text:span text:style-name="T11">20 <text:s/>| <text:s text:c="3"/></text:span><text:span text:style-name="T12"><text:s text:c="6"/></text:span><text:span text:style-name="T14">}</text:span></text:p>
      <text:p text:style-name="P38"><text:span text:style-name="T11">21 <text:s/>| <text:s text:c="3"/></text:span><text:span text:style-name="T12"><text:s text:c="6"/></text:span><text:span text:style-name="T13">button</text:span><text:span text:style-name="T12"> </text:span><text:span text:style-name="T14">{</text:span></text:p>
      <text:p text:style-name="P38"><text:span text:style-name="T11">22 <text:s/>| <text:s text:c="3"/></text:span><text:span text:style-name="T12"><text:s text:c="8"/></text:span><text:span text:style-name="T17">margin</text:span><text:span text:style-name="T14">:</text:span><text:span text:style-name="T12"> </text:span><text:span text:style-name="T15">0.5</text:span><text:span text:style-name="T23">rem</text:span><text:span text:style-name="T14">;</text:span></text:p>
      <text:p text:style-name="P38"><text:span text:style-name="T11">23 <text:s/>| <text:s text:c="3"/></text:span><text:span text:style-name="T12"><text:s text:c="6"/></text:span><text:span text:style-name="T14">}</text:span></text:p>
      <text:p text:style-name="P38"><text:span text:style-name="T11">24 <text:s/>| <text:s text:c="3"/></text:span><text:span text:style-name="T12"><text:s text:c="4"/></text:span><text:span text:style-name="T14">&lt;/</text:span><text:span text:style-name="T13">style</text:span><text:span text:style-name="T14">&gt;</text:span></text:p>
      <text:p text:style-name="P38"><text:span text:style-name="T11">25 <text:s/>| <text:s text:c="3"/></text:span><text:span text:style-name="T14"><text:s text:c="4"/>&lt;</text:span><text:span text:style-name="T13">h1</text:span><text:span text:style-name="T14">&gt;Настройки Активности&lt;/</text:span><text:span text:style-name="T13">h1</text:span><text:span text:style-name="T14">&gt;</text:span></text:p>
      <text:p text:style-name="P38"><text:span text:style-name="T11">26 <text:s/>| <text:s text:c="3"/></text:span><text:span text:style-name="T14"><text:s text:c="4"/>&lt;</text:span><text:span text:style-name="T13">p</text:span><text:span text:style-name="T14">&gt;Здесь вы можете настроить параметры контроля активности&lt;/</text:span><text:span text:style-name="T13">p</text:span><text:span text:style-name="T14">&gt;</text:span></text:p>
      <text:p text:style-name="P38"><text:span text:style-name="T11">27 <text:s/>| <text:s text:c="3"/></text:span><text:span text:style-name="T14"><text:s text:c="4"/>&lt;</text:span><text:span text:style-name="T13">fieldset</text:span><text:span text:style-name="T14"> </text:span><text:span text:style-name="T16">id</text:span><text:span text:style-name="T15">=</text:span><text:span text:style-name="T16">"url-list"</text:span><text:span text:style-name="T14">&gt;</text:span></text:p>
      <text:p text:style-name="P38"><text:span text:style-name="T11">28 <text:s/>| <text:s text:c="3"/></text:span><text:span text:style-name="T14"><text:s text:c="6"/>&lt;</text:span><text:span text:style-name="T13">legend</text:span><text:span text:style-name="T14">&gt;Список URL:&lt;/</text:span><text:span text:style-name="T13">legend</text:span><text:span text:style-name="T14">&gt;</text:span></text:p>
      <text:p text:style-name="P38"><text:soft-page-break/><text:span text:style-name="T11">29 <text:s/>| <text:s text:c="3"/></text:span><text:span text:style-name="T14"><text:s text:c="6"/>&lt;</text:span><text:span text:style-name="T13">ul</text:span><text:span text:style-name="T14"> </text:span><text:span text:style-name="T16">id</text:span><text:span text:style-name="T15">=</text:span><text:span text:style-name="T16">"url-items"</text:span><text:span text:style-name="T14">&gt;</text:span></text:p>
      <text:p text:style-name="P38"><text:span text:style-name="T11">30 <text:s/>| <text:s text:c="3"/></text:span><text:span text:style-name="T14"><text:s text:c="8"/></text:span><text:span text:style-name="T24">&lt;!-- Список URL будет динамически заполняться --&gt;</text:span></text:p>
      <text:p text:style-name="P38"><text:span text:style-name="T11">31 <text:s/>| <text:s text:c="3"/></text:span><text:span text:style-name="T14"><text:s text:c="6"/>&lt;/</text:span><text:span text:style-name="T13">ul</text:span><text:span text:style-name="T14">&gt;</text:span></text:p>
      <text:p text:style-name="P38"><text:span text:style-name="T11">32 <text:s/>| <text:s text:c="3"/></text:span><text:span text:style-name="T14"><text:s text:c="4"/>&lt;/</text:span><text:span text:style-name="T13">fieldset</text:span><text:span text:style-name="T14">&gt;</text:span></text:p>
      <text:p text:style-name="P38"><text:span text:style-name="T11">33 <text:s/>| <text:s text:c="3"/></text:span><text:span text:style-name="T14"><text:s text:c="4"/>&lt;</text:span><text:span text:style-name="T13">div</text:span><text:span text:style-name="T14"> </text:span><text:span text:style-name="T16">class</text:span><text:span text:style-name="T15">=</text:span><text:span text:style-name="T16">"btns-container"</text:span><text:span text:style-name="T14">&gt;</text:span></text:p>
      <text:p text:style-name="P38"><text:span text:style-name="T11">34 <text:s/>| <text:s text:c="3"/></text:span><text:span text:style-name="T14"><text:s text:c="6"/>&lt;</text:span><text:span text:style-name="T13">button</text:span><text:span text:style-name="T14"> </text:span><text:span text:style-name="T16">id</text:span><text:span text:style-name="T15">=</text:span><text:span text:style-name="T16">"add-url-btn"</text:span><text:span text:style-name="T14">&gt;Добавить новый URL&lt;/</text:span><text:span text:style-name="T13">button</text:span><text:span text:style-name="T14">&gt;</text:span></text:p>
      <text:p text:style-name="P38"><text:span text:style-name="T11">35 <text:s/>| <text:s text:c="3"/></text:span><text:span text:style-name="T14"><text:s text:c="6"/>&lt;</text:span><text:span text:style-name="T13">button</text:span><text:span text:style-name="T14"> </text:span><text:span text:style-name="T16">id</text:span><text:span text:style-name="T15">=</text:span><text:span text:style-name="T16">"save-btn"</text:span><text:span text:style-name="T14">&gt;Сохранить настройки&lt;/</text:span><text:span text:style-name="T13">button</text:span><text:span text:style-name="T14">&gt;</text:span></text:p>
      <text:p text:style-name="P38"><text:span text:style-name="T11">36 <text:s/>| <text:s text:c="3"/></text:span><text:span text:style-name="T14"><text:s text:c="4"/>&lt;/</text:span><text:span text:style-name="T13">div</text:span><text:span text:style-name="T14">&gt;</text:span></text:p>
      <text:p text:style-name="P38"><text:span text:style-name="T11">37 <text:s/>| <text:s text:c="3"/></text:span><text:span text:style-name="T14"><text:s text:c="4"/>&lt;</text:span><text:span text:style-name="T13">script</text:span><text:span text:style-name="T14"> </text:span><text:span text:style-name="T16">src</text:span><text:span text:style-name="T15">=</text:span><text:span text:style-name="T16">"options.js"</text:span><text:span text:style-name="T14">&gt;&lt;/</text:span><text:span text:style-name="T13">script</text:span><text:span text:style-name="T14">&gt;</text:span></text:p>
      <text:p text:style-name="P38"><text:span text:style-name="T11">38 <text:s/>| <text:s text:c="3"/></text:span><text:span text:style-name="T14"><text:s text:c="2"/>&lt;/</text:span><text:span text:style-name="T13">body</text:span><text:span text:style-name="T14">&gt;</text:span></text:p>
      <text:p text:style-name="P38"><text:span text:style-name="T11">39 <text:s/>| <text:s text:c="3"/></text:span><text:span text:style-name="T14">&lt;/</text:span><text:span text:style-name="T13">html</text:span><text:span text:style-name="T14">&gt;</text:span></text:p>
      <text:p text:style-name="P43"/>
      <text:p text:style-name="P45">Исходный код settings/options.js:</text:p>
      <text:p text:style-name="P40"><text:span text:style-name="T11"><text:s/>1 <text:s/>| <text:s text:c="3"/></text:span><text:span text:style-name="T17">const</text:span><text:span text:style-name="T12"> </text:span><text:span text:style-name="T14">browserAPI</text:span><text:span text:style-name="T12"> </text:span><text:span text:style-name="T15">=</text:span><text:span text:style-name="T12"> </text:span><text:span text:style-name="T17">typeof</text:span><text:span text:style-name="T12"> </text:span><text:span text:style-name="T14">browser</text:span><text:span text:style-name="T12"> </text:span><text:span text:style-name="T15">!==</text:span><text:span text:style-name="T12"> </text:span><text:span text:style-name="T16">"undefined"</text:span><text:span text:style-name="T12"> </text:span><text:span text:style-name="T15">?</text:span><text:span text:style-name="T12"> </text:span><text:span text:style-name="T14">browser</text:span><text:span text:style-name="T12"> </text:span><text:span text:style-name="T15">:</text:span><text:span text:style-name="T12"> </text:span><text:span text:style-name="T14">chrome;</text:span></text:p>
      <text:p text:style-name="P41"><text:s/>2 <text:s/>| <text:s text:c="3"/></text:p>
      <text:p text:style-name="P40"><text:span text:style-name="T11"><text:s/>3 <text:s/>| <text:s text:c="3"/></text:span><text:span text:style-name="T17">const</text:span><text:span text:style-name="T12"> </text:span><text:span text:style-name="T14">urlList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url-items"</text:span><text:span text:style-name="T14">);</text:span></text:p>
      <text:p text:style-name="P40"><text:span text:style-name="T11"><text:s/>4 <text:s/>| <text:s text:c="3"/></text:span><text:span text:style-name="T17">const</text:span><text:span text:style-name="T12"> </text:span><text:span text:style-name="T14">saveBtn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save-btn"</text:span><text:span text:style-name="T14">);</text:span></text:p>
      <text:p text:style-name="P40"><text:span text:style-name="T11"><text:s/>5 <text:s/>| <text:s text:c="3"/></text:span><text:span text:style-name="T17">const</text:span><text:span text:style-name="T12"> </text:span><text:span text:style-name="T14">addUrlBtn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add-url-btn"</text:span><text:span text:style-name="T14">);</text:span></text:p>
      <text:p text:style-name="P41"><text:s/>6 <text:s/>| <text:s text:c="3"/></text:p>
      <text:p text:style-name="P40"><text:span text:style-name="T11"><text:s/>7 <text:s/>| <text:s text:c="3"/></text:span><text:span text:style-name="T17">class</text:span><text:span text:style-name="T12"> </text:span><text:span text:style-name="T14">UrlItem</text:span><text:span text:style-name="T12"> </text:span><text:span text:style-name="T14">{</text:span></text:p>
      <text:p text:style-name="P40"><text:span text:style-name="T11"><text:s/>8 <text:s/>| <text:s text:c="3"/></text:span><text:span text:style-name="T12"><text:s text:c="2"/></text:span><text:span text:style-name="T17">constructor</text:span><text:span text:style-name="T14">(url,</text:span><text:span text:style-name="T12"> </text:span><text:span text:style-name="T14">time)</text:span><text:span text:style-name="T12"> </text:span><text:span text:style-name="T14">{</text:span></text:p>
      <text:p text:style-name="P40"><text:span text:style-name="T11"><text:s/>9 <text:s/>| <text:s text:c="3"/></text:span><text:span text:style-name="T12"><text:s text:c="4"/></text:span><text:span text:style-name="T17">this</text:span><text:span text:style-name="T14">.url</text:span><text:span text:style-name="T12"> </text:span><text:span text:style-name="T15">=</text:span><text:span text:style-name="T12"> </text:span><text:span text:style-name="T14">url;</text:span></text:p>
      <text:p text:style-name="P40"><text:span text:style-name="T11">10 <text:s/>| <text:s text:c="3"/></text:span><text:span text:style-name="T12"><text:s text:c="4"/></text:span><text:span text:style-name="T17">this</text:span><text:span text:style-name="T14">.time</text:span><text:span text:style-name="T12"> </text:span><text:span text:style-name="T15">=</text:span><text:span text:style-name="T12"> </text:span><text:span text:style-name="T14">time;</text:span></text:p>
      <text:p text:style-name="P40"><text:span text:style-name="T11">11 <text:s/>| <text:s text:c="3"/></text:span><text:span text:style-name="T12"><text:s text:c="4"/></text:span><text:span text:style-name="T17">this</text:span><text:span text:style-name="T14">.li</text:span><text:span text:style-name="T12"> </text:span><text:span text:style-name="T15">=</text:span><text:span text:style-name="T12"> </text:span><text:span text:style-name="T19">document</text:span><text:span text:style-name="T14">.createElement(</text:span><text:span text:style-name="T16">"li"</text:span><text:span text:style-name="T14">);</text:span></text:p>
      <text:p text:style-name="P40"><text:span text:style-name="T11">12 <text:s/>| <text:s text:c="3"/></text:span><text:span text:style-name="T12"><text:s text:c="4"/></text:span><text:span text:style-name="T17">this</text:span><text:span text:style-name="T14">.li.className</text:span><text:span text:style-name="T12"> </text:span><text:span text:style-name="T15">=</text:span><text:span text:style-name="T12"> </text:span><text:span text:style-name="T16">"url-item"</text:span><text:span text:style-name="T14">;</text:span></text:p>
      <text:p text:style-name="P41">13 <text:s/>| <text:s text:c="3"/></text:p>
      <text:p text:style-name="P40"><text:span text:style-name="T11">14 <text:s/>| <text:s text:c="3"/></text:span><text:span text:style-name="T12"><text:s text:c="4"/></text:span><text:span text:style-name="T17">const</text:span><text:span text:style-name="T12"> </text:span><text:span text:style-name="T14">urlInput</text:span><text:span text:style-name="T12"> </text:span><text:span text:style-name="T15">=</text:span><text:span text:style-name="T12"> </text:span><text:span text:style-name="T19">document</text:span><text:span text:style-name="T14">.createElement(</text:span><text:span text:style-name="T16">"input"</text:span><text:span text:style-name="T14">);</text:span></text:p>
      <text:p text:style-name="P40"><text:span text:style-name="T11">15 <text:s/>| <text:s text:c="3"/></text:span><text:span text:style-name="T12"><text:s text:c="4"/></text:span><text:span text:style-name="T14">urlInput.type</text:span><text:span text:style-name="T12"> </text:span><text:span text:style-name="T15">=</text:span><text:span text:style-name="T12"> </text:span><text:span text:style-name="T16">"text"</text:span><text:span text:style-name="T14">;</text:span></text:p>
      <text:p text:style-name="P40"><text:span text:style-name="T11">16 <text:s/>| <text:s text:c="3"/></text:span><text:span text:style-name="T12"><text:s text:c="4"/></text:span><text:span text:style-name="T14">urlInput.placeholder</text:span><text:span text:style-name="T12"> </text:span><text:span text:style-name="T15">=</text:span><text:span text:style-name="T12"> </text:span><text:span text:style-name="T16">"Ссылка"</text:span><text:span text:style-name="T14">;</text:span></text:p>
      <text:p text:style-name="P40"><text:span text:style-name="T11">17 <text:s/>| <text:s text:c="3"/></text:span><text:span text:style-name="T12"><text:s text:c="4"/></text:span><text:span text:style-name="T14">urlInput.value</text:span><text:span text:style-name="T12"> </text:span><text:span text:style-name="T15">=</text:span><text:span text:style-name="T12"> </text:span><text:span text:style-name="T14">url;</text:span></text:p>
      <text:p text:style-name="P41">18 <text:s/>| <text:s text:c="3"/></text:p>
      <text:p text:style-name="P40"><text:span text:style-name="T11">19 <text:s/>| <text:s text:c="3"/></text:span><text:span text:style-name="T12"><text:s text:c="4"/></text:span><text:span text:style-name="T17">const</text:span><text:span text:style-name="T12"> </text:span><text:span text:style-name="T14">deleteBtn</text:span><text:span text:style-name="T12"> </text:span><text:span text:style-name="T15">=</text:span><text:span text:style-name="T12"> </text:span><text:span text:style-name="T19">document</text:span><text:span text:style-name="T14">.createElement(</text:span><text:span text:style-name="T16">"button"</text:span><text:span text:style-name="T14">);</text:span></text:p>
      <text:p text:style-name="P40"><text:span text:style-name="T11">20 <text:s/>| <text:s text:c="3"/></text:span><text:span text:style-name="T12"><text:s text:c="4"/></text:span><text:span text:style-name="T14">deleteBtn.textContent</text:span><text:span text:style-name="T12"> </text:span><text:span text:style-name="T15">=</text:span><text:span text:style-name="T12"> </text:span><text:span text:style-name="T16">"❌"</text:span><text:span text:style-name="T14">;</text:span></text:p>
      <text:p text:style-name="P40"><text:span text:style-name="T11">21 <text:s/>| <text:s text:c="3"/></text:span><text:span text:style-name="T12"><text:s text:c="4"/></text:span><text:span text:style-name="T14">deleteBtn.addEventListener(</text:span><text:span text:style-name="T16">"click"</text:span><text:span text:style-name="T14">,</text:span><text:span text:style-name="T12"> </text:span><text:span text:style-name="T14">()</text:span><text:span text:style-name="T12"> </text:span><text:span text:style-name="T14">=&gt;</text:span><text:span text:style-name="T12"> </text:span><text:span text:style-name="T17">this</text:span><text:span text:style-name="T14">.li.remove());</text:span></text:p>
      <text:p text:style-name="P41">22 <text:s/>| <text:s text:c="3"/></text:p>
      <text:p text:style-name="P40"><text:span text:style-name="T11">23 <text:s/>| <text:s text:c="3"/></text:span><text:span text:style-name="T12"><text:s text:c="4"/></text:span><text:span text:style-name="T17">const</text:span><text:span text:style-name="T12"> </text:span><text:span text:style-name="T14">timeInput</text:span><text:span text:style-name="T12"> </text:span><text:span text:style-name="T15">=</text:span><text:span text:style-name="T12"> </text:span><text:span text:style-name="T19">document</text:span><text:span text:style-name="T14">.createElement(</text:span><text:span text:style-name="T16">"input"</text:span><text:span text:style-name="T14">);</text:span></text:p>
      <text:p text:style-name="P40"><text:span text:style-name="T11">24 <text:s/>| <text:s text:c="3"/></text:span><text:span text:style-name="T12"><text:s text:c="4"/></text:span><text:span text:style-name="T14">timeInput.type</text:span><text:span text:style-name="T12"> </text:span><text:span text:style-name="T15">=</text:span><text:span text:style-name="T12"> </text:span><text:span text:style-name="T16">"number"</text:span><text:span text:style-name="T14">;</text:span></text:p>
      <text:p text:style-name="P40"><text:span text:style-name="T11">25 <text:s/>| <text:s text:c="3"/></text:span><text:span text:style-name="T12"><text:s text:c="4"/></text:span><text:span text:style-name="T14">timeInput.min</text:span><text:span text:style-name="T12"> </text:span><text:span text:style-name="T15">=</text:span><text:span text:style-name="T12"> </text:span><text:span text:style-name="T16">"0"</text:span><text:span text:style-name="T14">;</text:span></text:p>
      <text:p text:style-name="P40"><text:span text:style-name="T11">26 <text:s/>| <text:s text:c="3"/></text:span><text:span text:style-name="T12"><text:s text:c="4"/></text:span><text:span text:style-name="T14">timeInput.placeholder</text:span><text:span text:style-name="T12"> </text:span><text:span text:style-name="T15">=</text:span><text:span text:style-name="T12"> </text:span><text:span text:style-name="T16">"Время в минутах"</text:span><text:span text:style-name="T14">;</text:span></text:p>
      <text:p text:style-name="P40"><text:span text:style-name="T11">27 <text:s/>| <text:s text:c="3"/></text:span><text:span text:style-name="T12"><text:s text:c="4"/></text:span><text:span text:style-name="T14">timeInput.value</text:span><text:span text:style-name="T12"> </text:span><text:span text:style-name="T15">=</text:span><text:span text:style-name="T12"> </text:span><text:span text:style-name="T19">String</text:span><text:span text:style-name="T14">(time)</text:span><text:span text:style-name="T12"> </text:span><text:span text:style-name="T15">||</text:span><text:span text:style-name="T12"> </text:span><text:span text:style-name="T16">"0"</text:span><text:span text:style-name="T14">;</text:span></text:p>
      <text:p text:style-name="P41">28 <text:s/>| <text:s text:c="3"/></text:p>
      <text:p text:style-name="P40"><text:span text:style-name="T11">29 <text:s/>| <text:s text:c="3"/></text:span><text:span text:style-name="T12"><text:s text:c="4"/></text:span><text:span text:style-name="T17">this</text:span><text:span text:style-name="T14">.li.appendChild(urlInput);</text:span></text:p>
      <text:p text:style-name="P40"><text:span text:style-name="T11">30 <text:s/>| <text:s text:c="3"/></text:span><text:span text:style-name="T12"><text:s text:c="4"/></text:span><text:span text:style-name="T17">this</text:span><text:span text:style-name="T14">.li.appendChild(deleteBtn);</text:span></text:p>
      <text:p text:style-name="P40"><text:span text:style-name="T11">31 <text:s/>| <text:s text:c="3"/></text:span><text:span text:style-name="T12"><text:s text:c="4"/></text:span><text:span text:style-name="T17">this</text:span><text:span text:style-name="T14">.li.appendChild(timeInput);</text:span></text:p>
      <text:p text:style-name="P40"><text:span text:style-name="T11">32 <text:s/>| <text:s text:c="3"/></text:span><text:span text:style-name="T12"><text:s text:c="2"/></text:span><text:span text:style-name="T14">}</text:span></text:p>
      <text:p text:style-name="P42"><text:span text:style-name="T11">33 <text:s/>| <text:s text:c="3"/></text:span>}</text:p>
      <text:p text:style-name="P41">34 <text:s/>| <text:s text:c="3"/></text:p>
      <text:p text:style-name="P40"><text:span text:style-name="T11">35 <text:s/>| <text:s text:c="3"/></text:span><text:span text:style-name="T14">browserAPI.storage.sync.get(</text:span><text:span text:style-name="T16">"urls"</text:span><text:span text:style-name="T14">).then((result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36 <text:s/>| <text:s text:c="3"/></text:span><text:span text:style-name="T12"><text:s text:c="2"/></text:span><text:span text:style-name="T17">const</text:span><text:span text:style-name="T12"> </text:span><text:span text:style-name="T14">urls</text:span><text:span text:style-name="T12"> </text:span><text:span text:style-name="T15">=</text:span><text:span text:style-name="T12"> </text:span><text:span text:style-name="T14">result.urls</text:span><text:span text:style-name="T12"> </text:span><text:span text:style-name="T15">||</text:span><text:span text:style-name="T12"> </text:span><text:span text:style-name="T14">[];</text:span></text:p>
      <text:p text:style-name="P40"><text:span text:style-name="T11">37 <text:s/>| <text:s text:c="3"/></text:span><text:span text:style-name="T12"><text:s text:c="2"/></text:span><text:span text:style-name="T14">urls.forEach(({</text:span><text:span text:style-name="T12"> </text:span><text:span text:style-name="T14">url,</text:span><text:span text:style-name="T12"> </text:span><text:span text:style-name="T14">time</text:span><text:span text:style-name="T12"> </text:span><text:span text:style-name="T14">}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38 <text:s/>| <text:s text:c="3"/></text:span><text:span text:style-name="T12"><text:s text:c="4"/></text:span><text:span text:style-name="T17">const</text:span><text:span text:style-name="T12"> </text:span><text:span text:style-name="T14">urlItem</text:span><text:span text:style-name="T12"> </text:span><text:span text:style-name="T15">=</text:span><text:span text:style-name="T12"> </text:span><text:span text:style-name="T17">new</text:span><text:span text:style-name="T12"> </text:span><text:span text:style-name="T14">UrlItem(url,</text:span><text:span text:style-name="T12"> </text:span><text:span text:style-name="T14">time);</text:span></text:p>
      <text:p text:style-name="P40"><text:span text:style-name="T11">39 <text:s/>| <text:s text:c="3"/></text:span><text:span text:style-name="T12"><text:s text:c="4"/></text:span><text:span text:style-name="T14">urlList.appendChild(urlItem.li);</text:span></text:p>
      <text:p text:style-name="P40"><text:span text:style-name="T11">40 <text:s/>| <text:s text:c="3"/></text:span><text:span text:style-name="T12"><text:s text:c="2"/></text:span><text:span text:style-name="T14">});</text:span></text:p>
      <text:p text:style-name="P42"><text:span text:style-name="T11">41 <text:s/>| <text:s text:c="3"/></text:span>});</text:p>
      <text:p text:style-name="P41">42 <text:s/>| <text:s text:c="3"/></text:p>
      <text:p text:style-name="P40"><text:span text:style-name="T11">43 <text:s/>| <text:s text:c="3"/></text:span><text:span text:style-name="T17">function</text:span><text:span text:style-name="T12"> </text:span><text:span text:style-name="T14">saveSettings()</text:span><text:span text:style-name="T12"> </text:span><text:span text:style-name="T14">{</text:span></text:p>
      <text:p text:style-name="P40"><text:span text:style-name="T11">44 <text:s/>| <text:s text:c="3"/></text:span><text:span text:style-name="T12"><text:s text:c="2"/></text:span><text:span text:style-name="T17">const</text:span><text:span text:style-name="T12"> </text:span><text:span text:style-name="T14">urls</text:span><text:span text:style-name="T12"> </text:span><text:span text:style-name="T15">=</text:span><text:span text:style-name="T12"> </text:span><text:span text:style-name="T14">[];</text:span></text:p>
      <text:p text:style-name="P40"><text:span text:style-name="T11">45 <text:s/>| <text:s text:c="3"/></text:span><text:span text:style-name="T12"><text:s text:c="2"/></text:span><text:span text:style-name="T14">urlList.querySelectorAll(</text:span><text:span text:style-name="T16">".url-item"</text:span><text:span text:style-name="T14">).forEach((li)</text:span><text:span text:style-name="T12"> </text:span><text:span text:style-name="T14">=&gt;</text:span><text:span text:style-name="T12"> </text:span><text:span text:style-name="T14">{</text:span></text:p>
      <text:p text:style-name="P40"><text:span text:style-name="T11">46 <text:s/>| <text:s text:c="3"/></text:span><text:span text:style-name="T12"><text:s text:c="4"/></text:span><text:span text:style-name="T17">const</text:span><text:span text:style-name="T12"> </text:span><text:span text:style-name="T14">urlInput</text:span><text:span text:style-name="T12"> </text:span><text:span text:style-name="T15">=</text:span><text:span text:style-name="T12"> </text:span><text:span text:style-name="T14">li.querySelector(</text:span><text:span text:style-name="T16">"input[type='text']"</text:span><text:span text:style-name="T14">);</text:span></text:p>
      <text:p text:style-name="P40"><text:span text:style-name="T11">47 <text:s/>| <text:s text:c="3"/></text:span><text:span text:style-name="T12"><text:s text:c="4"/></text:span><text:span text:style-name="T17">const</text:span><text:span text:style-name="T12"> </text:span><text:span text:style-name="T14">timeInput</text:span><text:span text:style-name="T12"> </text:span><text:span text:style-name="T15">=</text:span><text:span text:style-name="T12"> </text:span><text:span text:style-name="T14">li.querySelector(</text:span><text:span text:style-name="T16">"input[type='number']"</text:span><text:span text:style-name="T14">);</text:span></text:p>
      <text:p text:style-name="P40"><text:span text:style-name="T11">48 <text:s/>| <text:s text:c="3"/></text:span><text:span text:style-name="T12"><text:s text:c="4"/></text:span><text:span text:style-name="T17">const</text:span><text:span text:style-name="T12"> </text:span><text:span text:style-name="T14">url</text:span><text:span text:style-name="T12"> </text:span><text:span text:style-name="T15">=</text:span><text:span text:style-name="T12"> </text:span><text:span text:style-name="T14">urlInput.value.trim();</text:span></text:p>
      <text:p text:style-name="P40"><text:span text:style-name="T11">49 <text:s/>| <text:s text:c="3"/></text:span><text:span text:style-name="T12"><text:s text:c="4"/></text:span><text:span text:style-name="T17">const</text:span><text:span text:style-name="T12"> </text:span><text:span text:style-name="T14">time</text:span><text:span text:style-name="T12"> </text:span><text:span text:style-name="T15">=</text:span><text:span text:style-name="T12"> </text:span><text:span text:style-name="T19">parseInt</text:span><text:span text:style-name="T14">(timeInput.value,</text:span><text:span text:style-name="T12"> </text:span><text:span text:style-name="T15">10</text:span><text:span text:style-name="T14">)</text:span><text:span text:style-name="T12"> </text:span><text:span text:style-name="T15">||</text:span><text:span text:style-name="T12"> </text:span><text:span text:style-name="T15">0</text:span><text:span text:style-name="T14">;</text:span></text:p>
      <text:p text:style-name="P40"><text:span text:style-name="T11">50 <text:s/>| <text:s text:c="3"/></text:span><text:span text:style-name="T12"><text:s text:c="4"/></text:span><text:span text:style-name="T17">if</text:span><text:span text:style-name="T12"> </text:span><text:span text:style-name="T14">(url</text:span><text:span text:style-name="T12"> </text:span><text:span text:style-name="T15">!==</text:span><text:span text:style-name="T12"> </text:span><text:span text:style-name="T16">""</text:span><text:span text:style-name="T14">)</text:span><text:span text:style-name="T12"> </text:span><text:span text:style-name="T14">{</text:span></text:p>
      <text:p text:style-name="P40"><text:span text:style-name="T11">51 <text:s/>| <text:s text:c="3"/></text:span><text:span text:style-name="T12"><text:s text:c="6"/></text:span><text:span text:style-name="T14">urls.push({</text:span><text:span text:style-name="T12"> </text:span><text:span text:style-name="T14">url,</text:span><text:span text:style-name="T12"> </text:span><text:span text:style-name="T14">time</text:span><text:span text:style-name="T12"> </text:span><text:span text:style-name="T14">});</text:span></text:p>
      <text:p text:style-name="P40"><text:span text:style-name="T11">52 <text:s/>| <text:s text:c="3"/></text:span><text:span text:style-name="T12"><text:s text:c="4"/></text:span><text:span text:style-name="T14">}</text:span></text:p>
      <text:p text:style-name="P40"><text:span text:style-name="T11">53 <text:s/>| <text:s text:c="3"/></text:span><text:span text:style-name="T12"><text:s text:c="2"/></text:span><text:span text:style-name="T14">});</text:span></text:p>
      <text:p text:style-name="P40"><text:span text:style-name="T11">54 <text:s/>| <text:s text:c="3"/></text:span><text:span text:style-name="T12"><text:s text:c="2"/></text:span><text:span text:style-name="T14">browserAPI.storage.sync.set({</text:span><text:span text:style-name="T12"> </text:span><text:span text:style-name="T14">urls</text:span><text:span text:style-name="T15">:</text:span><text:span text:style-name="T12"> </text:span><text:span text:style-name="T14">urls</text:span><text:span text:style-name="T12"> </text:span><text:span text:style-name="T14">});</text:span></text:p>
      <text:p text:style-name="P42"><text:soft-page-break/><text:span text:style-name="T11">55 <text:s/>| <text:s text:c="3"/></text:span>}</text:p>
      <text:p text:style-name="P41">56 <text:s/>| <text:s text:c="3"/></text:p>
      <text:p text:style-name="P40"><text:span text:style-name="T11">57 <text:s/>| <text:s text:c="3"/></text:span><text:span text:style-name="T17">function</text:span><text:span text:style-name="T12"> </text:span><text:span text:style-name="T14">addUrl()</text:span><text:span text:style-name="T12"> </text:span><text:span text:style-name="T14">{</text:span></text:p>
      <text:p text:style-name="P40"><text:span text:style-name="T11">58 <text:s/>| <text:s text:c="3"/></text:span><text:span text:style-name="T12"><text:s text:c="2"/></text:span><text:span text:style-name="T17">const</text:span><text:span text:style-name="T12"> </text:span><text:span text:style-name="T14">newUrlItem</text:span><text:span text:style-name="T12"> </text:span><text:span text:style-name="T15">=</text:span><text:span text:style-name="T12"> </text:span><text:span text:style-name="T17">new</text:span><text:span text:style-name="T12"> </text:span><text:span text:style-name="T14">UrlItem(</text:span><text:span text:style-name="T16">""</text:span><text:span text:style-name="T14">,</text:span><text:span text:style-name="T12"> </text:span><text:span text:style-name="T15">0</text:span><text:span text:style-name="T14">);</text:span></text:p>
      <text:p text:style-name="P40"><text:span text:style-name="T11">59 <text:s/>| <text:s text:c="3"/></text:span><text:span text:style-name="T12"><text:s text:c="2"/></text:span><text:span text:style-name="T14">urlList.appendChild(newUrlItem.li);</text:span></text:p>
      <text:p text:style-name="P42"><text:span text:style-name="T11">60 <text:s/>| <text:s text:c="3"/></text:span>}</text:p>
      <text:p text:style-name="P41">61 <text:s/>| <text:s text:c="3"/></text:p>
      <text:p text:style-name="P40"><text:span text:style-name="T11">62 <text:s/>| <text:s text:c="3"/></text:span><text:span text:style-name="T14">saveBtn.addEventListener(</text:span><text:span text:style-name="T16">"click"</text:span><text:span text:style-name="T14">,</text:span><text:span text:style-name="T12"> </text:span><text:span text:style-name="T14">saveSettings);</text:span></text:p>
      <text:p text:style-name="P40"><text:span text:style-name="T11">63 <text:s/>| <text:s text:c="3"/></text:span><text:span text:style-name="T14">addUrlBtn.addEventListener(</text:span><text:span text:style-name="T16">"click"</text:span><text:span text:style-name="T14">,</text:span><text:span text:style-name="T12"> </text:span><text:span text:style-name="T14">addUrl);</text:span></text:p>
      <text:p text:style-name="P45"/>
      <text:p text:style-name="P45"/>
      <text:p text:style-name="P45">Исходный код blocked/blocked.html:</text:p>
      <text:p text:style-name="P37"><text:span text:style-name="T18"><text:s/>1 <text:s/>| <text:s text:c="3"/></text:span>&lt;!doctype html&gt;</text:p>
      <text:p text:style-name="P38"><text:span text:style-name="T11"><text:s/>2 <text:s/>| <text:s text:c="3"/></text:span><text:span text:style-name="T14">&lt;</text:span><text:span text:style-name="T13">html</text:span><text:span text:style-name="T14"> </text:span><text:span text:style-name="T16">lang</text:span><text:span text:style-name="T15">=</text:span><text:span text:style-name="T16">"ru"</text:span><text:span text:style-name="T14">&gt;</text:span></text:p>
      <text:p text:style-name="P38"><text:span text:style-name="T11"><text:s/>3 <text:s/>| <text:s text:c="3"/></text:span><text:span text:style-name="T14"><text:s text:c="2"/>&lt;</text:span><text:span text:style-name="T13">head</text:span><text:span text:style-name="T14">&gt;</text:span></text:p>
      <text:p text:style-name="P38"><text:span text:style-name="T11"><text:s/>4 <text:s/>| <text:s text:c="3"/></text:span><text:span text:style-name="T14"><text:s text:c="4"/>&lt;</text:span><text:span text:style-name="T13">meta</text:span><text:span text:style-name="T14"> </text:span><text:span text:style-name="T16">charset</text:span><text:span text:style-name="T15">=</text:span><text:span text:style-name="T16">"UTF-8"</text:span><text:span text:style-name="T14"> /&gt;</text:span></text:p>
      <text:p text:style-name="P38"><text:span text:style-name="T11"><text:s/>5 <text:s/>| <text:s text:c="3"/></text:span><text:span text:style-name="T14"><text:s text:c="4"/>&lt;</text:span><text:span text:style-name="T13">meta</text:span><text:span text:style-name="T14"> </text:span><text:span text:style-name="T16">name</text:span><text:span text:style-name="T15">=</text:span><text:span text:style-name="T16">"viewport"</text:span><text:span text:style-name="T14"> </text:span><text:span text:style-name="T16">content</text:span><text:span text:style-name="T15">=</text:span><text:span text:style-name="T16">"width=device-width, initial-scale=1.0"</text:span><text:span text:style-name="T14"> /&gt;</text:span></text:p>
      <text:p text:style-name="P38"><text:span text:style-name="T11"><text:s/>6 <text:s/>| <text:s text:c="3"/></text:span><text:span text:style-name="T14"><text:s text:c="4"/>&lt;</text:span><text:span text:style-name="T13">title</text:span><text:span text:style-name="T14">&gt;Доступ ограничен&lt;/</text:span><text:span text:style-name="T13">title</text:span><text:span text:style-name="T14">&gt;</text:span></text:p>
      <text:p text:style-name="P38"><text:span text:style-name="T11"><text:s/>7 <text:s/>| <text:s text:c="3"/></text:span><text:span text:style-name="T14"><text:s text:c="2"/>&lt;/</text:span><text:span text:style-name="T13">head</text:span><text:span text:style-name="T14">&gt;</text:span></text:p>
      <text:p text:style-name="P38"><text:span text:style-name="T11"><text:s/>8 <text:s/>| <text:s text:c="3"/></text:span><text:span text:style-name="T14"><text:s text:c="2"/>&lt;</text:span><text:span text:style-name="T13">body</text:span><text:span text:style-name="T14">&gt;</text:span></text:p>
      <text:p text:style-name="P38"><text:span text:style-name="T11"><text:s/>9 <text:s/>| <text:s text:c="3"/></text:span><text:span text:style-name="T14"><text:s text:c="4"/>&lt;</text:span><text:span text:style-name="T13">h1</text:span><text:span text:style-name="T14">&gt;Лимит времени исчерпан&lt;/</text:span><text:span text:style-name="T13">h1</text:span><text:span text:style-name="T14">&gt;</text:span></text:p>
      <text:p text:style-name="P38"><text:span text:style-name="T11">10 <text:s/>| <text:s text:c="3"/></text:span><text:span text:style-name="T14"><text:s text:c="4"/>&lt;</text:span><text:span text:style-name="T13">p</text:span><text:span text:style-name="T14">&gt;</text:span></text:p>
      <text:p text:style-name="P46"><text:span text:style-name="T11">11 <text:s/>| <text:s text:c="3"/></text:span><text:s text:c="6"/>Вы израсходовали установленный дневной лимит времения для сайта</text:p>
      <text:p text:style-name="P38"><text:span text:style-name="T11">12 <text:s/>| <text:s text:c="3"/></text:span><text:span text:style-name="T14"><text:s text:c="6"/>&lt;</text:span><text:span text:style-name="T13">span</text:span><text:span text:style-name="T14"> </text:span><text:span text:style-name="T16">id</text:span><text:span text:style-name="T15">=</text:span><text:span text:style-name="T16">"domain-name"</text:span><text:span text:style-name="T14">&gt;&lt;/</text:span><text:span text:style-name="T13">span</text:span><text:span text:style-name="T14">&gt;</text:span></text:p>
      <text:p text:style-name="P38"><text:span text:style-name="T11">13 <text:s/>| <text:s text:c="3"/></text:span><text:span text:style-name="T14"><text:s text:c="4"/>&lt;/</text:span><text:span text:style-name="T13">p</text:span><text:span text:style-name="T14">&gt;</text:span></text:p>
      <text:p text:style-name="P38"><text:span text:style-name="T11">14 <text:s/>| <text:s text:c="3"/></text:span><text:span text:style-name="T14"><text:s text:c="4"/>&lt;</text:span><text:span text:style-name="T13">p</text:span><text:span text:style-name="T14">&gt;А пока что можно зачилиться и подождать до завтра&lt;/</text:span><text:span text:style-name="T13">p</text:span><text:span text:style-name="T14">&gt;</text:span></text:p>
      <text:p text:style-name="P38"><text:span text:style-name="T11">15 <text:s/>| <text:s text:c="3"/></text:span><text:span text:style-name="T14"><text:s text:c="4"/>&lt;</text:span><text:span text:style-name="T13">script</text:span><text:span text:style-name="T14"> </text:span><text:span text:style-name="T16">src</text:span><text:span text:style-name="T15">=</text:span><text:span text:style-name="T16">"blocked.js"</text:span><text:span text:style-name="T14">&gt;&lt;/</text:span><text:span text:style-name="T13">script</text:span><text:span text:style-name="T14">&gt;</text:span></text:p>
      <text:p text:style-name="P38"><text:span text:style-name="T11">16 <text:s/>| <text:s text:c="3"/></text:span><text:span text:style-name="T14"><text:s text:c="2"/>&lt;/</text:span><text:span text:style-name="T13">body</text:span><text:span text:style-name="T14">&gt;</text:span></text:p>
      <text:p text:style-name="P38"><text:span text:style-name="T11">17 <text:s/>| <text:s text:c="3"/></text:span><text:span text:style-name="T14">&lt;/</text:span><text:span text:style-name="T13">html</text:span><text:span text:style-name="T14">&gt;</text:span></text:p>
      <text:p text:style-name="P43"/>
      <text:p text:style-name="P45">Исходный код blocked/blocked.js:</text:p>
      <text:p text:style-name="P40"><text:span text:style-name="T11">1 <text:s/>| <text:s text:c="3"/></text:span><text:span text:style-name="T17">const</text:span><text:span text:style-name="T12"> </text:span><text:span text:style-name="T14">urlParams</text:span><text:span text:style-name="T12"> </text:span><text:span text:style-name="T15">=</text:span><text:span text:style-name="T12"> </text:span><text:span text:style-name="T17">new</text:span><text:span text:style-name="T12"> </text:span><text:span text:style-name="T14">URLSearchParams(</text:span><text:span text:style-name="T19">window</text:span><text:span text:style-name="T14">.location.search);</text:span></text:p>
      <text:p text:style-name="P40"><text:span text:style-name="T11">2 <text:s/>| <text:s text:c="3"/></text:span><text:span text:style-name="T17">const</text:span><text:span text:style-name="T12"> </text:span><text:span text:style-name="T14">domain</text:span><text:span text:style-name="T12"> </text:span><text:span text:style-name="T15">=</text:span><text:span text:style-name="T12"> </text:span><text:span text:style-name="T14">urlParams.get(</text:span><text:span text:style-name="T16">"domain"</text:span><text:span text:style-name="T14">);</text:span></text:p>
      <text:p text:style-name="P40"><text:span text:style-name="T11">3 <text:s/>| <text:s text:c="3"/></text:span><text:span text:style-name="T17">const</text:span><text:span text:style-name="T12"> </text:span><text:span text:style-name="T14">domainName</text:span><text:span text:style-name="T12"> </text:span><text:span text:style-name="T15">=</text:span><text:span text:style-name="T12"> </text:span><text:span text:style-name="T19">document</text:span><text:span text:style-name="T14">.getElementById(</text:span><text:span text:style-name="T16">"domain-name"</text:span><text:span text:style-name="T14">);</text:span></text:p>
      <text:p text:style-name="P40"><text:span text:style-name="T11">4 <text:s/>| <text:s text:c="3"/></text:span><text:span text:style-name="T14">domainName.textContent</text:span><text:span text:style-name="T12"> </text:span><text:span text:style-name="T15">=</text:span><text:span text:style-name="T12"> </text:span><text:span text:style-name="T14">domain</text:span><text:span text:style-name="T12"> </text:span><text:span text:style-name="T15">||</text:span><text:span text:style-name="T12"> </text:span><text:span text:style-name="T16">"этого ресурса"</text:span><text:span text:style-name="T14">;</text:span></text:p>
      <text:p text:style-name="P43"/>
      <text:p text:style-name="P43"><text:bookmark text:name="__RefHeading___Toc143_2058273410 Copy 1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Liberation Mono" fo:font-family="'Liberation Mono'" style:font-family-generic="modern" style:font-pitch="fixed" fo:font-size="8pt" officeooo:rsid="0097f467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0</text:page-number><text:bookmark-end text:name="PageNumWizard_FOOTER_Landscape19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5-27T01:27:50.922576085</dc:date>
    <meta:editing-duration>P1DT10H53M3S</meta:editing-duration>
    <meta:editing-cycles>114</meta:editing-cycles>
    <meta:generator>LibreOffice/26.2.3.2$Linux_X86_64 LibreOffice_project/620$Build-2</meta:generator>
    <meta:print-date>2026-05-27T01:09:05.704352071</meta:print-date>
    <meta:printed-by>Файлы PDF</meta:printed-by>
    <meta:document-statistic meta:table-count="0" meta:image-count="5" meta:object-count="0" meta:page-count="13" meta:paragraph-count="442" meta:word-count="2314" meta:character-count="17672" meta:non-whitespace-character-count="13021"/>
  </office:meta>
</office:document-meta>
</file>