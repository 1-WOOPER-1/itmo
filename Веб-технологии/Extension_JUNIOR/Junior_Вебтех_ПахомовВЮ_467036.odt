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A0000012DEBFCBD52.png" manifest:media-type="image/png"/>
  <manifest:file-entry manifest:full-path="Pictures/100000010000013A0000011C682E673C.png" manifest:media-type="image/png"/>
  <manifest:file-entry manifest:full-path="Pictures/100000010000013B0000010EA4D3F8EA.png" manifest:media-type="image/png"/>
  <manifest:file-entry manifest:full-path="Pictures/100000010000047A00000217731613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98dad8"/>
    </style:style>
    <style:style style:name="P6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rsid="0098dad8" officeooo:paragraph-rsid="0098dad8"/>
    </style:style>
    <style:style style:name="P7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4a596f" officeooo:paragraph-rsid="004a596f"/>
    </style:style>
    <style:style style:name="P9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10" style:family="paragraph" style:parent-style-name="Text_20_body" style:master-page-name="">
      <loext:graphic-properties draw:fill="none"/>
      <style:paragraph-properties fo:margin-left="0cm" fo:margin-right="1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394161"/>
    </style:style>
    <style:style style:name="P13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5" style:family="paragraph" style:parent-style-name="Contents_20_1">
      <style:paragraph-properties fo:line-height="150%">
        <style:tab-stops>
          <style:tab-stop style:position="16.589cm" style:type="right" style:leader-style="dotted" style:leader-text="."/>
        </style:tab-stops>
      </style:paragraph-properties>
    </style:style>
    <style:style style:name="P16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90def4" officeooo:paragraph-rsid="0090def4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90def4" officeooo:paragraph-rsid="0090def4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font-weight="bold" officeooo:rsid="0090def4" officeooo:paragraph-rsid="0090def4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0def4" officeooo:paragraph-rsid="0090def4"/>
    </style:style>
    <style:style style:name="P20" style:family="paragraph" style:parent-style-name="Text_20_body" style:list-style-name="L1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0def4" officeooo:paragraph-rsid="0090def4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11619" officeooo:paragraph-rsid="0090def4"/>
    </style:style>
    <style:style style:name="P22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9515c5" officeooo:paragraph-rsid="009515c5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11619" officeooo:paragraph-rsid="00911619"/>
    </style:style>
    <style:style style:name="P24" style:family="paragraph" style:parent-style-name="Text_20_body" style:list-style-name="L2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25e2e" officeooo:paragraph-rsid="00925e2e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79256" officeooo:paragraph-rsid="00979256"/>
    </style:style>
    <style:style style:name="P26" style:family="paragraph" style:parent-style-name="Drawing">
      <style:paragraph-properties fo:text-align="center" style:justify-single-word="false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911619" officeooo:paragraph-rsid="00911619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7f467" officeooo:paragraph-rsid="0097f467"/>
    </style:style>
    <style:style style:name="P29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30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1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97f467" officeooo:paragraph-rsid="0097f467"/>
    </style:style>
    <style:style style:name="P33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language="zxx" fo:country="none" fo:font-style="normal" style:text-underline-style="none" fo:font-weight="normal" fo:background-color="transparent"/>
    </style:style>
    <style:style style:name="P34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5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36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7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38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officeooo:rsid="0028636d" officeooo:paragraph-rsid="0097f46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98dad8"/>
    </style:style>
    <style:style style:name="T3" style:family="text">
      <style:text-properties officeooo:rsid="00394161"/>
    </style:style>
    <style:style style:name="T4" style:family="text">
      <style:text-properties officeooo:rsid="0016960e"/>
    </style:style>
    <style:style style:name="T5" style:family="text">
      <style:text-properties officeooo:rsid="0097f467"/>
    </style:style>
    <style:style style:name="T6" style:family="text">
      <style:text-properties officeooo:rsid="00925e2e"/>
    </style:style>
    <style:style style:name="T7" style:family="text">
      <style:text-properties officeooo:rsid="00989a03"/>
    </style:style>
    <style:style style:name="T8" style:family="text">
      <style:text-properties officeooo:rsid="009b13a4"/>
    </style:style>
    <style:style style:name="T9" style:family="text">
      <style:text-properties officeooo:rsid="00979256"/>
    </style:style>
    <style:style style:name="T10" style:family="text">
      <style:text-properties fo:color="#008800" loext:opacity="100%" fo:font-size="8pt"/>
    </style:style>
    <style:style style:name="T11" style:family="text">
      <style:text-properties fo:color="#bbbbbb" loext:opacity="100%"/>
    </style:style>
    <style:style style:name="T12" style:family="text">
      <style:text-properties fo:color="#008000" loext:opacity="100%" fo:font-weight="bold"/>
    </style:style>
    <style:style style:name="T13" style:family="text">
      <style:text-properties fo:color="#000000" loext:opacity="100%"/>
    </style:style>
    <style:style style:name="T14" style:family="text">
      <style:text-properties fo:color="#666666" loext:opacity="100%"/>
    </style:style>
    <style:style style:name="T15" style:family="text">
      <style:text-properties fo:color="#bb4444" loext:opacity="100%"/>
    </style:style>
    <style:style style:name="T16" style:family="text">
      <style:text-properties fo:font-size="8pt"/>
    </style:style>
    <style:style style:name="T17" style:family="text">
      <style:text-properties fo:color="#aa22ff" loext:opacity="100%" fo:font-weight="bold"/>
    </style:style>
    <style:style style:name="T18" style:family="text">
      <style:text-properties fo:color="#00bb00" loext:opacity="100%" fo:font-weight="bold"/>
    </style:style>
    <style:style style:name="T19" style:family="text">
      <style:text-properties fo:color="#aa22ff" loext:opacity="100%"/>
    </style:style>
    <style:style style:name="T20" style:family="text">
      <style:text-properties fo:color="#bb6688" loext:opacity="100%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Веб-технологии</text:span>»</text:p>
      <text:p text:style-name="P3"/>
      <text:p text:style-name="P3"/>
      <text:p text:style-name="P5">ОТЧ<text:span text:style-name="T3">Ё</text:span>Т ПО <text:span text:style-name="T2">РАЗРАБОТКЕ БРАУЗЕРНОГО</text:span></text:p>
      <text:p text:style-name="P6">РАСШИРЕНИЯ УРОВНЯ JUNIOR</text:p>
      <text:p text:style-name="P3"/>
      <text:p text:style-name="P7">Выполнил:</text:p>
      <text:p text:style-name="P7">Пахомов Владимир Юрьевич, студент группы N3250</text:p>
      <text:p text:style-name="P7"><draw:frame draw:style-name="fr1" draw:name="Изображение4" text:anchor-type="char" svg:x="13.548cm" svg:y="-0.093cm" svg:width="3.212cm" svg:height="1.499cm" draw:z-index="5"><draw:image xlink:href="Pictures/100000010000047A0000021773161342.png" xlink:type="simple" xlink:show="embed" xlink:actuate="onLoad" draw:mime-type="image/png"/></draw:frame></text:p>
      <text:p text:style-name="P8"/>
      <text:p text:style-name="P9">________________</text:p>
      <text:p text:style-name="P10">(подпись)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2"/>
      <text:p text:style-name="P12">Санкт-Петербург</text:p>
      <text:p text:style-name="P12">202<text:span text:style-name="T4">6</text:span>.</text:p>
      <text:h text:style-name="P13" text:outline-level="1"><text:bookmark-start text:name="__RefHeading___Toc80_2058273410"/>СОДЕРЖАНИЕ<text:bookmark-end text:name="__RefHeading___Toc80_2058273410"/></text:h>
      <text:p text:style-name="P14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80_2058273410" office:name="СОДЕРЖАНИЕ" text:style-name="Index_20_Link" text:visited-style-name="Index_20_Link">СОДЕРЖАНИЕ<text:tab/>2</text:a></text:p>
          <text:p text:style-name="P15"><text:a xlink:type="simple" xlink:href="#__RefHeading___Toc82_2058273410" office:name="ЗАДАНИЕ JUNIOR" text:style-name="Index_20_Link" text:visited-style-name="Index_20_Link">ЗАДАНИЕ JUNIOR<text:tab/>3</text:a></text:p>
          <text:p text:style-name="P15"><text:a xlink:type="simple" xlink:href="#__RefHeading___Toc82_2058273410%20%D0%9A%D0%BE%D0%BF%D0%B8%D1%8F%203" office:name="ОПИСАНИЕ АЛГОРИТМА РАБОТЫ" text:style-name="Index_20_Link" text:visited-style-name="Index_20_Link">ОПИСАНИЕ АЛГОРИТМА РАБОТЫ<text:tab/>4</text:a></text:p>
        </text:index-body>
      </text:table-of-content>
      <text:p text:style-name="P14"/>
      <text:h text:style-name="P16" text:outline-level="1"><text:bookmark-start text:name="__RefHeading___Toc82_2058273410"/>ЗАДАНИЕ JUNIOR<text:bookmark-end text:name="__RefHeading___Toc82_2058273410"/></text:h>
      <text:p text:style-name="P17">Вариант задания: (467036 mod 5) + 1 = 2</text:p>
      <text:p text:style-name="P18">Вариант №2 – генератор случайного числа</text:p>
      <text:p text:style-name="P19">Необходимо написать браузерное расширение, которое будет генерировать случайное целое число в заданном диапазоне.</text:p>
      <text:p text:style-name="P19">По кнопке открывается небольшое окно, содержащее следующие элементы интерфейса:</text:p>
      <text:list text:style-name="L1">
        <text:list-item>
          <text:p text:style-name="P20">Числовое поле MIN – левая граница интервала</text:p>
        </text:list-item>
        <text:list-item>
          <text:p text:style-name="P20">Числовое поле MAX – правая граница интервала</text:p>
        </text:list-item>
        <text:list-item>
          <text:p text:style-name="P20">Кнопка “Сгенерировать”</text:p>
        </text:list-item>
      </text:list>
      <text:p text:style-name="P19">После нажатия на кнопку, число появится в окне. Также, число должно быть автоматически добавлено в буфер обмена (clipboard).</text:p>
      <text:p text:style-name="P19"/>
      <text:p text:style-name="P21"/>
      <text:h text:style-name="P22" text:outline-level="1"><text:bookmark-start text:name="__RefHeading___Toc82_2058273410 Копия 3"/>ОПИСАНИЕ АЛГОРИТМА РАБОТЫ<text:bookmark-end text:name="__RefHeading___Toc82_2058273410 Копия 3"/></text:h>
      <text:p text:style-name="P23"><text:span text:style-name="T5">Расширение было написано для браузеров на основе Chromium и Firefox (в браузере Safari возможности протестировать не было). Структура файлов</text:span><text:span text:style-name="T6">:</text:span></text:p>
      <text:list text:style-name="L2">
        <text:list-item>
          <text:p text:style-name="P24">manifest.json - конфигурационный файл расширения;</text:p>
        </text:list-item>
        <text:list-item>
          <text:p text:style-name="P24">popup.html - файл разметки главного окна;</text:p>
        </text:list-item>
        <text:list-item>
          <text:p text:style-name="P24">popup.js - скрипт, реализующий весь функционал расширения.</text:p>
        </text:list-item>
      </text:list>
      <text:p text:style-name="P25">При нажатии на иконку расширения появляется небольшое окно, в котором нужно ввести 2 числа: MIN - левая граница и MAX - правая граница. При нажатии кнопки "Сгенерировать" из этих двух полей читаются 2 числа. Далее они проходят проверки на то, что введённые числа не содержат иных символов, кроме цифр (это гарантирует тип поля input type="number", но для надёжности присутствует проверка на NaN), также проверятся, что MIN не больше чем MAX. Если все правильно, внизу окна появляется сообщение с сгенерированным числом, также это число автоматически копируется в буфер обмена. В случае ошибок выводится соответствующее сообщение об ошибке.</text:p>
      <text:p text:style-name="P25"><draw:frame draw:style-name="fr2" draw:name="Врезка1" text:anchor-type="char" svg:x="0.28cm" svg:y="0.434cm" svg:width="8.333cm" draw:z-index="0"><draw:text-box fo:min-height="7.142cm"><text:p text:style-name="P26"><draw:frame draw:style-name="fr3" draw:name="Изображение1" text:anchor-type="paragraph" svg:width="8.333cm" style:rel-width="100%" svg:height="7.142cm" style:rel-height="scale" draw:z-index="1"><draw:image xlink:href="Pictures/100000010000013B0000010EA4D3F8EA.png" xlink:type="simple" xlink:show="embed" xlink:actuate="onLoad" draw:mime-type="image/png"/></draw:frame>Рисунок <text:span text:style-name="T7">1</text:span>: Окно расширения</text:p></draw:text-box></draw:frame><draw:frame draw:style-name="fr4" draw:name="Врезка2" text:anchor-type="char" svg:x="8.761cm" svg:y="0.037cm" svg:width="8.306cm" draw:z-index="2"><draw:text-box fo:min-height="7.565cm"><text:p text:style-name="P26"><draw:frame draw:style-name="fr5" draw:name="Изображение2" text:anchor-type="char" svg:width="8.306cm" svg:height="7.512cm" draw:z-index="6"><draw:image xlink:href="Pictures/100000010000013A0000011C682E673C.png" xlink:type="simple" xlink:show="embed" xlink:actuate="onLoad" draw:mime-type="image/png"/></draw:frame>Рисунок <text:span text:style-name="T7">2</text:span>: Пример успешной работы</text:p></draw:text-box></draw:frame></text:p>
      <text:p text:style-name="P23"/>
      <text:p text:style-name="P27"><draw:frame draw:style-name="fr6" draw:name="Врезка3" text:anchor-type="char" svg:width="8.306cm" draw:z-index="3"><draw:text-box fo:min-height="7.962cm"><text:p text:style-name="P26"><draw:frame draw:style-name="fr3" draw:name="Изображение3" text:anchor-type="paragraph" svg:width="8.306cm" style:rel-width="100%" svg:height="7.962cm" style:rel-height="scale" draw:z-index="4"><draw:image xlink:href="Pictures/100000010000013A0000012DEBFCBD52.png" xlink:type="simple" xlink:show="embed" xlink:actuate="onLoad" draw:mime-type="image/png"/></draw:frame>Рисунок <text:span text:style-name="T8">3</text:span>: Обработка ввода неправ<text:span text:style-name="T9">и</text:span>льных чисел</text:p></draw:text-box></draw:frame></text:p>
      <text:p text:style-name="P28">Исходный код manifest.json:</text:p>
      <text:p text:style-name="P29"><text:span text:style-name="T10"><text:s/>1 <text:s/>| <text:s text:c="3"/></text:span>{</text:p>
      <text:p text:style-name="P30"><text:span text:style-name="T10"><text:s/>2 <text:s/>| <text:s text:c="3"/></text:span><text:span text:style-name="T11"><text:s text:c="2"/></text:span><text:span text:style-name="T12">"manifest_version"</text:span><text:span text:style-name="T13">:</text:span><text:span text:style-name="T11"> </text:span><text:span text:style-name="T14">3</text:span><text:span text:style-name="T13">,</text:span></text:p>
      <text:p text:style-name="P30"><text:span text:style-name="T10"><text:s/>3 <text:s/>| <text:s text:c="3"/></text:span><text:span text:style-name="T11"><text:s text:c="2"/></text:span><text:span text:style-name="T12">"name"</text:span><text:span text:style-name="T13">:</text:span><text:span text:style-name="T11"> </text:span><text:span text:style-name="T15">"Генератор случайных чисел"</text:span><text:span text:style-name="T13">,</text:span></text:p>
      <text:p text:style-name="P30"><text:span text:style-name="T10"><text:s/>4 <text:s/>| <text:s text:c="3"/></text:span><text:span text:style-name="T11"><text:s text:c="2"/></text:span><text:span text:style-name="T12">"version"</text:span><text:span text:style-name="T13">:</text:span><text:span text:style-name="T11"> </text:span><text:span text:style-name="T15">"1.0"</text:span><text:span text:style-name="T13">,</text:span></text:p>
      <text:p text:style-name="P30"><text:span text:style-name="T10"><text:s/>5 <text:s/>| <text:s text:c="3"/></text:span><text:span text:style-name="T11"><text:s text:c="2"/></text:span><text:span text:style-name="T12">"permissions"</text:span><text:span text:style-name="T13">:</text:span><text:span text:style-name="T11"> </text:span><text:span text:style-name="T13">[],</text:span></text:p>
      <text:p text:style-name="P30"><text:span text:style-name="T10"><text:s/>6 <text:s/>| <text:s text:c="3"/></text:span><text:span text:style-name="T11"><text:s text:c="2"/></text:span><text:span text:style-name="T12">"author"</text:span><text:span text:style-name="T13">:</text:span><text:span text:style-name="T11"> </text:span><text:span text:style-name="T15">"Пахомов Владимир Юрьевич 467036"</text:span><text:span text:style-name="T13">,</text:span></text:p>
      <text:p text:style-name="P31"><text:s/>7 <text:s/>| <text:s text:c="3"/></text:p>
      <text:p text:style-name="P30"><text:span text:style-name="T10"><text:s/>8 <text:s/>| <text:s text:c="3"/></text:span><text:span text:style-name="T11"><text:s text:c="2"/></text:span><text:span text:style-name="T12">"description"</text:span><text:span text:style-name="T13">:</text:span><text:span text:style-name="T11"> </text:span><text:span text:style-name="T15">"Расширение для генерации случайного числа из заданного диапазона"</text:span><text:span text:style-name="T13">,</text:span></text:p>
      <text:p text:style-name="P31"><text:s/>9 <text:s/>| <text:s text:c="3"/></text:p>
      <text:p text:style-name="P30"><text:span text:style-name="T10">10 <text:s/>| <text:s text:c="3"/></text:span><text:span text:style-name="T11"><text:s text:c="2"/></text:span><text:span text:style-name="T12">"action"</text:span><text:span text:style-name="T13">:</text:span><text:span text:style-name="T11"> </text:span><text:span text:style-name="T13">{</text:span></text:p>
      <text:p text:style-name="P30"><text:span text:style-name="T10">11 <text:s/>| <text:s text:c="3"/></text:span><text:span text:style-name="T11"><text:s text:c="4"/></text:span><text:span text:style-name="T12">"default_popup"</text:span><text:span text:style-name="T13">:</text:span><text:span text:style-name="T11"> </text:span><text:span text:style-name="T15">"popup.html"</text:span><text:span text:style-name="T13">,</text:span></text:p>
      <text:p text:style-name="P30"><text:span text:style-name="T10">12 <text:s/>| <text:s text:c="3"/></text:span><text:span text:style-name="T11"><text:s text:c="4"/></text:span><text:span text:style-name="T12">"default_title"</text:span><text:span text:style-name="T13">:</text:span><text:span text:style-name="T11"> </text:span><text:span text:style-name="T15">"Randomizer"</text:span></text:p>
      <text:p text:style-name="P30"><text:span text:style-name="T10">13 <text:s/>| <text:s text:c="3"/></text:span><text:span text:style-name="T11"><text:s text:c="2"/></text:span><text:span text:style-name="T13">}</text:span></text:p>
      <text:p text:style-name="P29"><text:span text:style-name="T10">14 <text:s/>| <text:s text:c="3"/></text:span>}</text:p>
      <text:p text:style-name="P28"/>
      <text:p text:style-name="P32">Исходный код popup.html:</text:p>
      <text:p text:style-name="P33"><text:span text:style-name="T16"><text:s/>1 <text:s/>| <text:s text:c="3"/></text:span>&lt;!doctype html&gt;</text:p>
      <text:p text:style-name="P34"><text:span text:style-name="T10"><text:s/>2 <text:s/>| <text:s text:c="3"/></text:span><text:span text:style-name="T13">&lt;</text:span><text:span text:style-name="T12">html</text:span><text:span text:style-name="T13"> </text:span><text:span text:style-name="T15">lang</text:span><text:span text:style-name="T14">=</text:span><text:span text:style-name="T15">"ru"</text:span><text:span text:style-name="T13">&gt;</text:span></text:p>
      <text:p text:style-name="P34"><text:span text:style-name="T10"><text:s/>3 <text:s/>| <text:s text:c="3"/></text:span><text:span text:style-name="T13"><text:s text:c="2"/>&lt;</text:span><text:span text:style-name="T12">head</text:span><text:span text:style-name="T13">&gt;</text:span></text:p>
      <text:p text:style-name="P34"><text:span text:style-name="T10"><text:s/>4 <text:s/>| <text:s text:c="3"/></text:span><text:span text:style-name="T13"><text:s text:c="4"/>&lt;</text:span><text:span text:style-name="T12">meta</text:span><text:span text:style-name="T13"> </text:span><text:span text:style-name="T15">charset</text:span><text:span text:style-name="T14">=</text:span><text:span text:style-name="T15">"UTF-8"</text:span><text:span text:style-name="T13"> /&gt;</text:span></text:p>
      <text:p text:style-name="P34"><text:span text:style-name="T10"><text:s/>5 <text:s/>| <text:s text:c="3"/></text:span><text:span text:style-name="T13"><text:s text:c="4"/>&lt;</text:span><text:span text:style-name="T12">meta</text:span><text:span text:style-name="T13"> </text:span><text:span text:style-name="T15">name</text:span><text:span text:style-name="T14">=</text:span><text:span text:style-name="T15">"viewport"</text:span><text:span text:style-name="T13"> </text:span><text:span text:style-name="T15">content</text:span><text:span text:style-name="T14">=</text:span><text:span text:style-name="T15">"width=device-width, initial-scale=1.0"</text:span><text:span text:style-name="T13"> /&gt;</text:span></text:p>
      <text:p text:style-name="P34"><text:span text:style-name="T10"><text:s/>6 <text:s/>| <text:s text:c="3"/></text:span><text:span text:style-name="T13"><text:s text:c="4"/>&lt;</text:span><text:span text:style-name="T12">title</text:span><text:span text:style-name="T13">&gt;Генератор случайных чисел&lt;/</text:span><text:span text:style-name="T12">title</text:span><text:span text:style-name="T13">&gt;</text:span></text:p>
      <text:p text:style-name="P34"><text:span text:style-name="T10"><text:s/>7 <text:s/>| <text:s text:c="3"/></text:span><text:span text:style-name="T13"><text:s text:c="4"/>&lt;</text:span><text:span text:style-name="T12">style</text:span><text:span text:style-name="T13">&gt;</text:span></text:p>
      <text:p text:style-name="P34"><text:span text:style-name="T10"><text:s/>8 <text:s/>| <text:s text:c="3"/></text:span><text:span text:style-name="T11"><text:s text:c="6"/></text:span><text:span text:style-name="T12">body</text:span><text:span text:style-name="T11"> </text:span><text:span text:style-name="T13">{</text:span></text:p>
      <text:p text:style-name="P34"><text:span text:style-name="T10"><text:s/>9 <text:s/>| <text:s text:c="3"/></text:span><text:span text:style-name="T11"><text:s text:c="8"/></text:span><text:span text:style-name="T17">width</text:span><text:span text:style-name="T13">:</text:span><text:span text:style-name="T11"> </text:span><text:span text:style-name="T14">300</text:span><text:span text:style-name="T18">px</text:span><text:span text:style-name="T13">;</text:span></text:p>
      <text:p text:style-name="P34"><text:span text:style-name="T10">10 <text:s/>| <text:s text:c="3"/></text:span><text:span text:style-name="T11"><text:s text:c="8"/></text:span><text:span text:style-name="T17">display</text:span><text:span text:style-name="T13">:</text:span><text:span text:style-name="T11"> </text:span><text:span text:style-name="T17">flex</text:span><text:span text:style-name="T13">;</text:span></text:p>
      <text:p text:style-name="P34"><text:span text:style-name="T10">11 <text:s/>| <text:s text:c="3"/></text:span><text:span text:style-name="T11"><text:s text:c="8"/></text:span><text:span text:style-name="T17">flex-direction</text:span><text:span text:style-name="T13">:</text:span><text:span text:style-name="T11"> </text:span><text:span text:style-name="T17">column</text:span><text:span text:style-name="T13">;</text:span></text:p>
      <text:p text:style-name="P34"><text:span text:style-name="T10">12 <text:s/>| <text:s text:c="3"/></text:span><text:span text:style-name="T11"><text:s text:c="8"/></text:span><text:span text:style-name="T17">gap</text:span><text:span text:style-name="T13">:</text:span><text:span text:style-name="T11"> </text:span><text:span text:style-name="T14">10</text:span><text:span text:style-name="T18">px</text:span><text:span text:style-name="T13">;</text:span></text:p>
      <text:p text:style-name="P34"><text:span text:style-name="T10">13 <text:s/>| <text:s text:c="3"/></text:span><text:span text:style-name="T11"><text:s text:c="6"/></text:span><text:span text:style-name="T13">}</text:span></text:p>
      <text:p text:style-name="P34"><text:span text:style-name="T10">14 <text:s/>| <text:s text:c="3"/></text:span><text:span text:style-name="T11"><text:s text:c="4"/></text:span><text:span text:style-name="T13">&lt;/</text:span><text:span text:style-name="T12">style</text:span><text:span text:style-name="T13">&gt;</text:span></text:p>
      <text:p text:style-name="P34"><text:span text:style-name="T10">15 <text:s/>| <text:s text:c="3"/></text:span><text:span text:style-name="T13"><text:s text:c="2"/>&lt;/</text:span><text:span text:style-name="T12">head</text:span><text:span text:style-name="T13">&gt;</text:span></text:p>
      <text:p text:style-name="P34"><text:span text:style-name="T10">16 <text:s/>| <text:s text:c="3"/></text:span><text:span text:style-name="T13"><text:s text:c="2"/>&lt;</text:span><text:span text:style-name="T12">body</text:span><text:span text:style-name="T13">&gt;</text:span></text:p>
      <text:p text:style-name="P34"><text:span text:style-name="T10">17 <text:s/>| <text:s text:c="3"/></text:span><text:span text:style-name="T13"><text:s text:c="4"/>&lt;</text:span><text:span text:style-name="T12">h1</text:span><text:span text:style-name="T13">&gt;Генератор случайных чисел&lt;/</text:span><text:span text:style-name="T12">h1</text:span><text:span text:style-name="T13">&gt;</text:span></text:p>
      <text:p text:style-name="P34"><text:span text:style-name="T10">18 <text:s/>| <text:s text:c="3"/></text:span><text:span text:style-name="T13"><text:s text:c="4"/>&lt;</text:span><text:span text:style-name="T12">label</text:span><text:span text:style-name="T13"> </text:span><text:span text:style-name="T15">for</text:span><text:span text:style-name="T14">=</text:span><text:span text:style-name="T15">"min-value"</text:span><text:span text:style-name="T13">&gt;Левая граница&lt;/</text:span><text:span text:style-name="T12">label</text:span><text:span text:style-name="T13">&gt;</text:span></text:p>
      <text:p text:style-name="P34"><text:span text:style-name="T10">19 <text:s/>| <text:s text:c="3"/></text:span><text:span text:style-name="T13"><text:s text:c="4"/>&lt;</text:span><text:span text:style-name="T12">input</text:span><text:span text:style-name="T13"> </text:span><text:span text:style-name="T15">type</text:span><text:span text:style-name="T14">=</text:span><text:span text:style-name="T15">"number"</text:span><text:span text:style-name="T13"> </text:span><text:span text:style-name="T15">id</text:span><text:span text:style-name="T14">=</text:span><text:span text:style-name="T15">"min-value"</text:span><text:span text:style-name="T13"> </text:span><text:span text:style-name="T15">placeholder</text:span><text:span text:style-name="T14">=</text:span><text:span text:style-name="T15">"MIN"</text:span><text:span text:style-name="T13"> /&gt;</text:span></text:p>
      <text:p text:style-name="P35">20 <text:s/>| <text:s text:c="3"/></text:p>
      <text:p text:style-name="P34"><text:span text:style-name="T10">21 <text:s/>| <text:s text:c="3"/></text:span><text:span text:style-name="T13"><text:s text:c="4"/>&lt;</text:span><text:span text:style-name="T12">label</text:span><text:span text:style-name="T13"> </text:span><text:span text:style-name="T15">for</text:span><text:span text:style-name="T14">=</text:span><text:span text:style-name="T15">"max-value"</text:span><text:span text:style-name="T13">&gt;Правая граница&lt;/</text:span><text:span text:style-name="T12">label</text:span><text:span text:style-name="T13">&gt;</text:span></text:p>
      <text:p text:style-name="P34"><text:span text:style-name="T10">22 <text:s/>| <text:s text:c="3"/></text:span><text:span text:style-name="T13"><text:s text:c="4"/>&lt;</text:span><text:span text:style-name="T12">input</text:span><text:span text:style-name="T13"> </text:span><text:span text:style-name="T15">type</text:span><text:span text:style-name="T14">=</text:span><text:span text:style-name="T15">"number"</text:span><text:span text:style-name="T13"> </text:span><text:span text:style-name="T15">id</text:span><text:span text:style-name="T14">=</text:span><text:span text:style-name="T15">"max-value"</text:span><text:span text:style-name="T13"> </text:span><text:span text:style-name="T15">placeholder</text:span><text:span text:style-name="T14">=</text:span><text:span text:style-name="T15">"MAX"</text:span><text:span text:style-name="T13"> /&gt;</text:span></text:p>
      <text:p text:style-name="P35">23 <text:s/>| <text:s text:c="3"/></text:p>
      <text:p text:style-name="P34"><text:span text:style-name="T10">24 <text:s/>| <text:s text:c="3"/></text:span><text:span text:style-name="T13"><text:s text:c="4"/>&lt;</text:span><text:span text:style-name="T12">button</text:span><text:span text:style-name="T13"> </text:span><text:span text:style-name="T15">id</text:span><text:span text:style-name="T14">=</text:span><text:span text:style-name="T15">"generate-btn"</text:span><text:span text:style-name="T13">&gt;Сгенерировать&lt;/</text:span><text:span text:style-name="T12">button</text:span><text:span text:style-name="T13">&gt;</text:span></text:p>
      <text:p text:style-name="P34"><text:span text:style-name="T10">25 <text:s/>| <text:s text:c="3"/></text:span><text:span text:style-name="T13"><text:s text:c="4"/>&lt;</text:span><text:span text:style-name="T12">span</text:span><text:span text:style-name="T13"> </text:span><text:span text:style-name="T15">id</text:span><text:span text:style-name="T14">=</text:span><text:span text:style-name="T15">"result"</text:span><text:span text:style-name="T13">&gt;&lt;/</text:span><text:span text:style-name="T12">span</text:span><text:span text:style-name="T13">&gt;</text:span></text:p>
      <text:p text:style-name="P35">26 <text:s/>| <text:s text:c="3"/></text:p>
      <text:p text:style-name="P34"><text:span text:style-name="T10">27 <text:s/>| <text:s text:c="3"/></text:span><text:span text:style-name="T13"><text:s text:c="4"/>&lt;</text:span><text:span text:style-name="T12">script</text:span><text:span text:style-name="T13"> </text:span><text:span text:style-name="T15">src</text:span><text:span text:style-name="T14">=</text:span><text:span text:style-name="T15">"popup.js"</text:span><text:span text:style-name="T13">&gt;&lt;/</text:span><text:span text:style-name="T12">script</text:span><text:span text:style-name="T13">&gt;</text:span></text:p>
      <text:p text:style-name="P34"><text:span text:style-name="T10">28 <text:s/>| <text:s text:c="3"/></text:span><text:span text:style-name="T13"><text:s text:c="2"/>&lt;/</text:span><text:span text:style-name="T12">body</text:span><text:span text:style-name="T13">&gt;</text:span></text:p>
      <text:p text:style-name="P34"><text:span text:style-name="T10">29 <text:s/>| <text:s text:c="3"/></text:span><text:span text:style-name="T13">&lt;/</text:span><text:span text:style-name="T12">html</text:span><text:span text:style-name="T13">&gt;</text:span></text:p>
      <text:p text:style-name="P28"/>
      <text:p text:style-name="P28">Исходный код popup.js:</text:p>
      <text:p text:style-name="P36"><text:span text:style-name="T10"><text:s/>1 <text:s/>| <text:s text:c="3"/></text:span><text:span text:style-name="T17">const</text:span><text:span text:style-name="T11"> </text:span><text:span text:style-name="T13">button</text:span><text:span text:style-name="T11"> </text:span><text:span text:style-name="T14">=</text:span><text:span text:style-name="T11"> </text:span><text:span text:style-name="T19">document</text:span><text:span text:style-name="T13">.getElementById(</text:span><text:span text:style-name="T15">"generate-btn"</text:span><text:span text:style-name="T13">);</text:span></text:p>
      <text:p text:style-name="P36"><text:span text:style-name="T10"><text:s/>2 <text:s/>| <text:s text:c="3"/></text:span><text:span text:style-name="T17">const</text:span><text:span text:style-name="T11"> </text:span><text:span text:style-name="T13">min_value</text:span><text:span text:style-name="T11"> </text:span><text:span text:style-name="T14">=</text:span><text:span text:style-name="T11"> </text:span><text:span text:style-name="T19">document</text:span><text:span text:style-name="T13">.getElementById(</text:span><text:span text:style-name="T15">"min-value"</text:span><text:span text:style-name="T13">);</text:span></text:p>
      <text:p text:style-name="P36"><text:span text:style-name="T10"><text:s/>3 <text:s/>| <text:s text:c="3"/></text:span><text:span text:style-name="T17">const</text:span><text:span text:style-name="T11"> </text:span><text:span text:style-name="T13">max_value</text:span><text:span text:style-name="T11"> </text:span><text:span text:style-name="T14">=</text:span><text:span text:style-name="T11"> </text:span><text:span text:style-name="T19">document</text:span><text:span text:style-name="T13">.getElementById(</text:span><text:span text:style-name="T15">"max-value"</text:span><text:span text:style-name="T13">);</text:span></text:p>
      <text:p text:style-name="P36"><text:span text:style-name="T10"><text:s/>4 <text:s/>| <text:s text:c="3"/></text:span><text:span text:style-name="T17">const</text:span><text:span text:style-name="T11"> </text:span><text:span text:style-name="T13">result</text:span><text:span text:style-name="T11"> </text:span><text:span text:style-name="T14">=</text:span><text:span text:style-name="T11"> </text:span><text:span text:style-name="T19">document</text:span><text:span text:style-name="T13">.getElementById(</text:span><text:span text:style-name="T15">"result"</text:span><text:span text:style-name="T13">);</text:span></text:p>
      <text:p text:style-name="P37"><text:s/>5 <text:s/>| <text:s text:c="3"/></text:p>
      <text:p text:style-name="P36"><text:span text:style-name="T10"><text:s/>6 <text:s/>| <text:s text:c="3"/></text:span><text:span text:style-name="T17">async</text:span><text:span text:style-name="T11"> </text:span><text:span text:style-name="T17">function</text:span><text:span text:style-name="T11"> </text:span><text:span text:style-name="T13">copyToClipboard(string)</text:span><text:span text:style-name="T11"> </text:span><text:span text:style-name="T13">{</text:span></text:p>
      <text:p text:style-name="P36"><text:span text:style-name="T10"><text:s/>7 <text:s/>| <text:s text:c="3"/></text:span><text:span text:style-name="T11"><text:s text:c="2"/></text:span><text:span text:style-name="T17">try</text:span><text:span text:style-name="T11"> </text:span><text:span text:style-name="T13">{</text:span></text:p>
      <text:p text:style-name="P36"><text:span text:style-name="T10"><text:s/>8 <text:s/>| <text:s text:c="3"/></text:span><text:span text:style-name="T11"><text:s text:c="4"/></text:span><text:span text:style-name="T17">await</text:span><text:span text:style-name="T11"> </text:span><text:span text:style-name="T13">navigator.clipboard.writeText(string);</text:span></text:p>
      <text:p text:style-name="P36"><text:span text:style-name="T10"><text:s/>9 <text:s/>| <text:s text:c="3"/></text:span><text:span text:style-name="T11"><text:s text:c="2"/></text:span><text:span text:style-name="T13">}</text:span><text:span text:style-name="T11"> </text:span><text:span text:style-name="T17">catch</text:span><text:span text:style-name="T11"> </text:span><text:span text:style-name="T13">(e)</text:span><text:span text:style-name="T11"> </text:span><text:span text:style-name="T13">{</text:span></text:p>
      <text:p text:style-name="P36"><text:span text:style-name="T10">10 <text:s/>| <text:s text:c="3"/></text:span><text:span text:style-name="T11"><text:s text:c="4"/></text:span><text:span text:style-name="T13">console.error(</text:span><text:span text:style-name="T15">"Не удалось скопировать в буфер обмена: "</text:span><text:span text:style-name="T13">,</text:span><text:span text:style-name="T11"> </text:span><text:span text:style-name="T13">e);</text:span></text:p>
      <text:p text:style-name="P36"><text:span text:style-name="T10">11 <text:s/>| <text:s text:c="3"/></text:span><text:span text:style-name="T11"><text:s text:c="2"/></text:span><text:span text:style-name="T13">}</text:span></text:p>
      <text:p text:style-name="P38"><text:span text:style-name="T10">12 <text:s/>| <text:s text:c="3"/></text:span>}</text:p>
      <text:p text:style-name="P37">13 <text:s/>| <text:s text:c="3"/></text:p>
      <text:p text:style-name="P36"><text:span text:style-name="T10">14 <text:s/>| <text:s text:c="3"/></text:span><text:span text:style-name="T13">button.addEventListener(</text:span><text:span text:style-name="T15">"click"</text:span><text:span text:style-name="T13">,</text:span><text:span text:style-name="T11"> </text:span><text:span text:style-name="T17">async</text:span><text:span text:style-name="T11"> </text:span><text:span text:style-name="T13">()</text:span><text:span text:style-name="T11"> </text:span><text:span text:style-name="T13">=&gt;</text:span><text:span text:style-name="T11"> </text:span><text:span text:style-name="T13">{</text:span></text:p>
      <text:p text:style-name="P36"><text:span text:style-name="T10">15 <text:s/>| <text:s text:c="3"/></text:span><text:span text:style-name="T11"><text:s text:c="2"/></text:span><text:span text:style-name="T17">const</text:span><text:span text:style-name="T11"> </text:span><text:span text:style-name="T13">min</text:span><text:span text:style-name="T11"> </text:span><text:span text:style-name="T14">=</text:span><text:span text:style-name="T11"> </text:span><text:span text:style-name="T19">parseInt</text:span><text:span text:style-name="T13">(min_value.value);</text:span></text:p>
      <text:p text:style-name="P36"><text:span text:style-name="T10">16 <text:s/>| <text:s text:c="3"/></text:span><text:span text:style-name="T11"><text:s text:c="2"/></text:span><text:span text:style-name="T17">const</text:span><text:span text:style-name="T11"> </text:span><text:span text:style-name="T13">max</text:span><text:span text:style-name="T11"> </text:span><text:span text:style-name="T14">=</text:span><text:span text:style-name="T11"> </text:span><text:span text:style-name="T19">parseInt</text:span><text:span text:style-name="T13">(max_value.value);</text:span></text:p>
      <text:p text:style-name="P37">17 <text:s/>| <text:s text:c="3"/></text:p>
      <text:p text:style-name="P36"><text:span text:style-name="T10">18 <text:s/>| <text:s text:c="3"/></text:span><text:span text:style-name="T11"><text:s text:c="2"/></text:span><text:span text:style-name="T17">if</text:span><text:span text:style-name="T11"> </text:span><text:span text:style-name="T13">(</text:span><text:span text:style-name="T19">isNaN</text:span><text:span text:style-name="T13">(min)</text:span><text:span text:style-name="T11"> </text:span><text:span text:style-name="T14">||</text:span><text:span text:style-name="T11"> </text:span><text:span text:style-name="T19">isNaN</text:span><text:span text:style-name="T13">(max))</text:span><text:span text:style-name="T11"> </text:span><text:span text:style-name="T13">{</text:span></text:p>
      <text:p text:style-name="P36"><text:span text:style-name="T10">19 <text:s/>| <text:s text:c="3"/></text:span><text:span text:style-name="T11"><text:s text:c="4"/></text:span><text:span text:style-name="T13">result.textContent</text:span><text:span text:style-name="T11"> </text:span><text:span text:style-name="T14">=</text:span><text:span text:style-name="T11"> </text:span><text:span text:style-name="T15">"Пожалуйста, введите корректные числа."</text:span><text:span text:style-name="T13">;</text:span></text:p>
      <text:p text:style-name="P36"><text:span text:style-name="T10">20 <text:s/>| <text:s text:c="3"/></text:span><text:span text:style-name="T11"><text:s text:c="4"/></text:span><text:span text:style-name="T17">return</text:span><text:span text:style-name="T13">;</text:span></text:p>
      <text:p text:style-name="P36"><text:span text:style-name="T10">21 <text:s/>| <text:s text:c="3"/></text:span><text:span text:style-name="T11"><text:s text:c="2"/></text:span><text:span text:style-name="T13">}</text:span></text:p>
      <text:p text:style-name="P37">22 <text:s/>| <text:s text:c="3"/></text:p>
      <text:p text:style-name="P36"><text:span text:style-name="T10">23 <text:s/>| <text:s text:c="3"/></text:span><text:span text:style-name="T11"><text:s text:c="2"/></text:span><text:span text:style-name="T17">if</text:span><text:span text:style-name="T11"> </text:span><text:span text:style-name="T13">(min</text:span><text:span text:style-name="T11"> </text:span><text:span text:style-name="T14">&gt;</text:span><text:span text:style-name="T11"> </text:span><text:span text:style-name="T13">max)</text:span><text:span text:style-name="T11"> </text:span><text:span text:style-name="T13">{</text:span></text:p>
      <text:p text:style-name="P36"><text:span text:style-name="T10">24 <text:s/>| <text:s text:c="3"/></text:span><text:span text:style-name="T11"><text:s text:c="4"/></text:span><text:span text:style-name="T13">result.textContent</text:span><text:span text:style-name="T11"> </text:span><text:span text:style-name="T14">=</text:span></text:p>
      <text:p text:style-name="P36"><text:span text:style-name="T10">25 <text:s/>| <text:s text:c="3"/></text:span><text:span text:style-name="T11"><text:s text:c="6"/></text:span><text:span text:style-name="T15">"Минимальное значение не может быть больше максимального."</text:span><text:span text:style-name="T13">;</text:span></text:p>
      <text:p text:style-name="P36"><text:span text:style-name="T10">26 <text:s/>| <text:s text:c="3"/></text:span><text:span text:style-name="T11"><text:s text:c="4"/></text:span><text:span text:style-name="T17">return</text:span><text:span text:style-name="T13">;</text:span></text:p>
      <text:p text:style-name="P36"><text:span text:style-name="T10">27 <text:s/>| <text:s text:c="3"/></text:span><text:span text:style-name="T11"><text:s text:c="2"/></text:span><text:span text:style-name="T13">}</text:span></text:p>
      <text:p text:style-name="P37">28 <text:s/>| <text:s text:c="3"/></text:p>
      <text:p text:style-name="P36"><text:span text:style-name="T10">29 <text:s/>| <text:s text:c="3"/></text:span><text:span text:style-name="T11"><text:s text:c="2"/></text:span><text:span text:style-name="T17">const</text:span><text:span text:style-name="T11"> </text:span><text:span text:style-name="T13">random_number</text:span><text:span text:style-name="T11"> </text:span><text:span text:style-name="T14">=</text:span><text:span text:style-name="T11"> </text:span><text:span text:style-name="T19">Math</text:span><text:span text:style-name="T13">.floor(</text:span><text:span text:style-name="T19">Math</text:span><text:span text:style-name="T13">.random()</text:span><text:span text:style-name="T11"> </text:span><text:span text:style-name="T14">*</text:span><text:span text:style-name="T11"> </text:span><text:span text:style-name="T13">(max</text:span><text:span text:style-name="T11"> </text:span><text:span text:style-name="T14">-</text:span><text:span text:style-name="T11"> </text:span><text:span text:style-name="T13">min</text:span><text:span text:style-name="T11"> </text:span><text:span text:style-name="T14">+</text:span><text:span text:style-name="T11"> </text:span><text:span text:style-name="T14">1</text:span><text:span text:style-name="T13">))</text:span><text:span text:style-name="T11"> </text:span><text:span text:style-name="T14">+</text:span><text:span text:style-name="T11"> </text:span><text:span text:style-name="T13">min;</text:span></text:p>
      <text:p text:style-name="P36"><text:span text:style-name="T10">30 <text:s/>| <text:s text:c="3"/></text:span><text:span text:style-name="T11"><text:s text:c="2"/></text:span><text:span text:style-name="T13">result.textContent</text:span><text:span text:style-name="T11"> </text:span><text:span text:style-name="T14">=</text:span><text:span text:style-name="T11"> </text:span><text:span text:style-name="T15">`Случайное число </text:span><text:span text:style-name="T20">${</text:span><text:span text:style-name="T13">random_number</text:span><text:span text:style-name="T20">}</text:span><text:span text:style-name="T15"> скопировано`</text:span><text:span text:style-name="T13">;</text:span></text:p>
      <text:p text:style-name="P37">31 <text:s/>| <text:s text:c="3"/></text:p>
      <text:p text:style-name="P36"><text:span text:style-name="T10">32 <text:s/>| <text:s text:c="3"/></text:span><text:span text:style-name="T11"><text:s text:c="2"/></text:span><text:span text:style-name="T13">copyToClipboard(random_number.toString());</text:span></text:p>
      <text:p text:style-name="P38"><text:span text:style-name="T10">33 <text:s/>| <text:s text:c="3"/></text:span>});</text:p>
      <text:p text:style-name="P39"><text:bookmark text:name="__RefHeading___Toc143_2058273410 Copy 1 Copy 1"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family="'Liberation Mono'" style:font-family-generic="modern" style:font-pitch="fixed" fo:font-size="8pt" officeooo:rsid="0097f467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43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andscape" style:page-layout-name="Mpm4" draw:style-name="Mdp1">
      <style:footer>
        <text:p text:style-name="MP1"><text:bookmark-start text:name="PageNumWizard_FOOTER_Landscape19"/><text:page-number text:select-page="current">0</text:page-number><text:bookmark-end text:name="PageNumWizard_FOOTER_Landscape19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5-27T01:22:21.797294292</dc:date>
    <meta:editing-duration>P1DT9H41M15S</meta:editing-duration>
    <meta:editing-cycles>104</meta:editing-cycles>
    <meta:generator>LibreOffice/26.2.3.2$Linux_X86_64 LibreOffice_project/620$Build-2</meta:generator>
    <meta:print-date>2026-03-14T12:41:01.714635128</meta:print-date>
    <meta:printed-by>PDF files</meta:printed-by>
    <meta:document-statistic meta:table-count="0" meta:image-count="4" meta:object-count="0" meta:page-count="7" meta:paragraph-count="118" meta:word-count="633" meta:character-count="4810" meta:non-whitespace-character-count="3774"/>
  </office:meta>
</office:document-meta>
</file>