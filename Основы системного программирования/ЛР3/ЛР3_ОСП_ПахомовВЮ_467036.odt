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333FB314E9F.png" manifest:media-type="image/png"/>
  <manifest:file-entry manifest:full-path="Pictures/100000010000037B00000243AE8A18AB.png" manifest:media-type="image/png"/>
  <manifest:file-entry manifest:full-path="Pictures/10000001000003D9000001BC3F39C460.png" manifest:media-type="image/png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882cm" style:rel-column-width="10741*"/>
    </style:style>
    <style:style style:name="Table1.B" style:family="table-column">
      <style:table-column-properties style:column-width="4.135cm" style:rel-column-width="15406*"/>
    </style:style>
    <style:style style:name="Table1.C" style:family="table-column">
      <style:table-column-properties style:column-width="4.972cm" style:rel-column-width="18527*"/>
    </style:style>
    <style:style style:name="Table1.D" style:family="table-column">
      <style:table-column-properties style:column-width="2.877cm" style:rel-column-width="10722*"/>
    </style:style>
    <style:style style:name="Table1.E" style:family="table-column">
      <style:table-column-properties style:column-width="2.722cm" style:rel-column-width="1013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0.2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5cm" fo:margin-left="0.009cm" fo:margin-top="0cm" fo:margin-bottom="0cm" table:align="left" style:writing-mode="lr-tb"/>
    </style:style>
    <style:style style:name="Table3.A" style:family="table-column">
      <style:table-column-properties style:column-width="7.188cm"/>
    </style:style>
    <style:style style:name="Table3.B" style:family="table-column">
      <style:table-column-properties style:column-width="10.40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="0.097cm" fo:border="0.5pt solid #000000" style:writing-mode="lr-tb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595cm" fo:margin-left="0.009cm" fo:margin-top="0cm" fo:margin-bottom="0cm" table:align="left" style:writing-mode="lr-tb"/>
    </style:style>
    <style:style style:name="Table4.A" style:family="table-column">
      <style:table-column-properties style:column-width="2.581cm"/>
    </style:style>
    <style:style style:name="Table4.B" style:family="table-column">
      <style:table-column-properties style:column-width="15.01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fo:padding="0.097cm" fo:border="0.5pt solid #000000" style:writing-mode="lr-tb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ddbd4" officeooo:paragraph-rsid="001ddbd4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fb6cf" officeooo:paragraph-rsid="001fb6cf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1fb6cf" officeooo:paragraph-rsid="001fb6cf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a99be" officeooo:paragraph-rsid="002a99b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a99be" officeooo:paragraph-rsid="002a99be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a99be" officeooo:paragraph-rsid="002a99be"/>
    </style:style>
    <style:style style:name="P20" style:family="paragraph" style:parent-style-name="Table_20_Contents">
      <style:paragraph-properties fo:text-align="justify" style:justify-single-word="false"/>
      <style:text-properties officeooo:rsid="002a99be" officeooo:paragraph-rsid="002a99be"/>
    </style:style>
    <style:style style:name="P21" style:family="paragraph" style:parent-style-name="Table_20_Contents">
      <style:paragraph-properties fo:text-align="left" style:justify-single-word="false"/>
      <style:text-properties fo:font-weight="normal" officeooo:rsid="002a99be" officeooo:paragraph-rsid="002a99be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0f2314" officeooo:paragraph-rsid="00257bfa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1fb6cf" officeooo:paragraph-rsid="001fb6cf"/>
    </style:style>
    <style:style style:name="P24" style:family="paragraph" style:parent-style-name="Text_20_body">
      <style:paragraph-properties fo:text-align="justify" style:justify-single-word="false"/>
      <style:text-properties officeooo:rsid="00257bfa" officeooo:paragraph-rsid="00257bfa"/>
    </style:style>
    <style:style style:name="P25" style:family="paragraph" style:parent-style-name="Table_20_Contents">
      <style:paragraph-properties fo:text-align="left" style:justify-single-word="false"/>
      <style:text-properties officeooo:rsid="002a99be" officeooo:paragraph-rsid="002a99b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1fb6cf" officeooo:paragraph-rsid="00257bfa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paragraph-rsid="001fb6cf"/>
    </style:style>
    <style:style style:name="P28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fo:font-weight="bold" officeooo:rsid="002a99be" officeooo:paragraph-rsid="002a99b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fo:font-weight="bold" officeooo:rsid="002a99be" style:font-weight-asian="bold" style:font-weight-complex="bold"/>
    </style:style>
    <style:style style:name="P30" style:family="paragraph" style:parent-style-name="Text_20_body">
      <style:paragraph-properties fo:line-height="115%" fo:text-align="justify" style:justify-single-word="false">
        <style:tab-stops/>
      </style:paragraph-properties>
      <style:text-properties style:font-name="Liberation Serif" officeooo:rsid="002a99be" officeooo:paragraph-rsid="002a99be"/>
    </style:style>
    <style:style style:name="P31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officeooo:rsid="002a99be" officeooo:paragraph-rsid="002a99be"/>
    </style:style>
    <style:style style:name="P32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erif" fo:font-weight="bold" officeooo:rsid="00257bfa" officeooo:paragraph-rsid="00257bfa" style:font-weight-asian="bold" style:font-weight-complex="bold"/>
    </style:style>
    <style:style style:name="P33" style:family="paragraph" style:parent-style-name="Text_20_body">
      <style:paragraph-properties fo:line-height="115%" fo:text-align="center" style:justify-single-word="false">
        <style:tab-stops/>
      </style:paragraph-properties>
      <style:text-properties style:font-name="Liberation Serif" officeooo:rsid="002a99be" officeooo:paragraph-rsid="002a99be"/>
    </style:style>
    <style:style style:name="P34" style:family="paragraph" style:parent-style-name="Table_20_Contents">
      <style:paragraph-properties fo:text-align="justify" style:justify-single-word="false">
        <style:tab-stops/>
      </style:paragraph-properties>
      <style:text-properties style:font-name="Liberation Serif"/>
    </style:style>
    <style:style style:name="P35" style:family="paragraph" style:parent-style-name="Text_20_body" style:list-style-name="">
      <style:paragraph-properties fo:margin-top="0cm" fo:margin-bottom="0.25cm" style:contextual-spacing="false" fo:line-height="150%" fo:text-align="left" style:justify-single-word="false"/>
      <style:text-properties fo:font-weight="bold" officeooo:rsid="000f2314" officeooo:paragraph-rsid="000f2314" style:font-weight-asian="bold" style:font-weight-complex="bold"/>
    </style:style>
    <style:style style:name="P3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2074ab" officeooo:paragraph-rsid="002074ab"/>
    </style:style>
    <style:style style:name="P38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39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074ab" officeooo:paragraph-rsid="002074ab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074ab" officeooo:paragraph-rsid="002074ab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8pt" officeooo:rsid="002074ab" officeooo:paragraph-rsid="002074ab" style:font-size-asian="8pt" style:font-size-complex="8p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cb077" officeooo:paragraph-rsid="002cb077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8pt" officeooo:rsid="002074ab" officeooo:paragraph-rsid="002cb077" style:font-size-asian="8pt" style:font-size-complex="8pt"/>
    </style:style>
    <style:style style:name="P45" style:family="paragraph" style:parent-style-name="Рисунок">
      <style:paragraph-properties fo:text-align="center" style:justify-single-word="fals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e7c24" officeooo:paragraph-rsid="002074ab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31fa8" officeooo:paragraph-rsid="00231fa8"/>
    </style:style>
    <style:style style:name="P48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49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50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5a450" officeooo:paragraph-rsid="0025a450"/>
    </style:style>
    <style:style style:name="P52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53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ff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54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55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5a450" officeooo:paragraph-rsid="0025a450" fo:background-color="transparent" style:font-size-asian="8pt" style:font-size-complex="8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5a450" officeooo:paragraph-rsid="0025a450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074ab" officeooo:paragraph-rsid="0025a4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dbd4"/>
    </style:style>
    <style:style style:name="T3" style:family="text">
      <style:text-properties officeooo:rsid="000ca6c1"/>
    </style:style>
    <style:style style:name="T4" style:family="text">
      <style:text-properties officeooo:rsid="002a99be"/>
    </style:style>
    <style:style style:name="T5" style:family="text">
      <style:text-properties officeooo:rsid="0016960e"/>
    </style:style>
    <style:style style:name="T6" style:family="text">
      <style:text-properties officeooo:rsid="00257bf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99be" style:font-weight-asian="bold" style:font-weight-complex="bold"/>
    </style:style>
    <style:style style:name="T9" style:family="text">
      <style:text-properties officeooo:rsid="001fb6cf"/>
    </style:style>
    <style:style style:name="T10" style:family="text">
      <style:text-properties fo:color="#000000" loext:opacity="100%" style:font-name="Liberation Serif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adc23"/>
    </style:style>
    <style:style style:name="T13" style:family="text">
      <style:text-properties fo:color="#008000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officeooo:rsid="002cb077"/>
    </style:style>
    <style:style style:name="T18" style:family="text">
      <style:text-properties officeooo:rsid="002e7c24"/>
    </style:style>
    <style:style style:name="T19" style:family="text">
      <style:text-properties fo:color="#2b91af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Основы системного программирования</text:span>»</text:p>
      <text:p text:style-name="P3"/>
      <text:p text:style-name="P3"/>
      <text:p text:style-name="P3">ОТЧЕТ ПО ЛАБОРАТОРНОЙ РАБОТЕ <text:span text:style-name="T3">№</text:span><text:span text:style-name="T4">3</text:span></text:p>
      <text:p text:style-name="P3">«Процессы, потоки и средства межпроцессного взаимодействия»</text:p>
      <text:p text:style-name="P3"/>
      <text:p text:style-name="P5">Выполнил:</text:p>
      <text:p text:style-name="P5">Пахомов Владимир Юрьевич, студент группы N3250</text:p>
      <text:p text:style-name="P6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6">________________</text:p>
      <text:p text:style-name="P7">(подпись) <text:s text:c="8"/></text:p>
      <text:p text:style-name="P5"/>
      <text:p text:style-name="P5">Проверил:</text:p>
      <text:p text:style-name="P8">Грозов Владимир Андреевич</text:p>
      <text:p text:style-name="P9"/>
      <text:p text:style-name="P10">_____________________</text:p>
      <text:p text:style-name="P7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ЗАДАНИЕ. ВАРИАНТ 5" text:style-name="Index_20_Link" text:visited-style-name="Index_20_Link">ЗАДАНИЕ. ВАРИАНТ 5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5</text:a></text:p>
        </text:index-body>
      </text:table-of-content>
      <text:p text:style-name="P13"/>
      <text:h text:style-name="P15" text:outline-level="1"><text:bookmark-start text:name="__RefHeading___Toc82_2058273410"/>ЗАДАНИЕ. ВАРИАНТ <text:span text:style-name="T4">5</text:span><text:bookmark-end text:name="__RefHeading___Toc82_2058273410"/></text:h>
      <text:p text:style-name="P16">Таблица 1:<text:span text:style-name="T6"> Переменные среды и опции командной строки, поддерживаемые программой</text:span><text:span text:style-name="T4">-</text:span><text:span text:style-name="T6">сервером и</text:span><text:span text:style-name="T4"> </text:span>программой-клиенто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Опция</text:p>
          </table:table-cell>
          <table:table-cell table:style-name="Table1.A1" office:value-type="string">
            <text:p text:style-name="P17">Переменная среды</text:p>
          </table:table-cell>
          <table:table-cell table:style-name="Table1.A1" office:value-type="string">
            <text:p text:style-name="P17">Назначение</text:p>
          </table:table-cell>
          <table:table-cell table:style-name="Table1.A1" office:value-type="string">
            <text:p text:style-name="P17">Значение по умолчанию</text:p>
          </table:table-cell>
          <table:table-cell table:style-name="Table1.E1" office:value-type="string">
            <text:p text:style-name="P17">Поддерживается</text:p>
          </table:table-cell>
        </table:table-row>
        <table:table-row>
          <table:table-cell table:style-name="Table1.A2" office:value-type="string">
            <text:p text:style-name="P18">-w N</text:p>
          </table:table-cell>
          <table:table-cell table:style-name="Table1.A2" office:value-type="string">
            <text:p text:style-name="P19">lab3WAIT</text:p>
          </table:table-cell>
          <table:table-cell table:style-name="Table1.A2" office:value-type="string">
            <text:p text:style-name="P20">Имитация работы путем приостановки обслуживающего запрос</text:p>
            <text:p text:style-name="P20">процесса/потока на N</text:p>
            <text:p text:style-name="P20">секунд. Если опция не</text:p>
            <text:p text:style-name="P20">задана, обслуживать запрос без задержки</text:p>
          </table:table-cell>
          <table:table-cell table:style-name="Table1.A2" office:value-type="string">
            <text:p text:style-name="P19">0</text:p>
          </table:table-cell>
          <table:table-cell table:style-name="Table1.E2" office:value-type="string">
            <text:p text:style-name="P19">Сервером</text:p>
          </table:table-cell>
        </table:table-row>
        <table:table-row>
          <table:table-cell table:style-name="Table1.A2" office:value-type="string">
            <text:p text:style-name="P18">-d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Работа в режиме демона.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</text:p>
          </table:table-cell>
        </table:table-row>
        <table:table-row>
          <table:table-cell table:style-name="Table1.A2" office:value-type="string">
            <text:p text:style-name="P18">-l /path/to/log</text:p>
          </table:table-cell>
          <table:table-cell table:style-name="Table1.A2" office:value-type="string">
            <text:p text:style-name="P19">lab3LOGFILE</text:p>
          </table:table-cell>
          <table:table-cell table:style-name="Table1.A2" office:value-type="string">
            <text:p text:style-name="P20">Путь к лог-файлу</text:p>
          </table:table-cell>
          <table:table-cell table:style-name="Table1.A2" office:value-type="string">
            <text:p text:style-name="P19">/tmp/lab3.log</text:p>
          </table:table-cell>
          <table:table-cell table:style-name="Table1.E2" office:value-type="string">
            <text:p text:style-name="P19">Сервером</text:p>
          </table:table-cell>
        </table:table-row>
        <table:table-row>
          <table:table-cell table:style-name="Table1.A2" office:value-type="string">
            <text:p text:style-name="P18">-a ip</text:p>
          </table:table-cell>
          <table:table-cell table:style-name="Table1.A2" office:value-type="string">
            <text:p text:style-name="P19">lab3ADDR</text:p>
          </table:table-cell>
          <table:table-cell table:style-name="Table1.A2" office:value-type="string">
            <text:p text:style-name="P20">Адрес, на котором слушает сервер и к которому подключается клиент.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 и клиентом</text:p>
          </table:table-cell>
        </table:table-row>
        <table:table-row>
          <table:table-cell table:style-name="Table1.A2" office:value-type="string">
            <text:p text:style-name="P18">-p port</text:p>
          </table:table-cell>
          <table:table-cell table:style-name="Table1.A2" office:value-type="string">
            <text:p text:style-name="P19">lab3PORT</text:p>
          </table:table-cell>
          <table:table-cell table:style-name="Table1.A2" office:value-type="string">
            <text:p text:style-name="P20">Порт, на котором слушает</text:p>
            <text:p text:style-name="P20">сервер и к которому</text:p>
            <text:p text:style-name="P20">подключается клиент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 и клиентом</text:p>
          </table:table-cell>
        </table:table-row>
        <table:table-row>
          <table:table-cell table:style-name="Table1.A2" office:value-type="string">
            <text:p text:style-name="P18">-v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Вывод версии программы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 и клиентом</text:p>
          </table:table-cell>
        </table:table-row>
        <table:table-row>
          <table:table-cell table:style-name="Table1.A2" office:value-type="string">
            <text:p text:style-name="P18">-h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Вывод справки по опциям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 и клиентом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9">lab3DEBUG</text:p>
          </table:table-cell>
          <table:table-cell table:style-name="Table1.A2" office:value-type="string">
            <text:p text:style-name="P20">Включение вывода отладочной информации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>Сервером и клиентом</text:p>
          </table:table-cell>
        </table:table-row>
      </table:table>
      <text:p text:style-name="P22"/>
      <text:p text:style-name="P23">Таблица 2:<text:span text:style-name="T6"> </text:span><text:span text:style-name="T4">Тип многозадачности программы-сервера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Вариант (условие)</text:p>
          </table:table-cell>
          <table:table-cell table:style-name="Table2.B1" office:value-type="string">
            <text:p text:style-name="P17">Тип многозадачности</text:p>
          </table:table-cell>
        </table:table-row>
        <table:table-row>
          <table:table-cell table:style-name="Table2.A2" office:value-type="string">
            <text:p text:style-name="P24">Количество букв в <text:span text:style-name="T7">фамилии</text:span> студента,<text:span text:style-name="T4"> </text:span>выполняющего работу, <text:span text:style-name="T7">нечетное</text:span><text:span text:style-name="T8">.</text:span></text:p>
          </table:table-cell>
          <table:table-cell table:style-name="Table2.B2" office:value-type="string">
            <text:p text:style-name="P25">Многопроцессорность (создание рабочих задач с помощью вызова fork)</text:p>
          </table:table-cell>
        </table:table-row>
      </table:table>
      <text:p text:style-name="P26"/>
      <text:p text:style-name="P27"><text:span text:style-name="T9">Таблица 3:</text:span><text:span text:style-name="T6"> Транспортный протокол, поддерживаемый программой-сервером и</text:span><text:span text:style-name="T4"> </text:span><text:span text:style-name="T6">программой-клиентом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8">Вариант (условие)</text:p>
          </table:table-cell>
          <table:table-cell table:style-name="Table3.B1" office:value-type="string">
            <text:p text:style-name="P29">Транспортный протокол</text:p>
          </table:table-cell>
        </table:table-row>
        <table:table-row table:style-name="Table3.1">
          <table:table-cell table:style-name="Table3.A2" office:value-type="string">
            <text:p text:style-name="P30">Количество букв в <text:span text:style-name="T7">имени</text:span> студента, выполняющего работу, <text:span text:style-name="T7">четное</text:span></text:p>
          </table:table-cell>
          <table:table-cell table:style-name="Table3.B2" office:value-type="string">
            <text:p text:style-name="P31">TCP</text:p>
          </table:table-cell>
        </table:table-row>
      </table:table>
      <text:p text:style-name="Standard" loext:marker-style-name="T10"/>
      <text:p text:style-name="P23">Таблица 4:<text:span text:style-name="T6"> Прикладной протокол, поддерживаемый программой-сервером и программой-клиентом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Вариант (номер)</text:p>
          </table:table-cell>
          <table:table-cell table:style-name="Table4.B1" office:value-type="string">
            <text:p text:style-name="P32">Описание <text:span text:style-name="T4">прикладного протокола</text:span></text:p>
          </table:table-cell>
        </table:table-row>
        <table:table-row table:style-name="Table4.1">
          <table:table-cell table:style-name="Table4.A2" office:value-type="string">
            <text:p text:style-name="P33">5</text:p>
          </table:table-cell>
          <table:table-cell table:style-name="Table4.B2" office:value-type="string">
            <text:p text:style-name="P34"><text:span text:style-name="T11">Запрос</text:span>: строка, содержащая список целых чисел в десятичной или<text:span text:style-name="T4"> </text:span>шестнадцатеричной системах счисления, разделенных пробелами или символами<text:span text:style-name="T4"> </text:span>табуляции (возможно, несколькими подряд), завершающаяся символом LF.</text:p>
            <text:p text:style-name="P34"><text:span text:style-name="T11">Ответ, если ошибок не было</text:span>: строка, содержащая отсортированный список чисел<text:span text:style-name="T4"> </text:span>(разделитель — пробел, критерий сортировки — по убыванию количества<text:span text:style-name="T4"> </text:span>разрядов в десятичном представлении числа), завершающаяся символом LF.</text:p>
            <text:p text:style-name="P34"><text:span text:style-name="T11">Ответ, если были ошибки</text:span>: строка «ERROR N», завершающаяся символом LF, где<text:span text:style-name="T4"> </text:span>N — код ошибки<text:span text:style-name="T12">.</text:span></text:p>
          </table:table-cell>
        </table:table-row>
      </table:table>
      <text:h text:style-name="P35" text:outline-level="1"/>
      <text:h text:style-name="P36" text:outline-level="1"><text:bookmark-start text:name="__RefHeading___Toc143_2058273410"/>ХОД РАБОТЫ<text:bookmark-end text:name="__RefHeading___Toc143_2058273410"/></text:h>
      <text:p text:style-name="P37">Исходный код Makefile:</text:p>
      <text:p text:style-name="P38"><text:span text:style-name="T13"><text:s/>1 <text:s/>| <text:s text:c="3"/></text:span><text:span text:style-name="T14">CC = gcc</text:span></text:p>
      <text:p text:style-name="P38"><text:span text:style-name="T13"><text:s/>2 <text:s/>| <text:s text:c="3"/></text:span><text:span text:style-name="T14">CFLAGS = -Wall -Wextra -Werror -O3</text:span></text:p>
      <text:p text:style-name="P39"><text:s/>3 <text:s/>| <text:s text:c="3"/></text:p>
      <text:p text:style-name="P38"><text:span text:style-name="T13"><text:s/>4 <text:s/>| <text:s text:c="3"/></text:span><text:span text:style-name="T14">SERVER_TARGET = lab3vypN3250_server</text:span></text:p>
      <text:p text:style-name="P38"><text:span text:style-name="T13"><text:s/>5 <text:s/>| <text:s text:c="3"/></text:span><text:span text:style-name="T14">CLIENT_TARGET = lab3vypN3250_client</text:span></text:p>
      <text:p text:style-name="P39"><text:s/>6 <text:s/>| <text:s text:c="3"/></text:p>
      <text:p text:style-name="P38"><text:span text:style-name="T13"><text:s/>7 <text:s/>| <text:s text:c="3"/></text:span><text:span text:style-name="T14">SERVER_SRC = lab3vypN3250_server.c</text:span></text:p>
      <text:p text:style-name="P38"><text:span text:style-name="T13"><text:s/>8 <text:s/>| <text:s text:c="3"/></text:span><text:span text:style-name="T14">CLIENT_SRC = lab3vypN3250_client.c</text:span></text:p>
      <text:p text:style-name="P39"><text:s/>9 <text:s/>| <text:s text:c="3"/></text:p>
      <text:p text:style-name="P38"><text:span text:style-name="T13">10 <text:s/>| <text:s text:c="3"/></text:span><text:span text:style-name="T14">all: </text:span><text:span text:style-name="T15">$(</text:span><text:span text:style-name="T14">SERVER_TARGET</text:span><text:span text:style-name="T15">)</text:span><text:span text:style-name="T14"> </text:span><text:span text:style-name="T15">$(</text:span><text:span text:style-name="T14">CLIENT_TARGET</text:span><text:span text:style-name="T15">)</text:span></text:p>
      <text:p text:style-name="P39">11 <text:s/>| <text:s text:c="3"/></text:p>
      <text:p text:style-name="P38"><text:span text:style-name="T13">12 <text:s/>| <text:s text:c="3"/></text:span><text:span text:style-name="T14">$(SERVER_TARGET): </text:span><text:span text:style-name="T15">$(</text:span><text:span text:style-name="T14">SERVER_SRC</text:span><text:span text:style-name="T15">)</text:span></text:p>
      <text:p text:style-name="P38"><text:span text:style-name="T13">13 <text:s/>| <text:s text:c="3"/></text:span><text:span text:style-name="T14"><text:tab/></text:span><text:span text:style-name="T15">$(</text:span><text:span text:style-name="T14">CC</text:span><text:span text:style-name="T15">)</text:span><text:span text:style-name="T14"> </text:span><text:span text:style-name="T15">$(</text:span><text:span text:style-name="T14">CFLAGS</text:span><text:span text:style-name="T15">)</text:span><text:span text:style-name="T14"> </text:span><text:span text:style-name="T15">$(</text:span><text:span text:style-name="T14">SERVER_SRC</text:span><text:span text:style-name="T15">)</text:span><text:span text:style-name="T14"> -o </text:span><text:span text:style-name="T15">$(</text:span><text:span text:style-name="T14">SERVER_TARGET</text:span><text:span text:style-name="T15">)</text:span></text:p>
      <text:p text:style-name="P39">14 <text:s/>| <text:s text:c="3"/></text:p>
      <text:p text:style-name="P38"><text:span text:style-name="T13">15 <text:s/>| <text:s text:c="3"/></text:span><text:span text:style-name="T14">$(CLIENT_TARGET): </text:span><text:span text:style-name="T15">$(</text:span><text:span text:style-name="T14">CLIENT_SRC</text:span><text:span text:style-name="T15">)</text:span></text:p>
      <text:p text:style-name="P38"><text:span text:style-name="T13">16 <text:s/>| <text:s text:c="3"/></text:span><text:span text:style-name="T14"><text:tab/></text:span><text:span text:style-name="T15">$(</text:span><text:span text:style-name="T14">CC</text:span><text:span text:style-name="T15">)</text:span><text:span text:style-name="T14"> </text:span><text:span text:style-name="T15">$(</text:span><text:span text:style-name="T14">CFLAGS</text:span><text:span text:style-name="T15">)</text:span><text:span text:style-name="T14"> </text:span><text:span text:style-name="T15">$(</text:span><text:span text:style-name="T14">CLIENT_SRC</text:span><text:span text:style-name="T15">)</text:span><text:span text:style-name="T14"> -o </text:span><text:span text:style-name="T15">$(</text:span><text:span text:style-name="T14">CLIENT_TARGET</text:span><text:span text:style-name="T15">)</text:span></text:p>
      <text:p text:style-name="P39">17 <text:s/>| <text:s text:c="3"/></text:p>
      <text:p text:style-name="P38"><text:span text:style-name="T13">18 <text:s/>| <text:s text:c="3"/></text:span><text:span text:style-name="T14">clean:</text:span></text:p>
      <text:p text:style-name="P38"><text:span text:style-name="T13">19 <text:s/>| <text:s text:c="3"/></text:span><text:span text:style-name="T14"><text:tab/>rm -f </text:span><text:span text:style-name="T15">$(</text:span><text:span text:style-name="T14">SERVER_TARGET</text:span><text:span text:style-name="T15">)</text:span><text:span text:style-name="T14"> </text:span><text:span text:style-name="T15">$(</text:span><text:span text:style-name="T14">CLIENT_TARGET</text:span><text:span text:style-name="T15">)</text:span><text:span text:style-name="T14"> *.o</text:span></text:p>
      <text:p text:style-name="P39">20 <text:s/>| <text:s text:c="3"/></text:p>
      <text:p text:style-name="P38"><text:span text:style-name="T13">21 <text:s/>| <text:s text:c="3"/></text:span><text:span text:style-name="T14">test: all</text:span></text:p>
      <text:p text:style-name="P38"><text:span text:style-name="T13">22 <text:s/>| <text:s text:c="3"/></text:span><text:span text:style-name="T14"><text:tab/>@echo </text:span><text:span text:style-name="T16">"=== ЗАПУСК ТЕСТОВ ==="</text:span></text:p>
      <text:p text:style-name="P38"><text:span text:style-name="T13">23 <text:s/>| <text:s text:c="3"/></text:span><text:span text:style-name="T14"><text:tab/>@echo </text:span><text:span text:style-name="T16">"1. Запуск сервера в фоновом режиме на порту 23456..."</text:span></text:p>
      <text:p text:style-name="P38"><text:span text:style-name="T13">24 <text:s/>| <text:s text:c="3"/></text:span><text:span text:style-name="T14"><text:tab/>./</text:span><text:span text:style-name="T15">$(</text:span><text:span text:style-name="T14">SERVER_TARGET</text:span><text:span text:style-name="T15">)</text:span><text:span text:style-name="T14"> -p 23456 -l /tmp/lab3_test.log &amp; </text:span><text:span text:style-name="T16">\</text:span></text:p>
      <text:p text:style-name="P38"><text:span text:style-name="T13">25 <text:s/>| <text:s text:c="3"/></text:span><text:span text:style-name="T14"><text:tab/>SERVER_PID=$$! ; </text:span><text:span text:style-name="T16">\</text:span></text:p>
      <text:p text:style-name="P38"><text:span text:style-name="T13">26 <text:s/>| <text:s text:c="3"/></text:span><text:span text:style-name="T14"><text:tab/>sleep 1 ; </text:span><text:span text:style-name="T16">\</text:span></text:p>
      <text:p text:style-name="P38"><text:span text:style-name="T13">27 <text:s/>| <text:s text:c="3"/></text:span><text:span text:style-name="T14"><text:tab/></text:span><text:span text:style-name="T16">\</text:span></text:p>
      <text:p text:style-name="P38"><text:span text:style-name="T13">28 <text:s/>| <text:s text:c="3"/></text:span><text:span text:style-name="T14"><text:tab/>echo </text:span><text:span text:style-name="T16">"2. Отправка тестового запроса (100 0x1F 5 1000 0xF)..."</text:span><text:span text:style-name="T14"> ; </text:span><text:span text:style-name="T16">\</text:span></text:p>
      <text:p text:style-name="P38"><text:span text:style-name="T13">29 <text:s/>| <text:s text:c="3"/></text:span><text:span text:style-name="T14"><text:tab/>RESULT=$$(./</text:span><text:span text:style-name="T15">$(</text:span><text:span text:style-name="T14">CLIENT_TARGET</text:span><text:span text:style-name="T15">)</text:span><text:span text:style-name="T14"> -p 23456 100 0x1F 5 1000 0xF) ; </text:span><text:span text:style-name="T16">\</text:span></text:p>
      <text:p text:style-name="P38"><text:span text:style-name="T13">30 <text:s/>| <text:s text:c="3"/></text:span><text:span text:style-name="T14"><text:tab/>echo </text:span><text:span text:style-name="T16">"Полученный ответ: </text:span><text:span text:style-name="T14">$$</text:span><text:span text:style-name="T16">RESULT"</text:span><text:span text:style-name="T14"> ; </text:span><text:span text:style-name="T16">\</text:span></text:p>
      <text:p text:style-name="P38"><text:span text:style-name="T13">31 <text:s/>| <text:s text:c="3"/></text:span><text:span text:style-name="T14"><text:tab/></text:span><text:span text:style-name="T16">\</text:span></text:p>
      <text:p text:style-name="P38"><text:span text:style-name="T13">32 <text:s/>| <text:s text:c="3"/></text:span><text:span text:style-name="T14"><text:tab/>echo </text:span><text:span text:style-name="T16">"3. Отправка некорректного запроса для проверки обработки ошибок..."</text:span><text:span text:style-name="T14"> ; </text:span><text:span text:style-name="T16">\</text:span></text:p>
      <text:p text:style-name="P38"><text:span text:style-name="T13">33 <text:s/>| <text:s text:c="3"/></text:span><text:span text:style-name="T14"><text:tab/>./</text:span><text:span text:style-name="T15">$(</text:span><text:span text:style-name="T14">CLIENT_TARGET</text:span><text:span text:style-name="T15">)</text:span><text:span text:style-name="T14"> -p 23456 10 20abc; </text:span><text:span text:style-name="T16">\</text:span></text:p>
      <text:p text:style-name="P38"><text:span text:style-name="T13">34 <text:s/>| <text:s text:c="3"/></text:span><text:span text:style-name="T14"><text:tab/></text:span><text:span text:style-name="T16">\</text:span></text:p>
      <text:p text:style-name="P38"><text:span text:style-name="T13">35 <text:s/>| <text:s text:c="3"/></text:span><text:span text:style-name="T14"><text:tab/>echo </text:span><text:span text:style-name="T16">"4. Запрос накопленной статистики у сервера (SIGUSR1)..."</text:span><text:span text:style-name="T14"> ; </text:span><text:span text:style-name="T16">\</text:span></text:p>
      <text:p text:style-name="P38"><text:span text:style-name="T13">36 <text:s/>| <text:s text:c="3"/></text:span><text:span text:style-name="T14"><text:tab/>kill -USR1 $$SERVER_PID ; </text:span><text:span text:style-name="T16">\</text:span></text:p>
      <text:p text:style-name="P38"><text:span text:style-name="T13">37 <text:s/>| <text:s text:c="3"/></text:span><text:span text:style-name="T14"><text:tab/>sleep 1 ; </text:span><text:span text:style-name="T16">\</text:span></text:p>
      <text:p text:style-name="P38"><text:span text:style-name="T13">38 <text:s/>| <text:s text:c="3"/></text:span><text:span text:style-name="T14"><text:tab/>echo </text:span><text:span text:style-name="T16">"Статистика в лог-файле /tmp/lab3_test.log:"</text:span><text:span text:style-name="T14"> ; </text:span><text:span text:style-name="T16">\</text:span></text:p>
      <text:p text:style-name="P38"><text:span text:style-name="T13">39 <text:s/>| <text:s text:c="3"/></text:span><text:span text:style-name="T14"><text:tab/>tail -n 5 /tmp/lab3_test.log ; </text:span><text:span text:style-name="T16">\</text:span></text:p>
      <text:p text:style-name="P38"><text:span text:style-name="T13">40 <text:s/>| <text:s text:c="3"/></text:span><text:span text:style-name="T14"><text:tab/></text:span><text:span text:style-name="T16">\</text:span></text:p>
      <text:p text:style-name="P38"><text:span text:style-name="T13">41 <text:s/>| <text:s text:c="3"/></text:span><text:span text:style-name="T14"><text:tab/>echo </text:span><text:span text:style-name="T16">"5. Завершение работы тестового сервера (SIGTERM)..."</text:span><text:span text:style-name="T14"> ; </text:span><text:span text:style-name="T16">\</text:span></text:p>
      <text:p text:style-name="P38"><text:span text:style-name="T13">42 <text:s/>| <text:s text:c="3"/></text:span><text:span text:style-name="T14"><text:tab/>kill -TERM $$SERVER_PID ; </text:span><text:span text:style-name="T16">\</text:span></text:p>
      <text:p text:style-name="P38"><text:span text:style-name="T13">43 <text:s/>| <text:s text:c="3"/></text:span><text:span text:style-name="T14"><text:tab/>wait $$SERVER_PID 2&gt;/dev/null || true ; </text:span><text:span text:style-name="T16">\</text:span></text:p>
      <text:p text:style-name="P38"><text:span text:style-name="T13">44 <text:s/>| <text:s text:c="3"/></text:span><text:span text:style-name="T14"><text:tab/>echo </text:span><text:span text:style-name="T16">"Тестирование завершено."</text:span></text:p>
      <text:p text:style-name="P39">45 <text:s/>| <text:s text:c="3"/></text:p>
      <text:p text:style-name="P38"><text:span text:style-name="T13">46 <text:s/>| <text:s text:c="3"/></text:span><text:span text:style-name="T14">.PHONY: all clean test</text:span></text:p>
      <text:p text:style-name="P40"/>
      <text:p text:style-name="P40"/>
      <text:p text:style-name="P41">Отчет valgrind<text:span text:style-name="T17">_server</text:span> со строчки HEAP SUMMARY:</text:p>
      <text:p text:style-name="P42">==34561== HEAP SUMMARY:</text:p>
      <text:p text:style-name="P42">==34561== <text:s text:c="4"/>in use at exit: 0 bytes in 0 blocks</text:p>
      <text:p text:style-name="P42">==34561== <text:s text:c="2"/>total heap usage: 28 allocs, 28 frees, 24,488 bytes allocated</text:p>
      <text:p text:style-name="P42">==34561== </text:p>
      <text:p text:style-name="P42">==34561== All heap blocks were freed -- no leaks are possible</text:p>
      <text:p text:style-name="P42">==34561== </text:p>
      <text:p text:style-name="P42">==34561== For lists of detected and suppressed errors, rerun with: -s</text:p>
      <text:p text:style-name="P42">==34561== ERROR SUMMARY: 0 errors from 0 contexts (suppressed: 0 from 0)</text:p>
      <text:p text:style-name="P42">==33838== </text:p>
      <text:p text:style-name="P42">==33838== HEAP SUMMARY:</text:p>
      <text:p text:style-name="P42">==33838== <text:s text:c="4"/>in use at exit: 0 bytes in 0 blocks</text:p>
      <text:p text:style-name="P42">==33838== <text:s text:c="2"/>total heap usage: 27 allocs, 27 frees, 28,547 bytes allocated</text:p>
      <text:p text:style-name="P42">==33838== </text:p>
      <text:p text:style-name="P42">==33838== All heap blocks were freed -- no leaks are possible</text:p>
      <text:p text:style-name="P42">==33838== </text:p>
      <text:p text:style-name="P42">==33838== For lists of detected and suppressed errors, rerun with: -s</text:p>
      <text:p text:style-name="P42">==33838== ERROR SUMMARY: 0 errors from 0 contexts (suppressed: 0 from 0)</text:p>
      <text:p text:style-name="P40"/>
      <text:p text:style-name="P43">Отчет valgrind_client со строчки HEAP SUMMARY:</text:p>
      <text:p text:style-name="P44">==34556== HEAP SUMMARY:</text:p>
      <text:p text:style-name="P44">==34556== <text:s text:c="4"/>in use at exit: 0 bytes in 0 blocks</text:p>
      <text:p text:style-name="P44">==34556== <text:s text:c="2"/>total heap usage: 3 allocs, 3 frees, 1,280 bytes allocated</text:p>
      <text:p text:style-name="P44">==34556== </text:p>
      <text:p text:style-name="P44">==34556== All heap blocks were freed -- no leaks are possible</text:p>
      <text:p text:style-name="P44">==34556== </text:p>
      <text:p text:style-name="P44">==34556== For lists of detected and suppressed errors, rerun with: -s</text:p>
      <text:p text:style-name="P44">==34556== ERROR SUMMARY: 0 errors from 0 contexts (suppressed: 0 from 0)</text:p>
      <text:p text:style-name="P43"/>
      <text:p text:style-name="P40"/>
      <text:p text:style-name="P40"><draw:frame draw:style-name="fr2" draw:name="Frame1" text:anchor-type="char" svg:width="17.59cm" draw:z-index="1"><draw:text-box fo:min-height="8.976cm"><text:p text:style-name="P45"><draw:frame draw:style-name="fr3" draw:name="Image1" text:anchor-type="char" svg:width="17.59cm" svg:height="7.927cm" draw:z-index="3"><draw:image xlink:href="Pictures/10000001000003D9000001BC3F39C460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ример работы <text:span text:style-name="T18">клиента</text:span></text:p></draw:text-box></draw:frame></text:p>
      <text:p text:style-name="P40"/>
      <text:p text:style-name="P40"><draw:frame draw:style-name="fr2" draw:name="Frame3" text:anchor-type="char" svg:width="17.59cm" draw:z-index="4"><draw:text-box fo:min-height="11.43cm"><text:p text:style-name="P45"><draw:frame draw:style-name="fr4" draw:name="Image3" text:anchor-type="paragraph" svg:width="17.59cm" style:rel-width="100%" svg:height="11.43cm" style:rel-height="scale" draw:z-index="5"><draw:image xlink:href="Pictures/100000010000037B00000243AE8A18AB.png" xlink:type="simple" xlink:show="embed" xlink:actuate="onLoad" draw:mime-type="image/png"/></draw:frame>Рисунок <text:sequence text:ref-name="refРисунок2" text:name="Рисунок" text:formula="ooow:Рисунок+1" style:num-format="1">2</text:sequence>: Пример работы сервера</text:p></draw:text-box></draw:frame><text:soft-page-break/></text:p>
      <text:p text:style-name="P46"><draw:frame draw:style-name="fr2" draw:name="Frame2" text:anchor-type="char" svg:width="16.268cm" draw:z-index="2"><draw:text-box fo:min-height="14.392cm"><text:p text:style-name="P45"><draw:frame draw:style-name="fr5" draw:name="Image2" text:anchor-type="char" svg:width="13.095cm" svg:height="21.666cm" draw:z-index="6"><draw:image xlink:href="Pictures/10000001000001EF00000333FB314E9F.png" xlink:type="simple" xlink:show="embed" xlink:actuate="onLoad" draw:mime-type="image/png"/></draw:frame>Рисунок <text:sequence text:ref-name="refРисунок1" text:name="Рисунок" text:formula="ooow:Рисунок+1" style:num-format="1">3</text:sequence>: Результат работы тестов из Makefile</text:p></draw:text-box></draw:frame><text:soft-page-break/></text:p>
      <text:p text:style-name="P47"><text:soft-page-break/>Исходный код программы lab<text:span text:style-name="T18">3</text:span>vypN3250<text:span text:style-name="T18">_client</text:span>:</text:p>
      <text:p text:style-name="P48"><text:span text:style-name="T13"><text:s text:c="2"/>1 <text:s/>| <text:s text:c="3"/></text:span><text:span text:style-name="T15">#include</text:span><text:span text:style-name="T14"> </text:span><text:span text:style-name="T13">&lt;getopt.h&gt;</text:span></text:p>
      <text:p text:style-name="P48"><text:span text:style-name="T13"><text:s text:c="2"/>2 <text:s/>| <text:s text:c="3"/></text:span><text:span text:style-name="T15">#include</text:span><text:span text:style-name="T14"> </text:span><text:span text:style-name="T13">&lt;stdio.h&gt;</text:span></text:p>
      <text:p text:style-name="P48"><text:span text:style-name="T13"><text:s text:c="2"/>3 <text:s/>| <text:s text:c="3"/></text:span><text:span text:style-name="T15">#include</text:span><text:span text:style-name="T14"> </text:span><text:span text:style-name="T13">&lt;stdlib.h&gt;</text:span></text:p>
      <text:p text:style-name="P48"><text:span text:style-name="T13"><text:s text:c="2"/>4 <text:s/>| <text:s text:c="3"/></text:span><text:span text:style-name="T15">#include</text:span><text:span text:style-name="T14"> </text:span><text:span text:style-name="T13">&lt;string.h&gt;</text:span></text:p>
      <text:p text:style-name="P48"><text:span text:style-name="T13"><text:s text:c="2"/>5 <text:s/>| <text:s text:c="3"/></text:span><text:span text:style-name="T15">#include</text:span><text:span text:style-name="T14"> </text:span><text:span text:style-name="T13">&lt;unistd.h&gt;</text:span></text:p>
      <text:p text:style-name="P48"><text:span text:style-name="T13"><text:s text:c="2"/>6 <text:s/>| <text:s text:c="3"/></text:span><text:span text:style-name="T15">#include</text:span><text:span text:style-name="T14"> </text:span><text:span text:style-name="T13">&lt;sys/socket.h&gt;</text:span></text:p>
      <text:p text:style-name="P48"><text:span text:style-name="T13"><text:s text:c="2"/>7 <text:s/>| <text:s text:c="3"/></text:span><text:span text:style-name="T15">#include</text:span><text:span text:style-name="T14"> </text:span><text:span text:style-name="T13">&lt;netinet/in.h&gt;</text:span></text:p>
      <text:p text:style-name="P48"><text:span text:style-name="T13"><text:s text:c="2"/>8 <text:s/>| <text:s text:c="3"/></text:span><text:span text:style-name="T15">#include</text:span><text:span text:style-name="T14"> </text:span><text:span text:style-name="T13">&lt;arpa/inet.h&gt;</text:span></text:p>
      <text:p text:style-name="P49"><text:s text:c="2"/>9 <text:s/>| <text:s text:c="3"/></text:p>
      <text:p text:style-name="P49"><text:s/>10 <text:s/>| <text:s text:c="3"/></text:p>
      <text:p text:style-name="P48"><text:span text:style-name="T13"><text:s/>11 <text:s/>| <text:s text:c="3"/></text:span><text:span text:style-name="T19">int</text:span><text:span text:style-name="T14"> main(</text:span><text:span text:style-name="T19">int</text:span><text:span text:style-name="T14"> argc, </text:span><text:span text:style-name="T19">char</text:span><text:span text:style-name="T14"> *argv[]) {</text:span></text:p>
      <text:p text:style-name="P48"><text:span text:style-name="T13"><text:s/>12 <text:s/>| <text:s text:c="3"/></text:span><text:span text:style-name="T14"><text:s text:c="4"/></text:span><text:span text:style-name="T19">int</text:span><text:span text:style-name="T14"> debug = (getenv(</text:span><text:span text:style-name="T16">"lab3DEBUG"</text:span><text:span text:style-name="T14">) != NULL);</text:span></text:p>
      <text:p text:style-name="P49"><text:s/>13 <text:s/>| <text:s text:c="3"/></text:p>
      <text:p text:style-name="P48"><text:span text:style-name="T13"><text:s/>14 <text:s/>| <text:s text:c="3"/></text:span><text:span text:style-name="T14"><text:s text:c="4"/></text:span><text:span text:style-name="T19">char</text:span><text:span text:style-name="T14"> *address = </text:span><text:span text:style-name="T16">"127.0.0.1"</text:span><text:span text:style-name="T14">;</text:span></text:p>
      <text:p text:style-name="P48"><text:span text:style-name="T13"><text:s/>15 <text:s/>| <text:s text:c="3"/></text:span><text:span text:style-name="T14"><text:s text:c="4"/></text:span><text:span text:style-name="T19">int</text:span><text:span text:style-name="T14"> port = 12345;</text:span></text:p>
      <text:p text:style-name="P49"><text:s/>16 <text:s/>| <text:s text:c="3"/></text:p>
      <text:p text:style-name="P48"><text:span text:style-name="T13"><text:s/>17 <text:s/>| <text:s text:c="3"/></text:span><text:span text:style-name="T14"><text:s text:c="4"/></text:span><text:span text:style-name="T19">char</text:span><text:span text:style-name="T14"> *env_address = getenv(</text:span><text:span text:style-name="T16">"lab3ADDR"</text:span><text:span text:style-name="T14">);</text:span></text:p>
      <text:p text:style-name="P48"><text:span text:style-name="T13"><text:s/>18 <text:s/>| <text:s text:c="3"/></text:span><text:span text:style-name="T14"><text:s text:c="4"/></text:span><text:span text:style-name="T19">char</text:span><text:span text:style-name="T14"> *env_port = getenv(</text:span><text:span text:style-name="T16">"lab3PORT"</text:span><text:span text:style-name="T14">);</text:span></text:p>
      <text:p text:style-name="P48"><text:span text:style-name="T13"><text:s/>19 <text:s/>| <text:s text:c="3"/></text:span><text:span text:style-name="T14"><text:s text:c="4"/></text:span><text:span text:style-name="T19">char</text:span><text:span text:style-name="T14"> *endptr;</text:span></text:p>
      <text:p text:style-name="P49"><text:s/>20 <text:s/>| <text:s text:c="3"/></text:p>
      <text:p text:style-name="P49"><text:s/>21 <text:s/>| <text:s text:c="3"/></text:p>
      <text:p text:style-name="P48"><text:span text:style-name="T13"><text:s/>22 <text:s/>| <text:s text:c="3"/></text:span><text:span text:style-name="T14"><text:s text:c="4"/></text:span><text:span text:style-name="T15">if</text:span><text:span text:style-name="T14"> (env_address != NULL) address = env_address;</text:span></text:p>
      <text:p text:style-name="P48"><text:span text:style-name="T13"><text:s/>23 <text:s/>| <text:s text:c="3"/></text:span><text:span text:style-name="T14"><text:s text:c="4"/></text:span><text:span text:style-name="T15">if</text:span><text:span text:style-name="T14"> (env_port != NULL) {</text:span></text:p>
      <text:p text:style-name="P48"><text:span text:style-name="T13"><text:s/>24 <text:s/>| <text:s text:c="3"/></text:span><text:span text:style-name="T14"><text:s text:c="8"/></text:span><text:span text:style-name="T19">long</text:span><text:span text:style-name="T14"> val = strtol(env_port, &amp;endptr, 10);</text:span></text:p>
      <text:p text:style-name="P48"><text:span text:style-name="T13"><text:s/>25 <text:s/>| <text:s text:c="3"/></text:span><text:span text:style-name="T14"><text:s text:c="8"/></text:span><text:span text:style-name="T15">if</text:span><text:span text:style-name="T14"> (*endptr == </text:span><text:span text:style-name="T16">'\0'</text:span><text:span text:style-name="T14"> &amp;&amp; val &gt; 0 &amp;&amp; val &lt;= 65535) {</text:span></text:p>
      <text:p text:style-name="P48"><text:span text:style-name="T13"><text:s/>26 <text:s/>| <text:s text:c="3"/></text:span><text:span text:style-name="T14"><text:s text:c="12"/>port = (</text:span><text:span text:style-name="T19">int</text:span><text:span text:style-name="T14">)val;</text:span></text:p>
      <text:p text:style-name="P48"><text:span text:style-name="T13"><text:s/>27 <text:s/>| <text:s text:c="3"/></text:span><text:span text:style-name="T14"><text:s text:c="8"/>} </text:span><text:span text:style-name="T15">else</text:span><text:span text:style-name="T14"> {</text:span></text:p>
      <text:p text:style-name="P48"><text:span text:style-name="T13"><text:s/>28 <text:s/>| <text:s text:c="3"/></text:span><text:span text:style-name="T14"><text:s text:c="12"/>fprintf(stderr, </text:span><text:span text:style-name="T16">"Ошибка: неверный формат порта: %s\n"</text:span><text:span text:style-name="T14">, env_port);</text:span></text:p>
      <text:p text:style-name="P48"><text:span text:style-name="T13"><text:s/>29 <text:s/>| <text:s text:c="3"/></text:span><text:span text:style-name="T14"><text:s text:c="12"/></text:span><text:span text:style-name="T15">return</text:span><text:span text:style-name="T14"> 1;</text:span></text:p>
      <text:p text:style-name="P48"><text:span text:style-name="T13"><text:s/>30 <text:s/>| <text:s text:c="3"/></text:span><text:span text:style-name="T14"><text:s text:c="8"/>}</text:span></text:p>
      <text:p text:style-name="P48"><text:span text:style-name="T13"><text:s/>31 <text:s/>| <text:s text:c="3"/></text:span><text:span text:style-name="T14"><text:s text:c="4"/>}</text:span></text:p>
      <text:p text:style-name="P49"><text:s/>32 <text:s/>| <text:s text:c="3"/></text:p>
      <text:p text:style-name="P48"><text:span text:style-name="T13"><text:s/>33 <text:s/>| <text:s text:c="3"/></text:span><text:span text:style-name="T14"><text:s text:c="4"/></text:span><text:span text:style-name="T15">static</text:span><text:span text:style-name="T14"> </text:span><text:span text:style-name="T15">struct</text:span><text:span text:style-name="T14"> </text:span><text:span text:style-name="T19">option</text:span><text:span text:style-name="T14"> longopts[] = {</text:span></text:p>
      <text:p text:style-name="P48"><text:span text:style-name="T13"><text:s/>34 <text:s/>| <text:s text:c="3"/></text:span><text:span text:style-name="T14"><text:s text:c="8"/>{</text:span><text:span text:style-name="T16">"address"</text:span><text:span text:style-name="T14">, required_argument, NULL, </text:span><text:span text:style-name="T16">'a'</text:span><text:span text:style-name="T14">},</text:span></text:p>
      <text:p text:style-name="P48"><text:span text:style-name="T13"><text:s/>35 <text:s/>| <text:s text:c="3"/></text:span><text:span text:style-name="T14"><text:s text:c="8"/>{</text:span><text:span text:style-name="T16">"port"</text:span><text:span text:style-name="T14">, required_argument, NULL, </text:span><text:span text:style-name="T16">'p'</text:span><text:span text:style-name="T14">},</text:span></text:p>
      <text:p text:style-name="P48"><text:span text:style-name="T13"><text:s/>36 <text:s/>| <text:s text:c="3"/></text:span><text:span text:style-name="T14"><text:s text:c="8"/>{</text:span><text:span text:style-name="T16">"verbose"</text:span><text:span text:style-name="T14">, no_argument, NULL, </text:span><text:span text:style-name="T16">'v'</text:span><text:span text:style-name="T14">},</text:span></text:p>
      <text:p text:style-name="P48"><text:span text:style-name="T13"><text:s/>37 <text:s/>| <text:s text:c="3"/></text:span><text:span text:style-name="T14"><text:s text:c="8"/>{</text:span><text:span text:style-name="T16">"help"</text:span><text:span text:style-name="T14">, no_argument, NULL, </text:span><text:span text:style-name="T16">'h'</text:span><text:span text:style-name="T14">},</text:span></text:p>
      <text:p text:style-name="P48"><text:span text:style-name="T13"><text:s/>38 <text:s/>| <text:s text:c="3"/></text:span><text:span text:style-name="T14"><text:s text:c="8"/>{NULL, 0, NULL, 0}</text:span></text:p>
      <text:p text:style-name="P48"><text:span text:style-name="T13"><text:s/>39 <text:s/>| <text:s text:c="3"/></text:span><text:span text:style-name="T14"><text:s text:c="4"/>};</text:span></text:p>
      <text:p text:style-name="P49"><text:s/>40 <text:s/>| <text:s text:c="3"/></text:p>
      <text:p text:style-name="P49"><text:s/>41 <text:s/>| <text:s text:c="3"/></text:p>
      <text:p text:style-name="P48"><text:span text:style-name="T13"><text:s/>42 <text:s/>| <text:s text:c="3"/></text:span><text:span text:style-name="T14"><text:s text:c="4"/></text:span><text:span text:style-name="T19">char</text:span><text:span text:style-name="T14"> *author = </text:span><text:span text:style-name="T16">"Клиент: Пахомов Владимир Юрьевич, гр. N3250\nВариант: 5\n"</text:span><text:span text:style-name="T14">;</text:span></text:p>
      <text:p text:style-name="P48"><text:span text:style-name="T13"><text:s/>43 <text:s/>| <text:s text:c="3"/></text:span><text:span text:style-name="T14"><text:s text:c="4"/></text:span><text:span text:style-name="T19">char</text:span><text:span text:style-name="T14"> *help = </text:span><text:span text:style-name="T16">"Использование: ./lab3vypN3250_client [опции] [числа...]\n"</text:span></text:p>
      <text:p text:style-name="P48"><text:span text:style-name="T13"><text:s/>44 <text:s/>| <text:s text:c="3"/></text:span><text:span text:style-name="T14"><text:s text:c="17"/></text:span><text:span text:style-name="T16">"Опции:\n"</text:span></text:p>
      <text:p text:style-name="P48"><text:span text:style-name="T13"><text:s/>45 <text:s/>| <text:s text:c="3"/></text:span><text:span text:style-name="T14"><text:s text:c="17"/></text:span><text:span text:style-name="T16">" <text:s/>-a, --address <text:s/>IP-адрес сервера (по умолчанию 127.0.0.1)\n"</text:span></text:p>
      <text:p text:style-name="P48"><text:span text:style-name="T13"><text:s/>46 <text:s/>| <text:s text:c="3"/></text:span><text:span text:style-name="T14"><text:s text:c="17"/></text:span><text:span text:style-name="T16">" <text:s/>-p, --port <text:s text:c="4"/>Порт сервера (по умолчанию 12345)\n"</text:span></text:p>
      <text:p text:style-name="P48"><text:span text:style-name="T13"><text:s/>47 <text:s/>| <text:s text:c="3"/></text:span><text:span text:style-name="T14"><text:s text:c="17"/></text:span><text:span text:style-name="T16">" <text:s/>-v, --version <text:s/>Вывод версии и информации об авторе\n"</text:span></text:p>
      <text:p text:style-name="P48"><text:span text:style-name="T13"><text:s/>48 <text:s/>| <text:s text:c="3"/></text:span><text:span text:style-name="T14"><text:s text:c="17"/></text:span><text:span text:style-name="T16">" <text:s/>-h, --help <text:s text:c="4"/>Вывод этой справки\n"</text:span><text:span text:style-name="T14">;</text:span></text:p>
      <text:p text:style-name="P50"><text:span text:style-name="T13"><text:s/>49 <text:s/>| <text:s text:c="3"/></text:span><text:s text:c="4"/></text:p>
      <text:p text:style-name="P48"><text:span text:style-name="T13"><text:s/>50 <text:s/>| <text:s text:c="3"/></text:span><text:span text:style-name="T14"><text:s text:c="4"/></text:span><text:span text:style-name="T19">int</text:span><text:span text:style-name="T14"> opt;</text:span></text:p>
      <text:p text:style-name="P48"><text:span text:style-name="T13"><text:s/>51 <text:s/>| <text:s text:c="3"/></text:span><text:span text:style-name="T14"><text:s text:c="4"/></text:span><text:span text:style-name="T15">while</text:span><text:span text:style-name="T14"> ((opt = getopt_long(argc, argv, </text:span><text:span text:style-name="T16">"a:p:vh"</text:span><text:span text:style-name="T14">, longopts, NULL)) != -1) {</text:span></text:p>
      <text:p text:style-name="P48"><text:span text:style-name="T13"><text:s/>52 <text:s/>| <text:s text:c="3"/></text:span><text:span text:style-name="T14"><text:s text:c="8"/></text:span><text:span text:style-name="T15">switch</text:span><text:span text:style-name="T14"> (opt) {</text:span></text:p>
      <text:p text:style-name="P48"><text:span text:style-name="T13"><text:s/>53 <text:s/>| <text:s text:c="3"/></text:span><text:span text:style-name="T14"><text:s text:c="12"/></text:span><text:span text:style-name="T15">case</text:span><text:span text:style-name="T14"> </text:span><text:span text:style-name="T16">'a'</text:span><text:span text:style-name="T14">:</text:span></text:p>
      <text:p text:style-name="P48"><text:span text:style-name="T13"><text:s/>54 <text:s/>| <text:s text:c="3"/></text:span><text:span text:style-name="T14"><text:s text:c="16"/>address = optarg;</text:span></text:p>
      <text:p text:style-name="P48"><text:span text:style-name="T13"><text:s/>55 <text:s/>| <text:s text:c="3"/></text:span><text:span text:style-name="T14"><text:s text:c="16"/></text:span><text:span text:style-name="T15">break</text:span><text:span text:style-name="T14">;</text:span></text:p>
      <text:p text:style-name="P48"><text:span text:style-name="T13"><text:s/>56 <text:s/>| <text:s text:c="3"/></text:span><text:span text:style-name="T14"><text:s text:c="12"/></text:span><text:span text:style-name="T15">case</text:span><text:span text:style-name="T14"> </text:span><text:span text:style-name="T16">'p'</text:span><text:span text:style-name="T14">: {</text:span></text:p>
      <text:p text:style-name="P48"><text:span text:style-name="T13"><text:s/>57 <text:s/>| <text:s text:c="3"/></text:span><text:span text:style-name="T14"><text:s text:c="16"/></text:span><text:span text:style-name="T19">char</text:span><text:span text:style-name="T14"> *endptr;</text:span></text:p>
      <text:p text:style-name="P48"><text:span text:style-name="T13"><text:s/>58 <text:s/>| <text:s text:c="3"/></text:span><text:span text:style-name="T14"><text:s text:c="16"/></text:span><text:span text:style-name="T19">long</text:span><text:span text:style-name="T14"> val = strtol(optarg, &amp;endptr, 10);</text:span></text:p>
      <text:p text:style-name="P48"><text:span text:style-name="T13"><text:s/>59 <text:s/>| <text:s text:c="3"/></text:span><text:span text:style-name="T14"><text:s text:c="16"/></text:span><text:span text:style-name="T15">if</text:span><text:span text:style-name="T14"> (*endptr != </text:span><text:span text:style-name="T16">'\0'</text:span><text:span text:style-name="T14"> || val &lt;= 0 || val &gt; 65535) {</text:span></text:p>
      <text:p text:style-name="P48"><text:span text:style-name="T13"><text:s/>60 <text:s/>| <text:s text:c="3"/></text:span><text:span text:style-name="T14"><text:s text:c="20"/>fprintf(stderr, </text:span><text:span text:style-name="T16">"Ошибка: некорректное значение порта '%s'. Должно быть число от 1 до 65535.\n"</text:span><text:span text:style-name="T14">, optarg);</text:span></text:p>
      <text:p text:style-name="P48"><text:span text:style-name="T13"><text:s/>61 <text:s/>| <text:s text:c="3"/></text:span><text:span text:style-name="T14"><text:s text:c="20"/></text:span><text:span text:style-name="T15">return</text:span><text:span text:style-name="T14"> 1;</text:span></text:p>
      <text:p text:style-name="P48"><text:span text:style-name="T13"><text:s/>62 <text:s/>| <text:s text:c="3"/></text:span><text:span text:style-name="T14"><text:s text:c="16"/>}</text:span></text:p>
      <text:p text:style-name="P48"><text:span text:style-name="T13"><text:s/>63 <text:s/>| <text:s text:c="3"/></text:span><text:span text:style-name="T14"><text:s text:c="16"/>port = (</text:span><text:span text:style-name="T19">int</text:span><text:span text:style-name="T14">)val;</text:span></text:p>
      <text:p text:style-name="P48"><text:span text:style-name="T13"><text:s/>64 <text:s/>| <text:s text:c="3"/></text:span><text:span text:style-name="T14"><text:s text:c="16"/></text:span><text:span text:style-name="T15">break</text:span><text:span text:style-name="T14">;</text:span></text:p>
      <text:p text:style-name="P48"><text:span text:style-name="T13"><text:s/>65 <text:s/>| <text:s text:c="3"/></text:span><text:span text:style-name="T14"><text:s text:c="12"/>}</text:span></text:p>
      <text:p text:style-name="P48"><text:span text:style-name="T13"><text:s/>66 <text:s/>| <text:s text:c="3"/></text:span><text:span text:style-name="T14"><text:s text:c="12"/></text:span><text:span text:style-name="T15">case</text:span><text:span text:style-name="T14"> </text:span><text:span text:style-name="T16">'v'</text:span><text:span text:style-name="T14">:</text:span></text:p>
      <text:p text:style-name="P48"><text:span text:style-name="T13"><text:s/>67 <text:s/>| <text:s text:c="3"/></text:span><text:span text:style-name="T14"><text:s text:c="16"/>printf(</text:span><text:span text:style-name="T16">"%s"</text:span><text:span text:style-name="T14">, author);</text:span></text:p>
      <text:p text:style-name="P48"><text:span text:style-name="T13"><text:s/>68 <text:s/>| <text:s text:c="3"/></text:span><text:span text:style-name="T14"><text:s text:c="16"/></text:span><text:span text:style-name="T15">return</text:span><text:span text:style-name="T14"> 0;</text:span></text:p>
      <text:p text:style-name="P48"><text:span text:style-name="T13"><text:s/>69 <text:s/>| <text:s text:c="3"/></text:span><text:span text:style-name="T14"><text:s text:c="12"/></text:span><text:span text:style-name="T15">case</text:span><text:span text:style-name="T14"> </text:span><text:span text:style-name="T16">'h'</text:span><text:span text:style-name="T14">:</text:span></text:p>
      <text:p text:style-name="P48"><text:span text:style-name="T13"><text:s/>70 <text:s/>| <text:s text:c="3"/></text:span><text:span text:style-name="T14"><text:s text:c="16"/>printf(</text:span><text:span text:style-name="T16">"%s"</text:span><text:span text:style-name="T14">, help);</text:span></text:p>
      <text:p text:style-name="P48"><text:soft-page-break/><text:span text:style-name="T13"><text:s/>71 <text:s/>| <text:s text:c="3"/></text:span><text:span text:style-name="T14"><text:s text:c="16"/></text:span><text:span text:style-name="T15">return</text:span><text:span text:style-name="T14"> 0;</text:span></text:p>
      <text:p text:style-name="P48"><text:span text:style-name="T13"><text:s/>72 <text:s/>| <text:s text:c="3"/></text:span><text:span text:style-name="T14"><text:s text:c="12"/></text:span><text:span text:style-name="T15">default</text:span><text:span text:style-name="T14">:</text:span></text:p>
      <text:p text:style-name="P48"><text:span text:style-name="T13"><text:s/>73 <text:s/>| <text:s text:c="3"/></text:span><text:span text:style-name="T14"><text:s text:c="16"/>fprintf(stderr, </text:span><text:span text:style-name="T16">"%s"</text:span><text:span text:style-name="T14">, help);</text:span></text:p>
      <text:p text:style-name="P48"><text:span text:style-name="T13"><text:s/>74 <text:s/>| <text:s text:c="3"/></text:span><text:span text:style-name="T14"><text:s text:c="16"/></text:span><text:span text:style-name="T15">return</text:span><text:span text:style-name="T14"> 1;</text:span></text:p>
      <text:p text:style-name="P48"><text:span text:style-name="T13"><text:s/>75 <text:s/>| <text:s text:c="3"/></text:span><text:span text:style-name="T14"><text:s text:c="8"/>}</text:span></text:p>
      <text:p text:style-name="P48"><text:span text:style-name="T13"><text:s/>76 <text:s/>| <text:s text:c="3"/></text:span><text:span text:style-name="T14"><text:s text:c="4"/>}</text:span></text:p>
      <text:p text:style-name="P49"><text:s/>77 <text:s/>| <text:s text:c="3"/></text:p>
      <text:p text:style-name="P48"><text:span text:style-name="T13"><text:s/>78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<text:s/>79 <text:s/>| <text:s text:c="3"/></text:span><text:span text:style-name="T14"><text:s text:c="8"/>fprintf(stderr, <text:s/></text:span><text:span text:style-name="T16">"[DEBUG] Подключение к %s:%d\n"</text:span><text:span text:style-name="T14">, address, port);</text:span></text:p>
      <text:p text:style-name="P48"><text:span text:style-name="T13"><text:s/>80 <text:s/>| <text:s text:c="3"/></text:span><text:span text:style-name="T14"><text:s text:c="4"/>}</text:span></text:p>
      <text:p text:style-name="P49"><text:s/>81 <text:s/>| <text:s text:c="3"/></text:p>
      <text:p text:style-name="P48"><text:span text:style-name="T13"><text:s/>82 <text:s/>| <text:s text:c="3"/></text:span><text:span text:style-name="T14"><text:s text:c="4"/></text:span><text:span text:style-name="T15">struct</text:span><text:span text:style-name="T14"> </text:span><text:span text:style-name="T19">in_addr</text:span><text:span text:style-name="T14"> test_addr;</text:span></text:p>
      <text:p text:style-name="P48"><text:span text:style-name="T13"><text:s/>83 <text:s/>| <text:s text:c="3"/></text:span><text:span text:style-name="T14"><text:s text:c="4"/></text:span><text:span text:style-name="T15">if</text:span><text:span text:style-name="T14"> (inet_pton(AF_INET, address, &amp;test_addr) &lt;= 0) {</text:span></text:p>
      <text:p text:style-name="P48"><text:span text:style-name="T13"><text:s/>84 <text:s/>| <text:s text:c="3"/></text:span><text:span text:style-name="T14"><text:s text:c="8"/>fprintf(stderr, </text:span><text:span text:style-name="T16">"Ошибка: некорректный IP-адрес '%s'\n"</text:span><text:span text:style-name="T14">, address);</text:span></text:p>
      <text:p text:style-name="P48"><text:span text:style-name="T13"><text:s/>85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<text:s/>86 <text:s/>| <text:s text:c="3"/></text:span><text:span text:style-name="T14"><text:s text:c="4"/>}</text:span></text:p>
      <text:p text:style-name="P49"><text:s/>87 <text:s/>| <text:s text:c="3"/></text:p>
      <text:p text:style-name="P48"><text:span text:style-name="T13"><text:s/>88 <text:s/>| <text:s text:c="3"/></text:span><text:span text:style-name="T14"><text:s text:c="4"/></text:span><text:span text:style-name="T19">size_t</text:span><text:span text:style-name="T14"> query_cap = 128;</text:span></text:p>
      <text:p text:style-name="P48"><text:span text:style-name="T13"><text:s/>89 <text:s/>| <text:s text:c="3"/></text:span><text:span text:style-name="T14"><text:s text:c="4"/></text:span><text:span text:style-name="T19">char</text:span><text:span text:style-name="T14"> *query = malloc(query_cap);</text:span></text:p>
      <text:p text:style-name="P48"><text:span text:style-name="T13"><text:s/>90 <text:s/>| <text:s text:c="3"/></text:span><text:span text:style-name="T14"><text:s text:c="4"/></text:span><text:span text:style-name="T15">if</text:span><text:span text:style-name="T14"> (query == NULL) {</text:span></text:p>
      <text:p text:style-name="P48"><text:span text:style-name="T13"><text:s/>91 <text:s/>| <text:s text:c="3"/></text:span><text:span text:style-name="T14"><text:s text:c="8"/>fprintf(stderr, </text:span><text:span text:style-name="T16">"Ошибка: не удалось выделить память для запроса\n"</text:span><text:span text:style-name="T14">);</text:span></text:p>
      <text:p text:style-name="P48"><text:span text:style-name="T13"><text:s/>92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<text:s/>93 <text:s/>| <text:s text:c="3"/></text:span><text:span text:style-name="T14"><text:s text:c="4"/>}</text:span></text:p>
      <text:p text:style-name="P48"><text:span text:style-name="T13"><text:s/>94 <text:s/>| <text:s text:c="3"/></text:span><text:span text:style-name="T14"><text:s text:c="4"/>query[0] = </text:span><text:span text:style-name="T16">'\0'</text:span><text:span text:style-name="T14">;</text:span></text:p>
      <text:p text:style-name="P48"><text:span text:style-name="T13"><text:s/>95 <text:s/>| <text:s text:c="3"/></text:span><text:span text:style-name="T14"><text:s text:c="4"/></text:span><text:span text:style-name="T19">size_t</text:span><text:span text:style-name="T14"> query_len = 0;</text:span></text:p>
      <text:p text:style-name="P49"><text:s/>96 <text:s/>| <text:s text:c="3"/></text:p>
      <text:p text:style-name="P48"><text:span text:style-name="T13"><text:s/>97 <text:s/>| <text:s text:c="3"/></text:span><text:span text:style-name="T14"><text:s text:c="4"/></text:span><text:span text:style-name="T15">if</text:span><text:span text:style-name="T14"> (optind &lt; argc) {</text:span></text:p>
      <text:p text:style-name="P48"><text:span text:style-name="T13"><text:s/>98 <text:s/>| <text:s text:c="3"/></text:span><text:span text:style-name="T14"><text:s text:c="8"/></text:span><text:span text:style-name="T15">for</text:span><text:span text:style-name="T14"> (</text:span><text:span text:style-name="T19">int</text:span><text:span text:style-name="T14"> i = optind; i &lt; argc; i++) {</text:span></text:p>
      <text:p text:style-name="P48"><text:span text:style-name="T13"><text:s/>99 <text:s/>| <text:s text:c="3"/></text:span><text:span text:style-name="T14"><text:s text:c="12"/></text:span><text:span text:style-name="T19">char</text:span><text:span text:style-name="T14"> *endptr;</text:span></text:p>
      <text:p text:style-name="P48"><text:span text:style-name="T13">100 <text:s/>| <text:s text:c="3"/></text:span><text:span text:style-name="T14"><text:s text:c="12"/>strtol(argv[i], &amp;endptr, 0);</text:span></text:p>
      <text:p text:style-name="P49">101 <text:s/>| <text:s text:c="3"/></text:p>
      <text:p text:style-name="P48"><text:span text:style-name="T13">102 <text:s/>| <text:s text:c="3"/></text:span><text:span text:style-name="T14"><text:s text:c="12"/></text:span><text:span text:style-name="T15">if</text:span><text:span text:style-name="T14"> (*endptr != </text:span><text:span text:style-name="T16">'\0'</text:span><text:span text:style-name="T14"> || endptr == argv[i]) {</text:span></text:p>
      <text:p text:style-name="P48"><text:span text:style-name="T13">103 <text:s/>| <text:s text:c="3"/></text:span><text:span text:style-name="T14"><text:s text:c="16"/>fprintf(stderr, </text:span><text:span text:style-name="T16">"Ошибка: некорректное число '%s'.\n"</text:span><text:span text:style-name="T14">, argv[i]);</text:span></text:p>
      <text:p text:style-name="P48"><text:span text:style-name="T13">104 <text:s/>| <text:s text:c="3"/></text:span><text:span text:style-name="T14"><text:s text:c="16"/>free(query);</text:span></text:p>
      <text:p text:style-name="P48"><text:span text:style-name="T13">105 <text:s/>| <text:s text:c="3"/></text:span><text:span text:style-name="T14"><text:s text:c="16"/></text:span><text:span text:style-name="T15">return</text:span><text:span text:style-name="T14"> 1;</text:span></text:p>
      <text:p text:style-name="P48"><text:span text:style-name="T13">106 <text:s/>| <text:s text:c="3"/></text:span><text:span text:style-name="T14"><text:s text:c="12"/>}</text:span></text:p>
      <text:p text:style-name="P49">107 <text:s/>| <text:s text:c="3"/></text:p>
      <text:p text:style-name="P48"><text:span text:style-name="T13">108 <text:s/>| <text:s text:c="3"/></text:span><text:span text:style-name="T14"><text:s text:c="12"/></text:span><text:span text:style-name="T15">if</text:span><text:span text:style-name="T14"> (debug) {</text:span></text:p>
      <text:p text:style-name="P48"><text:span text:style-name="T13">109 <text:s/>| <text:s text:c="3"/></text:span><text:span text:style-name="T14"><text:s text:c="16"/>fprintf(stderr, </text:span><text:span text:style-name="T16">"[DEBUG] Число: %s\n"</text:span><text:span text:style-name="T14">, argv[i]);</text:span></text:p>
      <text:p text:style-name="P48"><text:span text:style-name="T13">110 <text:s/>| <text:s text:c="3"/></text:span><text:span text:style-name="T14"><text:s text:c="12"/>}</text:span></text:p>
      <text:p text:style-name="P49">111 <text:s/>| <text:s text:c="3"/></text:p>
      <text:p text:style-name="P48"><text:span text:style-name="T13">112 <text:s/>| <text:s text:c="3"/></text:span><text:span text:style-name="T14"><text:s text:c="12"/></text:span><text:span text:style-name="T19">size_t</text:span><text:span text:style-name="T14"> arg_len = strlen(argv[i]);</text:span></text:p>
      <text:p text:style-name="P48"><text:span text:style-name="T13">113 <text:s/>| <text:s text:c="3"/></text:span><text:span text:style-name="T14"><text:s text:c="12"/></text:span><text:span text:style-name="T15">while</text:span><text:span text:style-name="T14"> (query_len + arg_len + 2 &gt; query_cap) {</text:span></text:p>
      <text:p text:style-name="P48"><text:span text:style-name="T13">114 <text:s/>| <text:s text:c="3"/></text:span><text:span text:style-name="T14"><text:s text:c="16"/>query_cap *= 2;</text:span></text:p>
      <text:p text:style-name="P48"><text:span text:style-name="T13">115 <text:s/>| <text:s text:c="3"/></text:span><text:span text:style-name="T14"><text:s text:c="16"/></text:span><text:span text:style-name="T19">char</text:span><text:span text:style-name="T14"> *temp = realloc(query, query_cap);</text:span></text:p>
      <text:p text:style-name="P48"><text:span text:style-name="T13">116 <text:s/>| <text:s text:c="3"/></text:span><text:span text:style-name="T14"><text:s text:c="16"/></text:span><text:span text:style-name="T15">if</text:span><text:span text:style-name="T14"> (temp == NULL) {</text:span></text:p>
      <text:p text:style-name="P48"><text:span text:style-name="T13">117 <text:s/>| <text:s text:c="3"/></text:span><text:span text:style-name="T14"><text:s text:c="20"/>fprintf(stderr, </text:span><text:span text:style-name="T16">"Ошибка: не удалось выделить память для запроса\n"</text:span><text:span text:style-name="T14">);</text:span></text:p>
      <text:p text:style-name="P48"><text:span text:style-name="T13">118 <text:s/>| <text:s text:c="3"/></text:span><text:span text:style-name="T14"><text:s text:c="20"/>free(query);</text:span></text:p>
      <text:p text:style-name="P48"><text:span text:style-name="T13">119 <text:s/>| <text:s text:c="3"/></text:span><text:span text:style-name="T14"><text:s text:c="20"/></text:span><text:span text:style-name="T15">return</text:span><text:span text:style-name="T14"> 1;</text:span></text:p>
      <text:p text:style-name="P48"><text:span text:style-name="T13">120 <text:s/>| <text:s text:c="3"/></text:span><text:span text:style-name="T14"><text:s text:c="16"/>}</text:span></text:p>
      <text:p text:style-name="P48"><text:span text:style-name="T13">121 <text:s/>| <text:s text:c="3"/></text:span><text:span text:style-name="T14"><text:s text:c="16"/>query = temp;</text:span></text:p>
      <text:p text:style-name="P48"><text:span text:style-name="T13">122 <text:s/>| <text:s text:c="3"/></text:span><text:span text:style-name="T14"><text:s text:c="12"/>}</text:span></text:p>
      <text:p text:style-name="P49">123 <text:s/>| <text:s text:c="3"/></text:p>
      <text:p text:style-name="P48"><text:span text:style-name="T13">124 <text:s/>| <text:s text:c="3"/></text:span><text:span text:style-name="T14"><text:s text:c="12"/>strcpy(query + query_len, argv[i]);</text:span></text:p>
      <text:p text:style-name="P48"><text:span text:style-name="T13">125 <text:s/>| <text:s text:c="3"/></text:span><text:span text:style-name="T14"><text:s text:c="12"/>query_len += arg_len;</text:span></text:p>
      <text:p text:style-name="P49">126 <text:s/>| <text:s text:c="3"/></text:p>
      <text:p text:style-name="P48"><text:span text:style-name="T13">127 <text:s/>| <text:s text:c="3"/></text:span><text:span text:style-name="T14"><text:s text:c="12"/></text:span><text:span text:style-name="T15">if</text:span><text:span text:style-name="T14"> (i &lt; argc - 1) {</text:span></text:p>
      <text:p text:style-name="P48"><text:span text:style-name="T13">128 <text:s/>| <text:s text:c="3"/></text:span><text:span text:style-name="T14"><text:s text:c="16"/>query[query_len++] = </text:span><text:span text:style-name="T16">' '</text:span><text:span text:style-name="T14">;</text:span></text:p>
      <text:p text:style-name="P48"><text:span text:style-name="T13">129 <text:s/>| <text:s text:c="3"/></text:span><text:span text:style-name="T14"><text:s text:c="12"/>} </text:span><text:span text:style-name="T15">else</text:span><text:span text:style-name="T14"> {</text:span></text:p>
      <text:p text:style-name="P48"><text:span text:style-name="T13">130 <text:s/>| <text:s text:c="3"/></text:span><text:span text:style-name="T14"><text:s text:c="16"/>query[query_len++] = </text:span><text:span text:style-name="T16">'\n'</text:span><text:span text:style-name="T14">;</text:span></text:p>
      <text:p text:style-name="P48"><text:span text:style-name="T13">131 <text:s/>| <text:s text:c="3"/></text:span><text:span text:style-name="T14"><text:s text:c="12"/>}</text:span></text:p>
      <text:p text:style-name="P48"><text:span text:style-name="T13">132 <text:s/>| <text:s text:c="3"/></text:span><text:span text:style-name="T14"><text:s text:c="12"/>query[query_len] = </text:span><text:span text:style-name="T16">'\0'</text:span><text:span text:style-name="T14">;</text:span></text:p>
      <text:p text:style-name="P48"><text:span text:style-name="T13">133 <text:s/>| <text:s text:c="3"/></text:span><text:span text:style-name="T14"><text:s text:c="8"/>}</text:span></text:p>
      <text:p text:style-name="P48"><text:span text:style-name="T13">134 <text:s/>| <text:s text:c="3"/></text:span><text:span text:style-name="T14"><text:s text:c="4"/>} </text:span><text:span text:style-name="T15">else</text:span><text:span text:style-name="T14"> {</text:span></text:p>
      <text:p text:style-name="P48"><text:span text:style-name="T13">135 <text:s/>| <text:s text:c="3"/></text:span><text:span text:style-name="T14"><text:s text:c="8"/></text:span><text:span text:style-name="T15">if</text:span><text:span text:style-name="T14"> (debug) {</text:span></text:p>
      <text:p text:style-name="P48"><text:span text:style-name="T13">136 <text:s/>| <text:s text:c="3"/></text:span><text:span text:style-name="T14"><text:s text:c="12"/>fprintf(stderr, </text:span><text:span text:style-name="T16">"[DEBUG] Аргументы не переданы. Ожидание ввода из stdin...\n"</text:span><text:span text:style-name="T14">);</text:span></text:p>
      <text:p text:style-name="P48"><text:span text:style-name="T13">137 <text:s/>| <text:s text:c="3"/></text:span><text:span text:style-name="T14"><text:s text:c="8"/>}</text:span></text:p>
      <text:p text:style-name="P49">138 <text:s/>| <text:s text:c="3"/></text:p>
      <text:p text:style-name="P48"><text:span text:style-name="T13">139 <text:s/>| <text:s text:c="3"/></text:span><text:span text:style-name="T14"><text:s text:c="8"/></text:span><text:span text:style-name="T19">size_t</text:span><text:span text:style-name="T14"> cap = 128;</text:span></text:p>
      <text:p text:style-name="P48"><text:span text:style-name="T13">140 <text:s/>| <text:s text:c="3"/></text:span><text:span text:style-name="T14"><text:s text:c="8"/></text:span><text:span text:style-name="T19">size_t</text:span><text:span text:style-name="T14"> buf_len = 0;</text:span></text:p>
      <text:p text:style-name="P48"><text:span text:style-name="T13">141 <text:s/>| <text:s text:c="3"/></text:span><text:span text:style-name="T14"><text:s text:c="8"/></text:span><text:span text:style-name="T19">char</text:span><text:span text:style-name="T14"> *buf = malloc(cap);</text:span></text:p>
      <text:p text:style-name="P48"><text:span text:style-name="T13">142 <text:s/>| <text:s text:c="3"/></text:span><text:span text:style-name="T14"><text:s text:c="8"/></text:span><text:span text:style-name="T15">if</text:span><text:span text:style-name="T14"> (buf == NULL) {</text:span></text:p>
      <text:p text:style-name="P48"><text:span text:style-name="T13">143 <text:s/>| <text:s text:c="3"/></text:span><text:span text:style-name="T14"><text:s text:c="12"/>fprintf(stderr, </text:span><text:span text:style-name="T16">"Ошибка: не удалось выделить память для ввода\n"</text:span><text:span text:style-name="T14">);</text:span></text:p>
      <text:p text:style-name="P48"><text:span text:style-name="T13">144 <text:s/>| <text:s text:c="3"/></text:span><text:span text:style-name="T14"><text:s text:c="12"/>free(query);</text:span></text:p>
      <text:p text:style-name="P48"><text:soft-page-break/><text:span text:style-name="T13">145 <text:s/>| <text:s text:c="3"/></text:span><text:span text:style-name="T14"><text:s text:c="12"/></text:span><text:span text:style-name="T15">return</text:span><text:span text:style-name="T14"> 1;</text:span></text:p>
      <text:p text:style-name="P48"><text:span text:style-name="T13">146 <text:s/>| <text:s text:c="3"/></text:span><text:span text:style-name="T14"><text:s text:c="8"/>}</text:span></text:p>
      <text:p text:style-name="P49">147 <text:s/>| <text:s text:c="3"/></text:p>
      <text:p text:style-name="P48"><text:span text:style-name="T13">148 <text:s/>| <text:s text:c="3"/></text:span><text:span text:style-name="T14"><text:s text:c="8"/></text:span><text:span text:style-name="T19">int</text:span><text:span text:style-name="T14"> c;</text:span></text:p>
      <text:p text:style-name="P48"><text:span text:style-name="T13">149 <text:s/>| <text:s text:c="3"/></text:span><text:span text:style-name="T14"><text:s text:c="8"/></text:span><text:span text:style-name="T15">while</text:span><text:span text:style-name="T14"> ((c = fgetc(stdin)) != EOF &amp;&amp; c != </text:span><text:span text:style-name="T16">'\n'</text:span><text:span text:style-name="T14">) {</text:span></text:p>
      <text:p text:style-name="P48"><text:span text:style-name="T13">150 <text:s/>| <text:s text:c="3"/></text:span><text:span text:style-name="T14"><text:s text:c="12"/></text:span><text:span text:style-name="T15">if</text:span><text:span text:style-name="T14"> (buf_len + 2 &gt;= cap) {</text:span></text:p>
      <text:p text:style-name="P48"><text:span text:style-name="T13">151 <text:s/>| <text:s text:c="3"/></text:span><text:span text:style-name="T14"><text:s text:c="16"/>cap *= 2;</text:span></text:p>
      <text:p text:style-name="P48"><text:span text:style-name="T13">152 <text:s/>| <text:s text:c="3"/></text:span><text:span text:style-name="T14"><text:s text:c="16"/></text:span><text:span text:style-name="T19">char</text:span><text:span text:style-name="T14"> *temp = realloc(buf, cap);</text:span></text:p>
      <text:p text:style-name="P48"><text:span text:style-name="T13">153 <text:s/>| <text:s text:c="3"/></text:span><text:span text:style-name="T14"><text:s text:c="16"/></text:span><text:span text:style-name="T15">if</text:span><text:span text:style-name="T14"> (temp == NULL) {</text:span></text:p>
      <text:p text:style-name="P48"><text:span text:style-name="T13">154 <text:s/>| <text:s text:c="3"/></text:span><text:span text:style-name="T14"><text:s text:c="20"/>fprintf(stderr, </text:span><text:span text:style-name="T16">"Ошибка: не удалось выделить память для ввода\n"</text:span><text:span text:style-name="T14">);</text:span></text:p>
      <text:p text:style-name="P48"><text:span text:style-name="T13">155 <text:s/>| <text:s text:c="3"/></text:span><text:span text:style-name="T14"><text:s text:c="20"/>free(buf);</text:span></text:p>
      <text:p text:style-name="P48"><text:span text:style-name="T13">156 <text:s/>| <text:s text:c="3"/></text:span><text:span text:style-name="T14"><text:s text:c="20"/>free(query);</text:span></text:p>
      <text:p text:style-name="P48"><text:span text:style-name="T13">157 <text:s/>| <text:s text:c="3"/></text:span><text:span text:style-name="T14"><text:s text:c="20"/></text:span><text:span text:style-name="T15">return</text:span><text:span text:style-name="T14"> 1;</text:span></text:p>
      <text:p text:style-name="P48"><text:span text:style-name="T13">158 <text:s/>| <text:s text:c="3"/></text:span><text:span text:style-name="T14"><text:s text:c="16"/>}</text:span></text:p>
      <text:p text:style-name="P48"><text:span text:style-name="T13">159 <text:s/>| <text:s text:c="3"/></text:span><text:span text:style-name="T14"><text:s text:c="16"/>buf = temp;</text:span></text:p>
      <text:p text:style-name="P48"><text:span text:style-name="T13">160 <text:s/>| <text:s text:c="3"/></text:span><text:span text:style-name="T14"><text:s text:c="12"/>}</text:span></text:p>
      <text:p text:style-name="P48"><text:span text:style-name="T13">161 <text:s/>| <text:s text:c="3"/></text:span><text:span text:style-name="T14"><text:s text:c="12"/>buf[buf_len++] = (</text:span><text:span text:style-name="T19">char</text:span><text:span text:style-name="T14">)c;</text:span></text:p>
      <text:p text:style-name="P48"><text:span text:style-name="T13">162 <text:s/>| <text:s text:c="3"/></text:span><text:span text:style-name="T14"><text:s text:c="8"/>}</text:span></text:p>
      <text:p text:style-name="P49">163 <text:s/>| <text:s text:c="3"/></text:p>
      <text:p text:style-name="P48"><text:span text:style-name="T13">164 <text:s/>| <text:s text:c="3"/></text:span><text:span text:style-name="T14"><text:s text:c="8"/>buf[buf_len++] = </text:span><text:span text:style-name="T16">'\n'</text:span><text:span text:style-name="T14">;</text:span></text:p>
      <text:p text:style-name="P48"><text:span text:style-name="T13">165 <text:s/>| <text:s text:c="3"/></text:span><text:span text:style-name="T14"><text:s text:c="8"/>buf[buf_len] = </text:span><text:span text:style-name="T16">'\0'</text:span><text:span text:style-name="T14">;</text:span></text:p>
      <text:p text:style-name="P49">166 <text:s/>| <text:s text:c="3"/></text:p>
      <text:p text:style-name="P48"><text:span text:style-name="T13">167 <text:s/>| <text:s text:c="3"/></text:span><text:span text:style-name="T14"><text:s text:c="8"/>free(query);</text:span></text:p>
      <text:p text:style-name="P48"><text:span text:style-name="T13">168 <text:s/>| <text:s text:c="3"/></text:span><text:span text:style-name="T14"><text:s text:c="8"/>query = buf;</text:span></text:p>
      <text:p text:style-name="P48"><text:span text:style-name="T13">169 <text:s/>| <text:s text:c="3"/></text:span><text:span text:style-name="T14"><text:s text:c="8"/>query_len = buf_len;</text:span></text:p>
      <text:p text:style-name="P49">170 <text:s/>| <text:s text:c="3"/></text:p>
      <text:p text:style-name="P48"><text:span text:style-name="T13">171 <text:s/>| <text:s text:c="3"/></text:span><text:span text:style-name="T14"><text:s text:c="8"/></text:span><text:span text:style-name="T19">char</text:span><text:span text:style-name="T14"> *query_copy = malloc(query_len + 1);</text:span></text:p>
      <text:p text:style-name="P48"><text:span text:style-name="T13">172 <text:s/>| <text:s text:c="3"/></text:span><text:span text:style-name="T14"><text:s text:c="8"/></text:span><text:span text:style-name="T15">if</text:span><text:span text:style-name="T14"> (query_copy == NULL) {</text:span></text:p>
      <text:p text:style-name="P48"><text:span text:style-name="T13">173 <text:s/>| <text:s text:c="3"/></text:span><text:span text:style-name="T14"><text:s text:c="12"/>fprintf(stderr, </text:span><text:span text:style-name="T16">"Ошибка: не удалось выделить память для валидации\n"</text:span><text:span text:style-name="T14">);</text:span></text:p>
      <text:p text:style-name="P48"><text:span text:style-name="T13">174 <text:s/>| <text:s text:c="3"/></text:span><text:span text:style-name="T14"><text:s text:c="12"/>free(query);</text:span></text:p>
      <text:p text:style-name="P48"><text:span text:style-name="T13">175 <text:s/>| <text:s text:c="3"/></text:span><text:span text:style-name="T14"><text:s text:c="12"/></text:span><text:span text:style-name="T15">return</text:span><text:span text:style-name="T14"> 1;</text:span></text:p>
      <text:p text:style-name="P48"><text:span text:style-name="T13">176 <text:s/>| <text:s text:c="3"/></text:span><text:span text:style-name="T14"><text:s text:c="8"/>}</text:span></text:p>
      <text:p text:style-name="P49">177 <text:s/>| <text:s text:c="3"/></text:p>
      <text:p text:style-name="P48"><text:span text:style-name="T13">178 <text:s/>| <text:s text:c="3"/></text:span><text:span text:style-name="T14"><text:s text:c="8"/>strcpy(query_copy, query);</text:span></text:p>
      <text:p text:style-name="P49">179 <text:s/>| <text:s text:c="3"/></text:p>
      <text:p text:style-name="P48"><text:span text:style-name="T13">180 <text:s/>| <text:s text:c="3"/></text:span><text:span text:style-name="T14"><text:s text:c="8"/></text:span><text:span text:style-name="T19">char</text:span><text:span text:style-name="T14"> *token = strtok(query_copy, </text:span><text:span text:style-name="T16">" \t\v\f\r\n"</text:span><text:span text:style-name="T14">);</text:span></text:p>
      <text:p text:style-name="P48"><text:span text:style-name="T13">181 <text:s/>| <text:s text:c="3"/></text:span><text:span text:style-name="T14"><text:s text:c="8"/></text:span><text:span text:style-name="T15">if</text:span><text:span text:style-name="T14"> (token == NULL) {</text:span></text:p>
      <text:p text:style-name="P48"><text:span text:style-name="T13">182 <text:s/>| <text:s text:c="3"/></text:span><text:span text:style-name="T14"><text:s text:c="12"/>fprintf(stderr, </text:span><text:span text:style-name="T16">"Ошибка: пустой запрос\n"</text:span><text:span text:style-name="T14">);</text:span></text:p>
      <text:p text:style-name="P48"><text:span text:style-name="T13">183 <text:s/>| <text:s text:c="3"/></text:span><text:span text:style-name="T14"><text:s text:c="12"/>free(query);</text:span></text:p>
      <text:p text:style-name="P48"><text:span text:style-name="T13">184 <text:s/>| <text:s text:c="3"/></text:span><text:span text:style-name="T14"><text:s text:c="12"/>free(query_copy);</text:span></text:p>
      <text:p text:style-name="P48"><text:span text:style-name="T13">185 <text:s/>| <text:s text:c="3"/></text:span><text:span text:style-name="T14"><text:s text:c="12"/></text:span><text:span text:style-name="T15">return</text:span><text:span text:style-name="T14"> 1;</text:span></text:p>
      <text:p text:style-name="P48"><text:span text:style-name="T13">186 <text:s/>| <text:s text:c="3"/></text:span><text:span text:style-name="T14"><text:s text:c="8"/>}</text:span></text:p>
      <text:p text:style-name="P49">187 <text:s/>| <text:s text:c="3"/></text:p>
      <text:p text:style-name="P48"><text:span text:style-name="T13">188 <text:s/>| <text:s text:c="3"/></text:span><text:span text:style-name="T14"><text:s text:c="8"/></text:span><text:span text:style-name="T15">while</text:span><text:span text:style-name="T14"> (token != NULL) {</text:span></text:p>
      <text:p text:style-name="P48"><text:span text:style-name="T13">189 <text:s/>| <text:s text:c="3"/></text:span><text:span text:style-name="T14"><text:s text:c="12"/></text:span><text:span text:style-name="T19">char</text:span><text:span text:style-name="T14"> *endptr;</text:span></text:p>
      <text:p text:style-name="P48"><text:span text:style-name="T13">190 <text:s/>| <text:s text:c="3"/></text:span><text:span text:style-name="T14"><text:s text:c="12"/>strtol(token, &amp;endptr, 0);</text:span></text:p>
      <text:p text:style-name="P48"><text:span text:style-name="T13">191 <text:s/>| <text:s text:c="3"/></text:span><text:span text:style-name="T14"><text:s text:c="12"/></text:span><text:span text:style-name="T15">if</text:span><text:span text:style-name="T14"> (*endptr != </text:span><text:span text:style-name="T16">'\0'</text:span><text:span text:style-name="T14"> || endptr == token) {</text:span></text:p>
      <text:p text:style-name="P48"><text:span text:style-name="T13">192 <text:s/>| <text:s text:c="3"/></text:span><text:span text:style-name="T14"><text:s text:c="16"/>fprintf(stderr, </text:span><text:span text:style-name="T16">"Ошибка: некорректное число '%s'\n"</text:span><text:span text:style-name="T14">, token);</text:span></text:p>
      <text:p text:style-name="P48"><text:span text:style-name="T13">193 <text:s/>| <text:s text:c="3"/></text:span><text:span text:style-name="T14"><text:s text:c="16"/>free(query);</text:span></text:p>
      <text:p text:style-name="P48"><text:span text:style-name="T13">194 <text:s/>| <text:s text:c="3"/></text:span><text:span text:style-name="T14"><text:s text:c="16"/>free(query_copy);</text:span></text:p>
      <text:p text:style-name="P48"><text:span text:style-name="T13">195 <text:s/>| <text:s text:c="3"/></text:span><text:span text:style-name="T14"><text:s text:c="16"/></text:span><text:span text:style-name="T15">return</text:span><text:span text:style-name="T14"> 1;</text:span></text:p>
      <text:p text:style-name="P48"><text:span text:style-name="T13">196 <text:s/>| <text:s text:c="3"/></text:span><text:span text:style-name="T14"><text:s text:c="12"/>}</text:span></text:p>
      <text:p text:style-name="P48"><text:span text:style-name="T13">197 <text:s/>| <text:s text:c="3"/></text:span><text:span text:style-name="T14"><text:s text:c="12"/>token = strtok(NULL, </text:span><text:span text:style-name="T16">" \t\v\f\r\n"</text:span><text:span text:style-name="T14">);</text:span></text:p>
      <text:p text:style-name="P48"><text:span text:style-name="T13">198 <text:s/>| <text:s text:c="3"/></text:span><text:span text:style-name="T14"><text:s text:c="8"/>}</text:span></text:p>
      <text:p text:style-name="P48"><text:span text:style-name="T13">199 <text:s/>| <text:s text:c="3"/></text:span><text:span text:style-name="T14"><text:s text:c="8"/>free(query_copy);</text:span></text:p>
      <text:p text:style-name="P49">200 <text:s/>| <text:s text:c="3"/></text:p>
      <text:p text:style-name="P48"><text:span text:style-name="T13">201 <text:s/>| <text:s text:c="3"/></text:span><text:span text:style-name="T14"><text:s text:c="4"/>}</text:span></text:p>
      <text:p text:style-name="P49">202 <text:s/>| <text:s text:c="3"/></text:p>
      <text:p text:style-name="P48"><text:span text:style-name="T13">203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204 <text:s/>| <text:s text:c="3"/></text:span><text:span text:style-name="T14"><text:s text:c="8"/>fprintf(stderr, </text:span><text:span text:style-name="T16">"[DEBUG] Сформированный запрос: %s"</text:span><text:span text:style-name="T14">, query);</text:span></text:p>
      <text:p text:style-name="P48"><text:span text:style-name="T13">205 <text:s/>| <text:s text:c="3"/></text:span><text:span text:style-name="T14"><text:s text:c="4"/>}</text:span></text:p>
      <text:p text:style-name="P49">206 <text:s/>| <text:s text:c="3"/></text:p>
      <text:p text:style-name="P48"><text:span text:style-name="T13">207 <text:s/>| <text:s text:c="3"/></text:span><text:span text:style-name="T14"><text:s text:c="4"/></text:span><text:span text:style-name="T19">int</text:span><text:span text:style-name="T14"> sock = socket(AF_INET, SOCK_STREAM, 0);</text:span></text:p>
      <text:p text:style-name="P48"><text:span text:style-name="T13">208 <text:s/>| <text:s text:c="3"/></text:span><text:span text:style-name="T14"><text:s text:c="4"/></text:span><text:span text:style-name="T15">if</text:span><text:span text:style-name="T14"> (sock &lt; 0) {</text:span></text:p>
      <text:p text:style-name="P48"><text:span text:style-name="T13">209 <text:s/>| <text:s text:c="3"/></text:span><text:span text:style-name="T14"><text:s text:c="8"/>fprintf(stderr, </text:span><text:span text:style-name="T16">"Ошибка: не удалось создать сокет\n"</text:span><text:span text:style-name="T14">);</text:span></text:p>
      <text:p text:style-name="P48"><text:span text:style-name="T13">210 <text:s/>| <text:s text:c="3"/></text:span><text:span text:style-name="T14"><text:s text:c="8"/>free(query);</text:span></text:p>
      <text:p text:style-name="P48"><text:span text:style-name="T13">211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12 <text:s/>| <text:s text:c="3"/></text:span><text:span text:style-name="T14"><text:s text:c="4"/>}</text:span></text:p>
      <text:p text:style-name="P50"><text:span text:style-name="T13">213 <text:s/>| <text:s text:c="3"/></text:span><text:s text:c="4"/></text:p>
      <text:p text:style-name="P48"><text:span text:style-name="T13">214 <text:s/>| <text:s text:c="3"/></text:span><text:span text:style-name="T14"><text:s text:c="4"/></text:span><text:span text:style-name="T15">struct</text:span><text:span text:style-name="T14"> </text:span><text:span text:style-name="T19">sockaddr_in</text:span><text:span text:style-name="T14"> server_addr;</text:span></text:p>
      <text:p text:style-name="P48"><text:span text:style-name="T13">215 <text:s/>| <text:s text:c="3"/></text:span><text:span text:style-name="T14"><text:s text:c="4"/>memset(&amp;server_addr, 0, </text:span><text:span text:style-name="T15">sizeof</text:span><text:span text:style-name="T14">(server_addr));</text:span></text:p>
      <text:p text:style-name="P48"><text:span text:style-name="T13">216 <text:s/>| <text:s text:c="3"/></text:span><text:span text:style-name="T14"><text:s text:c="4"/>server_addr.sin_family = AF_INET;</text:span></text:p>
      <text:p text:style-name="P48"><text:span text:style-name="T13">217 <text:s/>| <text:s text:c="3"/></text:span><text:span text:style-name="T14"><text:s text:c="4"/>server_addr.sin_port = htons(port);</text:span></text:p>
      <text:p text:style-name="P49">218 <text:s/>| <text:s text:c="3"/></text:p>
      <text:p text:style-name="P48"><text:soft-page-break/><text:span text:style-name="T13">219 <text:s/>| <text:s text:c="3"/></text:span><text:span text:style-name="T14"><text:s text:c="4"/></text:span><text:span text:style-name="T15">if</text:span><text:span text:style-name="T14"> (inet_pton(AF_INET, address, &amp;server_addr.sin_addr) &lt;= 0) {</text:span></text:p>
      <text:p text:style-name="P48"><text:span text:style-name="T13">220 <text:s/>| <text:s text:c="3"/></text:span><text:span text:style-name="T14"><text:s text:c="8"/>fprintf(stderr, </text:span><text:span text:style-name="T16">"Ошибка: некорректный IP-адрес '%s'\n"</text:span><text:span text:style-name="T14">, address);</text:span></text:p>
      <text:p text:style-name="P48"><text:span text:style-name="T13">221 <text:s/>| <text:s text:c="3"/></text:span><text:span text:style-name="T14"><text:s text:c="8"/>free(query);</text:span></text:p>
      <text:p text:style-name="P48"><text:span text:style-name="T13">222 <text:s/>| <text:s text:c="3"/></text:span><text:span text:style-name="T14"><text:s text:c="8"/>close(sock);</text:span></text:p>
      <text:p text:style-name="P48"><text:span text:style-name="T13">223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24 <text:s/>| <text:s text:c="3"/></text:span><text:span text:style-name="T14"><text:s text:c="4"/>}</text:span></text:p>
      <text:p text:style-name="P49">225 <text:s/>| <text:s text:c="3"/></text:p>
      <text:p text:style-name="P48"><text:span text:style-name="T13">226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227 <text:s/>| <text:s text:c="3"/></text:span><text:span text:style-name="T14"><text:s text:c="8"/>fprintf(stderr, </text:span><text:span text:style-name="T16">"[DEBUG] Установка TCP соедниениня с %s:%d...\n"</text:span><text:span text:style-name="T14">, address, port);</text:span></text:p>
      <text:p text:style-name="P48"><text:span text:style-name="T13">228 <text:s/>| <text:s text:c="3"/></text:span><text:span text:style-name="T14"><text:s text:c="4"/>}</text:span></text:p>
      <text:p text:style-name="P49">229 <text:s/>| <text:s text:c="3"/></text:p>
      <text:p text:style-name="P48"><text:span text:style-name="T13">230 <text:s/>| <text:s text:c="3"/></text:span><text:span text:style-name="T14"><text:s text:c="4"/></text:span><text:span text:style-name="T15">if</text:span><text:span text:style-name="T14"> (connect(sock, (</text:span><text:span text:style-name="T15">struct</text:span><text:span text:style-name="T14"> </text:span><text:span text:style-name="T19">sockaddr</text:span><text:span text:style-name="T14"> *)&amp;server_addr, </text:span><text:span text:style-name="T15">sizeof</text:span><text:span text:style-name="T14">(server_addr)) &lt; 0) {</text:span></text:p>
      <text:p text:style-name="P48"><text:span text:style-name="T13">231 <text:s/>| <text:s text:c="3"/></text:span><text:span text:style-name="T14"><text:s text:c="8"/>fprintf(stderr, </text:span><text:span text:style-name="T16">"Ошибка: не удалось подключиться к серверу %s:%d\n"</text:span><text:span text:style-name="T14">, address, port);</text:span></text:p>
      <text:p text:style-name="P48"><text:span text:style-name="T13">232 <text:s/>| <text:s text:c="3"/></text:span><text:span text:style-name="T14"><text:s text:c="8"/>free(query);</text:span></text:p>
      <text:p text:style-name="P48"><text:span text:style-name="T13">233 <text:s/>| <text:s text:c="3"/></text:span><text:span text:style-name="T14"><text:s text:c="8"/>close(sock);</text:span></text:p>
      <text:p text:style-name="P48"><text:span text:style-name="T13">234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35 <text:s/>| <text:s text:c="3"/></text:span><text:span text:style-name="T14"><text:s text:c="4"/>}</text:span></text:p>
      <text:p text:style-name="P49">236 <text:s/>| <text:s text:c="3"/></text:p>
      <text:p text:style-name="P48"><text:span text:style-name="T13">237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238 <text:s/>| <text:s text:c="3"/></text:span><text:span text:style-name="T14"><text:s text:c="8"/>fprintf(stderr, </text:span><text:span text:style-name="T16">"[DEBUG] Соединение установлено. Отправка запроса...\n"</text:span><text:span text:style-name="T14">);</text:span></text:p>
      <text:p text:style-name="P48"><text:span text:style-name="T13">239 <text:s/>| <text:s text:c="3"/></text:span><text:span text:style-name="T14"><text:s text:c="4"/>}</text:span></text:p>
      <text:p text:style-name="P49">240 <text:s/>| <text:s text:c="3"/></text:p>
      <text:p text:style-name="P48"><text:span text:style-name="T13">241 <text:s/>| <text:s text:c="3"/></text:span><text:span text:style-name="T14"><text:s text:c="4"/></text:span><text:span text:style-name="T19">ssize_t</text:span><text:span text:style-name="T14"> sent = write(sock, query, query_len);</text:span></text:p>
      <text:p text:style-name="P48"><text:span text:style-name="T13">242 <text:s/>| <text:s text:c="3"/></text:span><text:span text:style-name="T14"><text:s text:c="4"/></text:span><text:span text:style-name="T15">if</text:span><text:span text:style-name="T14"> (sent &lt; 0) { </text:span></text:p>
      <text:p text:style-name="P48"><text:span text:style-name="T13">243 <text:s/>| <text:s text:c="3"/></text:span><text:span text:style-name="T14"><text:s text:c="8"/>fprintf(stderr, </text:span><text:span text:style-name="T16">"Ошибка: не удалось отправить запрос\n"</text:span><text:span text:style-name="T14">);</text:span></text:p>
      <text:p text:style-name="P48"><text:span text:style-name="T13">244 <text:s/>| <text:s text:c="3"/></text:span><text:span text:style-name="T14"><text:s text:c="8"/>free(query);</text:span></text:p>
      <text:p text:style-name="P48"><text:span text:style-name="T13">245 <text:s/>| <text:s text:c="3"/></text:span><text:span text:style-name="T14"><text:s text:c="8"/>close(sock);</text:span></text:p>
      <text:p text:style-name="P48"><text:span text:style-name="T13">246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47 <text:s/>| <text:s text:c="3"/></text:span><text:span text:style-name="T14"><text:s text:c="4"/>}</text:span></text:p>
      <text:p text:style-name="P49">248 <text:s/>| <text:s text:c="3"/></text:p>
      <text:p text:style-name="P48"><text:span text:style-name="T13">249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250 <text:s/>| <text:s text:c="3"/></text:span><text:span text:style-name="T14"><text:s text:c="8"/>fprintf(stderr, </text:span><text:span text:style-name="T16">"[DEBUG] Запрос отправлен. Ожидание ответа...\n"</text:span><text:span text:style-name="T14">);</text:span></text:p>
      <text:p text:style-name="P48"><text:span text:style-name="T13">251 <text:s/>| <text:s text:c="3"/></text:span><text:span text:style-name="T14"><text:s text:c="4"/>}</text:span></text:p>
      <text:p text:style-name="P48"><text:span text:style-name="T13">252 <text:s/>| <text:s text:c="3"/></text:span><text:span text:style-name="T14"><text:s text:c="4"/></text:span><text:span text:style-name="T15">if</text:span><text:span text:style-name="T14"> (shutdown(sock, SHUT_WR) &lt; 0) {</text:span></text:p>
      <text:p text:style-name="P48"><text:span text:style-name="T13">253 <text:s/>| <text:s text:c="3"/></text:span><text:span text:style-name="T14"><text:s text:c="8"/>fprintf(stderr, </text:span><text:span text:style-name="T16">"Ошибка: не удалось закрыть запись в сокете\n"</text:span><text:span text:style-name="T14">);</text:span></text:p>
      <text:p text:style-name="P48"><text:span text:style-name="T13">254 <text:s/>| <text:s text:c="3"/></text:span><text:span text:style-name="T14"><text:s text:c="8"/>free(query);</text:span></text:p>
      <text:p text:style-name="P48"><text:span text:style-name="T13">255 <text:s/>| <text:s text:c="3"/></text:span><text:span text:style-name="T14"><text:s text:c="8"/>close(sock);</text:span></text:p>
      <text:p text:style-name="P48"><text:span text:style-name="T13">256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57 <text:s/>| <text:s text:c="3"/></text:span><text:span text:style-name="T14"><text:s text:c="4"/>}</text:span></text:p>
      <text:p text:style-name="P49">258 <text:s/>| <text:s text:c="3"/></text:p>
      <text:p text:style-name="P48"><text:span text:style-name="T13">259 <text:s/>| <text:s text:c="3"/></text:span><text:span text:style-name="T14"><text:s text:c="4"/></text:span><text:span text:style-name="T19">size_t</text:span><text:span text:style-name="T14"> resp_cap = 128;</text:span></text:p>
      <text:p text:style-name="P48"><text:span text:style-name="T13">260 <text:s/>| <text:s text:c="3"/></text:span><text:span text:style-name="T14"><text:s text:c="4"/></text:span><text:span text:style-name="T19">size_t</text:span><text:span text:style-name="T14"> resp_len = 0;</text:span></text:p>
      <text:p text:style-name="P48"><text:span text:style-name="T13">261 <text:s/>| <text:s text:c="3"/></text:span><text:span text:style-name="T14"><text:s text:c="4"/></text:span><text:span text:style-name="T19">char</text:span><text:span text:style-name="T14"> *response = malloc(resp_cap);</text:span></text:p>
      <text:p text:style-name="P48"><text:span text:style-name="T13">262 <text:s/>| <text:s text:c="3"/></text:span><text:span text:style-name="T14"><text:s text:c="4"/></text:span><text:span text:style-name="T15">if</text:span><text:span text:style-name="T14"> (response == NULL) {</text:span></text:p>
      <text:p text:style-name="P48"><text:span text:style-name="T13">263 <text:s/>| <text:s text:c="3"/></text:span><text:span text:style-name="T14"><text:s text:c="8"/>fprintf(stderr, </text:span><text:span text:style-name="T16">"Ошибка: не удалось выделить память для ответа\n"</text:span><text:span text:style-name="T14">);</text:span></text:p>
      <text:p text:style-name="P48"><text:span text:style-name="T13">264 <text:s/>| <text:s text:c="3"/></text:span><text:span text:style-name="T14"><text:s text:c="8"/>free(query);</text:span></text:p>
      <text:p text:style-name="P48"><text:span text:style-name="T13">265 <text:s/>| <text:s text:c="3"/></text:span><text:span text:style-name="T14"><text:s text:c="8"/>close(sock);</text:span></text:p>
      <text:p text:style-name="P48"><text:span text:style-name="T13">266 <text:s/>| <text:s text:c="3"/></text:span><text:span text:style-name="T14"><text:s text:c="8"/></text:span><text:span text:style-name="T15">return</text:span><text:span text:style-name="T14"> 1;</text:span></text:p>
      <text:p text:style-name="P48"><text:span text:style-name="T13">267 <text:s/>| <text:s text:c="3"/></text:span><text:span text:style-name="T14"><text:s text:c="4"/>}</text:span></text:p>
      <text:p text:style-name="P49">268 <text:s/>| <text:s text:c="3"/></text:p>
      <text:p text:style-name="P48"><text:span text:style-name="T13">269 <text:s/>| <text:s text:c="3"/></text:span><text:span text:style-name="T14"><text:s text:c="4"/></text:span><text:span text:style-name="T15">while</text:span><text:span text:style-name="T14"> (1) {</text:span></text:p>
      <text:p text:style-name="P48"><text:span text:style-name="T13">270 <text:s/>| <text:s text:c="3"/></text:span><text:span text:style-name="T14"><text:s text:c="8"/></text:span><text:span text:style-name="T15">if</text:span><text:span text:style-name="T14"> (resp_len + 64 &gt;= resp_cap) {</text:span></text:p>
      <text:p text:style-name="P48"><text:span text:style-name="T13">271 <text:s/>| <text:s text:c="3"/></text:span><text:span text:style-name="T14"><text:s text:c="12"/>resp_cap *= 2;</text:span></text:p>
      <text:p text:style-name="P48"><text:span text:style-name="T13">272 <text:s/>| <text:s text:c="3"/></text:span><text:span text:style-name="T14"><text:s text:c="12"/></text:span><text:span text:style-name="T19">char</text:span><text:span text:style-name="T14"> *temp = realloc(response, resp_cap);</text:span></text:p>
      <text:p text:style-name="P48"><text:span text:style-name="T13">273 <text:s/>| <text:s text:c="3"/></text:span><text:span text:style-name="T14"><text:s text:c="12"/></text:span><text:span text:style-name="T15">if</text:span><text:span text:style-name="T14"> (temp == NULL) {</text:span></text:p>
      <text:p text:style-name="P48"><text:span text:style-name="T13">274 <text:s/>| <text:s text:c="3"/></text:span><text:span text:style-name="T14"><text:s text:c="16"/>fprintf(stderr, </text:span><text:span text:style-name="T16">"Ошибка: не удалось выделить память для ответа\n"</text:span><text:span text:style-name="T14">);</text:span></text:p>
      <text:p text:style-name="P48"><text:span text:style-name="T13">275 <text:s/>| <text:s text:c="3"/></text:span><text:span text:style-name="T14"><text:s text:c="16"/>free(response);</text:span></text:p>
      <text:p text:style-name="P48"><text:span text:style-name="T13">276 <text:s/>| <text:s text:c="3"/></text:span><text:span text:style-name="T14"><text:s text:c="16"/>free(query);</text:span></text:p>
      <text:p text:style-name="P48"><text:span text:style-name="T13">277 <text:s/>| <text:s text:c="3"/></text:span><text:span text:style-name="T14"><text:s text:c="16"/>close(sock);</text:span></text:p>
      <text:p text:style-name="P48"><text:span text:style-name="T13">278 <text:s/>| <text:s text:c="3"/></text:span><text:span text:style-name="T14"><text:s text:c="16"/></text:span><text:span text:style-name="T15">return</text:span><text:span text:style-name="T14"> 1;</text:span></text:p>
      <text:p text:style-name="P48"><text:span text:style-name="T13">279 <text:s/>| <text:s text:c="3"/></text:span><text:span text:style-name="T14"><text:s text:c="12"/>}</text:span></text:p>
      <text:p text:style-name="P48"><text:span text:style-name="T13">280 <text:s/>| <text:s text:c="3"/></text:span><text:span text:style-name="T14"><text:s text:c="12"/>response = temp;</text:span></text:p>
      <text:p text:style-name="P48"><text:span text:style-name="T13">281 <text:s/>| <text:s text:c="3"/></text:span><text:span text:style-name="T14"><text:s text:c="8"/>}</text:span></text:p>
      <text:p text:style-name="P49">282 <text:s/>| <text:s text:c="3"/></text:p>
      <text:p text:style-name="P48"><text:span text:style-name="T13">283 <text:s/>| <text:s text:c="3"/></text:span><text:span text:style-name="T14"><text:s text:c="8"/></text:span><text:span text:style-name="T19">ssize_t</text:span><text:span text:style-name="T14"> received = read(sock, response + resp_len, 64);</text:span></text:p>
      <text:p text:style-name="P48"><text:span text:style-name="T13">284 <text:s/>| <text:s text:c="3"/></text:span><text:span text:style-name="T14"><text:s text:c="8"/></text:span><text:span text:style-name="T15">if</text:span><text:span text:style-name="T14"> (received &lt; 0) {</text:span></text:p>
      <text:p text:style-name="P48"><text:span text:style-name="T13">285 <text:s/>| <text:s text:c="3"/></text:span><text:span text:style-name="T14"><text:s text:c="12"/>fprintf(stderr, </text:span><text:span text:style-name="T16">"Ошибка: не удалось прочитать ответ\n"</text:span><text:span text:style-name="T14">);</text:span></text:p>
      <text:p text:style-name="P48"><text:span text:style-name="T13">286 <text:s/>| <text:s text:c="3"/></text:span><text:span text:style-name="T14"><text:s text:c="12"/>free(response);</text:span></text:p>
      <text:p text:style-name="P48"><text:span text:style-name="T13">287 <text:s/>| <text:s text:c="3"/></text:span><text:span text:style-name="T14"><text:s text:c="12"/>free(query);</text:span></text:p>
      <text:p text:style-name="P48"><text:span text:style-name="T13">288 <text:s/>| <text:s text:c="3"/></text:span><text:span text:style-name="T14"><text:s text:c="12"/>close(sock);</text:span></text:p>
      <text:p text:style-name="P48"><text:span text:style-name="T13">289 <text:s/>| <text:s text:c="3"/></text:span><text:span text:style-name="T14"><text:s text:c="12"/></text:span><text:span text:style-name="T15">return</text:span><text:span text:style-name="T14"> 1;</text:span></text:p>
      <text:p text:style-name="P48"><text:span text:style-name="T13">290 <text:s/>| <text:s text:c="3"/></text:span><text:span text:style-name="T14"><text:s text:c="8"/>}</text:span></text:p>
      <text:p text:style-name="P48"><text:span text:style-name="T13">291 <text:s/>| <text:s text:c="3"/></text:span><text:span text:style-name="T14"><text:s text:c="8"/></text:span><text:span text:style-name="T15">if</text:span><text:span text:style-name="T14"> (received == 0) {</text:span></text:p>
      <text:p text:style-name="P48"><text:span text:style-name="T13">292 <text:s/>| <text:s text:c="3"/></text:span><text:span text:style-name="T14"><text:s text:c="12"/></text:span><text:span text:style-name="T15">break</text:span><text:span text:style-name="T14">;</text:span></text:p>
      <text:p text:style-name="P48"><text:soft-page-break/><text:span text:style-name="T13">293 <text:s/>| <text:s text:c="3"/></text:span><text:span text:style-name="T14"><text:s text:c="8"/>}</text:span></text:p>
      <text:p text:style-name="P48"><text:span text:style-name="T13">294 <text:s/>| <text:s text:c="3"/></text:span><text:span text:style-name="T14"><text:s text:c="8"/>resp_len += received;</text:span></text:p>
      <text:p text:style-name="P48"><text:span text:style-name="T13">295 <text:s/>| <text:s text:c="3"/></text:span><text:span text:style-name="T14"><text:s text:c="4"/>}</text:span></text:p>
      <text:p text:style-name="P48"><text:span text:style-name="T13">296 <text:s/>| <text:s text:c="3"/></text:span><text:span text:style-name="T14"><text:s text:c="4"/>response[resp_len] = </text:span><text:span text:style-name="T16">'\0'</text:span><text:span text:style-name="T14">;</text:span></text:p>
      <text:p text:style-name="P49">297 <text:s/>| <text:s text:c="3"/></text:p>
      <text:p text:style-name="P48"><text:span text:style-name="T13">298 <text:s/>| <text:s text:c="3"/></text:span><text:span text:style-name="T14"><text:s text:c="4"/></text:span><text:span text:style-name="T15">if</text:span><text:span text:style-name="T14"> (debug) {</text:span></text:p>
      <text:p text:style-name="P48"><text:span text:style-name="T13">299 <text:s/>| <text:s text:c="3"/></text:span><text:span text:style-name="T14"><text:s text:c="8"/>fprintf(stderr, </text:span><text:span text:style-name="T16">"[DEBUG] Ответ получен (%zu байт). Закрытие соединения...\n"</text:span><text:span text:style-name="T14">, resp_len);</text:span></text:p>
      <text:p text:style-name="P48"><text:span text:style-name="T13">300 <text:s/>| <text:s text:c="3"/></text:span><text:span text:style-name="T14"><text:s text:c="4"/>}</text:span></text:p>
      <text:p text:style-name="P49">301 <text:s/>| <text:s text:c="3"/></text:p>
      <text:p text:style-name="P48"><text:span text:style-name="T13">302 <text:s/>| <text:s text:c="3"/></text:span><text:span text:style-name="T14"><text:s text:c="4"/>printf(</text:span><text:span text:style-name="T16">"%s"</text:span><text:span text:style-name="T14">, response);</text:span></text:p>
      <text:p text:style-name="P48"><text:span text:style-name="T13">303 <text:s/>| <text:s text:c="3"/></text:span><text:span text:style-name="T14"><text:s text:c="4"/>free(response);</text:span></text:p>
      <text:p text:style-name="P48"><text:span text:style-name="T13">304 <text:s/>| <text:s text:c="3"/></text:span><text:span text:style-name="T14"><text:s text:c="4"/>close(sock);</text:span></text:p>
      <text:p text:style-name="P48"><text:span text:style-name="T13">305 <text:s/>| <text:s text:c="3"/></text:span><text:span text:style-name="T14"><text:s text:c="4"/>free(query);</text:span></text:p>
      <text:p text:style-name="P49">306 <text:s/>| <text:s text:c="3"/></text:p>
      <text:p text:style-name="P48"><text:span text:style-name="T13">307 <text:s/>| <text:s text:c="3"/></text:span><text:span text:style-name="T14"><text:s text:c="4"/></text:span><text:span text:style-name="T15">return</text:span><text:span text:style-name="T14"> 0;</text:span></text:p>
      <text:p text:style-name="P49">308 <text:s/>| <text:s text:c="3"/></text:p>
      <text:p text:style-name="P50"><text:span text:style-name="T13">309 <text:s/>| <text:s text:c="3"/></text:span>}</text:p>
      <text:p text:style-name="P47"/>
      <text:p text:style-name="P51">Исходный код программы l<text:span text:style-name="T18">ab3</text:span>vypN3250<text:span text:style-name="T18">_server</text:span>.c:</text:p>
      <text:p text:style-name="P52"><text:span text:style-name="T13"><text:s text:c="2"/>1 <text:s/>| <text:s text:c="3"/></text:span><text:span text:style-name="T15">#include</text:span><text:span text:style-name="T14"> </text:span><text:span text:style-name="T13">&lt;sys/stat.h&gt;</text:span></text:p>
      <text:p text:style-name="P53"><text:span text:style-name="T13"><text:s text:c="2"/>2 <text:s/>| <text:s text:c="3"/></text:span>#define _GNU_SOURCE</text:p>
      <text:p text:style-name="P52"><text:span text:style-name="T13"><text:s text:c="2"/>3 <text:s/>| <text:s text:c="3"/></text:span><text:span text:style-name="T15">#include</text:span><text:span text:style-name="T14"> </text:span><text:span text:style-name="T13">&lt;stdio.h&gt;</text:span></text:p>
      <text:p text:style-name="P52"><text:span text:style-name="T13"><text:s text:c="2"/>4 <text:s/>| <text:s text:c="3"/></text:span><text:span text:style-name="T15">#include</text:span><text:span text:style-name="T14"> </text:span><text:span text:style-name="T13">&lt;stdlib.h&gt;</text:span></text:p>
      <text:p text:style-name="P52"><text:span text:style-name="T13"><text:s text:c="2"/>5 <text:s/>| <text:s text:c="3"/></text:span><text:span text:style-name="T15">#include</text:span><text:span text:style-name="T14"> </text:span><text:span text:style-name="T13">&lt;string.h&gt;</text:span></text:p>
      <text:p text:style-name="P52"><text:span text:style-name="T13"><text:s text:c="2"/>6 <text:s/>| <text:s text:c="3"/></text:span><text:span text:style-name="T15">#include</text:span><text:span text:style-name="T14"> </text:span><text:span text:style-name="T13">&lt;unistd.h&gt;</text:span></text:p>
      <text:p text:style-name="P52"><text:span text:style-name="T13"><text:s text:c="2"/>7 <text:s/>| <text:s text:c="3"/></text:span><text:span text:style-name="T15">#include</text:span><text:span text:style-name="T14"> </text:span><text:span text:style-name="T13">&lt;getopt.h&gt;</text:span></text:p>
      <text:p text:style-name="P52"><text:span text:style-name="T13"><text:s text:c="2"/>8 <text:s/>| <text:s text:c="3"/></text:span><text:span text:style-name="T15">#include</text:span><text:span text:style-name="T14"> </text:span><text:span text:style-name="T13">&lt;signal.h&gt;</text:span></text:p>
      <text:p text:style-name="P52"><text:span text:style-name="T13"><text:s text:c="2"/>9 <text:s/>| <text:s text:c="3"/></text:span><text:span text:style-name="T15">#include</text:span><text:span text:style-name="T14"> </text:span><text:span text:style-name="T13">&lt;errno.h&gt;</text:span></text:p>
      <text:p text:style-name="P52"><text:span text:style-name="T13"><text:s/>10 <text:s/>| <text:s text:c="3"/></text:span><text:span text:style-name="T15">#include</text:span><text:span text:style-name="T14"> </text:span><text:span text:style-name="T13">&lt;time.h&gt;</text:span></text:p>
      <text:p text:style-name="P52"><text:span text:style-name="T13"><text:s/>11 <text:s/>| <text:s text:c="3"/></text:span><text:span text:style-name="T15">#include</text:span><text:span text:style-name="T14"> </text:span><text:span text:style-name="T13">&lt;fcntl.h&gt;</text:span></text:p>
      <text:p text:style-name="P52"><text:span text:style-name="T13"><text:s/>12 <text:s/>| <text:s text:c="3"/></text:span><text:span text:style-name="T15">#include</text:span><text:span text:style-name="T14"> </text:span><text:span text:style-name="T13">&lt;sys/socket.h&gt;</text:span></text:p>
      <text:p text:style-name="P52"><text:span text:style-name="T13"><text:s/>13 <text:s/>| <text:s text:c="3"/></text:span><text:span text:style-name="T15">#include</text:span><text:span text:style-name="T14"> </text:span><text:span text:style-name="T13">&lt;sys/types.h&gt;</text:span></text:p>
      <text:p text:style-name="P52"><text:span text:style-name="T13"><text:s/>14 <text:s/>| <text:s text:c="3"/></text:span><text:span text:style-name="T15">#include</text:span><text:span text:style-name="T14"> </text:span><text:span text:style-name="T13">&lt;sys/wait.h&gt;</text:span></text:p>
      <text:p text:style-name="P52"><text:span text:style-name="T13"><text:s/>15 <text:s/>| <text:s text:c="3"/></text:span><text:span text:style-name="T15">#include</text:span><text:span text:style-name="T14"> </text:span><text:span text:style-name="T13">&lt;sys/mman.h&gt;</text:span></text:p>
      <text:p text:style-name="P52"><text:span text:style-name="T13"><text:s/>16 <text:s/>| <text:s text:c="3"/></text:span><text:span text:style-name="T15">#include</text:span><text:span text:style-name="T14"> </text:span><text:span text:style-name="T13">&lt;netinet/in.h&gt;</text:span></text:p>
      <text:p text:style-name="P52"><text:span text:style-name="T13"><text:s/>17 <text:s/>| <text:s text:c="3"/></text:span><text:span text:style-name="T15">#include</text:span><text:span text:style-name="T14"> </text:span><text:span text:style-name="T13">&lt;arpa/inet.h&gt;</text:span></text:p>
      <text:p text:style-name="P54"><text:s/>18 <text:s/>| <text:s text:c="3"/></text:p>
      <text:p text:style-name="P52"><text:span text:style-name="T13"><text:s/>19 <text:s/>| <text:s text:c="3"/></text:span><text:span text:style-name="T15">typedef</text:span><text:span text:style-name="T14"> </text:span><text:span text:style-name="T15">struct</text:span><text:span text:style-name="T14"> {</text:span></text:p>
      <text:p text:style-name="P52"><text:span text:style-name="T13"><text:s/>20 <text:s/>| <text:s text:c="3"/></text:span><text:span text:style-name="T14"><text:s text:c="4"/></text:span><text:span text:style-name="T19">time_t</text:span><text:span text:style-name="T14"> start_time;</text:span></text:p>
      <text:p text:style-name="P52"><text:span text:style-name="T13"><text:s/>21 <text:s/>| <text:s text:c="3"/></text:span><text:span text:style-name="T14"><text:s text:c="4"/></text:span><text:span text:style-name="T19">unsigned</text:span><text:span text:style-name="T14"> </text:span><text:span text:style-name="T19">long</text:span><text:span text:style-name="T14"> success_count;</text:span></text:p>
      <text:p text:style-name="P52"><text:span text:style-name="T13"><text:s/>22 <text:s/>| <text:s text:c="3"/></text:span><text:span text:style-name="T14"><text:s text:c="4"/></text:span><text:span text:style-name="T19">unsigned</text:span><text:span text:style-name="T14"> </text:span><text:span text:style-name="T19">long</text:span><text:span text:style-name="T14"> error_count;</text:span></text:p>
      <text:p text:style-name="P52"><text:span text:style-name="T13"><text:s/>23 <text:s/>| <text:s text:c="3"/></text:span><text:span text:style-name="T14">} ServerStats;</text:span></text:p>
      <text:p text:style-name="P54"><text:s/>24 <text:s/>| <text:s text:c="3"/></text:p>
      <text:p text:style-name="P52"><text:span text:style-name="T13"><text:s/>25 <text:s/>| <text:s text:c="3"/></text:span><text:span text:style-name="T15">volatile</text:span><text:span text:style-name="T14"> </text:span><text:span text:style-name="T19">sig_atomic_t</text:span><text:span text:style-name="T14"> keep_running = 1;</text:span></text:p>
      <text:p text:style-name="P52"><text:span text:style-name="T13"><text:s/>26 <text:s/>| <text:s text:c="3"/></text:span><text:span text:style-name="T15">volatile</text:span><text:span text:style-name="T14"> </text:span><text:span text:style-name="T19">sig_atomic_t</text:span><text:span text:style-name="T14"> dump_stats = 0;</text:span></text:p>
      <text:p text:style-name="P54"><text:s/>27 <text:s/>| <text:s text:c="3"/></text:p>
      <text:p text:style-name="P52"><text:span text:style-name="T13"><text:s/>28 <text:s/>| <text:s text:c="3"/></text:span><text:span text:style-name="T14">ServerStats *stats = NULL;</text:span></text:p>
      <text:p text:style-name="P52"><text:span text:style-name="T13"><text:s/>29 <text:s/>| <text:s text:c="3"/></text:span><text:span text:style-name="T19">char</text:span><text:span text:style-name="T14"> *log_path = </text:span><text:span text:style-name="T16">"/tmp/lab3.log"</text:span><text:span text:style-name="T14">;</text:span></text:p>
      <text:p text:style-name="P52"><text:span text:style-name="T13"><text:s/>30 <text:s/>| <text:s text:c="3"/></text:span><text:span text:style-name="T19">int</text:span><text:span text:style-name="T14"> debug = 0;</text:span></text:p>
      <text:p text:style-name="P54"><text:s/>31 <text:s/>| <text:s text:c="3"/></text:p>
      <text:p text:style-name="P52"><text:span text:style-name="T13"><text:s/>32 <text:s/>| <text:s text:c="3"/></text:span><text:span text:style-name="T19">void</text:span><text:span text:style-name="T14"> write_log(</text:span><text:span text:style-name="T15">const</text:span><text:span text:style-name="T14"> </text:span><text:span text:style-name="T19">char</text:span><text:span text:style-name="T14"> *message, </text:span><text:span text:style-name="T19">int</text:span><text:span text:style-name="T14"> is_debug_msg) {</text:span></text:p>
      <text:p text:style-name="P52"><text:span text:style-name="T13"><text:s/>33 <text:s/>| <text:s text:c="3"/></text:span><text:span text:style-name="T14"><text:s text:c="4"/></text:span><text:span text:style-name="T15">if</text:span><text:span text:style-name="T14"> (is_debug_msg &amp;&amp; !debug) {</text:span></text:p>
      <text:p text:style-name="P52"><text:span text:style-name="T13"><text:s/>34 <text:s/>| <text:s text:c="3"/></text:span><text:span text:style-name="T14"><text:s text:c="8"/></text:span><text:span text:style-name="T15">return</text:span><text:span text:style-name="T14">;</text:span></text:p>
      <text:p text:style-name="P52"><text:span text:style-name="T13"><text:s/>35 <text:s/>| <text:s text:c="3"/></text:span><text:span text:style-name="T14"><text:s text:c="4"/>}</text:span></text:p>
      <text:p text:style-name="P54"><text:s/>36 <text:s/>| <text:s text:c="3"/></text:p>
      <text:p text:style-name="P52"><text:span text:style-name="T13"><text:s/>37 <text:s/>| <text:s text:c="3"/></text:span><text:span text:style-name="T14"><text:s text:c="4"/></text:span><text:span text:style-name="T19">FILE</text:span><text:span text:style-name="T14"> *f = fopen(log_path, </text:span><text:span text:style-name="T16">"a"</text:span><text:span text:style-name="T14">);</text:span></text:p>
      <text:p text:style-name="P52"><text:span text:style-name="T13"><text:s/>38 <text:s/>| <text:s text:c="3"/></text:span><text:span text:style-name="T14"><text:s text:c="4"/></text:span><text:span text:style-name="T15">if</text:span><text:span text:style-name="T14"> (!f) {</text:span></text:p>
      <text:p text:style-name="P52"><text:span text:style-name="T13"><text:s/>39 <text:s/>| <text:s text:c="3"/></text:span><text:span text:style-name="T14"><text:s text:c="8"/></text:span><text:span text:style-name="T15">return</text:span><text:span text:style-name="T14">;</text:span></text:p>
      <text:p text:style-name="P52"><text:span text:style-name="T13"><text:s/>40 <text:s/>| <text:s text:c="3"/></text:span><text:span text:style-name="T14"><text:s text:c="4"/>}</text:span></text:p>
      <text:p text:style-name="P54"><text:s/>41 <text:s/>| <text:s text:c="3"/></text:p>
      <text:p text:style-name="P52"><text:span text:style-name="T13"><text:s/>42 <text:s/>| <text:s text:c="3"/></text:span><text:span text:style-name="T14"><text:s text:c="4"/></text:span><text:span text:style-name="T19">time_t</text:span><text:span text:style-name="T14"> now = time(NULL);</text:span></text:p>
      <text:p text:style-name="P52"><text:span text:style-name="T13"><text:s/>43 <text:s/>| <text:s text:c="3"/></text:span><text:span text:style-name="T14"><text:s text:c="4"/></text:span><text:span text:style-name="T15">struct</text:span><text:span text:style-name="T14"> </text:span><text:span text:style-name="T19">tm</text:span><text:span text:style-name="T14"> *tm_info = localtime(&amp;now);</text:span></text:p>
      <text:p text:style-name="P52"><text:span text:style-name="T13"><text:s/>44 <text:s/>| <text:s text:c="3"/></text:span><text:span text:style-name="T14"><text:s text:c="4"/></text:span><text:span text:style-name="T19">char</text:span><text:span text:style-name="T14"> time_buf[26];</text:span></text:p>
      <text:p text:style-name="P52"><text:span text:style-name="T13"><text:s/>45 <text:s/>| <text:s text:c="3"/></text:span><text:span text:style-name="T14"><text:s text:c="4"/>strftime(time_buf, </text:span><text:span text:style-name="T15">sizeof</text:span><text:span text:style-name="T14">(time_buf), </text:span><text:span text:style-name="T16">"%d.%m.%y %H:%M:%S"</text:span><text:span text:style-name="T14">, tm_info);</text:span></text:p>
      <text:p text:style-name="P54"><text:s/>46 <text:s/>| <text:s text:c="3"/></text:p>
      <text:p text:style-name="P52"><text:span text:style-name="T13"><text:s/>47 <text:s/>| <text:s text:c="3"/></text:span><text:span text:style-name="T14"><text:s text:c="4"/>fprintf(f, </text:span><text:span text:style-name="T16">"[%s] %s\n"</text:span><text:span text:style-name="T14">, time_buf, message);</text:span></text:p>
      <text:p text:style-name="P52"><text:span text:style-name="T13"><text:s/>48 <text:s/>| <text:s text:c="3"/></text:span><text:span text:style-name="T14"><text:s text:c="4"/>fclose(f);</text:span></text:p>
      <text:p text:style-name="P55"><text:span text:style-name="T13"><text:s/>49 <text:s/>| <text:s text:c="3"/></text:span>}</text:p>
      <text:p text:style-name="P54"><text:s/>50 <text:s/>| <text:s text:c="3"/></text:p>
      <text:p text:style-name="P52"><text:span text:style-name="T13"><text:s/>51 <text:s/>| <text:s text:c="3"/></text:span><text:span text:style-name="T19">void</text:span><text:span text:style-name="T14"> print_statistics(</text:span><text:span text:style-name="T19">void</text:span><text:span text:style-name="T14">) {</text:span></text:p>
      <text:p text:style-name="P52"><text:span text:style-name="T13"><text:s/>52 <text:s/>| <text:s text:c="3"/></text:span><text:span text:style-name="T14"><text:s text:c="4"/></text:span><text:span text:style-name="T15">if</text:span><text:span text:style-name="T14"> (stats == NULL) </text:span><text:span text:style-name="T15">return</text:span><text:span text:style-name="T14">;</text:span></text:p>
      <text:p text:style-name="P54"><text:s/>53 <text:s/>| <text:s text:c="3"/></text:p>
      <text:p text:style-name="P52"><text:span text:style-name="T13"><text:s/>54 <text:s/>| <text:s text:c="3"/></text:span><text:span text:style-name="T14"><text:s text:c="4"/></text:span><text:span text:style-name="T19">time_t</text:span><text:span text:style-name="T14"> now = time(NULL);</text:span></text:p>
      <text:p text:style-name="P52"><text:span text:style-name="T13"><text:s/>55 <text:s/>| <text:s text:c="3"/></text:span><text:span text:style-name="T14"><text:s text:c="4"/></text:span><text:span text:style-name="T19">double</text:span><text:span text:style-name="T14"> elapsed = difftime(now, stats-&gt;start_time);</text:span></text:p>
      <text:p text:style-name="P54"><text:s/>56 <text:s/>| <text:s text:c="3"/></text:p>
      <text:p text:style-name="P52"><text:span text:style-name="T13"><text:s/>57 <text:s/>| <text:s text:c="3"/></text:span><text:span text:style-name="T14"><text:s text:c="4"/></text:span><text:span text:style-name="T19">char</text:span><text:span text:style-name="T14"> stat_buf[256];</text:span></text:p>
      <text:p text:style-name="P52"><text:span text:style-name="T13"><text:s/>58 <text:s/>| <text:s text:c="3"/></text:span><text:span text:style-name="T14"><text:s text:c="4"/>snprintf(stat_buf, </text:span><text:span text:style-name="T15">sizeof</text:span><text:span text:style-name="T14">(stat_buf),</text:span></text:p>
      <text:p text:style-name="P52"><text:span text:style-name="T13"><text:s/>59 <text:s/>| <text:s text:c="3"/></text:span><text:span text:style-name="T14"><text:s text:c="13"/></text:span><text:span text:style-name="T16">"--- СТАТИСТИКА РАБОТЫ СЕРВЕРА ---\n"</text:span></text:p>
      <text:p text:style-name="P52"><text:span text:style-name="T13"><text:s/>60 <text:s/>| <text:s text:c="3"/></text:span><text:span text:style-name="T14"><text:s text:c="13"/></text:span><text:span text:style-name="T16">"Время работы: %.0f сек\n"</text:span></text:p>
      <text:p text:style-name="P52"><text:span text:style-name="T13"><text:s/>61 <text:s/>| <text:s text:c="3"/></text:span><text:span text:style-name="T14"><text:s text:c="13"/></text:span><text:span text:style-name="T16">"Успешно обслужено запросов: %lu\n"</text:span></text:p>
      <text:p text:style-name="P52"><text:span text:style-name="T13"><text:s/>62 <text:s/>| <text:s text:c="3"/></text:span><text:span text:style-name="T14"><text:s text:c="13"/></text:span><text:span text:style-name="T16">"Запросов с ошибками: %lu\n"</text:span></text:p>
      <text:p text:style-name="P52"><text:span text:style-name="T13"><text:s/>63 <text:s/>| <text:s text:c="3"/></text:span><text:span text:style-name="T14"><text:s text:c="13"/></text:span><text:span text:style-name="T16">"---------------------------------"</text:span><text:span text:style-name="T14">,</text:span></text:p>
      <text:p text:style-name="P52"><text:span text:style-name="T13"><text:s/>64 <text:s/>| <text:s text:c="3"/></text:span><text:span text:style-name="T14"><text:s text:c="13"/>elapsed, stats-&gt;success_count, stats-&gt;error_count);</text:span></text:p>
      <text:p text:style-name="P54"><text:s/>65 <text:s/>| <text:s text:c="3"/></text:p>
      <text:p text:style-name="P52"><text:span text:style-name="T13"><text:s/>66 <text:s/>| <text:s text:c="3"/></text:span><text:span text:style-name="T14"><text:s text:c="4"/>write_log(stat_buf, 0);</text:span></text:p>
      <text:p text:style-name="P54"><text:s/>67 <text:s/>| <text:s text:c="3"/></text:p>
      <text:p text:style-name="P52"><text:span text:style-name="T13"><text:s/>68 <text:s/>| <text:s text:c="3"/></text:span><text:span text:style-name="T14"><text:s text:c="4"/>fprintf(stderr, </text:span><text:span text:style-name="T16">"%s\n"</text:span><text:span text:style-name="T14">, stat_buf);</text:span></text:p>
      <text:p text:style-name="P55"><text:span text:style-name="T13"><text:s/>69 <text:s/>| <text:s text:c="3"/></text:span>}</text:p>
      <text:p text:style-name="P54"><text:s/>70 <text:s/>| <text:s text:c="3"/></text:p>
      <text:p text:style-name="P52"><text:span text:style-name="T13"><text:s/>71 <text:s/>| <text:s text:c="3"/></text:span><text:span text:style-name="T19">void</text:span><text:span text:style-name="T14"> handle_signal(</text:span><text:span text:style-name="T19">int</text:span><text:span text:style-name="T14"> sig) {</text:span></text:p>
      <text:p text:style-name="P52"><text:soft-page-break/><text:span text:style-name="T13"><text:s/>72 <text:s/>| <text:s text:c="3"/></text:span><text:span text:style-name="T14"><text:s text:c="4"/></text:span><text:span text:style-name="T15">if</text:span><text:span text:style-name="T14"> (sig == SIGINT || sig == SIGTERM || sig == SIGQUIT) {</text:span></text:p>
      <text:p text:style-name="P52"><text:span text:style-name="T13"><text:s/>73 <text:s/>| <text:s text:c="3"/></text:span><text:span text:style-name="T14"><text:s text:c="8"/>keep_running = 0;</text:span></text:p>
      <text:p text:style-name="P52"><text:span text:style-name="T13"><text:s/>74 <text:s/>| <text:s text:c="3"/></text:span><text:span text:style-name="T14"><text:s text:c="4"/>} </text:span><text:span text:style-name="T15">else</text:span><text:span text:style-name="T14"> </text:span><text:span text:style-name="T15">if</text:span><text:span text:style-name="T14"> (sig == SIGUSR1) {</text:span></text:p>
      <text:p text:style-name="P52"><text:span text:style-name="T13"><text:s/>75 <text:s/>| <text:s text:c="3"/></text:span><text:span text:style-name="T14"><text:s text:c="8"/>dump_stats = 1;</text:span></text:p>
      <text:p text:style-name="P52"><text:span text:style-name="T13"><text:s/>76 <text:s/>| <text:s text:c="3"/></text:span><text:span text:style-name="T14"><text:s text:c="4"/>}</text:span></text:p>
      <text:p text:style-name="P55"><text:span text:style-name="T13"><text:s/>77 <text:s/>| <text:s text:c="3"/></text:span>}</text:p>
      <text:p text:style-name="P54"><text:s/>78 <text:s/>| <text:s text:c="3"/></text:p>
      <text:p text:style-name="P52"><text:span text:style-name="T13"><text:s/>79 <text:s/>| <text:s text:c="3"/></text:span><text:span text:style-name="T19">void</text:span><text:span text:style-name="T14"> handle_sigchld(</text:span><text:span text:style-name="T19">int</text:span><text:span text:style-name="T14"> sig) {</text:span></text:p>
      <text:p text:style-name="P52"><text:span text:style-name="T13"><text:s/>80 <text:s/>| <text:s text:c="3"/></text:span><text:span text:style-name="T14"><text:s text:c="4"/>(</text:span><text:span text:style-name="T19">void</text:span><text:span text:style-name="T14">)sig;</text:span></text:p>
      <text:p text:style-name="P52"><text:span text:style-name="T13"><text:s/>81 <text:s/>| <text:s text:c="3"/></text:span><text:span text:style-name="T14"><text:s text:c="4"/></text:span><text:span text:style-name="T19">int</text:span><text:span text:style-name="T14"> saved_errno = errno;</text:span></text:p>
      <text:p text:style-name="P52"><text:span text:style-name="T13"><text:s/>82 <text:s/>| <text:s text:c="3"/></text:span><text:span text:style-name="T14"><text:s text:c="4"/></text:span><text:span text:style-name="T15">while</text:span><text:span text:style-name="T14"> (waitpid(-1, NULL, WNOHANG) &gt; 0);</text:span></text:p>
      <text:p text:style-name="P52"><text:span text:style-name="T13"><text:s/>83 <text:s/>| <text:s text:c="3"/></text:span><text:span text:style-name="T14"><text:s text:c="4"/>errno = saved_errno;</text:span></text:p>
      <text:p text:style-name="P55"><text:span text:style-name="T13"><text:s/>84 <text:s/>| <text:s text:c="3"/></text:span>}</text:p>
      <text:p text:style-name="P54"><text:s/>85 <text:s/>| <text:s text:c="3"/></text:p>
      <text:p text:style-name="P52"><text:span text:style-name="T13"><text:s/>86 <text:s/>| <text:s text:c="3"/></text:span><text:span text:style-name="T19">void</text:span><text:span text:style-name="T14"> daemonize(</text:span><text:span text:style-name="T19">void</text:span><text:span text:style-name="T14">) {</text:span></text:p>
      <text:p text:style-name="P52"><text:span text:style-name="T13"><text:s/>87 <text:s/>| <text:s text:c="3"/></text:span><text:span text:style-name="T14"><text:s text:c="4"/></text:span><text:span text:style-name="T19">pid_t</text:span><text:span text:style-name="T14"> pid = fork();</text:span></text:p>
      <text:p text:style-name="P52"><text:span text:style-name="T13"><text:s/>88 <text:s/>| <text:s text:c="3"/></text:span><text:span text:style-name="T14"><text:s text:c="4"/></text:span><text:span text:style-name="T15">if</text:span><text:span text:style-name="T14"> (pid &lt; 0) {</text:span></text:p>
      <text:p text:style-name="P52"><text:span text:style-name="T13"><text:s/>89 <text:s/>| <text:s text:c="3"/></text:span><text:span text:style-name="T14"><text:s text:c="8"/>perror(</text:span><text:span text:style-name="T16">"fork"</text:span><text:span text:style-name="T14">);</text:span></text:p>
      <text:p text:style-name="P52"><text:span text:style-name="T13"><text:s/>90 <text:s/>| <text:s text:c="3"/></text:span><text:span text:style-name="T14"><text:s text:c="8"/>exit(EXIT_FAILURE);</text:span></text:p>
      <text:p text:style-name="P52"><text:span text:style-name="T13"><text:s/>91 <text:s/>| <text:s text:c="3"/></text:span><text:span text:style-name="T14"><text:s text:c="4"/>}</text:span></text:p>
      <text:p text:style-name="P52"><text:span text:style-name="T13"><text:s/>92 <text:s/>| <text:s text:c="3"/></text:span><text:span text:style-name="T14"><text:s text:c="4"/></text:span><text:span text:style-name="T15">if</text:span><text:span text:style-name="T14"> (pid &gt; 0) {</text:span></text:p>
      <text:p text:style-name="P52"><text:span text:style-name="T13"><text:s/>93 <text:s/>| <text:s text:c="3"/></text:span><text:span text:style-name="T14"><text:s text:c="8"/>exit(EXIT_SUCCESS);</text:span></text:p>
      <text:p text:style-name="P52"><text:span text:style-name="T13"><text:s/>94 <text:s/>| <text:s text:c="3"/></text:span><text:span text:style-name="T14"><text:s text:c="4"/>}</text:span></text:p>
      <text:p text:style-name="P54"><text:s/>95 <text:s/>| <text:s text:c="3"/></text:p>
      <text:p text:style-name="P52"><text:span text:style-name="T13"><text:s/>96 <text:s/>| <text:s text:c="3"/></text:span><text:span text:style-name="T14"><text:s text:c="4"/></text:span><text:span text:style-name="T15">if</text:span><text:span text:style-name="T14"> (setsid() &lt; 0) {</text:span></text:p>
      <text:p text:style-name="P52"><text:span text:style-name="T13"><text:s/>97 <text:s/>| <text:s text:c="3"/></text:span><text:span text:style-name="T14"><text:s text:c="8"/>perror(</text:span><text:span text:style-name="T16">"setsid"</text:span><text:span text:style-name="T14">);</text:span></text:p>
      <text:p text:style-name="P52"><text:span text:style-name="T13"><text:s/>98 <text:s/>| <text:s text:c="3"/></text:span><text:span text:style-name="T14"><text:s text:c="8"/>exit(EXIT_FAILURE);</text:span></text:p>
      <text:p text:style-name="P52"><text:span text:style-name="T13"><text:s/>99 <text:s/>| <text:s text:c="3"/></text:span><text:span text:style-name="T14"><text:s text:c="4"/>}</text:span></text:p>
      <text:p text:style-name="P54">100 <text:s/>| <text:s text:c="3"/></text:p>
      <text:p text:style-name="P52"><text:span text:style-name="T13">101 <text:s/>| <text:s text:c="3"/></text:span><text:span text:style-name="T14"><text:s text:c="4"/>pid = fork();</text:span></text:p>
      <text:p text:style-name="P52"><text:span text:style-name="T13">102 <text:s/>| <text:s text:c="3"/></text:span><text:span text:style-name="T14"><text:s text:c="4"/></text:span><text:span text:style-name="T15">if</text:span><text:span text:style-name="T14"> (pid &lt; 0) exit(EXIT_FAILURE);</text:span></text:p>
      <text:p text:style-name="P52"><text:span text:style-name="T13">103 <text:s/>| <text:s text:c="3"/></text:span><text:span text:style-name="T14"><text:s text:c="4"/></text:span><text:span text:style-name="T15">if</text:span><text:span text:style-name="T14"> (pid &gt; 0) exit(EXIT_SUCCESS);</text:span></text:p>
      <text:p text:style-name="P54">104 <text:s/>| <text:s text:c="3"/></text:p>
      <text:p text:style-name="P52"><text:span text:style-name="T13">105 <text:s/>| <text:s text:c="3"/></text:span><text:span text:style-name="T14"><text:s text:c="4"/>umask(0);</text:span></text:p>
      <text:p text:style-name="P52"><text:span text:style-name="T13">106 <text:s/>| <text:s text:c="3"/></text:span><text:span text:style-name="T14"><text:s text:c="4"/></text:span><text:span text:style-name="T15">if</text:span><text:span text:style-name="T14"> (chdir(</text:span><text:span text:style-name="T16">"/"</text:span><text:span text:style-name="T14">) &lt; 0) {</text:span></text:p>
      <text:p text:style-name="P52"><text:span text:style-name="T13">107 <text:s/>| <text:s text:c="3"/></text:span><text:span text:style-name="T14"><text:s text:c="8"/>perror(</text:span><text:span text:style-name="T16">"chdir"</text:span><text:span text:style-name="T14">);</text:span></text:p>
      <text:p text:style-name="P52"><text:span text:style-name="T13">108 <text:s/>| <text:s text:c="3"/></text:span><text:span text:style-name="T14"><text:s text:c="8"/>exit(EXIT_FAILURE);</text:span></text:p>
      <text:p text:style-name="P52"><text:span text:style-name="T13">109 <text:s/>| <text:s text:c="3"/></text:span><text:span text:style-name="T14"><text:s text:c="4"/>}</text:span></text:p>
      <text:p text:style-name="P54">110 <text:s/>| <text:s text:c="3"/></text:p>
      <text:p text:style-name="P52"><text:span text:style-name="T13">111 <text:s/>| <text:s text:c="3"/></text:span><text:span text:style-name="T14"><text:s text:c="4"/>close(STDIN_FILENO);</text:span></text:p>
      <text:p text:style-name="P52"><text:span text:style-name="T13">112 <text:s/>| <text:s text:c="3"/></text:span><text:span text:style-name="T14"><text:s text:c="4"/>close(STDOUT_FILENO);</text:span></text:p>
      <text:p text:style-name="P52"><text:span text:style-name="T13">113 <text:s/>| <text:s text:c="3"/></text:span><text:span text:style-name="T14"><text:s text:c="4"/>close(STDERR_FILENO);</text:span></text:p>
      <text:p text:style-name="P54">114 <text:s/>| <text:s text:c="3"/></text:p>
      <text:p text:style-name="P52"><text:span text:style-name="T13">115 <text:s/>| <text:s text:c="3"/></text:span><text:span text:style-name="T14"><text:s text:c="4"/>open(</text:span><text:span text:style-name="T16">"/dev/null"</text:span><text:span text:style-name="T14">, O_RDONLY);</text:span></text:p>
      <text:p text:style-name="P52"><text:span text:style-name="T13">116 <text:s/>| <text:s text:c="3"/></text:span><text:span text:style-name="T14"><text:s text:c="4"/>open(</text:span><text:span text:style-name="T16">"/dev/null"</text:span><text:span text:style-name="T14">, O_WRONLY);</text:span></text:p>
      <text:p text:style-name="P52"><text:span text:style-name="T13">117 <text:s/>| <text:s text:c="3"/></text:span><text:span text:style-name="T14"><text:s text:c="4"/>open(</text:span><text:span text:style-name="T16">"/dev/null"</text:span><text:span text:style-name="T14">, O_RDWR);</text:span></text:p>
      <text:p text:style-name="P55"><text:span text:style-name="T13">118 <text:s/>| <text:s text:c="3"/></text:span>}</text:p>
      <text:p text:style-name="P54">119 <text:s/>| <text:s text:c="3"/></text:p>
      <text:p text:style-name="P52"><text:span text:style-name="T13">120 <text:s/>| <text:s text:c="3"/></text:span><text:span text:style-name="T19">int</text:span><text:span text:style-name="T14"> count_decimal_digits(</text:span><text:span text:style-name="T19">long</text:span><text:span text:style-name="T14"> </text:span><text:span text:style-name="T19">long</text:span><text:span text:style-name="T14"> val) {</text:span></text:p>
      <text:p text:style-name="P52"><text:span text:style-name="T13">121 <text:s/>| <text:s text:c="3"/></text:span><text:span text:style-name="T14"><text:s text:c="4"/></text:span><text:span text:style-name="T15">if</text:span><text:span text:style-name="T14"> (val == 0) </text:span><text:span text:style-name="T15">return</text:span><text:span text:style-name="T14"> 1;</text:span></text:p>
      <text:p text:style-name="P52"><text:span text:style-name="T13">122 <text:s/>| <text:s text:c="3"/></text:span><text:span text:style-name="T14"><text:s text:c="4"/></text:span><text:span text:style-name="T19">unsigned</text:span><text:span text:style-name="T14"> </text:span><text:span text:style-name="T19">long</text:span><text:span text:style-name="T14"> </text:span><text:span text:style-name="T19">long</text:span><text:span text:style-name="T14"> abs_val = (val &lt; 0) ? -val : val;</text:span></text:p>
      <text:p text:style-name="P52"><text:span text:style-name="T13">123 <text:s/>| <text:s text:c="3"/></text:span><text:span text:style-name="T14"><text:s text:c="4"/></text:span><text:span text:style-name="T19">int</text:span><text:span text:style-name="T14"> count = 0;</text:span></text:p>
      <text:p text:style-name="P52"><text:span text:style-name="T13">124 <text:s/>| <text:s text:c="3"/></text:span><text:span text:style-name="T14"><text:s text:c="4"/></text:span><text:span text:style-name="T15">while</text:span><text:span text:style-name="T14"> (abs_val &gt; 0) {</text:span></text:p>
      <text:p text:style-name="P52"><text:span text:style-name="T13">125 <text:s/>| <text:s text:c="3"/></text:span><text:span text:style-name="T14"><text:s text:c="8"/>count++;</text:span></text:p>
      <text:p text:style-name="P52"><text:span text:style-name="T13">126 <text:s/>| <text:s text:c="3"/></text:span><text:span text:style-name="T14"><text:s text:c="8"/>abs_val /= 10;</text:span></text:p>
      <text:p text:style-name="P52"><text:span text:style-name="T13">127 <text:s/>| <text:s text:c="3"/></text:span><text:span text:style-name="T14"><text:s text:c="4"/>}</text:span></text:p>
      <text:p text:style-name="P52"><text:span text:style-name="T13">128 <text:s/>| <text:s text:c="3"/></text:span><text:span text:style-name="T14"><text:s text:c="4"/></text:span><text:span text:style-name="T15">return</text:span><text:span text:style-name="T14"> count;</text:span></text:p>
      <text:p text:style-name="P55"><text:span text:style-name="T13">129 <text:s/>| <text:s text:c="3"/></text:span>}</text:p>
      <text:p text:style-name="P54">130 <text:s/>| <text:s text:c="3"/></text:p>
      <text:p text:style-name="P52"><text:span text:style-name="T13">131 <text:s/>| <text:s text:c="3"/></text:span><text:span text:style-name="T15">typedef</text:span><text:span text:style-name="T14"> </text:span><text:span text:style-name="T15">struct</text:span><text:span text:style-name="T14"> {</text:span></text:p>
      <text:p text:style-name="P52"><text:span text:style-name="T13">132 <text:s/>| <text:s text:c="3"/></text:span><text:span text:style-name="T14"><text:s text:c="4"/></text:span><text:span text:style-name="T19">long</text:span><text:span text:style-name="T14"> </text:span><text:span text:style-name="T19">long</text:span><text:span text:style-name="T14"> value;</text:span></text:p>
      <text:p text:style-name="P52"><text:span text:style-name="T13">133 <text:s/>| <text:s text:c="3"/></text:span><text:span text:style-name="T14"><text:s text:c="4"/></text:span><text:span text:style-name="T19">int</text:span><text:span text:style-name="T14"> digits;</text:span></text:p>
      <text:p text:style-name="P52"><text:span text:style-name="T13">134 <text:s/>| <text:s text:c="3"/></text:span><text:span text:style-name="T14"><text:s text:c="4"/></text:span><text:span text:style-name="T19">int</text:span><text:span text:style-name="T14"> original_index;</text:span></text:p>
      <text:p text:style-name="P52"><text:span text:style-name="T13">135 <text:s/>| <text:s text:c="3"/></text:span><text:span text:style-name="T14">} NumberItem;</text:span></text:p>
      <text:p text:style-name="P54">136 <text:s/>| <text:s text:c="3"/></text:p>
      <text:p text:style-name="P52"><text:span text:style-name="T13">137 <text:s/>| <text:s text:c="3"/></text:span><text:span text:style-name="T19">int</text:span><text:span text:style-name="T14"> compare_items(</text:span><text:span text:style-name="T15">const</text:span><text:span text:style-name="T14"> </text:span><text:span text:style-name="T19">void</text:span><text:span text:style-name="T14"> *a, </text:span><text:span text:style-name="T15">const</text:span><text:span text:style-name="T14"> </text:span><text:span text:style-name="T19">void</text:span><text:span text:style-name="T14"> *b) {</text:span></text:p>
      <text:p text:style-name="P52"><text:span text:style-name="T13">138 <text:s/>| <text:s text:c="3"/></text:span><text:span text:style-name="T14"><text:s text:c="4"/></text:span><text:span text:style-name="T15">const</text:span><text:span text:style-name="T14"> NumberItem *ia = (</text:span><text:span text:style-name="T15">const</text:span><text:span text:style-name="T14"> NumberItem *)a;</text:span></text:p>
      <text:p text:style-name="P52"><text:span text:style-name="T13">139 <text:s/>| <text:s text:c="3"/></text:span><text:span text:style-name="T14"><text:s text:c="4"/></text:span><text:span text:style-name="T15">const</text:span><text:span text:style-name="T14"> NumberItem *ib = (</text:span><text:span text:style-name="T15">const</text:span><text:span text:style-name="T14"> NumberItem *)b;</text:span></text:p>
      <text:p text:style-name="P52"><text:span text:style-name="T13">140 <text:s/>| <text:s text:c="3"/></text:span><text:span text:style-name="T14"><text:s text:c="4"/></text:span><text:span text:style-name="T15">if</text:span><text:span text:style-name="T14"> (ia-&gt;digits != ib-&gt;digits) {</text:span></text:p>
      <text:p text:style-name="P52"><text:span text:style-name="T13">141 <text:s/>| <text:s text:c="3"/></text:span><text:span text:style-name="T14"><text:s text:c="8"/></text:span><text:span text:style-name="T15">return</text:span><text:span text:style-name="T14"> ib-&gt;digits - ia-&gt;digits;</text:span></text:p>
      <text:p text:style-name="P52"><text:span text:style-name="T13">142 <text:s/>| <text:s text:c="3"/></text:span><text:span text:style-name="T14"><text:s text:c="4"/>}</text:span></text:p>
      <text:p text:style-name="P52"><text:span text:style-name="T13">143 <text:s/>| <text:s text:c="3"/></text:span><text:span text:style-name="T14"><text:s text:c="4"/></text:span><text:span text:style-name="T15">return</text:span><text:span text:style-name="T14"> ia-&gt;original_index - ib-&gt;original_index;</text:span></text:p>
      <text:p text:style-name="P55"><text:span text:style-name="T13">144 <text:s/>| <text:s text:c="3"/></text:span>}</text:p>
      <text:p text:style-name="P54">145 <text:s/>| <text:s text:c="3"/></text:p>
      <text:p text:style-name="P52"><text:soft-page-break/><text:span text:style-name="T13">146 <text:s/>| <text:s text:c="3"/></text:span><text:span text:style-name="T19">char</text:span><text:span text:style-name="T14"> *process_request(</text:span><text:span text:style-name="T15">const</text:span><text:span text:style-name="T14"> </text:span><text:span text:style-name="T19">char</text:span><text:span text:style-name="T14"> *request, </text:span><text:span text:style-name="T19">size_t</text:span><text:span text:style-name="T14"> *out_len) {</text:span></text:p>
      <text:p text:style-name="P52"><text:span text:style-name="T13">147 <text:s/>| <text:s text:c="3"/></text:span><text:span text:style-name="T14"><text:s text:c="4"/></text:span><text:span text:style-name="T19">char</text:span><text:span text:style-name="T14"> *req_copy = strdup(request);</text:span></text:p>
      <text:p text:style-name="P52"><text:span text:style-name="T13">148 <text:s/>| <text:s text:c="3"/></text:span><text:span text:style-name="T14"><text:s text:c="4"/></text:span><text:span text:style-name="T15">if</text:span><text:span text:style-name="T14"> (!req_copy) {</text:span></text:p>
      <text:p text:style-name="P52"><text:span text:style-name="T13">149 <text:s/>| <text:s text:c="3"/></text:span><text:span text:style-name="T14"><text:s text:c="8"/>*out_len = snprintf(NULL, 0, </text:span><text:span text:style-name="T16">"ERROR 2\n"</text:span><text:span text:style-name="T14">);</text:span></text:p>
      <text:p text:style-name="P52"><text:span text:style-name="T13">150 <text:s/>| <text:s text:c="3"/></text:span><text:span text:style-name="T14"><text:s text:c="8"/></text:span><text:span text:style-name="T19">char</text:span><text:span text:style-name="T14"> *err_res = malloc(*out_len + 1);</text:span></text:p>
      <text:p text:style-name="P52"><text:span text:style-name="T13">151 <text:s/>| <text:s text:c="3"/></text:span><text:span text:style-name="T14"><text:s text:c="8"/></text:span><text:span text:style-name="T15">if</text:span><text:span text:style-name="T14"> (err_res) sprintf(err_res, </text:span><text:span text:style-name="T16">"ERROR 2\n"</text:span><text:span text:style-name="T14">);</text:span></text:p>
      <text:p text:style-name="P52"><text:span text:style-name="T13">152 <text:s/>| <text:s text:c="3"/></text:span><text:span text:style-name="T14"><text:s text:c="8"/></text:span><text:span text:style-name="T15">return</text:span><text:span text:style-name="T14"> err_res;</text:span></text:p>
      <text:p text:style-name="P52"><text:span text:style-name="T13">153 <text:s/>| <text:s text:c="3"/></text:span><text:span text:style-name="T14"><text:s text:c="4"/>}</text:span></text:p>
      <text:p text:style-name="P54">154 <text:s/>| <text:s text:c="3"/></text:p>
      <text:p text:style-name="P52"><text:span text:style-name="T13">155 <text:s/>| <text:s text:c="3"/></text:span><text:span text:style-name="T14"><text:s text:c="4"/></text:span><text:span text:style-name="T19">size_t</text:span><text:span text:style-name="T14"> items_cap = 16;</text:span></text:p>
      <text:p text:style-name="P52"><text:span text:style-name="T13">156 <text:s/>| <text:s text:c="3"/></text:span><text:span text:style-name="T14"><text:s text:c="4"/></text:span><text:span text:style-name="T19">size_t</text:span><text:span text:style-name="T14"> items_count = 0;</text:span></text:p>
      <text:p text:style-name="P52"><text:span text:style-name="T13">157 <text:s/>| <text:s text:c="3"/></text:span><text:span text:style-name="T14"><text:s text:c="4"/>NumberItem *items = malloc(items_cap * </text:span><text:span text:style-name="T15">sizeof</text:span><text:span text:style-name="T14">(NumberItem));</text:span></text:p>
      <text:p text:style-name="P52"><text:span text:style-name="T13">158 <text:s/>| <text:s text:c="3"/></text:span><text:span text:style-name="T14"><text:s text:c="4"/></text:span><text:span text:style-name="T15">if</text:span><text:span text:style-name="T14"> (!items) {</text:span></text:p>
      <text:p text:style-name="P52"><text:span text:style-name="T13">159 <text:s/>| <text:s text:c="3"/></text:span><text:span text:style-name="T14"><text:s text:c="8"/>free(req_copy);</text:span></text:p>
      <text:p text:style-name="P52"><text:span text:style-name="T13">160 <text:s/>| <text:s text:c="3"/></text:span><text:span text:style-name="T14"><text:s text:c="8"/>*out_len = snprintf(NULL, 0, </text:span><text:span text:style-name="T16">"ERROR 2\n"</text:span><text:span text:style-name="T14">);</text:span></text:p>
      <text:p text:style-name="P52"><text:span text:style-name="T13">161 <text:s/>| <text:s text:c="3"/></text:span><text:span text:style-name="T14"><text:s text:c="8"/></text:span><text:span text:style-name="T19">char</text:span><text:span text:style-name="T14"> *err_res = malloc(*out_len + 1);</text:span></text:p>
      <text:p text:style-name="P52"><text:span text:style-name="T13">162 <text:s/>| <text:s text:c="3"/></text:span><text:span text:style-name="T14"><text:s text:c="8"/></text:span><text:span text:style-name="T15">if</text:span><text:span text:style-name="T14"> (err_res) sprintf(err_res, </text:span><text:span text:style-name="T16">"ERROR 2\n"</text:span><text:span text:style-name="T14">);</text:span></text:p>
      <text:p text:style-name="P52"><text:span text:style-name="T13">163 <text:s/>| <text:s text:c="3"/></text:span><text:span text:style-name="T14"><text:s text:c="8"/></text:span><text:span text:style-name="T15">return</text:span><text:span text:style-name="T14"> err_res;</text:span></text:p>
      <text:p text:style-name="P52"><text:span text:style-name="T13">164 <text:s/>| <text:s text:c="3"/></text:span><text:span text:style-name="T14"><text:s text:c="4"/>}</text:span></text:p>
      <text:p text:style-name="P54">165 <text:s/>| <text:s text:c="3"/></text:p>
      <text:p text:style-name="P52"><text:span text:style-name="T13">166 <text:s/>| <text:s text:c="3"/></text:span><text:span text:style-name="T14"><text:s text:c="4"/></text:span><text:span text:style-name="T19">char</text:span><text:span text:style-name="T14"> *saveptr;</text:span></text:p>
      <text:p text:style-name="P52"><text:span text:style-name="T13">167 <text:s/>| <text:s text:c="3"/></text:span><text:span text:style-name="T14"><text:s text:c="4"/></text:span><text:span text:style-name="T19">char</text:span><text:span text:style-name="T14"> *token = strtok_r(req_copy, </text:span><text:span text:style-name="T16">" \t\v\f\r\n"</text:span><text:span text:style-name="T14">, &amp;saveptr);</text:span></text:p>
      <text:p text:style-name="P52"><text:span text:style-name="T13">168 <text:s/>| <text:s text:c="3"/></text:span><text:span text:style-name="T14"><text:s text:c="4"/></text:span><text:span text:style-name="T19">int</text:span><text:span text:style-name="T14"> has_invalid_tokens = 0;</text:span></text:p>
      <text:p text:style-name="P54">169 <text:s/>| <text:s text:c="3"/></text:p>
      <text:p text:style-name="P52"><text:span text:style-name="T13">170 <text:s/>| <text:s text:c="3"/></text:span><text:span text:style-name="T14"><text:s text:c="4"/></text:span><text:span text:style-name="T15">while</text:span><text:span text:style-name="T14"> (token != NULL) {</text:span></text:p>
      <text:p text:style-name="P52"><text:span text:style-name="T13">171 <text:s/>| <text:s text:c="3"/></text:span><text:span text:style-name="T14"><text:s text:c="8"/></text:span><text:span text:style-name="T19">char</text:span><text:span text:style-name="T14"> *endptr;</text:span></text:p>
      <text:p text:style-name="P52"><text:span text:style-name="T13">172 <text:s/>| <text:s text:c="3"/></text:span><text:span text:style-name="T14"><text:s text:c="8"/></text:span><text:span text:style-name="T19">long</text:span><text:span text:style-name="T14"> </text:span><text:span text:style-name="T19">long</text:span><text:span text:style-name="T14"> val = strtoll(token, &amp;endptr, 0);</text:span></text:p>
      <text:p text:style-name="P54">173 <text:s/>| <text:s text:c="3"/></text:p>
      <text:p text:style-name="P52"><text:span text:style-name="T13">174 <text:s/>| <text:s text:c="3"/></text:span><text:span text:style-name="T14"><text:s text:c="8"/></text:span><text:span text:style-name="T15">if</text:span><text:span text:style-name="T14"> (*endptr != </text:span><text:span text:style-name="T16">'\0'</text:span><text:span text:style-name="T14"> || endptr == token) {</text:span></text:p>
      <text:p text:style-name="P52"><text:span text:style-name="T13">175 <text:s/>| <text:s text:c="3"/></text:span><text:span text:style-name="T14"><text:s text:c="12"/>has_invalid_tokens = 1;</text:span></text:p>
      <text:p text:style-name="P52"><text:span text:style-name="T13">176 <text:s/>| <text:s text:c="3"/></text:span><text:span text:style-name="T14"><text:s text:c="12"/></text:span><text:span text:style-name="T15">break</text:span><text:span text:style-name="T14">;</text:span></text:p>
      <text:p text:style-name="P52"><text:span text:style-name="T13">177 <text:s/>| <text:s text:c="3"/></text:span><text:span text:style-name="T14"><text:s text:c="8"/>}</text:span></text:p>
      <text:p text:style-name="P54">178 <text:s/>| <text:s text:c="3"/></text:p>
      <text:p text:style-name="P52"><text:span text:style-name="T13">179 <text:s/>| <text:s text:c="3"/></text:span><text:span text:style-name="T14"><text:s text:c="8"/></text:span><text:span text:style-name="T15">if</text:span><text:span text:style-name="T14"> (items_count &gt;= items_cap) {</text:span></text:p>
      <text:p text:style-name="P52"><text:span text:style-name="T13">180 <text:s/>| <text:s text:c="3"/></text:span><text:span text:style-name="T14"><text:s text:c="12"/>items_cap *= 2;</text:span></text:p>
      <text:p text:style-name="P52"><text:span text:style-name="T13">181 <text:s/>| <text:s text:c="3"/></text:span><text:span text:style-name="T14"><text:s text:c="12"/>NumberItem *temp = realloc(items, items_cap * </text:span><text:span text:style-name="T15">sizeof</text:span><text:span text:style-name="T14">(NumberItem));</text:span></text:p>
      <text:p text:style-name="P52"><text:span text:style-name="T13">182 <text:s/>| <text:s text:c="3"/></text:span><text:span text:style-name="T14"><text:s text:c="12"/></text:span><text:span text:style-name="T15">if</text:span><text:span text:style-name="T14"> (!temp) {</text:span></text:p>
      <text:p text:style-name="P52"><text:span text:style-name="T13">183 <text:s/>| <text:s text:c="3"/></text:span><text:span text:style-name="T14"><text:s text:c="16"/>has_invalid_tokens = 2;</text:span></text:p>
      <text:p text:style-name="P52"><text:span text:style-name="T13">184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185 <text:s/>| <text:s text:c="3"/></text:span><text:span text:style-name="T14"><text:s text:c="12"/>}</text:span></text:p>
      <text:p text:style-name="P52"><text:span text:style-name="T13">186 <text:s/>| <text:s text:c="3"/></text:span><text:span text:style-name="T14"><text:s text:c="12"/>items = temp;</text:span></text:p>
      <text:p text:style-name="P52"><text:span text:style-name="T13">187 <text:s/>| <text:s text:c="3"/></text:span><text:span text:style-name="T14"><text:s text:c="8"/>}</text:span></text:p>
      <text:p text:style-name="P54">188 <text:s/>| <text:s text:c="3"/></text:p>
      <text:p text:style-name="P52"><text:span text:style-name="T13">189 <text:s/>| <text:s text:c="3"/></text:span><text:span text:style-name="T14"><text:s text:c="8"/>items[items_count].value = val;</text:span></text:p>
      <text:p text:style-name="P52"><text:span text:style-name="T13">190 <text:s/>| <text:s text:c="3"/></text:span><text:span text:style-name="T14"><text:s text:c="8"/>items[items_count].digits = count_decimal_digits(val);</text:span></text:p>
      <text:p text:style-name="P52"><text:span text:style-name="T13">191 <text:s/>| <text:s text:c="3"/></text:span><text:span text:style-name="T14"><text:s text:c="8"/>items[items_count].original_index = (</text:span><text:span text:style-name="T19">int</text:span><text:span text:style-name="T14">)items_count;</text:span></text:p>
      <text:p text:style-name="P52"><text:span text:style-name="T13">192 <text:s/>| <text:s text:c="3"/></text:span><text:span text:style-name="T14"><text:s text:c="8"/>items_count++;</text:span></text:p>
      <text:p text:style-name="P54">193 <text:s/>| <text:s text:c="3"/></text:p>
      <text:p text:style-name="P52"><text:span text:style-name="T13">194 <text:s/>| <text:s text:c="3"/></text:span><text:span text:style-name="T14"><text:s text:c="8"/>token = strtok_r(NULL, </text:span><text:span text:style-name="T16">" \t\v\f\r\n"</text:span><text:span text:style-name="T14">, &amp;saveptr);</text:span></text:p>
      <text:p text:style-name="P52"><text:span text:style-name="T13">195 <text:s/>| <text:s text:c="3"/></text:span><text:span text:style-name="T14"><text:s text:c="4"/>}</text:span></text:p>
      <text:p text:style-name="P54">196 <text:s/>| <text:s text:c="3"/></text:p>
      <text:p text:style-name="P52"><text:span text:style-name="T13">197 <text:s/>| <text:s text:c="3"/></text:span><text:span text:style-name="T14"><text:s text:c="4"/>free(req_copy);</text:span></text:p>
      <text:p text:style-name="P54">198 <text:s/>| <text:s text:c="3"/></text:p>
      <text:p text:style-name="P52"><text:span text:style-name="T13">199 <text:s/>| <text:s text:c="3"/></text:span><text:span text:style-name="T14"><text:s text:c="4"/></text:span><text:span text:style-name="T19">char</text:span><text:span text:style-name="T14"> *res_str = NULL;</text:span></text:p>
      <text:p text:style-name="P52"><text:span text:style-name="T13">200 <text:s/>| <text:s text:c="3"/></text:span><text:span text:style-name="T14"><text:s text:c="4"/></text:span><text:span text:style-name="T15">if</text:span><text:span text:style-name="T14"> (has_invalid_tokens == 1 || items_count == 0) {</text:span></text:p>
      <text:p text:style-name="P52"><text:span text:style-name="T13">201 <text:s/>| <text:s text:c="3"/></text:span><text:span text:style-name="T14"><text:s text:c="8"/>stats-&gt;error_count++;</text:span></text:p>
      <text:p text:style-name="P52"><text:span text:style-name="T13">202 <text:s/>| <text:s text:c="3"/></text:span><text:span text:style-name="T14"><text:s text:c="8"/>*out_len = asprintf(&amp;res_str, </text:span><text:span text:style-name="T16">"ERROR 1\n"</text:span><text:span text:style-name="T14">);</text:span></text:p>
      <text:p text:style-name="P52"><text:span text:style-name="T13">203 <text:s/>| <text:s text:c="3"/></text:span><text:span text:style-name="T14"><text:s text:c="4"/>} </text:span><text:span text:style-name="T15">else</text:span><text:span text:style-name="T14"> </text:span><text:span text:style-name="T15">if</text:span><text:span text:style-name="T14"> (has_invalid_tokens == 2) {</text:span></text:p>
      <text:p text:style-name="P52"><text:span text:style-name="T13">204 <text:s/>| <text:s text:c="3"/></text:span><text:span text:style-name="T14"><text:s text:c="8"/>stats-&gt;error_count++;</text:span></text:p>
      <text:p text:style-name="P52"><text:span text:style-name="T13">205 <text:s/>| <text:s text:c="3"/></text:span><text:span text:style-name="T14"><text:s text:c="8"/>*out_len = asprintf(&amp;res_str, </text:span><text:span text:style-name="T16">"ERROR 2\n"</text:span><text:span text:style-name="T14">);</text:span></text:p>
      <text:p text:style-name="P52"><text:span text:style-name="T13">206 <text:s/>| <text:s text:c="3"/></text:span><text:span text:style-name="T14"><text:s text:c="4"/>} </text:span><text:span text:style-name="T15">else</text:span><text:span text:style-name="T14"> {</text:span></text:p>
      <text:p text:style-name="P52"><text:span text:style-name="T13">207 <text:s/>| <text:s text:c="3"/></text:span><text:span text:style-name="T14"><text:s text:c="8"/>qsort(items, items_count, </text:span><text:span text:style-name="T15">sizeof</text:span><text:span text:style-name="T14">(NumberItem), compare_items);</text:span></text:p>
      <text:p text:style-name="P54">208 <text:s/>| <text:s text:c="3"/></text:p>
      <text:p text:style-name="P52"><text:span text:style-name="T13">209 <text:s/>| <text:s text:c="3"/></text:span><text:span text:style-name="T14"><text:s text:c="8"/></text:span><text:span text:style-name="T19">size_t</text:span><text:span text:style-name="T14"> res_cap = 128;</text:span></text:p>
      <text:p text:style-name="P52"><text:span text:style-name="T13">210 <text:s/>| <text:s text:c="3"/></text:span><text:span text:style-name="T14"><text:s text:c="8"/>res_str = malloc(res_cap);</text:span></text:p>
      <text:p text:style-name="P52"><text:span text:style-name="T13">211 <text:s/>| <text:s text:c="3"/></text:span><text:span text:style-name="T14"><text:s text:c="8"/></text:span><text:span text:style-name="T15">if</text:span><text:span text:style-name="T14"> (!res_str) {</text:span></text:p>
      <text:p text:style-name="P52"><text:span text:style-name="T13">212 <text:s/>| <text:s text:c="3"/></text:span><text:span text:style-name="T14"><text:s text:c="12"/>stats-&gt;error_count++;</text:span></text:p>
      <text:p text:style-name="P52"><text:span text:style-name="T13">213 <text:s/>| <text:s text:c="3"/></text:span><text:span text:style-name="T14"><text:s text:c="12"/>*out_len = asprintf(&amp;res_str, </text:span><text:span text:style-name="T16">"ERROR 2\n"</text:span><text:span text:style-name="T14">);</text:span></text:p>
      <text:p text:style-name="P52"><text:span text:style-name="T13">214 <text:s/>| <text:s text:c="3"/></text:span><text:span text:style-name="T14"><text:s text:c="8"/>} </text:span><text:span text:style-name="T15">else</text:span><text:span text:style-name="T14"> {</text:span></text:p>
      <text:p text:style-name="P52"><text:span text:style-name="T13">215 <text:s/>| <text:s text:c="3"/></text:span><text:span text:style-name="T14"><text:s text:c="12"/></text:span><text:span text:style-name="T19">size_t</text:span><text:span text:style-name="T14"> res_len = 0;</text:span></text:p>
      <text:p text:style-name="P52"><text:span text:style-name="T13">216 <text:s/>| <text:s text:c="3"/></text:span><text:span text:style-name="T14"><text:s text:c="12"/>res_str[0] = </text:span><text:span text:style-name="T16">'\0'</text:span><text:span text:style-name="T14">;</text:span></text:p>
      <text:p text:style-name="P54">217 <text:s/>| <text:s text:c="3"/></text:p>
      <text:p text:style-name="P52"><text:span text:style-name="T13">218 <text:s/>| <text:s text:c="3"/></text:span><text:span text:style-name="T14"><text:s text:c="12"/></text:span><text:span text:style-name="T15">for</text:span><text:span text:style-name="T14"> (</text:span><text:span text:style-name="T19">size_t</text:span><text:span text:style-name="T14"> i = 0; i &lt; items_count; i++) {</text:span></text:p>
      <text:p text:style-name="P52"><text:span text:style-name="T13">219 <text:s/>| <text:s text:c="3"/></text:span><text:span text:style-name="T14"><text:s text:c="16"/></text:span><text:span text:style-name="T19">char</text:span><text:span text:style-name="T14"> num_buf[32];</text:span></text:p>
      <text:p text:style-name="P52"><text:soft-page-break/><text:span text:style-name="T13">220 <text:s/>| <text:s text:c="3"/></text:span><text:span text:style-name="T14"><text:s text:c="16"/></text:span><text:span text:style-name="T19">int</text:span><text:span text:style-name="T14"> printed = snprintf(num_buf, </text:span><text:span text:style-name="T15">sizeof</text:span><text:span text:style-name="T14">(num_buf), </text:span><text:span text:style-name="T16">"%lld"</text:span><text:span text:style-name="T14">, items[i].value);</text:span></text:p>
      <text:p text:style-name="P54">221 <text:s/>| <text:s text:c="3"/></text:p>
      <text:p text:style-name="P52"><text:span text:style-name="T13">222 <text:s/>| <text:s text:c="3"/></text:span><text:span text:style-name="T14"><text:s text:c="16"/></text:span><text:span text:style-name="T15">while</text:span><text:span text:style-name="T14"> (res_len + printed + 2 &gt; res_cap) {</text:span></text:p>
      <text:p text:style-name="P52"><text:span text:style-name="T13">223 <text:s/>| <text:s text:c="3"/></text:span><text:span text:style-name="T14"><text:s text:c="20"/>res_cap *= 2;</text:span></text:p>
      <text:p text:style-name="P52"><text:span text:style-name="T13">224 <text:s/>| <text:s text:c="3"/></text:span><text:span text:style-name="T14"><text:s text:c="20"/></text:span><text:span text:style-name="T19">char</text:span><text:span text:style-name="T14"> *temp = realloc(res_str, res_cap);</text:span></text:p>
      <text:p text:style-name="P52"><text:span text:style-name="T13">225 <text:s/>| <text:s text:c="3"/></text:span><text:span text:style-name="T14"><text:s text:c="20"/></text:span><text:span text:style-name="T15">if</text:span><text:span text:style-name="T14"> (!temp) {</text:span></text:p>
      <text:p text:style-name="P52"><text:span text:style-name="T13">226 <text:s/>| <text:s text:c="3"/></text:span><text:span text:style-name="T14"><text:s text:c="24"/>free(res_str);</text:span></text:p>
      <text:p text:style-name="P52"><text:span text:style-name="T13">227 <text:s/>| <text:s text:c="3"/></text:span><text:span text:style-name="T14"><text:s text:c="24"/>stats-&gt;error_count++;</text:span></text:p>
      <text:p text:style-name="P52"><text:span text:style-name="T13">228 <text:s/>| <text:s text:c="3"/></text:span><text:span text:style-name="T14"><text:s text:c="24"/>*out_len = asprintf(&amp;res_str, </text:span><text:span text:style-name="T16">"ERROR 2\n"</text:span><text:span text:style-name="T14">);</text:span></text:p>
      <text:p text:style-name="P52"><text:span text:style-name="T13">229 <text:s/>| <text:s text:c="3"/></text:span><text:span text:style-name="T14"><text:s text:c="24"/>free(items);</text:span></text:p>
      <text:p text:style-name="P52"><text:span text:style-name="T13">230 <text:s/>| <text:s text:c="3"/></text:span><text:span text:style-name="T14"><text:s text:c="24"/></text:span><text:span text:style-name="T15">return</text:span><text:span text:style-name="T14"> res_str;</text:span></text:p>
      <text:p text:style-name="P52"><text:span text:style-name="T13">231 <text:s/>| <text:s text:c="3"/></text:span><text:span text:style-name="T14"><text:s text:c="20"/>}</text:span></text:p>
      <text:p text:style-name="P52"><text:span text:style-name="T13">232 <text:s/>| <text:s text:c="3"/></text:span><text:span text:style-name="T14"><text:s text:c="20"/>res_str = temp;</text:span></text:p>
      <text:p text:style-name="P52"><text:span text:style-name="T13">233 <text:s/>| <text:s text:c="3"/></text:span><text:span text:style-name="T14"><text:s text:c="16"/>}</text:span></text:p>
      <text:p text:style-name="P54">234 <text:s/>| <text:s text:c="3"/></text:p>
      <text:p text:style-name="P52"><text:span text:style-name="T13">235 <text:s/>| <text:s text:c="3"/></text:span><text:span text:style-name="T14"><text:s text:c="16"/>strcpy(res_str + res_len, num_buf);</text:span></text:p>
      <text:p text:style-name="P52"><text:span text:style-name="T13">236 <text:s/>| <text:s text:c="3"/></text:span><text:span text:style-name="T14"><text:s text:c="16"/>res_len += printed;</text:span></text:p>
      <text:p text:style-name="P54">237 <text:s/>| <text:s text:c="3"/></text:p>
      <text:p text:style-name="P52"><text:span text:style-name="T13">238 <text:s/>| <text:s text:c="3"/></text:span><text:span text:style-name="T14"><text:s text:c="16"/></text:span><text:span text:style-name="T15">if</text:span><text:span text:style-name="T14"> (i &lt; items_count - 1) {</text:span></text:p>
      <text:p text:style-name="P52"><text:span text:style-name="T13">239 <text:s/>| <text:s text:c="3"/></text:span><text:span text:style-name="T14"><text:s text:c="20"/>res_str[res_len++] = </text:span><text:span text:style-name="T16">' '</text:span><text:span text:style-name="T14">;</text:span></text:p>
      <text:p text:style-name="P52"><text:span text:style-name="T13">240 <text:s/>| <text:s text:c="3"/></text:span><text:span text:style-name="T14"><text:s text:c="16"/>} </text:span><text:span text:style-name="T15">else</text:span><text:span text:style-name="T14"> {</text:span></text:p>
      <text:p text:style-name="P52"><text:span text:style-name="T13">241 <text:s/>| <text:s text:c="3"/></text:span><text:span text:style-name="T14"><text:s text:c="20"/>res_str[res_len++] = </text:span><text:span text:style-name="T16">'\n'</text:span><text:span text:style-name="T14">;</text:span></text:p>
      <text:p text:style-name="P52"><text:span text:style-name="T13">242 <text:s/>| <text:s text:c="3"/></text:span><text:span text:style-name="T14"><text:s text:c="16"/>}</text:span></text:p>
      <text:p text:style-name="P52"><text:span text:style-name="T13">243 <text:s/>| <text:s text:c="3"/></text:span><text:span text:style-name="T14"><text:s text:c="16"/>res_str[res_len] = </text:span><text:span text:style-name="T16">'\0'</text:span><text:span text:style-name="T14">;</text:span></text:p>
      <text:p text:style-name="P52"><text:span text:style-name="T13">244 <text:s/>| <text:s text:c="3"/></text:span><text:span text:style-name="T14"><text:s text:c="12"/>}</text:span></text:p>
      <text:p text:style-name="P52"><text:span text:style-name="T13">245 <text:s/>| <text:s text:c="3"/></text:span><text:span text:style-name="T14"><text:s text:c="12"/>stats-&gt;success_count++;</text:span></text:p>
      <text:p text:style-name="P52"><text:span text:style-name="T13">246 <text:s/>| <text:s text:c="3"/></text:span><text:span text:style-name="T14"><text:s text:c="12"/>*out_len = res_len;</text:span></text:p>
      <text:p text:style-name="P52"><text:span text:style-name="T13">247 <text:s/>| <text:s text:c="3"/></text:span><text:span text:style-name="T14"><text:s text:c="8"/>}</text:span></text:p>
      <text:p text:style-name="P52"><text:span text:style-name="T13">248 <text:s/>| <text:s text:c="3"/></text:span><text:span text:style-name="T14"><text:s text:c="4"/>}</text:span></text:p>
      <text:p text:style-name="P54">249 <text:s/>| <text:s text:c="3"/></text:p>
      <text:p text:style-name="P52"><text:span text:style-name="T13">250 <text:s/>| <text:s text:c="3"/></text:span><text:span text:style-name="T14"><text:s text:c="4"/>free(items);</text:span></text:p>
      <text:p text:style-name="P52"><text:span text:style-name="T13">251 <text:s/>| <text:s text:c="3"/></text:span><text:span text:style-name="T14"><text:s text:c="4"/></text:span><text:span text:style-name="T15">return</text:span><text:span text:style-name="T14"> res_str;</text:span></text:p>
      <text:p text:style-name="P55"><text:span text:style-name="T13">252 <text:s/>| <text:s text:c="3"/></text:span>}</text:p>
      <text:p text:style-name="P54">253 <text:s/>| <text:s text:c="3"/></text:p>
      <text:p text:style-name="P52"><text:span text:style-name="T13">254 <text:s/>| <text:s text:c="3"/></text:span><text:span text:style-name="T19">int</text:span><text:span text:style-name="T14"> main(</text:span><text:span text:style-name="T19">int</text:span><text:span text:style-name="T14"> argc, </text:span><text:span text:style-name="T19">char</text:span><text:span text:style-name="T14"> *argv[]) {</text:span></text:p>
      <text:p text:style-name="P52"><text:span text:style-name="T13">255 <text:s/>| <text:s text:c="3"/></text:span><text:span text:style-name="T14"><text:s text:c="4"/>debug = (getenv(</text:span><text:span text:style-name="T16">"lab3DEBUG"</text:span><text:span text:style-name="T14">) != NULL);</text:span></text:p>
      <text:p text:style-name="P54">256 <text:s/>| <text:s text:c="3"/></text:p>
      <text:p text:style-name="P52"><text:span text:style-name="T13">257 <text:s/>| <text:s text:c="3"/></text:span><text:span text:style-name="T14"><text:s text:c="4"/></text:span><text:span text:style-name="T19">int</text:span><text:span text:style-name="T14"> wait_time = 0;</text:span></text:p>
      <text:p text:style-name="P52"><text:span text:style-name="T13">258 <text:s/>| <text:s text:c="3"/></text:span><text:span text:style-name="T14"><text:s text:c="4"/></text:span><text:span text:style-name="T19">int</text:span><text:span text:style-name="T14"> is_daemon = 0;</text:span></text:p>
      <text:p text:style-name="P52"><text:span text:style-name="T13">259 <text:s/>| <text:s text:c="3"/></text:span><text:span text:style-name="T14"><text:s text:c="4"/></text:span><text:span text:style-name="T19">char</text:span><text:span text:style-name="T14"> *address = </text:span><text:span text:style-name="T16">"127.0.0.1"</text:span><text:span text:style-name="T14">;</text:span></text:p>
      <text:p text:style-name="P52"><text:span text:style-name="T13">260 <text:s/>| <text:s text:c="3"/></text:span><text:span text:style-name="T14"><text:s text:c="4"/></text:span><text:span text:style-name="T19">int</text:span><text:span text:style-name="T14"> port = 12345;</text:span></text:p>
      <text:p text:style-name="P54">261 <text:s/>| <text:s text:c="3"/></text:p>
      <text:p text:style-name="P52"><text:span text:style-name="T13">262 <text:s/>| <text:s text:c="3"/></text:span><text:span text:style-name="T14"><text:s text:c="4"/></text:span><text:span text:style-name="T19">char</text:span><text:span text:style-name="T14"> *env_address = getenv(</text:span><text:span text:style-name="T16">"lab3ADDR"</text:span><text:span text:style-name="T14">);</text:span></text:p>
      <text:p text:style-name="P52"><text:span text:style-name="T13">263 <text:s/>| <text:s text:c="3"/></text:span><text:span text:style-name="T14"><text:s text:c="4"/></text:span><text:span text:style-name="T19">char</text:span><text:span text:style-name="T14"> *env_port = getenv(</text:span><text:span text:style-name="T16">"lab3PORT"</text:span><text:span text:style-name="T14">);</text:span></text:p>
      <text:p text:style-name="P52"><text:span text:style-name="T13">264 <text:s/>| <text:s text:c="3"/></text:span><text:span text:style-name="T14"><text:s text:c="4"/></text:span><text:span text:style-name="T19">char</text:span><text:span text:style-name="T14"> *env_log = getenv(</text:span><text:span text:style-name="T16">"lab3LOGFILE"</text:span><text:span text:style-name="T14">);</text:span></text:p>
      <text:p text:style-name="P52"><text:span text:style-name="T13">265 <text:s/>| <text:s text:c="3"/></text:span><text:span text:style-name="T14"><text:s text:c="4"/></text:span><text:span text:style-name="T19">char</text:span><text:span text:style-name="T14"> *env_wait = getenv(</text:span><text:span text:style-name="T16">"lab3WAIT"</text:span><text:span text:style-name="T14">);</text:span></text:p>
      <text:p text:style-name="P54">266 <text:s/>| <text:s text:c="3"/></text:p>
      <text:p text:style-name="P52"><text:span text:style-name="T13">267 <text:s/>| <text:s text:c="3"/></text:span><text:span text:style-name="T14"><text:s text:c="4"/></text:span><text:span text:style-name="T15">if</text:span><text:span text:style-name="T14"> (env_address != NULL) address = env_address;</text:span></text:p>
      <text:p text:style-name="P52"><text:span text:style-name="T13">268 <text:s/>| <text:s text:c="3"/></text:span><text:span text:style-name="T14"><text:s text:c="4"/></text:span><text:span text:style-name="T15">if</text:span><text:span text:style-name="T14"> (env_log != NULL) log_path = env_log;</text:span></text:p>
      <text:p text:style-name="P55"><text:span text:style-name="T13">269 <text:s/>| <text:s text:c="3"/></text:span><text:s text:c="4"/></text:p>
      <text:p text:style-name="P52"><text:span text:style-name="T13">270 <text:s/>| <text:s text:c="3"/></text:span><text:span text:style-name="T14"><text:s text:c="4"/></text:span><text:span text:style-name="T15">if</text:span><text:span text:style-name="T14"> (env_port != NULL) {</text:span></text:p>
      <text:p text:style-name="P52"><text:span text:style-name="T13">271 <text:s/>| <text:s text:c="3"/></text:span><text:span text:style-name="T14"><text:s text:c="8"/></text:span><text:span text:style-name="T19">char</text:span><text:span text:style-name="T14"> *endptr;</text:span></text:p>
      <text:p text:style-name="P52"><text:span text:style-name="T13">272 <text:s/>| <text:s text:c="3"/></text:span><text:span text:style-name="T14"><text:s text:c="8"/></text:span><text:span text:style-name="T19">long</text:span><text:span text:style-name="T14"> val = strtol(env_port, &amp;endptr, 10);</text:span></text:p>
      <text:p text:style-name="P52"><text:span text:style-name="T13">273 <text:s/>| <text:s text:c="3"/></text:span><text:span text:style-name="T14"><text:s text:c="8"/></text:span><text:span text:style-name="T15">if</text:span><text:span text:style-name="T14"> (*endptr == </text:span><text:span text:style-name="T16">'\0'</text:span><text:span text:style-name="T14"> &amp;&amp; val &gt; 0 &amp;&amp; val &lt;= 65535) port = (</text:span><text:span text:style-name="T19">int</text:span><text:span text:style-name="T14">)val;</text:span></text:p>
      <text:p text:style-name="P52"><text:span text:style-name="T13">274 <text:s/>| <text:s text:c="3"/></text:span><text:span text:style-name="T14"><text:s text:c="4"/>}</text:span></text:p>
      <text:p text:style-name="P52"><text:span text:style-name="T13">275 <text:s/>| <text:s text:c="3"/></text:span><text:span text:style-name="T14"><text:s text:c="4"/></text:span><text:span text:style-name="T15">if</text:span><text:span text:style-name="T14"> (env_wait != NULL) {</text:span></text:p>
      <text:p text:style-name="P52"><text:span text:style-name="T13">276 <text:s/>| <text:s text:c="3"/></text:span><text:span text:style-name="T14"><text:s text:c="8"/></text:span><text:span text:style-name="T19">char</text:span><text:span text:style-name="T14"> *endptr;</text:span></text:p>
      <text:p text:style-name="P52"><text:span text:style-name="T13">277 <text:s/>| <text:s text:c="3"/></text:span><text:span text:style-name="T14"><text:s text:c="8"/></text:span><text:span text:style-name="T19">long</text:span><text:span text:style-name="T14"> val = strtol(env_wait, &amp;endptr, 10);</text:span></text:p>
      <text:p text:style-name="P52"><text:span text:style-name="T13">278 <text:s/>| <text:s text:c="3"/></text:span><text:span text:style-name="T14"><text:s text:c="8"/></text:span><text:span text:style-name="T15">if</text:span><text:span text:style-name="T14"> (*endptr == </text:span><text:span text:style-name="T16">'\0'</text:span><text:span text:style-name="T14"> &amp;&amp; val &gt;= 0) wait_time = (</text:span><text:span text:style-name="T19">int</text:span><text:span text:style-name="T14">)val;</text:span></text:p>
      <text:p text:style-name="P52"><text:span text:style-name="T13">279 <text:s/>| <text:s text:c="3"/></text:span><text:span text:style-name="T14"><text:s text:c="4"/>}</text:span></text:p>
      <text:p text:style-name="P54">280 <text:s/>| <text:s text:c="3"/></text:p>
      <text:p text:style-name="P52"><text:span text:style-name="T13">281 <text:s/>| <text:s text:c="3"/></text:span><text:span text:style-name="T14"><text:s text:c="4"/>stats = mmap(NULL, </text:span><text:span text:style-name="T15">sizeof</text:span><text:span text:style-name="T14">(ServerStats), PROT_READ | PROT_WRITE,</text:span></text:p>
      <text:p text:style-name="P52"><text:span text:style-name="T13">282 <text:s/>| <text:s text:c="3"/></text:span><text:span text:style-name="T14"><text:s text:c="17"/>MAP_SHARED | MAP_ANONYMOUS, -1, 0);</text:span></text:p>
      <text:p text:style-name="P52"><text:span text:style-name="T13">283 <text:s/>| <text:s text:c="3"/></text:span><text:span text:style-name="T14"><text:s text:c="4"/></text:span><text:span text:style-name="T15">if</text:span><text:span text:style-name="T14"> (stats == MAP_FAILED) {</text:span></text:p>
      <text:p text:style-name="P52"><text:span text:style-name="T13">284 <text:s/>| <text:s text:c="3"/></text:span><text:span text:style-name="T14"><text:s text:c="8"/>perror(</text:span><text:span text:style-name="T16">"mmap"</text:span><text:span text:style-name="T14">);</text:span></text:p>
      <text:p text:style-name="P52"><text:span text:style-name="T13">285 <text:s/>| <text:s text:c="3"/></text:span><text:span text:style-name="T14"><text:s text:c="8"/></text:span><text:span text:style-name="T15">return</text:span><text:span text:style-name="T14"> 1;</text:span></text:p>
      <text:p text:style-name="P52"><text:span text:style-name="T13">286 <text:s/>| <text:s text:c="3"/></text:span><text:span text:style-name="T14"><text:s text:c="4"/>}</text:span></text:p>
      <text:p text:style-name="P52"><text:span text:style-name="T13">287 <text:s/>| <text:s text:c="3"/></text:span><text:span text:style-name="T14"><text:s text:c="4"/>stats-&gt;start_time = time(NULL);</text:span></text:p>
      <text:p text:style-name="P52"><text:span text:style-name="T13">288 <text:s/>| <text:s text:c="3"/></text:span><text:span text:style-name="T14"><text:s text:c="4"/>stats-&gt;success_count = 0;</text:span></text:p>
      <text:p text:style-name="P52"><text:span text:style-name="T13">289 <text:s/>| <text:s text:c="3"/></text:span><text:span text:style-name="T14"><text:s text:c="4"/>stats-&gt;error_count = 0;</text:span></text:p>
      <text:p text:style-name="P54">290 <text:s/>| <text:s text:c="3"/></text:p>
      <text:p text:style-name="P52"><text:span text:style-name="T13">291 <text:s/>| <text:s text:c="3"/></text:span><text:span text:style-name="T14"><text:s text:c="4"/></text:span><text:span text:style-name="T15">static</text:span><text:span text:style-name="T14"> </text:span><text:span text:style-name="T15">struct</text:span><text:span text:style-name="T14"> </text:span><text:span text:style-name="T19">option</text:span><text:span text:style-name="T14"> longopts[] = {</text:span></text:p>
      <text:p text:style-name="P52"><text:span text:style-name="T13">292 <text:s/>| <text:s text:c="3"/></text:span><text:span text:style-name="T14"><text:s text:c="8"/>{</text:span><text:span text:style-name="T16">"wait"</text:span><text:span text:style-name="T14">, required_argument, NULL, </text:span><text:span text:style-name="T16">'w'</text:span><text:span text:style-name="T14">},</text:span></text:p>
      <text:p text:style-name="P52"><text:span text:style-name="T13">293 <text:s/>| <text:s text:c="3"/></text:span><text:span text:style-name="T14"><text:s text:c="8"/>{</text:span><text:span text:style-name="T16">"daemon"</text:span><text:span text:style-name="T14">, no_argument, NULL, </text:span><text:span text:style-name="T16">'d'</text:span><text:span text:style-name="T14">},</text:span></text:p>
      <text:p text:style-name="P52"><text:soft-page-break/><text:span text:style-name="T13">294 <text:s/>| <text:s text:c="3"/></text:span><text:span text:style-name="T14"><text:s text:c="8"/>{</text:span><text:span text:style-name="T16">"log"</text:span><text:span text:style-name="T14">, required_argument, NULL, </text:span><text:span text:style-name="T16">'l'</text:span><text:span text:style-name="T14">},</text:span></text:p>
      <text:p text:style-name="P52"><text:span text:style-name="T13">295 <text:s/>| <text:s text:c="3"/></text:span><text:span text:style-name="T14"><text:s text:c="8"/>{</text:span><text:span text:style-name="T16">"address"</text:span><text:span text:style-name="T14">, required_argument, NULL, </text:span><text:span text:style-name="T16">'a'</text:span><text:span text:style-name="T14">},</text:span></text:p>
      <text:p text:style-name="P52"><text:span text:style-name="T13">296 <text:s/>| <text:s text:c="3"/></text:span><text:span text:style-name="T14"><text:s text:c="8"/>{</text:span><text:span text:style-name="T16">"port"</text:span><text:span text:style-name="T14">, required_argument, NULL, </text:span><text:span text:style-name="T16">'p'</text:span><text:span text:style-name="T14">},</text:span></text:p>
      <text:p text:style-name="P52"><text:span text:style-name="T13">297 <text:s/>| <text:s text:c="3"/></text:span><text:span text:style-name="T14"><text:s text:c="8"/>{</text:span><text:span text:style-name="T16">"version"</text:span><text:span text:style-name="T14">, no_argument, NULL, </text:span><text:span text:style-name="T16">'v'</text:span><text:span text:style-name="T14">},</text:span></text:p>
      <text:p text:style-name="P52"><text:span text:style-name="T13">298 <text:s/>| <text:s text:c="3"/></text:span><text:span text:style-name="T14"><text:s text:c="8"/>{</text:span><text:span text:style-name="T16">"help"</text:span><text:span text:style-name="T14">, no_argument, NULL, </text:span><text:span text:style-name="T16">'h'</text:span><text:span text:style-name="T14">},</text:span></text:p>
      <text:p text:style-name="P52"><text:span text:style-name="T13">299 <text:s/>| <text:s text:c="3"/></text:span><text:span text:style-name="T14"><text:s text:c="8"/>{NULL, 0, NULL, 0}</text:span></text:p>
      <text:p text:style-name="P52"><text:span text:style-name="T13">300 <text:s/>| <text:s text:c="3"/></text:span><text:span text:style-name="T14"><text:s text:c="4"/>};</text:span></text:p>
      <text:p text:style-name="P54">301 <text:s/>| <text:s text:c="3"/></text:p>
      <text:p text:style-name="P52"><text:span text:style-name="T13">302 <text:s/>| <text:s text:c="3"/></text:span><text:span text:style-name="T14"><text:s text:c="4"/></text:span><text:span text:style-name="T19">char</text:span><text:span text:style-name="T14"> *author = </text:span><text:span text:style-name="T16">"Сервер: Пахомов Владимир Юрьевич, гр. N3250\nВариант: 5\n"</text:span><text:span text:style-name="T14">;</text:span></text:p>
      <text:p text:style-name="P52"><text:span text:style-name="T13">303 <text:s/>| <text:s text:c="3"/></text:span><text:span text:style-name="T14"><text:s text:c="4"/></text:span><text:span text:style-name="T19">char</text:span><text:span text:style-name="T14"> *help = </text:span><text:span text:style-name="T16">"Использование: ./lab3vypN3250_server [опции]\n"</text:span></text:p>
      <text:p text:style-name="P52"><text:span text:style-name="T13">304 <text:s/>| <text:s text:c="3"/></text:span><text:span text:style-name="T14"><text:s text:c="17"/></text:span><text:span text:style-name="T16">"Опции:\n"</text:span></text:p>
      <text:p text:style-name="P52"><text:span text:style-name="T13">305 <text:s/>| <text:s text:c="3"/></text:span><text:span text:style-name="T14"><text:s text:c="17"/></text:span><text:span text:style-name="T16">" <text:s/>-a, --address <text:s/>IP-адрес для прослушивания (по умолчанию: 127.0.0.1)\n"</text:span></text:p>
      <text:p text:style-name="P52"><text:span text:style-name="T13">306 <text:s/>| <text:s text:c="3"/></text:span><text:span text:style-name="T14"><text:s text:c="17"/></text:span><text:span text:style-name="T16">" <text:s/>-p, --port <text:s text:c="4"/>Порт для прослушивания (по умолчанию: 12345)\n"</text:span></text:p>
      <text:p text:style-name="P52"><text:span text:style-name="T13">307 <text:s/>| <text:s text:c="3"/></text:span><text:span text:style-name="T14"><text:s text:c="17"/></text:span><text:span text:style-name="T16">" <text:s/>-l, --log <text:s text:c="5"/>Путь к лог-файлу (по умолчанию: /tmp/lab3.log)\n"</text:span></text:p>
      <text:p text:style-name="P52"><text:span text:style-name="T13">308 <text:s/>| <text:s text:c="3"/></text:span><text:span text:style-name="T14"><text:s text:c="17"/></text:span><text:span text:style-name="T16">" <text:s/>-w, --wait <text:s text:c="4"/>Имитация работы (задержка N секунд)\n"</text:span></text:p>
      <text:p text:style-name="P52"><text:span text:style-name="T13">309 <text:s/>| <text:s text:c="3"/></text:span><text:span text:style-name="T14"><text:s text:c="17"/></text:span><text:span text:style-name="T16">" <text:s/>-d, --daemon <text:s text:c="2"/>Запуск в режиме демона\n"</text:span></text:p>
      <text:p text:style-name="P52"><text:span text:style-name="T13">310 <text:s/>| <text:s text:c="3"/></text:span><text:span text:style-name="T14"><text:s text:c="17"/></text:span><text:span text:style-name="T16">" <text:s/>-v, --version <text:s/>Вывод версии и информации об авторе\n"</text:span></text:p>
      <text:p text:style-name="P52"><text:span text:style-name="T13">311 <text:s/>| <text:s text:c="3"/></text:span><text:span text:style-name="T14"><text:s text:c="17"/></text:span><text:span text:style-name="T16">" <text:s/>-h, --help <text:s text:c="4"/>Вывод этой справки\n"</text:span><text:span text:style-name="T14">;</text:span></text:p>
      <text:p text:style-name="P54">312 <text:s/>| <text:s text:c="3"/></text:p>
      <text:p text:style-name="P52"><text:span text:style-name="T13">313 <text:s/>| <text:s text:c="3"/></text:span><text:span text:style-name="T14"><text:s text:c="4"/></text:span><text:span text:style-name="T19">int</text:span><text:span text:style-name="T14"> opt;</text:span></text:p>
      <text:p text:style-name="P52"><text:span text:style-name="T13">314 <text:s/>| <text:s text:c="3"/></text:span><text:span text:style-name="T14"><text:s text:c="4"/></text:span><text:span text:style-name="T15">while</text:span><text:span text:style-name="T14"> ((opt = getopt_long(argc, argv, </text:span><text:span text:style-name="T16">"w:dl:a:p:vh"</text:span><text:span text:style-name="T14">, longopts, NULL)) != -1) {</text:span></text:p>
      <text:p text:style-name="P52"><text:span text:style-name="T13">315 <text:s/>| <text:s text:c="3"/></text:span><text:span text:style-name="T14"><text:s text:c="8"/></text:span><text:span text:style-name="T15">switch</text:span><text:span text:style-name="T14"> (opt) {</text:span></text:p>
      <text:p text:style-name="P52"><text:span text:style-name="T13">316 <text:s/>| <text:s text:c="3"/></text:span><text:span text:style-name="T14"><text:s text:c="12"/></text:span><text:span text:style-name="T15">case</text:span><text:span text:style-name="T14"> </text:span><text:span text:style-name="T16">'a'</text:span><text:span text:style-name="T14">:</text:span></text:p>
      <text:p text:style-name="P52"><text:span text:style-name="T13">317 <text:s/>| <text:s text:c="3"/></text:span><text:span text:style-name="T14"><text:s text:c="16"/>address = optarg;</text:span></text:p>
      <text:p text:style-name="P52"><text:span text:style-name="T13">318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319 <text:s/>| <text:s text:c="3"/></text:span><text:span text:style-name="T14"><text:s text:c="12"/></text:span><text:span text:style-name="T15">case</text:span><text:span text:style-name="T14"> </text:span><text:span text:style-name="T16">'p'</text:span><text:span text:style-name="T14">: {</text:span></text:p>
      <text:p text:style-name="P52"><text:span text:style-name="T13">320 <text:s/>| <text:s text:c="3"/></text:span><text:span text:style-name="T14"><text:s text:c="16"/></text:span><text:span text:style-name="T19">char</text:span><text:span text:style-name="T14"> *endptr;</text:span></text:p>
      <text:p text:style-name="P52"><text:span text:style-name="T13">321 <text:s/>| <text:s text:c="3"/></text:span><text:span text:style-name="T14"><text:s text:c="16"/></text:span><text:span text:style-name="T19">long</text:span><text:span text:style-name="T14"> val = strtol(optarg, &amp;endptr, 10);</text:span></text:p>
      <text:p text:style-name="P52"><text:span text:style-name="T13">322 <text:s/>| <text:s text:c="3"/></text:span><text:span text:style-name="T14"><text:s text:c="16"/></text:span><text:span text:style-name="T15">if</text:span><text:span text:style-name="T14"> (*endptr == </text:span><text:span text:style-name="T16">'\0'</text:span><text:span text:style-name="T14"> &amp;&amp; val &gt; 0 &amp;&amp; val &lt;= 65535) port = (</text:span><text:span text:style-name="T19">int</text:span><text:span text:style-name="T14">)val;</text:span></text:p>
      <text:p text:style-name="P52"><text:span text:style-name="T13">323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324 <text:s/>| <text:s text:c="3"/></text:span><text:span text:style-name="T14"><text:s text:c="12"/>}</text:span></text:p>
      <text:p text:style-name="P52"><text:span text:style-name="T13">325 <text:s/>| <text:s text:c="3"/></text:span><text:span text:style-name="T14"><text:s text:c="12"/></text:span><text:span text:style-name="T15">case</text:span><text:span text:style-name="T14"> </text:span><text:span text:style-name="T16">'l'</text:span><text:span text:style-name="T14">:</text:span></text:p>
      <text:p text:style-name="P52"><text:span text:style-name="T13">326 <text:s/>| <text:s text:c="3"/></text:span><text:span text:style-name="T14"><text:s text:c="16"/>log_path = optarg;</text:span></text:p>
      <text:p text:style-name="P52"><text:span text:style-name="T13">327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328 <text:s/>| <text:s text:c="3"/></text:span><text:span text:style-name="T14"><text:s text:c="12"/></text:span><text:span text:style-name="T15">case</text:span><text:span text:style-name="T14"> </text:span><text:span text:style-name="T16">'w'</text:span><text:span text:style-name="T14">: {</text:span></text:p>
      <text:p text:style-name="P52"><text:span text:style-name="T13">329 <text:s/>| <text:s text:c="3"/></text:span><text:span text:style-name="T14"><text:s text:c="16"/></text:span><text:span text:style-name="T19">char</text:span><text:span text:style-name="T14"> *endptr;</text:span></text:p>
      <text:p text:style-name="P52"><text:span text:style-name="T13">330 <text:s/>| <text:s text:c="3"/></text:span><text:span text:style-name="T14"><text:s text:c="16"/></text:span><text:span text:style-name="T19">long</text:span><text:span text:style-name="T14"> val = strtol(optarg, &amp;endptr, 10);</text:span></text:p>
      <text:p text:style-name="P52"><text:span text:style-name="T13">331 <text:s/>| <text:s text:c="3"/></text:span><text:span text:style-name="T14"><text:s text:c="16"/></text:span><text:span text:style-name="T15">if</text:span><text:span text:style-name="T14"> (*endptr == </text:span><text:span text:style-name="T16">'\0'</text:span><text:span text:style-name="T14"> &amp;&amp; val &gt;= 0) wait_time = (</text:span><text:span text:style-name="T19">int</text:span><text:span text:style-name="T14">)val;</text:span></text:p>
      <text:p text:style-name="P52"><text:span text:style-name="T13">332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333 <text:s/>| <text:s text:c="3"/></text:span><text:span text:style-name="T14"><text:s text:c="12"/>}</text:span></text:p>
      <text:p text:style-name="P52"><text:span text:style-name="T13">334 <text:s/>| <text:s text:c="3"/></text:span><text:span text:style-name="T14"><text:s text:c="12"/></text:span><text:span text:style-name="T15">case</text:span><text:span text:style-name="T14"> </text:span><text:span text:style-name="T16">'d'</text:span><text:span text:style-name="T14">:</text:span></text:p>
      <text:p text:style-name="P52"><text:span text:style-name="T13">335 <text:s/>| <text:s text:c="3"/></text:span><text:span text:style-name="T14"><text:s text:c="16"/>is_daemon = 1;</text:span></text:p>
      <text:p text:style-name="P52"><text:span text:style-name="T13">336 <text:s/>| <text:s text:c="3"/></text:span><text:span text:style-name="T14"><text:s text:c="16"/></text:span><text:span text:style-name="T15">break</text:span><text:span text:style-name="T14">;</text:span></text:p>
      <text:p text:style-name="P52"><text:span text:style-name="T13">337 <text:s/>| <text:s text:c="3"/></text:span><text:span text:style-name="T14"><text:s text:c="12"/></text:span><text:span text:style-name="T15">case</text:span><text:span text:style-name="T14"> </text:span><text:span text:style-name="T16">'v'</text:span><text:span text:style-name="T14">:</text:span></text:p>
      <text:p text:style-name="P52"><text:span text:style-name="T13">338 <text:s/>| <text:s text:c="3"/></text:span><text:span text:style-name="T14"><text:s text:c="16"/>printf(</text:span><text:span text:style-name="T16">"%s"</text:span><text:span text:style-name="T14">, author);</text:span></text:p>
      <text:p text:style-name="P52"><text:span text:style-name="T13">339 <text:s/>| <text:s text:c="3"/></text:span><text:span text:style-name="T14"><text:s text:c="16"/>munmap(stats, </text:span><text:span text:style-name="T15">sizeof</text:span><text:span text:style-name="T14">(ServerStats));</text:span></text:p>
      <text:p text:style-name="P52"><text:span text:style-name="T13">340 <text:s/>| <text:s text:c="3"/></text:span><text:span text:style-name="T14"><text:s text:c="16"/></text:span><text:span text:style-name="T15">return</text:span><text:span text:style-name="T14"> 0;</text:span></text:p>
      <text:p text:style-name="P52"><text:span text:style-name="T13">341 <text:s/>| <text:s text:c="3"/></text:span><text:span text:style-name="T14"><text:s text:c="12"/></text:span><text:span text:style-name="T15">case</text:span><text:span text:style-name="T14"> </text:span><text:span text:style-name="T16">'h'</text:span><text:span text:style-name="T14">:</text:span></text:p>
      <text:p text:style-name="P52"><text:span text:style-name="T13">342 <text:s/>| <text:s text:c="3"/></text:span><text:span text:style-name="T14"><text:s text:c="16"/>printf(</text:span><text:span text:style-name="T16">"%s"</text:span><text:span text:style-name="T14">, help);</text:span></text:p>
      <text:p text:style-name="P52"><text:span text:style-name="T13">343 <text:s/>| <text:s text:c="3"/></text:span><text:span text:style-name="T14"><text:s text:c="16"/>munmap(stats, </text:span><text:span text:style-name="T15">sizeof</text:span><text:span text:style-name="T14">(ServerStats));</text:span></text:p>
      <text:p text:style-name="P52"><text:span text:style-name="T13">344 <text:s/>| <text:s text:c="3"/></text:span><text:span text:style-name="T14"><text:s text:c="16"/></text:span><text:span text:style-name="T15">return</text:span><text:span text:style-name="T14"> 0;</text:span></text:p>
      <text:p text:style-name="P52"><text:span text:style-name="T13">345 <text:s/>| <text:s text:c="3"/></text:span><text:span text:style-name="T14"><text:s text:c="12"/></text:span><text:span text:style-name="T15">default</text:span><text:span text:style-name="T14">:</text:span></text:p>
      <text:p text:style-name="P52"><text:span text:style-name="T13">346 <text:s/>| <text:s text:c="3"/></text:span><text:span text:style-name="T14"><text:s text:c="16"/>fprintf(stderr, </text:span><text:span text:style-name="T16">"%s"</text:span><text:span text:style-name="T14">, help);</text:span></text:p>
      <text:p text:style-name="P52"><text:span text:style-name="T13">347 <text:s/>| <text:s text:c="3"/></text:span><text:span text:style-name="T14"><text:s text:c="16"/>munmap(stats, </text:span><text:span text:style-name="T15">sizeof</text:span><text:span text:style-name="T14">(ServerStats));</text:span></text:p>
      <text:p text:style-name="P52"><text:span text:style-name="T13">348 <text:s/>| <text:s text:c="3"/></text:span><text:span text:style-name="T14"><text:s text:c="16"/></text:span><text:span text:style-name="T15">return</text:span><text:span text:style-name="T14"> 1;</text:span></text:p>
      <text:p text:style-name="P52"><text:span text:style-name="T13">349 <text:s/>| <text:s text:c="3"/></text:span><text:span text:style-name="T14"><text:s text:c="8"/>}</text:span></text:p>
      <text:p text:style-name="P52"><text:span text:style-name="T13">350 <text:s/>| <text:s text:c="3"/></text:span><text:span text:style-name="T14"><text:s text:c="4"/>}</text:span></text:p>
      <text:p text:style-name="P54">351 <text:s/>| <text:s text:c="3"/></text:p>
      <text:p text:style-name="P54">352 <text:s/>| <text:s text:c="3"/></text:p>
      <text:p text:style-name="P52"><text:span text:style-name="T13">353 <text:s/>| <text:s text:c="3"/></text:span><text:span text:style-name="T14"><text:s text:c="4"/></text:span><text:span text:style-name="T15">struct</text:span><text:span text:style-name="T14"> </text:span><text:span text:style-name="T19">in_addr</text:span><text:span text:style-name="T14"> test_addr;</text:span></text:p>
      <text:p text:style-name="P52"><text:span text:style-name="T13">354 <text:s/>| <text:s text:c="3"/></text:span><text:span text:style-name="T14"><text:s text:c="4"/></text:span><text:span text:style-name="T15">if</text:span><text:span text:style-name="T14"> (inet_pton(AF_INET, address, &amp;test_addr) &lt;= 0) {</text:span></text:p>
      <text:p text:style-name="P52"><text:span text:style-name="T13">355 <text:s/>| <text:s text:c="3"/></text:span><text:span text:style-name="T14"><text:s text:c="8"/>fprintf(stderr, </text:span><text:span text:style-name="T16">"Ошибка: некорректный IP-адрес '%s'\n"</text:span><text:span text:style-name="T14">, address);</text:span></text:p>
      <text:p text:style-name="P52"><text:span text:style-name="T13">356 <text:s/>| <text:s text:c="3"/></text:span><text:span text:style-name="T14"><text:s text:c="8"/></text:span><text:span text:style-name="T15">return</text:span><text:span text:style-name="T14"> 1;</text:span></text:p>
      <text:p text:style-name="P52"><text:span text:style-name="T13">357 <text:s/>| <text:s text:c="3"/></text:span><text:span text:style-name="T14"><text:s text:c="4"/>}</text:span></text:p>
      <text:p text:style-name="P54">358 <text:s/>| <text:s text:c="3"/></text:p>
      <text:p text:style-name="P52"><text:span text:style-name="T13">359 <text:s/>| <text:s text:c="3"/></text:span><text:span text:style-name="T14"><text:s text:c="4"/></text:span><text:span text:style-name="T15">if</text:span><text:span text:style-name="T14"> (is_daemon) {</text:span></text:p>
      <text:p text:style-name="P52"><text:span text:style-name="T13">360 <text:s/>| <text:s text:c="3"/></text:span><text:span text:style-name="T14"><text:s text:c="8"/>daemonize();</text:span></text:p>
      <text:p text:style-name="P52"><text:span text:style-name="T13">361 <text:s/>| <text:s text:c="3"/></text:span><text:span text:style-name="T14"><text:s text:c="4"/>}</text:span></text:p>
      <text:p text:style-name="P54">362 <text:s/>| <text:s text:c="3"/></text:p>
      <text:p text:style-name="P52"><text:span text:style-name="T13">363 <text:s/>| <text:s text:c="3"/></text:span><text:span text:style-name="T14"><text:s text:c="4"/>write_log(</text:span><text:span text:style-name="T16">"--- СЕРВЕР ЗАПУЩЕН ---"</text:span><text:span text:style-name="T14">, 0);</text:span></text:p>
      <text:p text:style-name="P52"><text:span text:style-name="T13">364 <text:s/>| <text:s text:c="3"/></text:span><text:span text:style-name="T14"><text:s text:c="4"/></text:span><text:span text:style-name="T19">char</text:span><text:span text:style-name="T14"> start_info[256];</text:span></text:p>
      <text:p text:style-name="P52"><text:span text:style-name="T13">365 <text:s/>| <text:s text:c="3"/></text:span><text:span text:style-name="T14"><text:s text:c="4"/>snprintf(start_info, </text:span><text:span text:style-name="T15">sizeof</text:span><text:span text:style-name="T14">(start_info), </text:span><text:span text:style-name="T16">"Слушаем на %s:%d, Имитация ожидания: %d сек"</text:span><text:span text:style-name="T14">, address, port, wait_time);</text:span></text:p>
      <text:p text:style-name="P52"><text:span text:style-name="T13">366 <text:s/>| <text:s text:c="3"/></text:span><text:span text:style-name="T14"><text:s text:c="4"/>write_log(start_info, 0);</text:span></text:p>
      <text:p text:style-name="P54"><text:soft-page-break/>367 <text:s/>| <text:s text:c="3"/></text:p>
      <text:p text:style-name="P52"><text:span text:style-name="T13">368 <text:s/>| <text:s text:c="3"/></text:span><text:span text:style-name="T14"><text:s text:c="4"/></text:span><text:span text:style-name="T15">struct</text:span><text:span text:style-name="T14"> </text:span><text:span text:style-name="T19">sigaction</text:span><text:span text:style-name="T14"> sa;</text:span></text:p>
      <text:p text:style-name="P52"><text:span text:style-name="T13">369 <text:s/>| <text:s text:c="3"/></text:span><text:span text:style-name="T14"><text:s text:c="4"/>memset(&amp;sa, 0, </text:span><text:span text:style-name="T15">sizeof</text:span><text:span text:style-name="T14">(sa));</text:span></text:p>
      <text:p text:style-name="P52"><text:span text:style-name="T13">370 <text:s/>| <text:s text:c="3"/></text:span><text:span text:style-name="T14"><text:s text:c="4"/>sa.sa_handler = handle_signal;</text:span></text:p>
      <text:p text:style-name="P52"><text:span text:style-name="T13">371 <text:s/>| <text:s text:c="3"/></text:span><text:span text:style-name="T14"><text:s text:c="4"/>sigemptyset(&amp;sa.sa_mask);</text:span></text:p>
      <text:p text:style-name="P55"><text:span text:style-name="T13">372 <text:s/>| <text:s text:c="3"/></text:span><text:s text:c="4"/></text:p>
      <text:p text:style-name="P52"><text:span text:style-name="T13">373 <text:s/>| <text:s text:c="3"/></text:span><text:span text:style-name="T14"><text:s text:c="4"/>sigaction(SIGINT, &amp;sa, NULL);</text:span></text:p>
      <text:p text:style-name="P52"><text:span text:style-name="T13">374 <text:s/>| <text:s text:c="3"/></text:span><text:span text:style-name="T14"><text:s text:c="4"/>sigaction(SIGTERM, &amp;sa, NULL);</text:span></text:p>
      <text:p text:style-name="P52"><text:span text:style-name="T13">375 <text:s/>| <text:s text:c="3"/></text:span><text:span text:style-name="T14"><text:s text:c="4"/>sigaction(SIGQUIT, &amp;sa, NULL);</text:span></text:p>
      <text:p text:style-name="P52"><text:span text:style-name="T13">376 <text:s/>| <text:s text:c="3"/></text:span><text:span text:style-name="T14"><text:s text:c="4"/>sigaction(SIGUSR1, &amp;sa, NULL);</text:span></text:p>
      <text:p text:style-name="P54">377 <text:s/>| <text:s text:c="3"/></text:p>
      <text:p text:style-name="P52"><text:span text:style-name="T13">378 <text:s/>| <text:s text:c="3"/></text:span><text:span text:style-name="T14"><text:s text:c="4"/></text:span><text:span text:style-name="T15">struct</text:span><text:span text:style-name="T14"> </text:span><text:span text:style-name="T19">sigaction</text:span><text:span text:style-name="T14"> sa_chld;</text:span></text:p>
      <text:p text:style-name="P52"><text:span text:style-name="T13">379 <text:s/>| <text:s text:c="3"/></text:span><text:span text:style-name="T14"><text:s text:c="4"/>memset(&amp;sa_chld, 0, </text:span><text:span text:style-name="T15">sizeof</text:span><text:span text:style-name="T14">(sa_chld));</text:span></text:p>
      <text:p text:style-name="P52"><text:span text:style-name="T13">380 <text:s/>| <text:s text:c="3"/></text:span><text:span text:style-name="T14"><text:s text:c="4"/>sa_chld.sa_handler = handle_sigchld;</text:span></text:p>
      <text:p text:style-name="P52"><text:span text:style-name="T13">381 <text:s/>| <text:s text:c="3"/></text:span><text:span text:style-name="T14"><text:s text:c="4"/>sigemptyset(&amp;sa_chld.sa_mask);</text:span></text:p>
      <text:p text:style-name="P52"><text:span text:style-name="T13">382 <text:s/>| <text:s text:c="3"/></text:span><text:span text:style-name="T14"><text:s text:c="4"/>sa_chld.sa_flags = SA_RESTART | SA_NOCLDSTOP;</text:span></text:p>
      <text:p text:style-name="P52"><text:span text:style-name="T13">383 <text:s/>| <text:s text:c="3"/></text:span><text:span text:style-name="T14"><text:s text:c="4"/>sigaction(SIGCHLD, &amp;sa_chld, NULL);</text:span></text:p>
      <text:p text:style-name="P54">384 <text:s/>| <text:s text:c="3"/></text:p>
      <text:p text:style-name="P52"><text:span text:style-name="T13">385 <text:s/>| <text:s text:c="3"/></text:span><text:span text:style-name="T14"><text:s text:c="4"/></text:span><text:span text:style-name="T19">int</text:span><text:span text:style-name="T14"> listen_fd = socket(AF_INET, SOCK_STREAM, 0);</text:span></text:p>
      <text:p text:style-name="P52"><text:span text:style-name="T13">386 <text:s/>| <text:s text:c="3"/></text:span><text:span text:style-name="T14"><text:s text:c="4"/></text:span><text:span text:style-name="T15">if</text:span><text:span text:style-name="T14"> (listen_fd &lt; 0) {</text:span></text:p>
      <text:p text:style-name="P52"><text:span text:style-name="T13">387 <text:s/>| <text:s text:c="3"/></text:span><text:span text:style-name="T14"><text:s text:c="8"/>write_log(</text:span><text:span text:style-name="T16">"Ошибка при создании сокета"</text:span><text:span text:style-name="T14">, 0);</text:span></text:p>
      <text:p text:style-name="P52"><text:span text:style-name="T13">388 <text:s/>| <text:s text:c="3"/></text:span><text:span text:style-name="T14"><text:s text:c="8"/>munmap(stats, </text:span><text:span text:style-name="T15">sizeof</text:span><text:span text:style-name="T14">(ServerStats));</text:span></text:p>
      <text:p text:style-name="P52"><text:span text:style-name="T13">389 <text:s/>| <text:s text:c="3"/></text:span><text:span text:style-name="T14"><text:s text:c="8"/></text:span><text:span text:style-name="T15">return</text:span><text:span text:style-name="T14"> 1;</text:span></text:p>
      <text:p text:style-name="P52"><text:span text:style-name="T13">390 <text:s/>| <text:s text:c="3"/></text:span><text:span text:style-name="T14"><text:s text:c="4"/>}</text:span></text:p>
      <text:p text:style-name="P54">391 <text:s/>| <text:s text:c="3"/></text:p>
      <text:p text:style-name="P52"><text:span text:style-name="T13">392 <text:s/>| <text:s text:c="3"/></text:span><text:span text:style-name="T14"><text:s text:c="4"/></text:span><text:span text:style-name="T19">int</text:span><text:span text:style-name="T14"> optval = 1;</text:span></text:p>
      <text:p text:style-name="P52"><text:span text:style-name="T13">393 <text:s/>| <text:s text:c="3"/></text:span><text:span text:style-name="T14"><text:s text:c="4"/>setsockopt(listen_fd, SOL_SOCKET, SO_REUSEADDR, &amp;optval, </text:span><text:span text:style-name="T15">sizeof</text:span><text:span text:style-name="T14">(optval));</text:span></text:p>
      <text:p text:style-name="P54">394 <text:s/>| <text:s text:c="3"/></text:p>
      <text:p text:style-name="P52"><text:span text:style-name="T13">395 <text:s/>| <text:s text:c="3"/></text:span><text:span text:style-name="T14"><text:s text:c="4"/></text:span><text:span text:style-name="T15">struct</text:span><text:span text:style-name="T14"> </text:span><text:span text:style-name="T19">sockaddr_in</text:span><text:span text:style-name="T14"> serv_addr;</text:span></text:p>
      <text:p text:style-name="P52"><text:span text:style-name="T13">396 <text:s/>| <text:s text:c="3"/></text:span><text:span text:style-name="T14"><text:s text:c="4"/>memset(&amp;serv_addr, 0, </text:span><text:span text:style-name="T15">sizeof</text:span><text:span text:style-name="T14">(serv_addr));</text:span></text:p>
      <text:p text:style-name="P52"><text:span text:style-name="T13">397 <text:s/>| <text:s text:c="3"/></text:span><text:span text:style-name="T14"><text:s text:c="4"/>serv_addr.sin_family = AF_INET;</text:span></text:p>
      <text:p text:style-name="P52"><text:span text:style-name="T13">398 <text:s/>| <text:s text:c="3"/></text:span><text:span text:style-name="T14"><text:s text:c="4"/>serv_addr.sin_port = htons(port);</text:span></text:p>
      <text:p text:style-name="P52"><text:span text:style-name="T13">399 <text:s/>| <text:s text:c="3"/></text:span><text:span text:style-name="T14"><text:s text:c="4"/>inet_pton(AF_INET, address, &amp;serv_addr.sin_addr);</text:span></text:p>
      <text:p text:style-name="P54">400 <text:s/>| <text:s text:c="3"/></text:p>
      <text:p text:style-name="P52"><text:span text:style-name="T13">401 <text:s/>| <text:s text:c="3"/></text:span><text:span text:style-name="T14"><text:s text:c="4"/></text:span><text:span text:style-name="T15">if</text:span><text:span text:style-name="T14"> (bind(listen_fd, (</text:span><text:span text:style-name="T15">struct</text:span><text:span text:style-name="T14"> </text:span><text:span text:style-name="T19">sockaddr</text:span><text:span text:style-name="T14"> *)&amp;serv_addr, </text:span><text:span text:style-name="T15">sizeof</text:span><text:span text:style-name="T14">(serv_addr)) &lt; 0) {</text:span></text:p>
      <text:p text:style-name="P52"><text:span text:style-name="T13">402 <text:s/>| <text:s text:c="3"/></text:span><text:span text:style-name="T14"><text:s text:c="8"/>perror(</text:span><text:span text:style-name="T16">"Ошибка при привязке сокета (bind)"</text:span><text:span text:style-name="T14">);</text:span></text:p>
      <text:p text:style-name="P52"><text:span text:style-name="T13">403 <text:s/>| <text:s text:c="3"/></text:span><text:span text:style-name="T14"><text:s text:c="8"/>write_log(</text:span><text:span text:style-name="T16">"Ошибка при привязке сокета (bind)"</text:span><text:span text:style-name="T14">, 0);</text:span></text:p>
      <text:p text:style-name="P52"><text:span text:style-name="T13">404 <text:s/>| <text:s text:c="3"/></text:span><text:span text:style-name="T14"><text:s text:c="8"/>close(listen_fd);</text:span></text:p>
      <text:p text:style-name="P52"><text:span text:style-name="T13">405 <text:s/>| <text:s text:c="3"/></text:span><text:span text:style-name="T14"><text:s text:c="8"/>munmap(stats, </text:span><text:span text:style-name="T15">sizeof</text:span><text:span text:style-name="T14">(ServerStats));</text:span></text:p>
      <text:p text:style-name="P52"><text:span text:style-name="T13">406 <text:s/>| <text:s text:c="3"/></text:span><text:span text:style-name="T14"><text:s text:c="8"/></text:span><text:span text:style-name="T15">return</text:span><text:span text:style-name="T14"> 1;</text:span></text:p>
      <text:p text:style-name="P52"><text:span text:style-name="T13">407 <text:s/>| <text:s text:c="3"/></text:span><text:span text:style-name="T14"><text:s text:c="4"/>}</text:span></text:p>
      <text:p text:style-name="P54">408 <text:s/>| <text:s text:c="3"/></text:p>
      <text:p text:style-name="P52"><text:span text:style-name="T13">409 <text:s/>| <text:s text:c="3"/></text:span><text:span text:style-name="T14"><text:s text:c="4"/></text:span><text:span text:style-name="T15">if</text:span><text:span text:style-name="T14"> (listen(listen_fd, 10) &lt; 0) {</text:span></text:p>
      <text:p text:style-name="P52"><text:span text:style-name="T13">410 <text:s/>| <text:s text:c="3"/></text:span><text:span text:style-name="T14"><text:s text:c="8"/>perror(</text:span><text:span text:style-name="T16">"Ошибка при вызове listen"</text:span><text:span text:style-name="T14">);</text:span></text:p>
      <text:p text:style-name="P52"><text:span text:style-name="T13">411 <text:s/>| <text:s text:c="3"/></text:span><text:span text:style-name="T14"><text:s text:c="8"/>write_log(</text:span><text:span text:style-name="T16">"Ошибка при вызове listen"</text:span><text:span text:style-name="T14">, 0);</text:span></text:p>
      <text:p text:style-name="P52"><text:span text:style-name="T13">412 <text:s/>| <text:s text:c="3"/></text:span><text:span text:style-name="T14"><text:s text:c="8"/>close(listen_fd);</text:span></text:p>
      <text:p text:style-name="P52"><text:span text:style-name="T13">413 <text:s/>| <text:s text:c="3"/></text:span><text:span text:style-name="T14"><text:s text:c="8"/>munmap(stats, </text:span><text:span text:style-name="T15">sizeof</text:span><text:span text:style-name="T14">(ServerStats));</text:span></text:p>
      <text:p text:style-name="P52"><text:span text:style-name="T13">414 <text:s/>| <text:s text:c="3"/></text:span><text:span text:style-name="T14"><text:s text:c="8"/></text:span><text:span text:style-name="T15">return</text:span><text:span text:style-name="T14"> 1;</text:span></text:p>
      <text:p text:style-name="P52"><text:span text:style-name="T13">415 <text:s/>| <text:s text:c="3"/></text:span><text:span text:style-name="T14"><text:s text:c="4"/>}</text:span></text:p>
      <text:p text:style-name="P54">416 <text:s/>| <text:s text:c="3"/></text:p>
      <text:p text:style-name="P52"><text:span text:style-name="T13">417 <text:s/>| <text:s text:c="3"/></text:span><text:span text:style-name="T14"><text:s text:c="4"/></text:span><text:span text:style-name="T15">while</text:span><text:span text:style-name="T14"> (keep_running) {</text:span></text:p>
      <text:p text:style-name="P52"><text:span text:style-name="T13">418 <text:s/>| <text:s text:c="3"/></text:span><text:span text:style-name="T14"><text:s text:c="8"/></text:span><text:span text:style-name="T15">if</text:span><text:span text:style-name="T14"> (dump_stats) {</text:span></text:p>
      <text:p text:style-name="P52"><text:span text:style-name="T13">419 <text:s/>| <text:s text:c="3"/></text:span><text:span text:style-name="T14"><text:s text:c="12"/>print_statistics();</text:span></text:p>
      <text:p text:style-name="P52"><text:span text:style-name="T13">420 <text:s/>| <text:s text:c="3"/></text:span><text:span text:style-name="T14"><text:s text:c="12"/>dump_stats = 0;</text:span></text:p>
      <text:p text:style-name="P52"><text:span text:style-name="T13">421 <text:s/>| <text:s text:c="3"/></text:span><text:span text:style-name="T14"><text:s text:c="8"/>}</text:span></text:p>
      <text:p text:style-name="P54">422 <text:s/>| <text:s text:c="3"/></text:p>
      <text:p text:style-name="P52"><text:span text:style-name="T13">423 <text:s/>| <text:s text:c="3"/></text:span><text:span text:style-name="T14"><text:s text:c="8"/></text:span><text:span text:style-name="T15">struct</text:span><text:span text:style-name="T14"> </text:span><text:span text:style-name="T19">sockaddr_in</text:span><text:span text:style-name="T14"> client_addr;</text:span></text:p>
      <text:p text:style-name="P52"><text:span text:style-name="T13">424 <text:s/>| <text:s text:c="3"/></text:span><text:span text:style-name="T14"><text:s text:c="8"/></text:span><text:span text:style-name="T19">socklen_t</text:span><text:span text:style-name="T14"> client_len = </text:span><text:span text:style-name="T15">sizeof</text:span><text:span text:style-name="T14">(client_addr);</text:span></text:p>
      <text:p text:style-name="P55"><text:span text:style-name="T13">425 <text:s/>| <text:s text:c="3"/></text:span><text:s text:c="8"/></text:p>
      <text:p text:style-name="P52"><text:span text:style-name="T13">426 <text:s/>| <text:s text:c="3"/></text:span><text:span text:style-name="T14"><text:s text:c="8"/></text:span><text:span text:style-name="T19">int</text:span><text:span text:style-name="T14"> client_fd = accept(listen_fd, (</text:span><text:span text:style-name="T15">struct</text:span><text:span text:style-name="T14"> </text:span><text:span text:style-name="T19">sockaddr</text:span><text:span text:style-name="T14"> *)&amp;client_addr, &amp;client_len);</text:span></text:p>
      <text:p text:style-name="P52"><text:span text:style-name="T13">427 <text:s/>| <text:s text:c="3"/></text:span><text:span text:style-name="T14"><text:s text:c="8"/></text:span><text:span text:style-name="T15">if</text:span><text:span text:style-name="T14"> (client_fd &lt; 0) {</text:span></text:p>
      <text:p text:style-name="P52"><text:span text:style-name="T13">428 <text:s/>| <text:s text:c="3"/></text:span><text:span text:style-name="T14"><text:s text:c="12"/></text:span><text:span text:style-name="T15">if</text:span><text:span text:style-name="T14"> (errno == EINTR) {</text:span></text:p>
      <text:p text:style-name="P52"><text:span text:style-name="T13">429 <text:s/>| <text:s text:c="3"/></text:span><text:span text:style-name="T14"><text:s text:c="16"/></text:span><text:span text:style-name="T15">continue</text:span><text:span text:style-name="T14">;</text:span></text:p>
      <text:p text:style-name="P52"><text:span text:style-name="T13">430 <text:s/>| <text:s text:c="3"/></text:span><text:span text:style-name="T14"><text:s text:c="12"/>}</text:span></text:p>
      <text:p text:style-name="P52"><text:span text:style-name="T13">431 <text:s/>| <text:s text:c="3"/></text:span><text:span text:style-name="T14"><text:s text:c="12"/>write_log(</text:span><text:span text:style-name="T16">"Ошибка при accept"</text:span><text:span text:style-name="T14">, 0);</text:span></text:p>
      <text:p text:style-name="P52"><text:span text:style-name="T13">432 <text:s/>| <text:s text:c="3"/></text:span><text:span text:style-name="T14"><text:s text:c="12"/></text:span><text:span text:style-name="T15">continue</text:span><text:span text:style-name="T14">;</text:span></text:p>
      <text:p text:style-name="P52"><text:span text:style-name="T13">433 <text:s/>| <text:s text:c="3"/></text:span><text:span text:style-name="T14"><text:s text:c="8"/>}</text:span></text:p>
      <text:p text:style-name="P54">434 <text:s/>| <text:s text:c="3"/></text:p>
      <text:p text:style-name="P52"><text:span text:style-name="T13">435 <text:s/>| <text:s text:c="3"/></text:span><text:span text:style-name="T14"><text:s text:c="8"/></text:span><text:span text:style-name="T19">char</text:span><text:span text:style-name="T14"> client_ip[INET_ADDRSTRLEN];</text:span></text:p>
      <text:p text:style-name="P52"><text:span text:style-name="T13">436 <text:s/>| <text:s text:c="3"/></text:span><text:span text:style-name="T14"><text:s text:c="8"/>inet_ntop(AF_INET, &amp;client_addr.sin_addr, client_ip, </text:span><text:span text:style-name="T15">sizeof</text:span><text:span text:style-name="T14">(client_ip));</text:span></text:p>
      <text:p text:style-name="P55"><text:span text:style-name="T13">437 <text:s/>| <text:s text:c="3"/></text:span><text:s text:c="8"/></text:p>
      <text:p text:style-name="P52"><text:span text:style-name="T13">438 <text:s/>| <text:s text:c="3"/></text:span><text:span text:style-name="T14"><text:s text:c="8"/></text:span><text:span text:style-name="T19">char</text:span><text:span text:style-name="T14"> conn_msg[128];</text:span></text:p>
      <text:p text:style-name="P52"><text:span text:style-name="T13">439 <text:s/>| <text:s text:c="3"/></text:span><text:span text:style-name="T14"><text:s text:c="8"/>snprintf(conn_msg, </text:span><text:span text:style-name="T15">sizeof</text:span><text:span text:style-name="T14">(conn_msg), </text:span><text:span text:style-name="T16">"Новое подключение с адреса: %s"</text:span><text:span text:style-name="T14">, client_ip);</text:span></text:p>
      <text:p text:style-name="P52"><text:span text:style-name="T13">440 <text:s/>| <text:s text:c="3"/></text:span><text:span text:style-name="T14"><text:s text:c="8"/>write_log(conn_msg, 0);</text:span></text:p>
      <text:p text:style-name="P54"><text:soft-page-break/>441 <text:s/>| <text:s text:c="3"/></text:p>
      <text:p text:style-name="P52"><text:span text:style-name="T13">442 <text:s/>| <text:s text:c="3"/></text:span><text:span text:style-name="T14"><text:s text:c="8"/></text:span><text:span text:style-name="T19">pid_t</text:span><text:span text:style-name="T14"> pid = fork();</text:span></text:p>
      <text:p text:style-name="P52"><text:span text:style-name="T13">443 <text:s/>| <text:s text:c="3"/></text:span><text:span text:style-name="T14"><text:s text:c="8"/></text:span><text:span text:style-name="T15">if</text:span><text:span text:style-name="T14"> (pid &lt; 0) {</text:span></text:p>
      <text:p text:style-name="P52"><text:span text:style-name="T13">444 <text:s/>| <text:s text:c="3"/></text:span><text:span text:style-name="T14"><text:s text:c="12"/>write_log(</text:span><text:span text:style-name="T16">"Ошибка при вызове fork()"</text:span><text:span text:style-name="T14">, 0);</text:span></text:p>
      <text:p text:style-name="P52"><text:span text:style-name="T13">445 <text:s/>| <text:s text:c="3"/></text:span><text:span text:style-name="T14"><text:s text:c="12"/>close(client_fd);</text:span></text:p>
      <text:p text:style-name="P52"><text:span text:style-name="T13">446 <text:s/>| <text:s text:c="3"/></text:span><text:span text:style-name="T14"><text:s text:c="8"/>} </text:span><text:span text:style-name="T15">else</text:span><text:span text:style-name="T14"> </text:span><text:span text:style-name="T15">if</text:span><text:span text:style-name="T14"> (pid == 0) {</text:span></text:p>
      <text:p text:style-name="P52"><text:span text:style-name="T13">447 <text:s/>| <text:s text:c="3"/></text:span><text:span text:style-name="T14"><text:s text:c="12"/>close(listen_fd);</text:span></text:p>
      <text:p text:style-name="P54">448 <text:s/>| <text:s text:c="3"/></text:p>
      <text:p text:style-name="P52"><text:span text:style-name="T13">449 <text:s/>| <text:s text:c="3"/></text:span><text:span text:style-name="T14"><text:s text:c="12"/></text:span><text:span text:style-name="T15">if</text:span><text:span text:style-name="T14"> (wait_time &gt; 0) {</text:span></text:p>
      <text:p text:style-name="P52"><text:span text:style-name="T13">450 <text:s/>| <text:s text:c="3"/></text:span><text:span text:style-name="T14"><text:s text:c="16"/></text:span><text:span text:style-name="T19">char</text:span><text:span text:style-name="T14"> wait_msg[128];</text:span></text:p>
      <text:p text:style-name="P52"><text:span text:style-name="T13">451 <text:s/>| <text:s text:c="3"/></text:span><text:span text:style-name="T14"><text:s text:c="16"/>snprintf(wait_msg, </text:span><text:span text:style-name="T15">sizeof</text:span><text:span text:style-name="T14">(wait_msg), </text:span><text:span text:style-name="T16">"[DEBUG] Имитация работы: задержка %d сек..."</text:span><text:span text:style-name="T14">, wait_time);</text:span></text:p>
      <text:p text:style-name="P52"><text:span text:style-name="T13">452 <text:s/>| <text:s text:c="3"/></text:span><text:span text:style-name="T14"><text:s text:c="16"/>write_log(wait_msg, 1);</text:span></text:p>
      <text:p text:style-name="P52"><text:span text:style-name="T13">453 <text:s/>| <text:s text:c="3"/></text:span><text:span text:style-name="T14"><text:s text:c="16"/>sleep(wait_time);</text:span></text:p>
      <text:p text:style-name="P52"><text:span text:style-name="T13">454 <text:s/>| <text:s text:c="3"/></text:span><text:span text:style-name="T14"><text:s text:c="12"/>}</text:span></text:p>
      <text:p text:style-name="P54">455 <text:s/>| <text:s text:c="3"/></text:p>
      <text:p text:style-name="P52"><text:span text:style-name="T13">456 <text:s/>| <text:s text:c="3"/></text:span><text:span text:style-name="T14"><text:s text:c="12"/></text:span><text:span text:style-name="T19">size_t</text:span><text:span text:style-name="T14"> req_cap = 128;</text:span></text:p>
      <text:p text:style-name="P52"><text:span text:style-name="T13">457 <text:s/>| <text:s text:c="3"/></text:span><text:span text:style-name="T14"><text:s text:c="12"/></text:span><text:span text:style-name="T19">size_t</text:span><text:span text:style-name="T14"> req_len = 0;</text:span></text:p>
      <text:p text:style-name="P52"><text:span text:style-name="T13">458 <text:s/>| <text:s text:c="3"/></text:span><text:span text:style-name="T14"><text:s text:c="12"/></text:span><text:span text:style-name="T19">char</text:span><text:span text:style-name="T14"> *request = malloc(req_cap);</text:span></text:p>
      <text:p text:style-name="P52"><text:span text:style-name="T13">459 <text:s/>| <text:s text:c="3"/></text:span><text:span text:style-name="T14"><text:s text:c="12"/></text:span><text:span text:style-name="T15">if</text:span><text:span text:style-name="T14"> (!request) {</text:span></text:p>
      <text:p text:style-name="P52"><text:span text:style-name="T13">460 <text:s/>| <text:s text:c="3"/></text:span><text:span text:style-name="T14"><text:s text:c="16"/>close(client_fd);</text:span></text:p>
      <text:p text:style-name="P52"><text:span text:style-name="T13">461 <text:s/>| <text:s text:c="3"/></text:span><text:span text:style-name="T14"><text:s text:c="16"/>exit(EXIT_FAILURE);</text:span></text:p>
      <text:p text:style-name="P52"><text:span text:style-name="T13">462 <text:s/>| <text:s text:c="3"/></text:span><text:span text:style-name="T14"><text:s text:c="12"/>}</text:span></text:p>
      <text:p text:style-name="P54">463 <text:s/>| <text:s text:c="3"/></text:p>
      <text:p text:style-name="P52"><text:span text:style-name="T13">464 <text:s/>| <text:s text:c="3"/></text:span><text:span text:style-name="T14"><text:s text:c="12"/></text:span><text:span text:style-name="T15">while</text:span><text:span text:style-name="T14"> (1) {</text:span></text:p>
      <text:p text:style-name="P52"><text:span text:style-name="T13">465 <text:s/>| <text:s text:c="3"/></text:span><text:span text:style-name="T14"><text:s text:c="16"/></text:span><text:span text:style-name="T15">if</text:span><text:span text:style-name="T14"> (req_len + 64 &gt;= req_cap) {</text:span></text:p>
      <text:p text:style-name="P52"><text:span text:style-name="T13">466 <text:s/>| <text:s text:c="3"/></text:span><text:span text:style-name="T14"><text:s text:c="20"/>req_cap *= 2;</text:span></text:p>
      <text:p text:style-name="P52"><text:span text:style-name="T13">467 <text:s/>| <text:s text:c="3"/></text:span><text:span text:style-name="T14"><text:s text:c="20"/></text:span><text:span text:style-name="T19">char</text:span><text:span text:style-name="T14"> *temp = realloc(request, req_cap);</text:span></text:p>
      <text:p text:style-name="P52"><text:span text:style-name="T13">468 <text:s/>| <text:s text:c="3"/></text:span><text:span text:style-name="T14"><text:s text:c="20"/></text:span><text:span text:style-name="T15">if</text:span><text:span text:style-name="T14"> (!temp) </text:span><text:span text:style-name="T15">break</text:span><text:span text:style-name="T14">;</text:span></text:p>
      <text:p text:style-name="P52"><text:span text:style-name="T13">469 <text:s/>| <text:s text:c="3"/></text:span><text:span text:style-name="T14"><text:s text:c="20"/>request = temp;</text:span></text:p>
      <text:p text:style-name="P52"><text:span text:style-name="T13">470 <text:s/>| <text:s text:c="3"/></text:span><text:span text:style-name="T14"><text:s text:c="16"/>}</text:span></text:p>
      <text:p text:style-name="P52"><text:span text:style-name="T13">471 <text:s/>| <text:s text:c="3"/></text:span><text:span text:style-name="T14"><text:s text:c="16"/></text:span><text:span text:style-name="T19">ssize_t</text:span><text:span text:style-name="T14"> n = read(client_fd, request + req_len, 64);</text:span></text:p>
      <text:p text:style-name="P52"><text:span text:style-name="T13">472 <text:s/>| <text:s text:c="3"/></text:span><text:span text:style-name="T14"><text:s text:c="16"/></text:span><text:span text:style-name="T15">if</text:span><text:span text:style-name="T14"> (n &lt;= 0) </text:span><text:span text:style-name="T15">break</text:span><text:span text:style-name="T14">;</text:span></text:p>
      <text:p text:style-name="P52"><text:span text:style-name="T13">473 <text:s/>| <text:s text:c="3"/></text:span><text:span text:style-name="T14"><text:s text:c="16"/>req_len += n;</text:span></text:p>
      <text:p text:style-name="P52"><text:span text:style-name="T13">474 <text:s/>| <text:s text:c="3"/></text:span><text:span text:style-name="T14"><text:s text:c="12"/>}</text:span></text:p>
      <text:p text:style-name="P52"><text:span text:style-name="T13">475 <text:s/>| <text:s text:c="3"/></text:span><text:span text:style-name="T14"><text:s text:c="12"/>request[req_len] = </text:span><text:span text:style-name="T16">'\0'</text:span><text:span text:style-name="T14">;</text:span></text:p>
      <text:p text:style-name="P54">476 <text:s/>| <text:s text:c="3"/></text:p>
      <text:p text:style-name="P52"><text:span text:style-name="T13">477 <text:s/>| <text:s text:c="3"/></text:span><text:span text:style-name="T14"><text:s text:c="12"/></text:span><text:span text:style-name="T19">char</text:span><text:span text:style-name="T14"> req_log[256];</text:span></text:p>
      <text:p text:style-name="P52"><text:span text:style-name="T13">478 <text:s/>| <text:s text:c="3"/></text:span><text:span text:style-name="T14"><text:s text:c="12"/>snprintf(req_log, </text:span><text:span text:style-name="T15">sizeof</text:span><text:span text:style-name="T14">(req_log), </text:span><text:span text:style-name="T16">"Получен запрос от %s: %s"</text:span><text:span text:style-name="T14">, client_ip, request);</text:span></text:p>
      <text:p text:style-name="P52"><text:span text:style-name="T13">479 <text:s/>| <text:s text:c="3"/></text:span><text:span text:style-name="T14"><text:s text:c="12"/>write_log(req_log, 1);</text:span></text:p>
      <text:p text:style-name="P54">480 <text:s/>| <text:s text:c="3"/></text:p>
      <text:p text:style-name="P52"><text:span text:style-name="T13">481 <text:s/>| <text:s text:c="3"/></text:span><text:span text:style-name="T14"><text:s text:c="12"/></text:span><text:span text:style-name="T19">size_t</text:span><text:span text:style-name="T14"> res_len = 0;</text:span></text:p>
      <text:p text:style-name="P52"><text:span text:style-name="T13">482 <text:s/>| <text:s text:c="3"/></text:span><text:span text:style-name="T14"><text:s text:c="12"/></text:span><text:span text:style-name="T19">char</text:span><text:span text:style-name="T14"> *response = process_request(request, &amp;res_len);</text:span></text:p>
      <text:p text:style-name="P54">483 <text:s/>| <text:s text:c="3"/></text:p>
      <text:p text:style-name="P52"><text:span text:style-name="T13">484 <text:s/>| <text:s text:c="3"/></text:span><text:span text:style-name="T14"><text:s text:c="12"/></text:span><text:span text:style-name="T15">if</text:span><text:span text:style-name="T14"> (response) {</text:span></text:p>
      <text:p text:style-name="P52"><text:span text:style-name="T13">485 <text:s/>| <text:s text:c="3"/></text:span><text:span text:style-name="T14"><text:s text:c="16"/>write(client_fd, response, res_len);</text:span></text:p>
      <text:p text:style-name="P52"><text:span text:style-name="T13">486 <text:s/>| <text:s text:c="3"/></text:span><text:span text:style-name="T14"><text:s text:c="16"/>free(response);</text:span></text:p>
      <text:p text:style-name="P52"><text:span text:style-name="T13">487 <text:s/>| <text:s text:c="3"/></text:span><text:span text:style-name="T14"><text:s text:c="12"/>}</text:span></text:p>
      <text:p text:style-name="P54">488 <text:s/>| <text:s text:c="3"/></text:p>
      <text:p text:style-name="P52"><text:span text:style-name="T13">489 <text:s/>| <text:s text:c="3"/></text:span><text:span text:style-name="T14"><text:s text:c="12"/>free(request);</text:span></text:p>
      <text:p text:style-name="P52"><text:span text:style-name="T13">490 <text:s/>| <text:s text:c="3"/></text:span><text:span text:style-name="T14"><text:s text:c="12"/>close(client_fd);</text:span></text:p>
      <text:p text:style-name="P54">491 <text:s/>| <text:s text:c="3"/></text:p>
      <text:p text:style-name="P52"><text:span text:style-name="T13">492 <text:s/>| <text:s text:c="3"/></text:span><text:span text:style-name="T14"><text:s text:c="12"/></text:span><text:span text:style-name="T19">char</text:span><text:span text:style-name="T14"> dis_msg[128];</text:span></text:p>
      <text:p text:style-name="P52"><text:span text:style-name="T13">493 <text:s/>| <text:s text:c="3"/></text:span><text:span text:style-name="T14"><text:s text:c="12"/>snprintf(dis_msg, </text:span><text:span text:style-name="T15">sizeof</text:span><text:span text:style-name="T14">(dis_msg), </text:span><text:span text:style-name="T16">"Завершено обслуживание запроса от %s"</text:span><text:span text:style-name="T14">, client_ip);</text:span></text:p>
      <text:p text:style-name="P52"><text:span text:style-name="T13">494 <text:s/>| <text:s text:c="3"/></text:span><text:span text:style-name="T14"><text:s text:c="12"/>write_log(dis_msg, 0);</text:span></text:p>
      <text:p text:style-name="P54">495 <text:s/>| <text:s text:c="3"/></text:p>
      <text:p text:style-name="P52"><text:span text:style-name="T13">496 <text:s/>| <text:s text:c="3"/></text:span><text:span text:style-name="T14"><text:s text:c="12"/>exit(EXIT_SUCCESS);</text:span></text:p>
      <text:p text:style-name="P52"><text:span text:style-name="T13">497 <text:s/>| <text:s text:c="3"/></text:span><text:span text:style-name="T14"><text:s text:c="8"/>} </text:span><text:span text:style-name="T15">else</text:span><text:span text:style-name="T14"> {</text:span></text:p>
      <text:p text:style-name="P52"><text:span text:style-name="T13">498 <text:s/>| <text:s text:c="3"/></text:span><text:span text:style-name="T14"><text:s text:c="12"/>close(client_fd);</text:span></text:p>
      <text:p text:style-name="P52"><text:span text:style-name="T13">499 <text:s/>| <text:s text:c="3"/></text:span><text:span text:style-name="T14"><text:s text:c="8"/>}</text:span></text:p>
      <text:p text:style-name="P52"><text:span text:style-name="T13">500 <text:s/>| <text:s text:c="3"/></text:span><text:span text:style-name="T14"><text:s text:c="4"/>}</text:span></text:p>
      <text:p text:style-name="P54">501 <text:s/>| <text:s text:c="3"/></text:p>
      <text:p text:style-name="P52"><text:span text:style-name="T13">502 <text:s/>| <text:s text:c="3"/></text:span><text:span text:style-name="T14"><text:s text:c="4"/>write_log(</text:span><text:span text:style-name="T16">"--- СЕРВЕР ЗАВЕРШАЕТ РАБОТУ ---"</text:span><text:span text:style-name="T14">, 0);</text:span></text:p>
      <text:p text:style-name="P52"><text:span text:style-name="T13">503 <text:s/>| <text:s text:c="3"/></text:span><text:span text:style-name="T14"><text:s text:c="4"/>print_statistics();</text:span></text:p>
      <text:p text:style-name="P54">504 <text:s/>| <text:s text:c="3"/></text:p>
      <text:p text:style-name="P52"><text:span text:style-name="T13">505 <text:s/>| <text:s text:c="3"/></text:span><text:span text:style-name="T14"><text:s text:c="4"/>close(listen_fd);</text:span></text:p>
      <text:p text:style-name="P52"><text:span text:style-name="T13">506 <text:s/>| <text:s text:c="3"/></text:span><text:span text:style-name="T14"><text:s text:c="4"/>munmap(stats, </text:span><text:span text:style-name="T15">sizeof</text:span><text:span text:style-name="T14">(ServerStats));</text:span></text:p>
      <text:p text:style-name="P54">507 <text:s/>| <text:s text:c="3"/></text:p>
      <text:p text:style-name="P52"><text:span text:style-name="T13">508 <text:s/>| <text:s text:c="3"/></text:span><text:span text:style-name="T14"><text:s text:c="4"/></text:span><text:span text:style-name="T15">return</text:span><text:span text:style-name="T14"> 0;</text:span></text:p>
      <text:p text:style-name="P55"><text:span text:style-name="T13">509 <text:s/>| <text:s text:c="3"/></text:span>}</text:p>
      <text:p text:style-name="P56"/>
      <text:p text:style-name="P56"><text:soft-page-break/></text:p>
      <text:p text:style-name="P57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24T22:48:40.639400777</dc:date>
    <meta:editing-duration>PT8H23M51S</meta:editing-duration>
    <meta:editing-cycles>28</meta:editing-cycles>
    <meta:generator>LibreOffice/26.2.3.2$Linux_X86_64 LibreOffice_project/620$Build-2</meta:generator>
    <meta:document-statistic meta:table-count="4" meta:image-count="4" meta:object-count="0" meta:page-count="21" meta:paragraph-count="982" meta:word-count="4835" meta:character-count="36620" meta:non-whitespace-character-count="22948"/>
  </office:meta>
</office:document-meta>
</file>