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7000002202B2E8A91.png" manifest:media-type="image/png"/>
  <manifest:file-entry manifest:full-path="Pictures/100000010000029E0000022A4A676D58.png" manifest:media-type="image/png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6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ddbd4" officeooo:paragraph-rsid="001ddbd4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fb6cf" officeooo:paragraph-rsid="001fb6cf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1fb6cf" officeooo:paragraph-rsid="001fb6cf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0f2314" officeooo:paragraph-rsid="001fb6cf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rsid="001fb6cf" officeooo:paragraph-rsid="001fb6cf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fo:background-color="transparent"/>
      <style:text-properties officeooo:paragraph-rsid="001fb6cf"/>
    </style:style>
    <style:style style:name="P20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21" style:family="paragraph" style:parent-style-name="Text_20_body">
      <style:paragraph-properties fo:margin-top="0cm" fo:margin-bottom="0.25cm" style:contextual-spacing="false" fo:line-height="150%" fo:text-align="left" style:justify-single-word="false" fo:break-before="page"/>
      <style:text-properties officeooo:paragraph-rsid="000f2314"/>
    </style:style>
    <style:style style:name="P2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0f2314" officeooo:paragraph-rsid="000f2314" style:font-weight-asian="bold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2074ab" officeooo:paragraph-rsid="002074ab"/>
    </style:style>
    <style:style style:name="P24" style:family="paragraph" style:parent-style-name="Text_20_body">
      <loext:graphic-properties draw:fill="none"/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074ab" officeooo:paragraph-rsid="002074ab" fo:background-color="transparent" style:font-size-asian="8pt" style:font-size-complex="8pt"/>
    </style:style>
    <style:style style:name="P25" style:family="paragraph" style:parent-style-name="Text_20_body">
      <loext:graphic-properties draw:fill="none"/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074ab" officeooo:paragraph-rsid="002074ab" fo:background-color="transparent" style:font-size-asian="8pt" style:font-size-complex="8pt"/>
    </style:style>
    <style:style style:name="P26" style:family="paragraph" style:parent-style-name="Text_20_body">
      <loext:graphic-properties draw:fill="none"/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8pt" fo:language="zxx" fo:country="none" fo:font-style="normal" style:text-underline-style="none" fo:font-weight="normal" officeooo:rsid="002074ab" officeooo:paragraph-rsid="002074ab" fo:background-color="transparent" style:font-size-asian="8pt" style:font-size-complex="8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074ab" officeooo:paragraph-rsid="002074ab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8pt" officeooo:rsid="002074ab" officeooo:paragraph-rsid="002074ab" style:font-size-asian="8pt" style:font-size-complex="8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2074ab" officeooo:paragraph-rsid="002074ab"/>
    </style:style>
    <style:style style:name="P30" style:family="paragraph" style:parent-style-name="Рисунок">
      <style:paragraph-properties fo:text-align="center" style:justify-single-word="false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231fa8" officeooo:paragraph-rsid="00231fa8"/>
    </style:style>
    <style:style style:name="P32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style:use-window-font-color="true" loext:opacity="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33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8000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34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00ff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35" style:family="paragraph" style:parent-style-name="Text_20_body">
      <loext:graphic-properties draw:fill="none"/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fo:color="#000000" loext:opacity="100%" style:font-name="Liberation Mono" fo:font-size="8pt" fo:language="zxx" fo:country="none" fo:font-style="normal" style:text-underline-style="none" fo:font-weight="normal" officeooo:rsid="00231fa8" officeooo:paragraph-rsid="00231fa8" fo:background-color="transparent" style:font-size-asian="8pt" style:font-size-complex="8p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31fa8" officeooo:paragraph-rsid="00231f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dbd4"/>
    </style:style>
    <style:style style:name="T3" style:family="text">
      <style:text-properties officeooo:rsid="000ca6c1"/>
    </style:style>
    <style:style style:name="T4" style:family="text">
      <style:text-properties officeooo:rsid="0016960e"/>
    </style:style>
    <style:style style:name="T5" style:family="text">
      <style:text-properties officeooo:rsid="001fb6c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8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a31515" loext:opacity="100%"/>
    </style:style>
    <style:style style:name="T11" style:family="text">
      <style:text-properties fo:color="#2b91af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Основы системного программирования</text:span>»</text:p>
      <text:p text:style-name="P3"/>
      <text:p text:style-name="P3"/>
      <text:p text:style-name="P3">ОТЧЕТ ПО ЛАБОРАТОРНОЙ РАБОТЕ <text:span text:style-name="T3">№</text:span>1</text:p>
      <text:p text:style-name="P3">«<text:span text:style-name="T2">Работа с файлами и каталогами</text:span>»</text:p>
      <text:p text:style-name="P3"/>
      <text:p text:style-name="P5">Выполнил:</text:p>
      <text:p text:style-name="P5">Пахомов Владимир Юрьевич, студент группы N3250</text:p>
      <text:p text:style-name="P6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6">________________</text:p>
      <text:p text:style-name="P7">(подпись) <text:s text:c="8"/></text:p>
      <text:p text:style-name="P5"/>
      <text:p text:style-name="P5">Проверил:</text:p>
      <text:p text:style-name="P8">Грозов Владимир Андреевич</text:p>
      <text:p text:style-name="P9"/>
      <text:p text:style-name="P10">_____________________</text:p>
      <text:p text:style-name="P7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4">6</text:span>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ВВЕДЕНИЕ" text:style-name="Index_20_Link" text:visited-style-name="Index_20_Link">ВВЕДЕНИЕ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3</text:a></text:p>
        </text:index-body>
      </text:table-of-content>
      <text:p text:style-name="P13"/>
      <text:h text:style-name="P15" text:outline-level="1"><text:bookmark-start text:name="__RefHeading___Toc82_2058273410"/>ЗАДАНИЕ. ВАРИАНТ 1<text:bookmark-end text:name="__RefHeading___Toc82_2058273410"/></text:h>
      <text:p text:style-name="P16">Таблица 1:</text:p>
      <text:p text:style-name="P17">-v, --version<text:span text:style-name="T5"> - </text:span>Вывод версии программы и информации о программе (ФИО<text:span text:style-name="T5"> </text:span>исполнителя, номер группы, номер варианта лабораторной).</text:p>
      <text:p text:style-name="P17">-h, --help<text:span text:style-name="T5"> - </text:span><text:s/>Вывод справки по опциям.</text:p>
      <text:p text:style-name="P17"/>
      <text:p text:style-name="P18">Таблица 2:</text:p>
      <text:p text:style-name="P18">LAB1DEBUG - Включение вывода отладочной информации.</text:p>
      <text:p text:style-name="P18"/>
      <text:p text:style-name="P18">Таблица 3:</text:p>
      <text:p text:style-name="P18">Количество букв в <text:span text:style-name="T6">фамилии</text:span> студента, выполняющего работу, <text:span text:style-name="T6">нечетное</text:span>.</text:p>
      <text:p text:style-name="P18">Выполняется поиск заданной последовательности байтов. Аргумент цель_поиска имеет формат 0xhh[hh*], где hh — две шестнадцатеричных цифры (число должно начинаться префикса 0x).</text:p>
      <text:p text:style-name="P18">Пример запуска программы:</text:p>
      <text:p text:style-name="P18">./lab1psiN32451 /home 0xc0ffee</text:p>
      <text:p text:style-name="P17">(open/getdents64, без рекурсии, поиск HEX в формате 0xhh[hh*])</text:p>
      <text:p text:style-name="P19"/>
      <text:p text:style-name="P18">Таблица 4:</text:p>
      <text:p text:style-name="P18">Вариант 1 - open()/getdents64() без рекурсии</text:p>
      <text:p text:style-name="P20"/>
      <text:p text:style-name="P21"/>
      <text:h text:style-name="P22" text:outline-level="1"><text:bookmark-start text:name="__RefHeading___Toc143_2058273410"/>ХОД РАБОТЫ<text:bookmark-end text:name="__RefHeading___Toc143_2058273410"/></text:h>
      <text:p text:style-name="P23">Исходный код Makefile:</text:p>
      <text:p text:style-name="P24"><text:span text:style-name="T7"><text:s/>1 <text:s/>| <text:s text:c="3"/></text:span><text:span text:style-name="T8">CC = gcc</text:span></text:p>
      <text:p text:style-name="P24"><text:span text:style-name="T7"><text:s/>2 <text:s/>| <text:s text:c="3"/></text:span><text:span text:style-name="T8">CFLAGS = -O3 -Wall -Wextra -Werror -fanalyzer</text:span></text:p>
      <text:p text:style-name="P24"><text:span text:style-name="T7"><text:s/>3 <text:s/>| <text:s text:c="3"/></text:span><text:span text:style-name="T8">TARGET = lab1vypN3250</text:span></text:p>
      <text:p text:style-name="P25"><text:s/>4 <text:s/>| <text:s text:c="3"/></text:p>
      <text:p text:style-name="P24"><text:span text:style-name="T7"><text:s/>5 <text:s/>| <text:s text:c="3"/></text:span><text:span text:style-name="T8">all: </text:span><text:span text:style-name="T9">$(</text:span><text:span text:style-name="T8">TARGET</text:span><text:span text:style-name="T9">)</text:span></text:p>
      <text:p text:style-name="P25"><text:s/>6 <text:s/>| <text:s text:c="3"/></text:p>
      <text:p text:style-name="P24"><text:span text:style-name="T7"><text:s/>7 <text:s/>| <text:s text:c="3"/></text:span><text:span text:style-name="T8">$(TARGET): lab1vypN3250.c</text:span></text:p>
      <text:p text:style-name="P24"><text:span text:style-name="T7"><text:s/>8 <text:s/>| <text:s text:c="3"/></text:span><text:span text:style-name="T8"><text:tab/></text:span><text:span text:style-name="T9">$(</text:span><text:span text:style-name="T8">CC</text:span><text:span text:style-name="T9">)</text:span><text:span text:style-name="T8"> </text:span><text:span text:style-name="T9">$(</text:span><text:span text:style-name="T8">CFLAGS</text:span><text:span text:style-name="T9">)</text:span><text:span text:style-name="T8"> </text:span><text:span text:style-name="T9">$(</text:span><text:span text:style-name="T8">TARGET</text:span><text:span text:style-name="T9">)</text:span><text:span text:style-name="T8">.c -o </text:span><text:span text:style-name="T9">$(</text:span><text:span text:style-name="T8">TARGET</text:span><text:span text:style-name="T9">)</text:span></text:p>
      <text:p text:style-name="P25"><text:s/>9 <text:s/>| <text:s text:c="3"/></text:p>
      <text:p text:style-name="P24"><text:span text:style-name="T7">10 <text:s/>| <text:s text:c="3"/></text:span><text:span text:style-name="T8">clean:</text:span></text:p>
      <text:p text:style-name="P24"><text:span text:style-name="T7">11 <text:s/>| <text:s text:c="3"/></text:span><text:span text:style-name="T8"><text:tab/>rm -f </text:span><text:span text:style-name="T9">$(</text:span><text:span text:style-name="T8">TARGET</text:span><text:span text:style-name="T9">)</text:span></text:p>
      <text:p text:style-name="P24"><text:span text:style-name="T7">12 <text:s/>| <text:s text:c="3"/></text:span><text:span text:style-name="T8"><text:tab/>rm -rf test</text:span></text:p>
      <text:p text:style-name="P25">13 <text:s/>| <text:s text:c="3"/></text:p>
      <text:p text:style-name="P25">14 <text:s/>| <text:s text:c="3"/></text:p>
      <text:p text:style-name="P24"><text:span text:style-name="T7">15 <text:s/>| <text:s text:c="3"/></text:span><text:span text:style-name="T8">test: all</text:span></text:p>
      <text:p text:style-name="P24"><text:span text:style-name="T7">16 <text:s/>| <text:s text:c="3"/></text:span><text:span text:style-name="T8"><text:tab/>@echo </text:span><text:span text:style-name="T10">"--- Подготовка тестового дерева ---"</text:span></text:p>
      <text:p text:style-name="P24"><text:span text:style-name="T7">17 <text:s/>| <text:s text:c="3"/></text:span><text:span text:style-name="T8"><text:tab/>@rm -rf test &amp;&amp; mkdir -p test/dir1/subdir test/dir2 test/empty_dir</text:span></text:p>
      <text:p text:style-name="P25">18 <text:s/>| <text:s text:c="3"/><text:tab/>@# Создаем файлы с тестовыми данными</text:p>
      <text:p text:style-name="P24"><text:span text:style-name="T7">19 <text:s/>| <text:s text:c="3"/></text:span><text:span text:style-name="T8"><text:tab/>@printf </text:span><text:span text:style-name="T10">"\xDE\xAD\xBE\xEF"</text:span><text:span text:style-name="T8"> &gt; test/dir1/hit1.bin</text:span></text:p>
      <text:p text:style-name="P24"><text:span text:style-name="T7">20 <text:s/>| <text:s text:c="3"/></text:span><text:span text:style-name="T8"><text:tab/>@printf </text:span><text:span text:style-name="T10">"Обычный текст с \xCA\xFE\xBA\xBE внутри"</text:span><text:span text:style-name="T8"> &gt; test/dir1/subdir/hit2.txt</text:span></text:p>
      <text:p text:style-name="P24"><text:span text:style-name="T7">21 <text:s/>| <text:s text:c="3"/></text:span><text:span text:style-name="T8"><text:tab/>@printf </text:span><text:span text:style-name="T10">"\xDE\xAD\xBE\xEF и еще раз \xDE\xAD\xBE\xEF"</text:span><text:span text:style-name="T8"> &gt; test/dir2/multiple.bin</text:span></text:p>
      <text:p text:style-name="P24"><text:span text:style-name="T7">22 <text:s/>| <text:s text:c="3"/></text:span><text:span text:style-name="T8"><text:tab/>@touch test/empty.file</text:span></text:p>
      <text:p text:style-name="P24"><text:span text:style-name="T7">23 <text:s/>| <text:s text:c="3"/></text:span><text:span text:style-name="T8"><text:tab/>@echo </text:span><text:span text:style-name="T10">"Просто текст без совпадений"</text:span><text:span text:style-name="T8"> &gt; test/no_match.txt</text:span></text:p>
      <text:p text:style-name="P25">24 <text:s/>| <text:s text:c="3"/></text:p>
      <text:p text:style-name="P24"><text:span text:style-name="T7">25 <text:s/>| <text:s text:c="3"/></text:span><text:span text:style-name="T8"><text:tab/>@echo </text:span><text:span text:style-name="T10">""</text:span></text:p>
      <text:p text:style-name="P24"><text:span text:style-name="T7">26 <text:s/>| <text:s text:c="3"/></text:span><text:span text:style-name="T8"><text:tab/>@echo </text:span><text:span text:style-name="T10">"--- Тест 1: Базовый поиск ---"</text:span></text:p>
      <text:p text:style-name="P24"><text:span text:style-name="T7">27 <text:s/>| <text:s text:c="3"/></text:span><text:span text:style-name="T8"><text:tab/>./</text:span><text:span text:style-name="T9">$(</text:span><text:span text:style-name="T8">TARGET</text:span><text:span text:style-name="T9">)</text:span><text:span text:style-name="T8"> test 0xcafebabe</text:span></text:p>
      <text:p text:style-name="P26"><text:span text:style-name="T7">28 <text:s/>| <text:s text:c="3"/></text:span><text:tab/></text:p>
      <text:p text:style-name="P24"><text:span text:style-name="T7">29 <text:s/>| <text:s text:c="3"/></text:span><text:span text:style-name="T8"><text:tab/>@echo </text:span><text:span text:style-name="T10">""</text:span></text:p>
      <text:p text:style-name="P24"><text:span text:style-name="T7">30 <text:s/>| <text:s text:c="3"/></text:span><text:span text:style-name="T8"><text:tab/>@echo </text:span><text:span text:style-name="T10">"--- Тест 2: Поиск в глубоких подкаталогах ---"</text:span></text:p>
      <text:p text:style-name="P24"><text:span text:style-name="T7">31 <text:s/>| <text:s text:c="3"/></text:span><text:span text:style-name="T8"><text:tab/>./</text:span><text:span text:style-name="T9">$(</text:span><text:span text:style-name="T8">TARGET</text:span><text:span text:style-name="T9">)</text:span><text:span text:style-name="T8"> test 0xdeadbeef</text:span></text:p>
      <text:p text:style-name="P26"><text:span text:style-name="T7">32 <text:s/>| <text:s text:c="3"/></text:span><text:tab/></text:p>
      <text:p text:style-name="P24"><text:span text:style-name="T7">33 <text:s/>| <text:s text:c="3"/></text:span><text:span text:style-name="T8"><text:tab/>@echo </text:span><text:span text:style-name="T10">""</text:span></text:p>
      <text:p text:style-name="P24"><text:span text:style-name="T7">34 <text:s/>| <text:s text:c="3"/></text:span><text:span text:style-name="T8"><text:tab/>@echo </text:span><text:span text:style-name="T10">"--- Тест 3: Режим отладки (LAB1DEBUG) ---"</text:span></text:p>
      <text:p text:style-name="P24"><text:span text:style-name="T7">35 <text:s/>| <text:s text:c="3"/></text:span><text:span text:style-name="T8"><text:tab/>LAB1DEBUG=1 ./</text:span><text:span text:style-name="T9">$(</text:span><text:span text:style-name="T8">TARGET</text:span><text:span text:style-name="T9">)</text:span><text:span text:style-name="T8"> test/dir2 0xdeadbeef</text:span></text:p>
      <text:p text:style-name="P26"><text:span text:style-name="T7">36 <text:s/>| <text:s text:c="3"/></text:span><text:tab/></text:p>
      <text:p text:style-name="P24"><text:span text:style-name="T7">37 <text:s/>| <text:s text:c="3"/></text:span><text:span text:style-name="T8"><text:tab/>@echo </text:span><text:span text:style-name="T10">""</text:span></text:p>
      <text:p text:style-name="P24"><text:span text:style-name="T7">38 <text:s/>| <text:s text:c="3"/></text:span><text:span text:style-name="T8"><text:tab/>@echo </text:span><text:span text:style-name="T10">"--- Тест 4: Поиск в пустом каталоге / отсутствие совпадений ---"</text:span></text:p>
      <text:p text:style-name="P24"><text:span text:style-name="T7">39 <text:s/>| <text:s text:c="3"/></text:span><text:span text:style-name="T8"><text:tab/>./</text:span><text:span text:style-name="T9">$(</text:span><text:span text:style-name="T8">TARGET</text:span><text:span text:style-name="T9">)</text:span><text:span text:style-name="T8"> test/empty_dir 0x123456</text:span></text:p>
      <text:p text:style-name="P26"><text:span text:style-name="T7">40 <text:s/>| <text:s text:c="3"/></text:span><text:tab/></text:p>
      <text:p text:style-name="P24"><text:span text:style-name="T7">41 <text:s/>| <text:s text:c="3"/></text:span><text:span text:style-name="T8"><text:tab/>@echo </text:span><text:span text:style-name="T10">""</text:span></text:p>
      <text:p text:style-name="P24"><text:span text:style-name="T7">42 <text:s/>| <text:s text:c="3"/></text:span><text:span text:style-name="T8"><text:tab/>@echo </text:span><text:span text:style-name="T10">"--- Тест 5: Обработка ошибок ---"</text:span></text:p>
      <text:p text:style-name="P24"><text:span text:style-name="T7">43 <text:s/>| <text:s text:c="3"/></text:span><text:span text:style-name="T8"><text:tab/>./</text:span><text:span text:style-name="T9">$(</text:span><text:span text:style-name="T8">TARGET</text:span><text:span text:style-name="T9">)</text:span><text:span text:style-name="T8"> ./non_existent_path 0x112233</text:span></text:p>
      <text:p text:style-name="P25">44 <text:s/>| <text:s text:c="3"/></text:p>
      <text:p text:style-name="P24"><text:span text:style-name="T7">45 <text:s/>| <text:s text:c="3"/></text:span><text:span text:style-name="T8"><text:tab/>@echo </text:span><text:span text:style-name="T10">""</text:span></text:p>
      <text:p text:style-name="P24"><text:span text:style-name="T7">46 <text:s/>| <text:s text:c="3"/></text:span><text:span text:style-name="T8"><text:tab/>@echo </text:span><text:span text:style-name="T10">"--- Все тесты завершены ---"</text:span></text:p>
      <text:p text:style-name="P27"/>
      <text:p text:style-name="P27"/>
      <text:p text:style-name="P27">Отчет valgrind со строчки HEAP SUMMARY:</text:p>
      <text:p text:style-name="P28">==49683== HEAP SUMMARY:</text:p>
      <text:p text:style-name="P28">==49683== <text:s text:c="4"/>in use at exit: 0 bytes in 0 blocks</text:p>
      <text:p text:style-name="P28">==49683== <text:s text:c="2"/>total heap usage: 13 allocs, 13 frees, 28,789 bytes allocated</text:p>
      <text:p text:style-name="P28">==49683== </text:p>
      <text:p text:style-name="P28">==49683== All heap blocks were freed -- no leaks are possible</text:p>
      <text:p text:style-name="P28">==49683== </text:p>
      <text:p text:style-name="P28">==49683== For lists of detected and suppressed errors, rerun with: -s</text:p>
      <text:p text:style-name="P28">==49683== ERROR SUMMARY: 0 errors from 0 contexts (suppressed: 0 from 0)</text:p>
      <text:p text:style-name="P27"/>
      <text:p text:style-name="P27"><text:soft-page-break/></text:p>
      <text:p text:style-name="P29"><draw:frame draw:style-name="fr2" draw:name="Frame1" text:anchor-type="char" svg:width="17.59cm" draw:z-index="1"><draw:text-box fo:min-height="14.545cm"><text:p text:style-name="P30"><draw:frame draw:style-name="fr3" draw:name="Image1" text:anchor-type="paragraph" svg:width="17.59cm" style:rel-width="100%" svg:height="14.545cm" style:rel-height="scale" draw:z-index="2"><draw:image xlink:href="Pictures/100000010000029E0000022A4A676D58.png" xlink:type="simple" xlink:show="embed" xlink:actuate="onLoad" draw:mime-type="image/png"/></draw:frame>Рисунок <text:sequence text:ref-name="refРисунок0" text:name="Рисунок" text:formula="ooow:Рисунок+1" style:num-format="1">1</text:sequence>: Пример работы программы</text:p></draw:text-box></draw:frame></text:p>
      <text:p text:style-name="P27"/>
      <text:p text:style-name="P27"><draw:frame draw:style-name="fr2" draw:name="Frame2" text:anchor-type="char" svg:width="16.268cm" draw:z-index="3"><draw:text-box fo:min-height="14.392cm"><text:p text:style-name="P30"><draw:frame draw:style-name="fr3" draw:name="Image2" text:anchor-type="paragraph" svg:width="16.268cm" style:rel-width="100%" svg:height="14.392cm" style:rel-height="scale" draw:z-index="4"><draw:image xlink:href="Pictures/1000000100000267000002202B2E8A91.png" xlink:type="simple" xlink:show="embed" xlink:actuate="onLoad" draw:mime-type="image/png"/></draw:frame>Рисунок <text:sequence text:ref-name="refРисунок1" text:name="Рисунок" text:formula="ooow:Рисунок+1" style:num-format="1">2</text:sequence>: Результат работы тестов из Makefile</text:p></draw:text-box></draw:frame><text:soft-page-break/></text:p>
      <text:p text:style-name="P27"/>
      <text:p text:style-name="P27"/>
      <text:p text:style-name="P27"/>
      <text:p text:style-name="P31">Исходный код программы lab1vypN3250:</text:p>
      <text:p text:style-name="P32"><text:span text:style-name="T7"><text:s text:c="2"/>1 <text:s/>| <text:s text:c="3"/></text:span><text:span text:style-name="T9">#include</text:span><text:span text:style-name="T8"> </text:span><text:span text:style-name="T7">&lt;errno.h&gt;</text:span></text:p>
      <text:p text:style-name="P32"><text:span text:style-name="T7"><text:s text:c="2"/>2 <text:s/>| <text:s text:c="3"/></text:span><text:span text:style-name="T9">#include</text:span><text:span text:style-name="T8"> </text:span><text:span text:style-name="T7">&lt;stdio.h&gt;</text:span></text:p>
      <text:p text:style-name="P32"><text:span text:style-name="T7"><text:s text:c="2"/>3 <text:s/>| <text:s text:c="3"/></text:span><text:span text:style-name="T9">#include</text:span><text:span text:style-name="T8"> </text:span><text:span text:style-name="T7">&lt;stdlib.h&gt;</text:span></text:p>
      <text:p text:style-name="P32"><text:span text:style-name="T7"><text:s text:c="2"/>4 <text:s/>| <text:s text:c="3"/></text:span><text:span text:style-name="T9">#include</text:span><text:span text:style-name="T8"> </text:span><text:span text:style-name="T7">&lt;string.h&gt;</text:span></text:p>
      <text:p text:style-name="P32"><text:span text:style-name="T7"><text:s text:c="2"/>5 <text:s/>| <text:s text:c="3"/></text:span><text:span text:style-name="T9">#include</text:span><text:span text:style-name="T8"> </text:span><text:span text:style-name="T7">&lt;getopt.h&gt;</text:span></text:p>
      <text:p text:style-name="P32"><text:span text:style-name="T7"><text:s text:c="2"/>6 <text:s/>| <text:s text:c="3"/></text:span><text:span text:style-name="T9">#include</text:span><text:span text:style-name="T8"> </text:span><text:span text:style-name="T7">&lt;sys/syscall.h&gt;</text:span></text:p>
      <text:p text:style-name="P32"><text:span text:style-name="T7"><text:s text:c="2"/>7 <text:s/>| <text:s text:c="3"/></text:span><text:span text:style-name="T9">#include</text:span><text:span text:style-name="T8"> </text:span><text:span text:style-name="T7">&lt;unistd.h&gt;</text:span></text:p>
      <text:p text:style-name="P32"><text:span text:style-name="T7"><text:s text:c="2"/>8 <text:s/>| <text:s text:c="3"/></text:span><text:span text:style-name="T9">#include</text:span><text:span text:style-name="T8"> </text:span><text:span text:style-name="T7">&lt;fcntl.h&gt;</text:span></text:p>
      <text:p text:style-name="P32"><text:span text:style-name="T7"><text:s text:c="2"/>9 <text:s/>| <text:s text:c="3"/></text:span><text:span text:style-name="T9">#include</text:span><text:span text:style-name="T8"> </text:span><text:span text:style-name="T7">&lt;dirent.h&gt;</text:span></text:p>
      <text:p text:style-name="P33"><text:s/>10 <text:s/>| <text:s text:c="3"/></text:p>
      <text:p text:style-name="P33"><text:s/>11 <text:s/>| <text:s text:c="3"/></text:p>
      <text:p text:style-name="P34"><text:span text:style-name="T7"><text:s/>12 <text:s/>| <text:s text:c="3"/></text:span>#define MAX_PATH 4096</text:p>
      <text:p text:style-name="P34"><text:span text:style-name="T7"><text:s/>13 <text:s/>| <text:s text:c="3"/></text:span>#define BUFFER_SIZE 4096</text:p>
      <text:p text:style-name="P33"><text:s/>14 <text:s/>| <text:s text:c="3"/></text:p>
      <text:p text:style-name="P33"><text:s/>15 <text:s/>| <text:s text:c="3"/></text:p>
      <text:p text:style-name="P32"><text:span text:style-name="T7"><text:s/>16 <text:s/>| <text:s text:c="3"/></text:span><text:span text:style-name="T9">struct</text:span><text:span text:style-name="T8"> </text:span><text:span text:style-name="T11">linux_dirent64</text:span><text:span text:style-name="T8"> {</text:span></text:p>
      <text:p text:style-name="P32"><text:span text:style-name="T7"><text:s/>17 <text:s/>| <text:s text:c="3"/></text:span><text:span text:style-name="T8"><text:s text:c="4"/></text:span><text:span text:style-name="T11">unsigned</text:span><text:span text:style-name="T8"> </text:span><text:span text:style-name="T11">long</text:span><text:span text:style-name="T8"> </text:span><text:span text:style-name="T11">long</text:span><text:span text:style-name="T8"> d_ino;</text:span></text:p>
      <text:p text:style-name="P32"><text:span text:style-name="T7"><text:s/>18 <text:s/>| <text:s text:c="3"/></text:span><text:span text:style-name="T8"><text:s text:c="4"/></text:span><text:span text:style-name="T11">long</text:span><text:span text:style-name="T8"> </text:span><text:span text:style-name="T11">long</text:span><text:span text:style-name="T8"> <text:s text:c="9"/>d_off;</text:span></text:p>
      <text:p text:style-name="P32"><text:span text:style-name="T7"><text:s/>19 <text:s/>| <text:s text:c="3"/></text:span><text:span text:style-name="T8"><text:s text:c="4"/></text:span><text:span text:style-name="T11">unsigned</text:span><text:span text:style-name="T8"> </text:span><text:span text:style-name="T11">short</text:span><text:span text:style-name="T8"> <text:s text:c="4"/>d_reclen;</text:span></text:p>
      <text:p text:style-name="P32"><text:span text:style-name="T7"><text:s/>20 <text:s/>| <text:s text:c="3"/></text:span><text:span text:style-name="T8"><text:s text:c="4"/></text:span><text:span text:style-name="T11">unsigned</text:span><text:span text:style-name="T8"> </text:span><text:span text:style-name="T11">char</text:span><text:span text:style-name="T8"> <text:s text:c="5"/>d_type;</text:span></text:p>
      <text:p text:style-name="P32"><text:span text:style-name="T7"><text:s/>21 <text:s/>| <text:s text:c="3"/></text:span><text:span text:style-name="T8"><text:s text:c="4"/></text:span><text:span text:style-name="T11">char</text:span><text:span text:style-name="T8"> <text:s text:c="14"/>d_name[];</text:span></text:p>
      <text:p text:style-name="P35"><text:span text:style-name="T7"><text:s/>22 <text:s/>| <text:s text:c="3"/></text:span>};</text:p>
      <text:p text:style-name="P33"><text:s/>23 <text:s/>| <text:s text:c="3"/></text:p>
      <text:p text:style-name="P33"><text:s/>24 <text:s/>| <text:s text:c="3"/></text:p>
      <text:p text:style-name="P32"><text:span text:style-name="T7"><text:s/>25 <text:s/>| <text:s text:c="3"/></text:span><text:span text:style-name="T9">typedef</text:span><text:span text:style-name="T8"> </text:span><text:span text:style-name="T9">struct</text:span><text:span text:style-name="T8"> </text:span><text:span text:style-name="T11">StackNode</text:span><text:span text:style-name="T8"> {</text:span></text:p>
      <text:p text:style-name="P32"><text:span text:style-name="T7"><text:s/>26 <text:s/>| <text:s text:c="3"/></text:span><text:span text:style-name="T8"><text:s text:c="4"/></text:span><text:span text:style-name="T11">char</text:span><text:span text:style-name="T8"> path[MAX_PATH];</text:span></text:p>
      <text:p text:style-name="P32"><text:span text:style-name="T7"><text:s/>27 <text:s/>| <text:s text:c="3"/></text:span><text:span text:style-name="T8"><text:s text:c="4"/></text:span><text:span text:style-name="T9">struct</text:span><text:span text:style-name="T8"> </text:span><text:span text:style-name="T11">StackNode</text:span><text:span text:style-name="T8"> *next;</text:span></text:p>
      <text:p text:style-name="P32"><text:span text:style-name="T7"><text:s/>28 <text:s/>| <text:s text:c="3"/></text:span><text:span text:style-name="T8">} StackNode;</text:span></text:p>
      <text:p text:style-name="P33"><text:s/>29 <text:s/>| <text:s text:c="3"/></text:p>
      <text:p text:style-name="P32"><text:span text:style-name="T7"><text:s/>30 <text:s/>| <text:s text:c="3"/></text:span><text:span text:style-name="T11">void</text:span><text:span text:style-name="T8"> push(StackNode **top, </text:span><text:span text:style-name="T9">const</text:span><text:span text:style-name="T8"> </text:span><text:span text:style-name="T11">char</text:span><text:span text:style-name="T8"> *path) {</text:span></text:p>
      <text:p text:style-name="P32"><text:span text:style-name="T7"><text:s/>31 <text:s/>| <text:s text:c="3"/></text:span><text:span text:style-name="T8"><text:s text:c="4"/>StackNode *node = malloc(</text:span><text:span text:style-name="T9">sizeof</text:span><text:span text:style-name="T8">(StackNode));</text:span></text:p>
      <text:p text:style-name="P32"><text:span text:style-name="T7"><text:s/>32 <text:s/>| <text:s text:c="3"/></text:span><text:span text:style-name="T8"><text:s text:c="4"/></text:span><text:span text:style-name="T9">if</text:span><text:span text:style-name="T8"> (!node) {</text:span></text:p>
      <text:p text:style-name="P32"><text:span text:style-name="T7"><text:s/>33 <text:s/>| <text:s text:c="3"/></text:span><text:span text:style-name="T8"><text:s text:c="8"/>perror(</text:span><text:span text:style-name="T10">"malloc"</text:span><text:span text:style-name="T8">);</text:span></text:p>
      <text:p text:style-name="P32"><text:span text:style-name="T7"><text:s/>34 <text:s/>| <text:s text:c="3"/></text:span><text:span text:style-name="T8"><text:s text:c="8"/>exit(1);</text:span></text:p>
      <text:p text:style-name="P32"><text:span text:style-name="T7"><text:s/>35 <text:s/>| <text:s text:c="3"/></text:span><text:span text:style-name="T8"><text:s text:c="4"/>}</text:span></text:p>
      <text:p text:style-name="P32"><text:span text:style-name="T7"><text:s/>36 <text:s/>| <text:s text:c="3"/></text:span><text:span text:style-name="T8"><text:s text:c="4"/>strncpy(node-&gt;path, path, MAX_PATH - 1);</text:span></text:p>
      <text:p text:style-name="P32"><text:span text:style-name="T7"><text:s/>37 <text:s/>| <text:s text:c="3"/></text:span><text:span text:style-name="T8"><text:s text:c="4"/>node-&gt;path[MAX_PATH - 1] = </text:span><text:span text:style-name="T10">'\0'</text:span><text:span text:style-name="T8">;</text:span></text:p>
      <text:p text:style-name="P33"><text:s/>38 <text:s/>| <text:s text:c="3"/></text:p>
      <text:p text:style-name="P32"><text:span text:style-name="T7"><text:s/>39 <text:s/>| <text:s text:c="3"/></text:span><text:span text:style-name="T8"><text:s text:c="4"/>node-&gt;next = *top;</text:span></text:p>
      <text:p text:style-name="P32"><text:span text:style-name="T7"><text:s/>40 <text:s/>| <text:s text:c="3"/></text:span><text:span text:style-name="T8"><text:s text:c="4"/>*top = node;</text:span></text:p>
      <text:p text:style-name="P35"><text:span text:style-name="T7"><text:s/>41 <text:s/>| <text:s text:c="3"/></text:span>}</text:p>
      <text:p text:style-name="P33"><text:s/>42 <text:s/>| <text:s text:c="3"/></text:p>
      <text:p text:style-name="P32"><text:span text:style-name="T7"><text:s/>43 <text:s/>| <text:s text:c="3"/></text:span><text:span text:style-name="T11">char</text:span><text:span text:style-name="T8"> *pop(StackNode **top) {</text:span></text:p>
      <text:p text:style-name="P32"><text:span text:style-name="T7"><text:s/>44 <text:s/>| <text:s text:c="3"/></text:span><text:span text:style-name="T8"><text:s text:c="4"/></text:span><text:span text:style-name="T9">if</text:span><text:span text:style-name="T8"> (*top == NULL) </text:span><text:span text:style-name="T9">return</text:span><text:span text:style-name="T8"> NULL;</text:span></text:p>
      <text:p text:style-name="P32"><text:span text:style-name="T7"><text:s/>45 <text:s/>| <text:s text:c="3"/></text:span><text:span text:style-name="T8"><text:s text:c="4"/>StackNode *node = *top;</text:span></text:p>
      <text:p text:style-name="P32"><text:span text:style-name="T7"><text:s/>46 <text:s/>| <text:s text:c="3"/></text:span><text:span text:style-name="T8"><text:s text:c="4"/></text:span><text:span text:style-name="T11">char</text:span><text:span text:style-name="T8"> *path = strdup(node-&gt;path);</text:span></text:p>
      <text:p text:style-name="P32"><text:span text:style-name="T7"><text:s/>47 <text:s/>| <text:s text:c="3"/></text:span><text:span text:style-name="T8"><text:s text:c="4"/></text:span><text:span text:style-name="T9">if</text:span><text:span text:style-name="T8"> (!path) {</text:span></text:p>
      <text:p text:style-name="P32"><text:span text:style-name="T7"><text:s/>48 <text:s/>| <text:s text:c="3"/></text:span><text:span text:style-name="T8"><text:s text:c="8"/>perror(</text:span><text:span text:style-name="T10">"strdup"</text:span><text:span text:style-name="T8">);</text:span></text:p>
      <text:p text:style-name="P32"><text:span text:style-name="T7"><text:s/>49 <text:s/>| <text:s text:c="3"/></text:span><text:span text:style-name="T8"><text:s text:c="8"/>exit(1);</text:span></text:p>
      <text:p text:style-name="P32"><text:span text:style-name="T7"><text:s/>50 <text:s/>| <text:s text:c="3"/></text:span><text:span text:style-name="T8"><text:s text:c="4"/>}</text:span></text:p>
      <text:p text:style-name="P32"><text:span text:style-name="T7"><text:s/>51 <text:s/>| <text:s text:c="3"/></text:span><text:span text:style-name="T8"><text:s text:c="4"/>*top = node-&gt;next;</text:span></text:p>
      <text:p text:style-name="P32"><text:span text:style-name="T7"><text:s/>52 <text:s/>| <text:s text:c="3"/></text:span><text:span text:style-name="T8"><text:s text:c="4"/>free(node);</text:span></text:p>
      <text:p text:style-name="P32"><text:span text:style-name="T7"><text:s/>53 <text:s/>| <text:s text:c="3"/></text:span><text:span text:style-name="T8"><text:s text:c="4"/></text:span><text:span text:style-name="T9">return</text:span><text:span text:style-name="T8"> path;</text:span></text:p>
      <text:p text:style-name="P35"><text:span text:style-name="T7"><text:s/>54 <text:s/>| <text:s text:c="3"/></text:span>}</text:p>
      <text:p text:style-name="P33"><text:s/>55 <text:s/>| <text:s text:c="3"/></text:p>
      <text:p text:style-name="P32"><text:span text:style-name="T7"><text:s/>56 <text:s/>| <text:s text:c="3"/></text:span><text:span text:style-name="T11">int</text:span><text:span text:style-name="T8"> hexToBytes(</text:span><text:span text:style-name="T9">const</text:span><text:span text:style-name="T8"> </text:span><text:span text:style-name="T11">char</text:span><text:span text:style-name="T8"> *hexStr, </text:span><text:span text:style-name="T11">unsigned</text:span><text:span text:style-name="T8"> </text:span><text:span text:style-name="T11">char</text:span><text:span text:style-name="T8"> *bytes) {</text:span></text:p>
      <text:p text:style-name="P32"><text:span text:style-name="T7"><text:s/>57 <text:s/>| <text:s text:c="3"/></text:span><text:span text:style-name="T8"><text:s text:c="4"/></text:span><text:span text:style-name="T9">if</text:span><text:span text:style-name="T8"> (strncmp(hexStr, </text:span><text:span text:style-name="T10">"0x"</text:span><text:span text:style-name="T8">, 2) != 0) </text:span><text:span text:style-name="T9">return</text:span><text:span text:style-name="T8"> -1;</text:span></text:p>
      <text:p text:style-name="P32"><text:span text:style-name="T7"><text:s/>58 <text:s/>| <text:s text:c="3"/></text:span><text:span text:style-name="T8"><text:s text:c="4"/></text:span><text:span text:style-name="T9">const</text:span><text:span text:style-name="T8"> </text:span><text:span text:style-name="T11">char</text:span><text:span text:style-name="T8"> *p = hexStr + 2;</text:span></text:p>
      <text:p text:style-name="P32"><text:span text:style-name="T7"><text:s/>59 <text:s/>| <text:s text:c="3"/></text:span><text:span text:style-name="T8"><text:s text:c="4"/></text:span><text:span text:style-name="T11">int</text:span><text:span text:style-name="T8"> length = strlen(p);</text:span></text:p>
      <text:p text:style-name="P32"><text:span text:style-name="T7"><text:s/>60 <text:s/>| <text:s text:c="3"/></text:span><text:span text:style-name="T8"><text:s text:c="4"/></text:span><text:span text:style-name="T9">if</text:span><text:span text:style-name="T8"> (length == 0 || length % 2 != 0) </text:span><text:span text:style-name="T9">return</text:span><text:span text:style-name="T8"> -1;</text:span></text:p>
      <text:p text:style-name="P33"><text:s/>61 <text:s/>| <text:s text:c="3"/></text:p>
      <text:p text:style-name="P32"><text:span text:style-name="T7"><text:s/>62 <text:s/>| <text:s text:c="3"/></text:span><text:span text:style-name="T8"><text:s text:c="4"/></text:span><text:span text:style-name="T11">int</text:span><text:span text:style-name="T8"> byteCount = 0;</text:span></text:p>
      <text:p text:style-name="P32"><text:span text:style-name="T7"><text:s/>63 <text:s/>| <text:s text:c="3"/></text:span><text:span text:style-name="T8"><text:s text:c="4"/></text:span><text:span text:style-name="T9">for</text:span><text:span text:style-name="T8"> (</text:span><text:span text:style-name="T11">int</text:span><text:span text:style-name="T8"> i = 0; i &lt; length; i += 2) {</text:span></text:p>
      <text:p text:style-name="P32"><text:span text:style-name="T7"><text:s/>64 <text:s/>| <text:s text:c="3"/></text:span><text:span text:style-name="T8"><text:s text:c="8"/></text:span><text:span text:style-name="T11">unsigned</text:span><text:span text:style-name="T8"> </text:span><text:span text:style-name="T11">int</text:span><text:span text:style-name="T8"> temp;</text:span></text:p>
      <text:p text:style-name="P32"><text:span text:style-name="T7"><text:s/>65 <text:s/>| <text:s text:c="3"/></text:span><text:span text:style-name="T8"><text:s text:c="8"/></text:span><text:span text:style-name="T9">if</text:span><text:span text:style-name="T8"> (sscanf(p + i, </text:span><text:span text:style-name="T10">"%2x"</text:span><text:span text:style-name="T8">, &amp;temp) != 1) </text:span><text:span text:style-name="T9">return</text:span><text:span text:style-name="T8"> -1;</text:span></text:p>
      <text:p text:style-name="P32"><text:span text:style-name="T7"><text:s/>66 <text:s/>| <text:s text:c="3"/></text:span><text:span text:style-name="T8"><text:s text:c="8"/>bytes[byteCount++] = (</text:span><text:span text:style-name="T11">unsigned</text:span><text:span text:style-name="T8"> </text:span><text:span text:style-name="T11">char</text:span><text:span text:style-name="T8">)temp;</text:span></text:p>
      <text:p text:style-name="P32"><text:span text:style-name="T7"><text:s/>67 <text:s/>| <text:s text:c="3"/></text:span><text:span text:style-name="T8"><text:s text:c="4"/>}</text:span></text:p>
      <text:p text:style-name="P32"><text:span text:style-name="T7"><text:s/>68 <text:s/>| <text:s text:c="3"/></text:span><text:span text:style-name="T8"><text:s text:c="4"/></text:span><text:span text:style-name="T9">return</text:span><text:span text:style-name="T8"> byteCount;</text:span></text:p>
      <text:p text:style-name="P35"><text:span text:style-name="T7"><text:s/>69 <text:s/>| <text:s text:c="3"/></text:span>}</text:p>
      <text:p text:style-name="P33"><text:s/>70 <text:s/>| <text:s text:c="3"/></text:p>
      <text:p text:style-name="P32"><text:span text:style-name="T7"><text:s/>71 <text:s/>| <text:s text:c="3"/></text:span><text:span text:style-name="T11">int</text:span><text:span text:style-name="T8"> search(</text:span><text:span text:style-name="T9">const</text:span><text:span text:style-name="T8"> </text:span><text:span text:style-name="T11">char</text:span><text:span text:style-name="T8"> *filepath, </text:span><text:span text:style-name="T11">unsigned</text:span><text:span text:style-name="T8"> </text:span><text:span text:style-name="T11">char</text:span><text:span text:style-name="T8"> *target, </text:span><text:span text:style-name="T11">int</text:span><text:span text:style-name="T8"> targetLength, </text:span><text:span text:style-name="T11">int</text:span><text:span text:style-name="T8"> debug) {</text:span></text:p>
      <text:p text:style-name="P32"><text:soft-page-break/><text:span text:style-name="T7"><text:s/>72 <text:s/>| <text:s text:c="3"/></text:span><text:span text:style-name="T8"><text:s text:c="4"/></text:span><text:span text:style-name="T11">int</text:span><text:span text:style-name="T8"> fd = open(filepath, O_RDONLY);</text:span></text:p>
      <text:p text:style-name="P32"><text:span text:style-name="T7"><text:s/>73 <text:s/>| <text:s text:c="3"/></text:span><text:span text:style-name="T8"><text:s text:c="4"/></text:span><text:span text:style-name="T9">if</text:span><text:span text:style-name="T8"> (fd &lt; 0) </text:span><text:span text:style-name="T9">return</text:span><text:span text:style-name="T8"> 0;</text:span></text:p>
      <text:p text:style-name="P33"><text:s/>74 <text:s/>| <text:s text:c="3"/></text:p>
      <text:p text:style-name="P32"><text:span text:style-name="T7"><text:s/>75 <text:s/>| <text:s text:c="3"/></text:span><text:span text:style-name="T8"><text:s text:c="4"/></text:span><text:span text:style-name="T11">unsigned</text:span><text:span text:style-name="T8"> </text:span><text:span text:style-name="T11">char</text:span><text:span text:style-name="T8"> buffer[BUFFER_SIZE];</text:span></text:p>
      <text:p text:style-name="P32"><text:span text:style-name="T7"><text:s/>76 <text:s/>| <text:s text:c="3"/></text:span><text:span text:style-name="T8"><text:s text:c="4"/></text:span><text:span text:style-name="T11">ssize_t</text:span><text:span text:style-name="T8"> n;</text:span></text:p>
      <text:p text:style-name="P32"><text:span text:style-name="T7"><text:s/>77 <text:s/>| <text:s text:c="3"/></text:span><text:span text:style-name="T8"><text:s text:c="4"/></text:span><text:span text:style-name="T11">int</text:span><text:span text:style-name="T8"> found = 0;</text:span></text:p>
      <text:p text:style-name="P32"><text:span text:style-name="T7"><text:s/>78 <text:s/>| <text:s text:c="3"/></text:span><text:span text:style-name="T8"><text:s text:c="4"/></text:span><text:span text:style-name="T11">long</text:span><text:span text:style-name="T8"> totalOffset = 0;</text:span></text:p>
      <text:p text:style-name="P33"><text:s/>79 <text:s/>| <text:s text:c="3"/></text:p>
      <text:p text:style-name="P32"><text:span text:style-name="T7"><text:s/>80 <text:s/>| <text:s text:c="3"/></text:span><text:span text:style-name="T8"><text:s text:c="4"/></text:span><text:span text:style-name="T9">while</text:span><text:span text:style-name="T8"> ((n = read(fd, buffer, BUFFER_SIZE)) &gt; 0) {</text:span></text:p>
      <text:p text:style-name="P32"><text:span text:style-name="T7"><text:s/>81 <text:s/>| <text:s text:c="3"/></text:span><text:span text:style-name="T8"><text:s text:c="8"/></text:span><text:span text:style-name="T9">for</text:span><text:span text:style-name="T8"> (</text:span><text:span text:style-name="T11">int</text:span><text:span text:style-name="T8"> i = 0; i &lt;= n - targetLength; i++) {</text:span></text:p>
      <text:p text:style-name="P32"><text:span text:style-name="T7"><text:s/>82 <text:s/>| <text:s text:c="3"/></text:span><text:span text:style-name="T8"><text:s text:c="12"/></text:span><text:span text:style-name="T9">if</text:span><text:span text:style-name="T8"> (memcmp(&amp;buffer[i], target, targetLength) == 0) {</text:span></text:p>
      <text:p text:style-name="P32"><text:span text:style-name="T7"><text:s/>83 <text:s/>| <text:s text:c="3"/></text:span><text:span text:style-name="T8"><text:s text:c="16"/></text:span><text:span text:style-name="T9">if</text:span><text:span text:style-name="T8"> (debug) fprintf(stderr, </text:span><text:span text:style-name="T10">"Файл %s: Найдено совпадение %ld\n"</text:span><text:span text:style-name="T8">, filepath, totalOffset + i);</text:span></text:p>
      <text:p text:style-name="P32"><text:span text:style-name="T7"><text:s/>84 <text:s/>| <text:s text:c="3"/></text:span><text:span text:style-name="T8"><text:s text:c="16"/>found = 1;</text:span></text:p>
      <text:p text:style-name="P32"><text:span text:style-name="T7"><text:s/>85 <text:s/>| <text:s text:c="3"/></text:span><text:span text:style-name="T8"><text:s text:c="16"/></text:span><text:span text:style-name="T9">break</text:span><text:span text:style-name="T8">;</text:span></text:p>
      <text:p text:style-name="P32"><text:span text:style-name="T7"><text:s/>86 <text:s/>| <text:s text:c="3"/></text:span><text:span text:style-name="T8"><text:s text:c="12"/>}</text:span></text:p>
      <text:p text:style-name="P32"><text:span text:style-name="T7"><text:s/>87 <text:s/>| <text:s text:c="3"/></text:span><text:span text:style-name="T8"><text:s text:c="8"/>}</text:span></text:p>
      <text:p text:style-name="P32"><text:span text:style-name="T7"><text:s/>88 <text:s/>| <text:s text:c="3"/></text:span><text:span text:style-name="T8"><text:s text:c="8"/></text:span><text:span text:style-name="T9">if</text:span><text:span text:style-name="T8"> (found) </text:span><text:span text:style-name="T9">break</text:span><text:span text:style-name="T8">;</text:span></text:p>
      <text:p text:style-name="P32"><text:span text:style-name="T7"><text:s/>89 <text:s/>| <text:s text:c="3"/></text:span><text:span text:style-name="T8"><text:s text:c="8"/>totalOffset += n;</text:span></text:p>
      <text:p text:style-name="P32"><text:span text:style-name="T7"><text:s/>90 <text:s/>| <text:s text:c="3"/></text:span><text:span text:style-name="T8"><text:s text:c="8"/></text:span><text:span text:style-name="T9">if</text:span><text:span text:style-name="T8"> (n == BUFFER_SIZE) {</text:span></text:p>
      <text:p text:style-name="P32"><text:span text:style-name="T7"><text:s/>91 <text:s/>| <text:s text:c="3"/></text:span><text:span text:style-name="T8"><text:s text:c="12"/>lseek(fd, -(targetLength - 1), SEEK_CUR);</text:span></text:p>
      <text:p text:style-name="P32"><text:span text:style-name="T7"><text:s/>92 <text:s/>| <text:s text:c="3"/></text:span><text:span text:style-name="T8"><text:s text:c="12"/>totalOffset -= (targetLength - 1);</text:span></text:p>
      <text:p text:style-name="P32"><text:span text:style-name="T7"><text:s/>93 <text:s/>| <text:s text:c="3"/></text:span><text:span text:style-name="T8"><text:s text:c="8"/>}</text:span></text:p>
      <text:p text:style-name="P32"><text:span text:style-name="T7"><text:s/>94 <text:s/>| <text:s text:c="3"/></text:span><text:span text:style-name="T8"><text:s text:c="4"/>}</text:span></text:p>
      <text:p text:style-name="P32"><text:span text:style-name="T7"><text:s/>95 <text:s/>| <text:s text:c="3"/></text:span><text:span text:style-name="T8"><text:s text:c="4"/>close(fd);</text:span></text:p>
      <text:p text:style-name="P32"><text:span text:style-name="T7"><text:s/>96 <text:s/>| <text:s text:c="3"/></text:span><text:span text:style-name="T8"><text:s text:c="4"/></text:span><text:span text:style-name="T9">return</text:span><text:span text:style-name="T8"> found;</text:span></text:p>
      <text:p text:style-name="P35"><text:span text:style-name="T7"><text:s/>97 <text:s/>| <text:s text:c="3"/></text:span>}</text:p>
      <text:p text:style-name="P33"><text:s/>98 <text:s/>| <text:s text:c="3"/></text:p>
      <text:p text:style-name="P32"><text:span text:style-name="T7"><text:s/>99 <text:s/>| <text:s text:c="3"/></text:span><text:span text:style-name="T11">int</text:span><text:span text:style-name="T8"> main(</text:span><text:span text:style-name="T11">int</text:span><text:span text:style-name="T8"> argc, </text:span><text:span text:style-name="T11">char</text:span><text:span text:style-name="T8">* argv[]) {</text:span></text:p>
      <text:p text:style-name="P32"><text:span text:style-name="T7">100 <text:s/>| <text:s text:c="3"/></text:span><text:span text:style-name="T8"><text:s text:c="4"/></text:span><text:span text:style-name="T11">char</text:span><text:span text:style-name="T8"> *DEBUG = getenv(</text:span><text:span text:style-name="T10">"LAB1DEBUG"</text:span><text:span text:style-name="T8">);</text:span></text:p>
      <text:p text:style-name="P32"><text:span text:style-name="T7">101 <text:s/>| <text:s text:c="3"/></text:span><text:span text:style-name="T8"><text:s text:c="4"/></text:span><text:span text:style-name="T11">int</text:span><text:span text:style-name="T8"> debugMode = 0;</text:span></text:p>
      <text:p text:style-name="P32"><text:span text:style-name="T7">102 <text:s/>| <text:s text:c="3"/></text:span><text:span text:style-name="T8"><text:s text:c="4"/></text:span><text:span text:style-name="T9">if</text:span><text:span text:style-name="T8"> (DEBUG) {</text:span></text:p>
      <text:p text:style-name="P32"><text:span text:style-name="T7">103 <text:s/>| <text:s text:c="3"/></text:span><text:span text:style-name="T8"><text:s text:c="8"/>fprintf(stderr, </text:span><text:span text:style-name="T10">"Включен вывод отладочных сообщений\n"</text:span><text:span text:style-name="T8">);</text:span></text:p>
      <text:p text:style-name="P32"><text:span text:style-name="T7">104 <text:s/>| <text:s text:c="3"/></text:span><text:span text:style-name="T8"><text:s text:c="8"/>debugMode = 1;</text:span></text:p>
      <text:p text:style-name="P32"><text:span text:style-name="T7">105 <text:s/>| <text:s text:c="3"/></text:span><text:span text:style-name="T8"><text:s text:c="4"/>}</text:span></text:p>
      <text:p text:style-name="P33">106 <text:s/>| <text:s text:c="3"/></text:p>
      <text:p text:style-name="P32"><text:span text:style-name="T7">107 <text:s/>| <text:s text:c="3"/></text:span><text:span text:style-name="T8"><text:s text:c="4"/></text:span><text:span text:style-name="T11">int</text:span><text:span text:style-name="T8"> opt;</text:span></text:p>
      <text:p text:style-name="P32"><text:span text:style-name="T7">108 <text:s/>| <text:s text:c="3"/></text:span><text:span text:style-name="T8"><text:s text:c="4"/></text:span><text:span text:style-name="T11">char</text:span><text:span text:style-name="T8"> *author = </text:span><text:span text:style-name="T10">"Пахомов Владимир Юрьевич, гр. N3250\nВариант: 1"</text:span><text:span text:style-name="T8">;</text:span></text:p>
      <text:p text:style-name="P32"><text:span text:style-name="T7">109 <text:s/>| <text:s text:c="3"/></text:span><text:span text:style-name="T8"><text:s text:c="4"/></text:span><text:span text:style-name="T11">char</text:span><text:span text:style-name="T8"> *help = </text:span><text:span text:style-name="T10">"Использование: lab1vypN3250 [опции] &lt;каталог&gt; &lt;цель_поиска&gt;\nОпции:\n <text:s/>-v, --version <text:s/>Вывод версии и информации об авторе\n <text:s/>-h, --help <text:s text:c="4"/>Вывод этой справки\n"</text:span><text:span text:style-name="T8">;</text:span></text:p>
      <text:p text:style-name="P33">110 <text:s/>| <text:s text:c="3"/></text:p>
      <text:p text:style-name="P33">111 <text:s/>| <text:s text:c="3"/></text:p>
      <text:p text:style-name="P32"><text:span text:style-name="T7">112 <text:s/>| <text:s text:c="3"/></text:span><text:span text:style-name="T8"><text:s text:c="4"/></text:span><text:span text:style-name="T9">static</text:span><text:span text:style-name="T8"> </text:span><text:span text:style-name="T9">struct</text:span><text:span text:style-name="T8"> </text:span><text:span text:style-name="T11">option</text:span><text:span text:style-name="T8"> longopts[] = {</text:span></text:p>
      <text:p text:style-name="P32"><text:span text:style-name="T7">113 <text:s/>| <text:s text:c="3"/></text:span><text:span text:style-name="T8"><text:s text:c="8"/>{</text:span><text:span text:style-name="T10">"version"</text:span><text:span text:style-name="T8">, no_argument, 0, </text:span><text:span text:style-name="T10">'v'</text:span><text:span text:style-name="T8">},</text:span></text:p>
      <text:p text:style-name="P32"><text:span text:style-name="T7">114 <text:s/>| <text:s text:c="3"/></text:span><text:span text:style-name="T8"><text:s text:c="8"/>{</text:span><text:span text:style-name="T10">"help"</text:span><text:span text:style-name="T8">, no_argument, 0, </text:span><text:span text:style-name="T10">'h'</text:span><text:span text:style-name="T8">},</text:span></text:p>
      <text:p text:style-name="P32"><text:span text:style-name="T7">115 <text:s/>| <text:s text:c="3"/></text:span><text:span text:style-name="T8"><text:s text:c="8"/>{0, 0, 0, 0},</text:span></text:p>
      <text:p text:style-name="P32"><text:span text:style-name="T7">116 <text:s/>| <text:s text:c="3"/></text:span><text:span text:style-name="T8"><text:s text:c="4"/>};</text:span></text:p>
      <text:p text:style-name="P33">117 <text:s/>| <text:s text:c="3"/></text:p>
      <text:p text:style-name="P32"><text:span text:style-name="T7">118 <text:s/>| <text:s text:c="3"/></text:span><text:span text:style-name="T8"><text:s text:c="4"/></text:span><text:span text:style-name="T9">while</text:span><text:span text:style-name="T8"> ((opt = getopt_long(argc, argv, </text:span><text:span text:style-name="T10">"vh"</text:span><text:span text:style-name="T8">, longopts, NULL)) != -1) {</text:span></text:p>
      <text:p text:style-name="P32"><text:span text:style-name="T7">119 <text:s/>| <text:s text:c="3"/></text:span><text:span text:style-name="T8"><text:s text:c="8"/></text:span><text:span text:style-name="T9">if</text:span><text:span text:style-name="T8"> (opt == </text:span><text:span text:style-name="T10">'v'</text:span><text:span text:style-name="T8">) {</text:span></text:p>
      <text:p text:style-name="P32"><text:span text:style-name="T7">120 <text:s/>| <text:s text:c="3"/></text:span><text:span text:style-name="T8"><text:s text:c="12"/>printf(</text:span><text:span text:style-name="T10">"%s\n"</text:span><text:span text:style-name="T8">, author);</text:span></text:p>
      <text:p text:style-name="P32"><text:span text:style-name="T7">121 <text:s/>| <text:s text:c="3"/></text:span><text:span text:style-name="T8"><text:s text:c="12"/></text:span><text:span text:style-name="T9">return</text:span><text:span text:style-name="T8"> 0;</text:span></text:p>
      <text:p text:style-name="P32"><text:span text:style-name="T7">122 <text:s/>| <text:s text:c="3"/></text:span><text:span text:style-name="T8"><text:s text:c="8"/>}</text:span></text:p>
      <text:p text:style-name="P32"><text:span text:style-name="T7">123 <text:s/>| <text:s text:c="3"/></text:span><text:span text:style-name="T8"><text:s text:c="8"/></text:span><text:span text:style-name="T9">else</text:span><text:span text:style-name="T8"> </text:span><text:span text:style-name="T9">if</text:span><text:span text:style-name="T8"> (opt == </text:span><text:span text:style-name="T10">'h'</text:span><text:span text:style-name="T8">) {</text:span></text:p>
      <text:p text:style-name="P32"><text:span text:style-name="T7">124 <text:s/>| <text:s text:c="3"/></text:span><text:span text:style-name="T8"><text:s text:c="12"/>printf(</text:span><text:span text:style-name="T10">"%s\n"</text:span><text:span text:style-name="T8">, help);</text:span></text:p>
      <text:p text:style-name="P32"><text:span text:style-name="T7">125 <text:s/>| <text:s text:c="3"/></text:span><text:span text:style-name="T8"><text:s text:c="12"/></text:span><text:span text:style-name="T9">return</text:span><text:span text:style-name="T8"> 0;</text:span></text:p>
      <text:p text:style-name="P32"><text:span text:style-name="T7">126 <text:s/>| <text:s text:c="3"/></text:span><text:span text:style-name="T8"><text:s text:c="8"/>}</text:span></text:p>
      <text:p text:style-name="P32"><text:span text:style-name="T7">127 <text:s/>| <text:s text:c="3"/></text:span><text:span text:style-name="T8"><text:s text:c="8"/></text:span><text:span text:style-name="T9">else</text:span><text:span text:style-name="T8"> {</text:span></text:p>
      <text:p text:style-name="P32"><text:span text:style-name="T7">128 <text:s/>| <text:s text:c="3"/></text:span><text:span text:style-name="T8"><text:s text:c="12"/>fprintf(stderr, </text:span><text:span text:style-name="T10">"Введены неизвестные опции. Используйте -h для справки\n"</text:span><text:span text:style-name="T8">);</text:span></text:p>
      <text:p text:style-name="P32"><text:span text:style-name="T7">129 <text:s/>| <text:s text:c="3"/></text:span><text:span text:style-name="T8"><text:s text:c="12"/></text:span><text:span text:style-name="T9">return</text:span><text:span text:style-name="T8"> 1;</text:span></text:p>
      <text:p text:style-name="P32"><text:span text:style-name="T7">130 <text:s/>| <text:s text:c="3"/></text:span><text:span text:style-name="T8"><text:s text:c="8"/>}</text:span></text:p>
      <text:p text:style-name="P32"><text:span text:style-name="T7">131 <text:s/>| <text:s text:c="3"/></text:span><text:span text:style-name="T8"><text:s text:c="4"/>}</text:span></text:p>
      <text:p text:style-name="P33">132 <text:s/>| <text:s text:c="3"/></text:p>
      <text:p text:style-name="P32"><text:span text:style-name="T7">133 <text:s/>| <text:s text:c="3"/></text:span><text:span text:style-name="T8"><text:s text:c="4"/></text:span><text:span text:style-name="T9">if</text:span><text:span text:style-name="T8"> (argc - optind &lt; 2) {</text:span></text:p>
      <text:p text:style-name="P32"><text:span text:style-name="T7">134 <text:s/>| <text:s text:c="3"/></text:span><text:span text:style-name="T8"><text:s text:c="8"/>fprintf(stderr, </text:span><text:span text:style-name="T10">"Ошибка: Необходимо ввести название каталога и цель поиска\n"</text:span><text:span text:style-name="T8">);</text:span></text:p>
      <text:p text:style-name="P32"><text:span text:style-name="T7">135 <text:s/>| <text:s text:c="3"/></text:span><text:span text:style-name="T8"><text:s text:c="8"/>printf(</text:span><text:span text:style-name="T10">"%s\n"</text:span><text:span text:style-name="T8">, help);</text:span></text:p>
      <text:p text:style-name="P32"><text:span text:style-name="T7">136 <text:s/>| <text:s text:c="3"/></text:span><text:span text:style-name="T8"><text:s text:c="8"/></text:span><text:span text:style-name="T9">return</text:span><text:span text:style-name="T8"> 1;</text:span></text:p>
      <text:p text:style-name="P32"><text:span text:style-name="T7">137 <text:s/>| <text:s text:c="3"/></text:span><text:span text:style-name="T8"><text:s text:c="4"/>}</text:span></text:p>
      <text:p text:style-name="P33">138 <text:s/>| <text:s text:c="3"/></text:p>
      <text:p text:style-name="P32"><text:span text:style-name="T7">139 <text:s/>| <text:s text:c="3"/></text:span><text:span text:style-name="T8"><text:s text:c="4"/></text:span><text:span text:style-name="T11">char</text:span><text:span text:style-name="T8"> *searchDir = argv[optind++];</text:span></text:p>
      <text:p text:style-name="P32"><text:span text:style-name="T7">140 <text:s/>| <text:s text:c="3"/></text:span><text:span text:style-name="T8"><text:s text:c="4"/></text:span><text:span text:style-name="T11">char</text:span><text:span text:style-name="T8"> *searchString = argv[optind];</text:span></text:p>
      <text:p text:style-name="P33">141 <text:s/>| <text:s text:c="3"/></text:p>
      <text:p text:style-name="P32"><text:span text:style-name="T7">142 <text:s/>| <text:s text:c="3"/></text:span><text:span text:style-name="T8"><text:s text:c="4"/></text:span><text:span text:style-name="T11">unsigned</text:span><text:span text:style-name="T8"> </text:span><text:span text:style-name="T11">char</text:span><text:span text:style-name="T8"> targetBytes[256];</text:span></text:p>
      <text:p text:style-name="P32"><text:span text:style-name="T7">143 <text:s/>| <text:s text:c="3"/></text:span><text:span text:style-name="T8"><text:s text:c="4"/></text:span><text:span text:style-name="T11">int</text:span><text:span text:style-name="T8"> targetLen = hexToBytes(searchString, targetBytes);</text:span></text:p>
      <text:p text:style-name="P32"><text:soft-page-break/><text:span text:style-name="T7">144 <text:s/>| <text:s text:c="3"/></text:span><text:span text:style-name="T8"><text:s text:c="4"/></text:span><text:span text:style-name="T9">if</text:span><text:span text:style-name="T8"> (targetLen &lt;= 0) {</text:span></text:p>
      <text:p text:style-name="P32"><text:span text:style-name="T7">145 <text:s/>| <text:s text:c="3"/></text:span><text:span text:style-name="T8"><text:s text:c="8"/>fprintf(stderr, </text:span><text:span text:style-name="T10">"Ошибка: Неверный формат HEX\n"</text:span><text:span text:style-name="T8">);</text:span></text:p>
      <text:p text:style-name="P32"><text:span text:style-name="T7">146 <text:s/>| <text:s text:c="3"/></text:span><text:span text:style-name="T8"><text:s text:c="8"/></text:span><text:span text:style-name="T9">return</text:span><text:span text:style-name="T8"> 1;</text:span></text:p>
      <text:p text:style-name="P32"><text:span text:style-name="T7">147 <text:s/>| <text:s text:c="3"/></text:span><text:span text:style-name="T8"><text:s text:c="4"/>}</text:span></text:p>
      <text:p text:style-name="P33">148 <text:s/>| <text:s text:c="3"/></text:p>
      <text:p text:style-name="P32"><text:span text:style-name="T7">149 <text:s/>| <text:s text:c="3"/></text:span><text:span text:style-name="T8"><text:s text:c="4"/>StackNode *dirsStack = NULL;</text:span></text:p>
      <text:p text:style-name="P32"><text:span text:style-name="T7">150 <text:s/>| <text:s text:c="3"/></text:span><text:span text:style-name="T8"><text:s text:c="4"/>push(&amp;dirsStack, searchDir);</text:span></text:p>
      <text:p text:style-name="P33">151 <text:s/>| <text:s text:c="3"/></text:p>
      <text:p text:style-name="P32"><text:span text:style-name="T7">152 <text:s/>| <text:s text:c="3"/></text:span><text:span text:style-name="T8"><text:s text:c="4"/></text:span><text:span text:style-name="T9">while</text:span><text:span text:style-name="T8"> (dirsStack != NULL) {</text:span></text:p>
      <text:p text:style-name="P32"><text:span text:style-name="T7">153 <text:s/>| <text:s text:c="3"/></text:span><text:span text:style-name="T8"><text:s text:c="8"/></text:span><text:span text:style-name="T11">char</text:span><text:span text:style-name="T8"> *currentDir = pop(&amp;dirsStack);</text:span></text:p>
      <text:p text:style-name="P32"><text:span text:style-name="T7">154 <text:s/>| <text:s text:c="3"/></text:span><text:span text:style-name="T8"><text:s text:c="8"/></text:span><text:span text:style-name="T11">int</text:span><text:span text:style-name="T8"> fd = open(currentDir, O_RDONLY | O_DIRECTORY);</text:span></text:p>
      <text:p text:style-name="P33">155 <text:s/>| <text:s text:c="3"/></text:p>
      <text:p text:style-name="P32"><text:span text:style-name="T7">156 <text:s/>| <text:s text:c="3"/></text:span><text:span text:style-name="T8"><text:s text:c="8"/></text:span><text:span text:style-name="T9">if</text:span><text:span text:style-name="T8"> (fd == -1) {</text:span></text:p>
      <text:p text:style-name="P32"><text:span text:style-name="T7">157 <text:s/>| <text:s text:c="3"/></text:span><text:span text:style-name="T8"><text:s text:c="12"/>fprintf(stderr, </text:span><text:span text:style-name="T10">"Ошибка доступа к каталогу %s: %s\n"</text:span><text:span text:style-name="T8">, currentDir, strerror(errno));</text:span></text:p>
      <text:p text:style-name="P32"><text:span text:style-name="T7">158 <text:s/>| <text:s text:c="3"/></text:span><text:span text:style-name="T8"><text:s text:c="12"/>free(currentDir);</text:span></text:p>
      <text:p text:style-name="P32"><text:span text:style-name="T7">159 <text:s/>| <text:s text:c="3"/></text:span><text:span text:style-name="T8"><text:s text:c="12"/></text:span><text:span text:style-name="T9">continue</text:span><text:span text:style-name="T8">;</text:span></text:p>
      <text:p text:style-name="P32"><text:span text:style-name="T7">160 <text:s/>| <text:s text:c="3"/></text:span><text:span text:style-name="T8"><text:s text:c="8"/>}</text:span></text:p>
      <text:p text:style-name="P33">161 <text:s/>| <text:s text:c="3"/></text:p>
      <text:p text:style-name="P32"><text:span text:style-name="T7">162 <text:s/>| <text:s text:c="3"/></text:span><text:span text:style-name="T8"><text:s text:c="8"/></text:span><text:span text:style-name="T11">char</text:span><text:span text:style-name="T8"> buffer[BUFFER_SIZE];</text:span></text:p>
      <text:p text:style-name="P32"><text:span text:style-name="T7">163 <text:s/>| <text:s text:c="3"/></text:span><text:span text:style-name="T8"><text:s text:c="8"/></text:span><text:span text:style-name="T11">int</text:span><text:span text:style-name="T8"> nread;</text:span></text:p>
      <text:p text:style-name="P32"><text:span text:style-name="T7">164 <text:s/>| <text:s text:c="3"/></text:span><text:span text:style-name="T8"><text:s text:c="8"/></text:span><text:span text:style-name="T9">while</text:span><text:span text:style-name="T8"> ((nread = syscall(SYS_getdents64, fd, buffer, BUFFER_SIZE)) &gt; 0) {</text:span></text:p>
      <text:p text:style-name="P32"><text:span text:style-name="T7">165 <text:s/>| <text:s text:c="3"/></text:span><text:span text:style-name="T8"><text:s text:c="12"/></text:span><text:span text:style-name="T9">for</text:span><text:span text:style-name="T8"> (</text:span><text:span text:style-name="T11">int</text:span><text:span text:style-name="T8"> bpos = 0; bpos &lt; nread; ) {</text:span></text:p>
      <text:p text:style-name="P32"><text:span text:style-name="T7">166 <text:s/>| <text:s text:c="3"/></text:span><text:span text:style-name="T8"><text:s text:c="16"/></text:span><text:span text:style-name="T9">struct</text:span><text:span text:style-name="T8"> </text:span><text:span text:style-name="T11">linux_dirent64</text:span><text:span text:style-name="T8"> *d = (</text:span><text:span text:style-name="T9">struct</text:span><text:span text:style-name="T8"> </text:span><text:span text:style-name="T11">linux_dirent64</text:span><text:span text:style-name="T8"> *)(buffer + bpos);</text:span></text:p>
      <text:p text:style-name="P33">167 <text:s/>| <text:s text:c="3"/></text:p>
      <text:p text:style-name="P32"><text:span text:style-name="T7">168 <text:s/>| <text:s text:c="3"/></text:span><text:span text:style-name="T8"><text:s text:c="16"/></text:span><text:span text:style-name="T9">if</text:span><text:span text:style-name="T8"> (strcmp(d-&gt;d_name, </text:span><text:span text:style-name="T10">"."</text:span><text:span text:style-name="T8">) == 0 || strcmp(d-&gt;d_name, </text:span><text:span text:style-name="T10">".."</text:span><text:span text:style-name="T8">) == 0) {</text:span></text:p>
      <text:p text:style-name="P32"><text:span text:style-name="T7">169 <text:s/>| <text:s text:c="3"/></text:span><text:span text:style-name="T8"><text:s text:c="20"/>bpos += d-&gt;d_reclen;</text:span></text:p>
      <text:p text:style-name="P32"><text:span text:style-name="T7">170 <text:s/>| <text:s text:c="3"/></text:span><text:span text:style-name="T8"><text:s text:c="20"/></text:span><text:span text:style-name="T9">continue</text:span><text:span text:style-name="T8">;</text:span></text:p>
      <text:p text:style-name="P32"><text:span text:style-name="T7">171 <text:s/>| <text:s text:c="3"/></text:span><text:span text:style-name="T8"><text:s text:c="16"/>}</text:span></text:p>
      <text:p text:style-name="P33">172 <text:s/>| <text:s text:c="3"/></text:p>
      <text:p text:style-name="P32"><text:span text:style-name="T7">173 <text:s/>| <text:s text:c="3"/></text:span><text:span text:style-name="T8"><text:s text:c="16"/></text:span><text:span text:style-name="T11">char</text:span><text:span text:style-name="T8"> fullPath[MAX_PATH];</text:span></text:p>
      <text:p text:style-name="P32"><text:span text:style-name="T7">174 <text:s/>| <text:s text:c="3"/></text:span><text:span text:style-name="T8"><text:s text:c="16"/>snprintf(fullPath, MAX_PATH, </text:span><text:span text:style-name="T10">"%s/%s"</text:span><text:span text:style-name="T8">, currentDir, d-&gt;d_name);</text:span></text:p>
      <text:p text:style-name="P33">175 <text:s/>| <text:s text:c="3"/></text:p>
      <text:p text:style-name="P32"><text:span text:style-name="T7">176 <text:s/>| <text:s text:c="3"/></text:span><text:span text:style-name="T8"><text:s text:c="16"/></text:span><text:span text:style-name="T9">if</text:span><text:span text:style-name="T8"> (d-&gt;d_type == DT_DIR) {</text:span></text:p>
      <text:p text:style-name="P32"><text:span text:style-name="T7">177 <text:s/>| <text:s text:c="3"/></text:span><text:span text:style-name="T8"><text:s text:c="20"/>push(&amp;dirsStack, fullPath);</text:span></text:p>
      <text:p text:style-name="P32"><text:span text:style-name="T7">178 <text:s/>| <text:s text:c="3"/></text:span><text:span text:style-name="T8"><text:s text:c="16"/>} </text:span><text:span text:style-name="T9">else</text:span><text:span text:style-name="T8"> </text:span><text:span text:style-name="T9">if</text:span><text:span text:style-name="T8"> (d-&gt;d_type == DT_REG) {</text:span></text:p>
      <text:p text:style-name="P32"><text:span text:style-name="T7">179 <text:s/>| <text:s text:c="3"/></text:span><text:span text:style-name="T8"><text:s text:c="20"/></text:span><text:span text:style-name="T9">if</text:span><text:span text:style-name="T8"> (search(fullPath, targetBytes, targetLen, debugMode)) {</text:span></text:p>
      <text:p text:style-name="P32"><text:span text:style-name="T7">180 <text:s/>| <text:s text:c="3"/></text:span><text:span text:style-name="T8"><text:s text:c="24"/>printf(</text:span><text:span text:style-name="T10">"%s\n"</text:span><text:span text:style-name="T8">, fullPath);</text:span></text:p>
      <text:p text:style-name="P32"><text:span text:style-name="T7">181 <text:s/>| <text:s text:c="3"/></text:span><text:span text:style-name="T8"><text:s text:c="20"/>}</text:span></text:p>
      <text:p text:style-name="P32"><text:span text:style-name="T7">182 <text:s/>| <text:s text:c="3"/></text:span><text:span text:style-name="T8"><text:s text:c="16"/>}</text:span></text:p>
      <text:p text:style-name="P33">183 <text:s/>| <text:s text:c="3"/></text:p>
      <text:p text:style-name="P32"><text:span text:style-name="T7">184 <text:s/>| <text:s text:c="3"/></text:span><text:span text:style-name="T8"><text:s text:c="16"/>bpos += d-&gt;d_reclen;</text:span></text:p>
      <text:p text:style-name="P32"><text:span text:style-name="T7">185 <text:s/>| <text:s text:c="3"/></text:span><text:span text:style-name="T8"><text:s text:c="12"/>} <text:s text:c="6"/></text:span></text:p>
      <text:p text:style-name="P32"><text:span text:style-name="T7">186 <text:s/>| <text:s text:c="3"/></text:span><text:span text:style-name="T8"><text:s text:c="8"/>}</text:span></text:p>
      <text:p text:style-name="P32"><text:span text:style-name="T7">187 <text:s/>| <text:s text:c="3"/></text:span><text:span text:style-name="T8"><text:s text:c="8"/>close(fd);</text:span></text:p>
      <text:p text:style-name="P32"><text:span text:style-name="T7">188 <text:s/>| <text:s text:c="3"/></text:span><text:span text:style-name="T8"><text:s text:c="8"/>free(currentDir);</text:span></text:p>
      <text:p text:style-name="P32"><text:span text:style-name="T7">189 <text:s/>| <text:s text:c="3"/></text:span><text:span text:style-name="T8"><text:s text:c="4"/>}</text:span></text:p>
      <text:p text:style-name="P33">190 <text:s/>| <text:s text:c="3"/></text:p>
      <text:p text:style-name="P33">191 <text:s/>| <text:s text:c="3"/></text:p>
      <text:p text:style-name="P32"><text:span text:style-name="T7">192 <text:s/>| <text:s text:c="3"/></text:span><text:span text:style-name="T8"><text:s text:c="4"/></text:span><text:span text:style-name="T9">return</text:span><text:span text:style-name="T8"> 0;</text:span></text:p>
      <text:p text:style-name="P35"><text:span text:style-name="T7">193 <text:s/>| <text:s text:c="3"/></text:span>}</text:p>
      <text:p text:style-name="P36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унок" style:family="paragraph" style:parent-style-name="Caption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4-27T13:02:10.396052344</dc:date>
    <meta:editing-duration>PT7H42M36S</meta:editing-duration>
    <meta:editing-cycles>21</meta:editing-cycles>
    <meta:generator>LibreOffice/26.2.2.2$Linux_X86_64 LibreOffice_project/620$Build-2</meta:generator>
    <meta:document-statistic meta:table-count="0" meta:image-count="3" meta:object-count="0" meta:page-count="10" meta:paragraph-count="292" meta:word-count="1495" meta:character-count="10384" meta:non-whitespace-character-count="6903"/>
  </office:meta>
</office:document-meta>
</file>