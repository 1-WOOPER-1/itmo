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6000002B004628705.png" manifest:media-type="image/png"/>
  <manifest:file-entry manifest:full-path="Pictures/1000000100000295000003555CAD7715.png" manifest:media-type="image/png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6.004cm"/>
    </style:style>
    <style:style style:name="Table1.B" style:family="table-column">
      <style:table-column-properties style:column-width="11.5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6.004cm"/>
    </style:style>
    <style:style style:name="Table2.B" style:family="table-column">
      <style:table-column-properties style:column-width="11.58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84cm" fo:margin-left="0.009cm" fo:margin-top="0cm" fo:margin-bottom="0cm" table:align="left" style:writing-mode="lr-tb"/>
    </style:style>
    <style:style style:name="Table3.A" style:family="table-column">
      <style:table-column-properties style:column-width="6.004cm"/>
    </style:style>
    <style:style style:name="Table3.B" style:family="table-column">
      <style:table-column-properties style:column-width="11.5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fo:padding="0.097cm" fo:border="0.5pt solid #000000" style:writing-mode="lr-tb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7.584cm" fo:margin-left="0.009cm" fo:margin-top="0cm" fo:margin-bottom="0cm" table:align="left" style:writing-mode="lr-tb"/>
    </style:style>
    <style:style style:name="Table4.A" style:family="table-column">
      <style:table-column-properties style:column-width="3.196cm"/>
    </style:style>
    <style:style style:name="Table4.B" style:family="table-column">
      <style:table-column-properties style:column-width="14.38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fo:padding="0.097cm" fo:border="0.5pt solid #000000" style:writing-mode="lr-tb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6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1ddbd4" officeooo:paragraph-rsid="001ddbd4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fb6cf" officeooo:paragraph-rsid="001fb6cf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1fb6cf" officeooo:paragraph-rsid="001fb6cf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57bfa" officeooo:paragraph-rsid="00257bfa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able_20_Contents">
      <style:paragraph-properties fo:text-align="left" style:justify-single-word="false"/>
      <style:text-properties officeooo:rsid="00257bfa" officeooo:paragraph-rsid="00257bfa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rsid="000f2314" officeooo:paragraph-rsid="00257bfa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rsid="001fb6cf" officeooo:paragraph-rsid="001fb6cf"/>
    </style:style>
    <style:style style:name="P22" style:family="paragraph" style:parent-style-name="Text_20_body">
      <style:paragraph-properties fo:text-align="center" style:justify-single-word="false"/>
      <style:text-properties officeooo:rsid="00257bfa" officeooo:paragraph-rsid="00257bfa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rsid="001fb6cf" officeooo:paragraph-rsid="00257bfa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paragraph-rsid="001fb6cf"/>
    </style:style>
    <style:style style:name="P25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erif" fo:font-weight="bold" officeooo:rsid="00257bfa" officeooo:paragraph-rsid="00257bf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erif" fo:font-weight="bold" style:font-weight-asian="bold" style:font-weight-complex="bold"/>
    </style:style>
    <style:style style:name="P27" style:family="paragraph" style:parent-style-name="Text_20_body">
      <style:paragraph-properties fo:line-height="115%" fo:text-align="center" style:justify-single-word="false">
        <style:tab-stops/>
      </style:paragraph-properties>
      <style:text-properties style:font-name="Liberation Serif" officeooo:rsid="00257bfa" officeooo:paragraph-rsid="00257bfa"/>
    </style:style>
    <style:style style:name="P28" style:family="paragraph" style:parent-style-name="Table_20_Contents">
      <style:paragraph-properties fo:text-align="left" style:justify-single-word="false">
        <style:tab-stops/>
      </style:paragraph-properties>
      <style:text-properties style:font-name="Liberation Serif" officeooo:rsid="00257bfa" officeooo:paragraph-rsid="00257bfa"/>
    </style:style>
    <style:style style:name="P29" style:family="paragraph" style:parent-style-name="Table_20_Contents">
      <style:paragraph-properties fo:text-align="left" style:justify-single-word="false">
        <style:tab-stops/>
      </style:paragraph-properties>
      <style:text-properties style:font-name="Liberation Serif"/>
    </style:style>
    <style:style style:name="P30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paragraph-rsid="000f2314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2074ab" officeooo:paragraph-rsid="002074ab"/>
    </style:style>
    <style:style style:name="P32" style:family="paragraph" style:parent-style-name="Text_20_body">
      <loext:graphic-properties draw:fill="none"/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8pt" fo:language="zxx" fo:country="none" fo:font-style="normal" style:text-underline-style="none" fo:font-weight="normal" officeooo:rsid="002074ab" officeooo:paragraph-rsid="002074ab" fo:background-color="transparent" style:font-size-asian="8pt" style:font-size-complex="8pt"/>
    </style:style>
    <style:style style:name="P33" style:family="paragraph" style:parent-style-name="Text_20_body">
      <loext:graphic-properties draw:fill="none"/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8000" loext:opacity="100%" style:font-name="Liberation Mono" fo:font-size="8pt" fo:language="zxx" fo:country="none" fo:font-style="normal" style:text-underline-style="none" fo:font-weight="normal" officeooo:rsid="002074ab" officeooo:paragraph-rsid="002074ab" fo:background-color="transparent" style:font-size-asian="8pt" style:font-size-complex="8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074ab" officeooo:paragraph-rsid="002074ab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2074ab" officeooo:paragraph-rsid="002074ab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size="8pt" officeooo:rsid="002074ab" officeooo:paragraph-rsid="002074ab" style:font-size-asian="8pt" style:font-size-complex="8pt"/>
    </style:style>
    <style:style style:name="P37" style:family="paragraph" style:parent-style-name="Рисунок">
      <style:paragraph-properties fo:text-align="center" style:justify-single-word="false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231fa8" officeooo:paragraph-rsid="00231fa8"/>
    </style:style>
    <style:style style:name="P39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style:use-window-font-color="true" loext:opacity="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40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fo:color="#008000" loext:opacity="10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41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fo:color="#0000ff" loext:opacity="10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42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fo:color="#000000" loext:opacity="10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31fa8" officeooo:paragraph-rsid="00231fa8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5a450" officeooo:paragraph-rsid="0025a450"/>
    </style:style>
    <style:style style:name="P45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8pt" fo:language="zxx" fo:country="none" fo:font-style="normal" style:text-underline-style="none" fo:font-weight="normal" officeooo:rsid="0025a450" officeooo:paragraph-rsid="0025a450" fo:background-color="transparent" style:font-size-asian="8pt" style:font-size-complex="8pt"/>
    </style:style>
    <style:style style:name="P46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8000" loext:opacity="100%" style:font-name="Liberation Mono" fo:font-size="8pt" fo:language="zxx" fo:country="none" fo:font-style="normal" style:text-underline-style="none" fo:font-weight="normal" officeooo:rsid="0025a450" officeooo:paragraph-rsid="0025a450" fo:background-color="transparent" style:font-size-asian="8pt" style:font-size-complex="8pt"/>
    </style:style>
    <style:style style:name="P47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size="8pt" fo:language="zxx" fo:country="none" fo:font-style="normal" style:text-underline-style="none" fo:font-weight="normal" officeooo:rsid="0025a450" officeooo:paragraph-rsid="0025a450" fo:background-color="transparent" style:font-size-asian="8pt" style:font-size-complex="8p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25a450" officeooo:paragraph-rsid="0025a450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rsid="0025a450" officeooo:paragraph-rsid="0025a450"/>
    </style:style>
    <style:style style:name="P50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ff" loext:opacity="100%" style:font-name="Liberation Mono" fo:font-size="8pt" fo:language="zxx" fo:country="none" fo:font-style="normal" style:text-underline-style="none" fo:font-weight="normal" officeooo:rsid="0025a450" officeooo:paragraph-rsid="0025a450" fo:background-color="transparen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dbd4"/>
    </style:style>
    <style:style style:name="T3" style:family="text">
      <style:text-properties officeooo:rsid="000ca6c1"/>
    </style:style>
    <style:style style:name="T4" style:family="text">
      <style:text-properties officeooo:rsid="00257bfa"/>
    </style:style>
    <style:style style:name="T5" style:family="text">
      <style:text-properties officeooo:rsid="0016960e"/>
    </style:style>
    <style:style style:name="T6" style:family="text">
      <style:text-properties officeooo:rsid="001fb6cf"/>
    </style:style>
    <style:style style:name="T7" style:family="text">
      <style:text-properties fo:color="#000000" loext:opacity="100%" style:font-name="Liberation Serif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8" style:family="text">
      <style:text-properties fo:font-weight="bold" officeooo:rsid="000f2314" style:font-weight-asian="bold" style:font-weight-complex="bold"/>
    </style:style>
    <style:style style:name="T9" style:family="text">
      <style:text-properties fo:color="#008000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a31515" loext:opacity="100%"/>
    </style:style>
    <style:style style:name="T13" style:family="text">
      <style:text-properties officeooo:rsid="0025a450"/>
    </style:style>
    <style:style style:name="T14" style:family="text">
      <style:text-properties fo:color="#2b91af" loext:opacity="100%"/>
    </style:style>
    <style:style style:name="T15" style:family="text">
      <style:text-properties fo:color="#008000" loext:opacity="100%" style:font-name="Liberation Mono" fo:font-size="8pt" fo:language="zxx" fo:country="none" fo:font-style="normal" style:text-underline-style="none" fo:font-weight="normal" fo:background-color="transparent" loext:char-shading-value="0" style:font-size-asian="8pt" style:font-size-complex="8pt"/>
    </style:style>
    <style:style style:name="T16" style:family="text">
      <style:text-properties fo:color="#0000ff" loext:opacity="100%" style:font-name="Liberation Mono" fo:font-size="8pt" fo:language="zxx" fo:country="none" fo:font-style="normal" style:text-underline-style="none" fo:font-weight="normal" fo:background-color="transparent" loext:char-shading-value="0" style:font-size-asian="8pt" style:font-size-complex="8pt"/>
    </style:style>
    <style:style style:name="T17" style:family="text">
      <style:text-properties fo:color="#000000" loext:opacity="100%" fo:font-style="normal" style:text-underline-style="none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Основы системного программирования</text:span>»</text:p>
      <text:p text:style-name="P3"/>
      <text:p text:style-name="P3"/>
      <text:p text:style-name="P3">ОТЧЕТ ПО ЛАБОРАТОРНОЙ РАБОТЕ <text:span text:style-name="T3">№</text:span><text:span text:style-name="T4">2</text:span></text:p>
      <text:p text:style-name="P3">«<text:span text:style-name="T4">Использование динамических библиотек</text:span>»</text:p>
      <text:p text:style-name="P3"/>
      <text:p text:style-name="P5">Выполнил:</text:p>
      <text:p text:style-name="P5">Пахомов Владимир Юрьевич, студент группы N3250</text:p>
      <text:p text:style-name="P6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6">________________</text:p>
      <text:p text:style-name="P7">(подпись) <text:s text:c="8"/></text:p>
      <text:p text:style-name="P5"/>
      <text:p text:style-name="P5">Проверил:</text:p>
      <text:p text:style-name="P8">Грозов Владимир Андреевич</text:p>
      <text:p text:style-name="P9"/>
      <text:p text:style-name="P10">_____________________</text:p>
      <text:p text:style-name="P7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5">6</text:span>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ЗАДАНИЕ. ВАРИАНТ 19" text:style-name="Index_20_Link" text:visited-style-name="Index_20_Link">ЗАДАНИЕ. ВАРИАНТ 19<text:tab/>3</text:a></text:p>
          <text:p text:style-name="P14"><text:a xlink:type="simple" xlink:href="#__RefHeading___Toc143_2058273410" office:name="ХОД РАБОТЫ" text:style-name="Index_20_Link" text:visited-style-name="Index_20_Link">ХОД РАБОТЫ<text:tab/>4</text:a></text:p>
        </text:index-body>
      </text:table-of-content>
      <text:p text:style-name="P13"/>
      <text:h text:style-name="P15" text:outline-level="1"><text:bookmark-start text:name="__RefHeading___Toc82_2058273410"/>ЗАДАНИЕ. ВАРИАНТ 1<text:span text:style-name="T4">9</text:span><text:bookmark-end text:name="__RefHeading___Toc82_2058273410"/></text:h>
      <text:p text:style-name="P16">Таблица 1:<text:span text:style-name="T4"> Интерфейсные функции библиотеки-плагина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Функция</text:p>
          </table:table-cell>
          <table:table-cell table:style-name="Table1.B1" office:value-type="string">
            <text:p text:style-name="P17">Назначение</text:p>
          </table:table-cell>
        </table:table-row>
        <table:table-row>
          <table:table-cell table:style-name="Table1.A2" office:value-type="string">
            <text:p text:style-name="P18">plugin_get_info</text:p>
          </table:table-cell>
          <table:table-cell table:style-name="Table1.B2" office:value-type="string">
            <text:p text:style-name="P19">Получение информации о поддерживаемых плагином опциях.</text:p>
          </table:table-cell>
        </table:table-row>
        <table:table-row>
          <table:table-cell table:style-name="Table1.A2" office:value-type="string">
            <text:p text:style-name="P18">plugin_process_file</text:p>
          </table:table-cell>
          <table:table-cell table:style-name="Table1.B2" office:value-type="string">
            <text:p text:style-name="P19">Проверка соответствия файла заданным критериям.</text:p>
          </table:table-cell>
        </table:table-row>
      </table:table>
      <text:p text:style-name="P20"/>
      <text:p text:style-name="P21">Таблица 2:<text:span text:style-name="T4"> Опции командной строки, поддерживаемые программой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Опция</text:p>
          </table:table-cell>
          <table:table-cell table:style-name="Table2.B1" office:value-type="string">
            <text:p text:style-name="P17">Назначение</text:p>
          </table:table-cell>
        </table:table-row>
        <table:table-row>
          <table:table-cell table:style-name="Table2.A2" office:value-type="string">
            <text:p text:style-name="P22">-P dir</text:p>
          </table:table-cell>
          <table:table-cell table:style-name="Table2.B2" office:value-type="string">
            <text:p text:style-name="P19">Каталог с плагинами.</text:p>
          </table:table-cell>
        </table:table-row>
        <table:table-row>
          <table:table-cell table:style-name="Table2.A2" office:value-type="string">
            <text:p text:style-name="P22">-A</text:p>
          </table:table-cell>
          <table:table-cell table:style-name="Table2.B2" office:value-type="string">
            <text:p text:style-name="P19">Объединение опций плагинов с помощью операции «И» (действует по умолчанию).</text:p>
          </table:table-cell>
        </table:table-row>
        <table:table-row>
          <table:table-cell table:style-name="Table2.A2" office:value-type="string">
            <text:p text:style-name="P22">-O</text:p>
          </table:table-cell>
          <table:table-cell table:style-name="Table2.B2" office:value-type="string">
            <text:p text:style-name="P19">Объединение опций плагинов с помощью операции «ИЛИ».</text:p>
          </table:table-cell>
        </table:table-row>
        <table:table-row>
          <table:table-cell table:style-name="Table2.A2" office:value-type="string">
            <text:p text:style-name="P22">-N</text:p>
          </table:table-cell>
          <table:table-cell table:style-name="Table2.B2" office:value-type="string">
            <text:p text:style-name="P19">Инвертирование условия поиска (после объединения опций плагинов с помощью -A или -O).</text:p>
          </table:table-cell>
        </table:table-row>
        <table:table-row>
          <table:table-cell table:style-name="Table2.A2" office:value-type="string">
            <text:p text:style-name="P22">-v</text:p>
          </table:table-cell>
          <table:table-cell table:style-name="Table2.B2" office:value-type="string">
            <text:p text:style-name="P19">Вывод версии программы и информации о программе (ФИО -v исполнителя, номер группы, номер варианта лабораторной).</text:p>
          </table:table-cell>
        </table:table-row>
        <table:table-row>
          <table:table-cell table:style-name="Table2.A2" office:value-type="string">
            <text:p text:style-name="P22">-h</text:p>
          </table:table-cell>
          <table:table-cell table:style-name="Table2.B2" office:value-type="string">
            <text:p text:style-name="P19">Вывод справки по опциям.</text:p>
          </table:table-cell>
        </table:table-row>
      </table:table>
      <text:p text:style-name="P23"/>
      <text:p text:style-name="P24"><text:span text:style-name="T6">Таблица 3:</text:span><text:span text:style-name="T4"> Переменные окружения, поддерживаемые программой и динамической библиотекой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Переменная</text:p>
          </table:table-cell>
          <table:table-cell table:style-name="Table3.B1" office:value-type="string">
            <text:p text:style-name="P26">Назначение</text:p>
          </table:table-cell>
        </table:table-row>
        <table:table-row table:style-name="Table3.1">
          <table:table-cell table:style-name="Table3.A2" office:value-type="string">
            <text:p text:style-name="P27">LAB2DEBUG</text:p>
          </table:table-cell>
          <table:table-cell table:style-name="Table3.B2" office:value-type="string">
            <text:p text:style-name="P28">Включение вывода отладочной информации</text:p>
          </table:table-cell>
        </table:table-row>
      </table:table>
      <text:p text:style-name="Standard" loext:marker-style-name="T7"/>
      <text:p text:style-name="P21">Таблица 4:<text:span text:style-name="T4"> Опции, поддерживаемые библиотекой-плагином (вариант 19)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Вариант (номер)</text:p>
          </table:table-cell>
          <table:table-cell table:style-name="Table4.B1" office:value-type="string">
            <text:p text:style-name="P25">Описание поддерживаемых плагином опций</text:p>
          </table:table-cell>
        </table:table-row>
        <table:table-row table:style-name="Table4.1">
          <table:table-cell table:style-name="Table4.A2" office:value-type="string">
            <text:p text:style-name="P27">19</text:p>
          </table:table-cell>
          <table:table-cell table:style-name="Table4.B2" office:value-type="string">
            <text:p text:style-name="P29">Опция: --ipv4-addr-bin &lt;значение&gt;</text:p>
            <text:p text:style-name="P29">Назначение: поиск файлов, содержащих заданное значение IPv4-адреса в бинарной<text:span text:style-name="T4"> </text:span>(little-endian или big-endian) форме, т. е. в виде четырех последовательных октетов<text:span text:style-name="T4"> </text:span>с заданными значениями.</text:p>
            <text:p text:style-name="P29">Пример: --ipv4-addr-bin 192.168.8.1</text:p>
          </table:table-cell>
        </table:table-row>
      </table:table>
      <text:h text:style-name="P30" text:outline-level="1"><text:bookmark-start text:name="__RefHeading___Toc143_2058273410"/><text:soft-page-break/><text:span text:style-name="T8">ХОД РАБОТЫ</text:span><text:bookmark-end text:name="__RefHeading___Toc143_2058273410"/></text:h>
      <text:p text:style-name="P31">Исходный код Makefile:</text:p>
      <text:p text:style-name="P32"><text:span text:style-name="T9"><text:s/>1 <text:s/>| <text:s text:c="3"/></text:span><text:span text:style-name="T10">CC = gcc</text:span></text:p>
      <text:p text:style-name="P32"><text:span text:style-name="T9"><text:s/>2 <text:s/>| <text:s text:c="3"/></text:span><text:span text:style-name="T10">CFLAGS = -Wall -Wextra -Werror -std=c11 -D_GNU_SOURCE</text:span></text:p>
      <text:p text:style-name="P32"><text:span text:style-name="T9"><text:s/>3 <text:s/>| <text:s text:c="3"/></text:span><text:span text:style-name="T10">LDFLAGS = -ldl</text:span></text:p>
      <text:p text:style-name="P32"><text:span text:style-name="T9"><text:s/>4 <text:s/>| <text:s text:c="3"/></text:span><text:span text:style-name="T10">TARGET = lab2vypN3250</text:span></text:p>
      <text:p text:style-name="P32"><text:span text:style-name="T9"><text:s/>5 <text:s/>| <text:s text:c="3"/></text:span><text:span text:style-name="T10">LIB = libvypN3250.so</text:span></text:p>
      <text:p text:style-name="P33"><text:s/>6 <text:s/>| <text:s text:c="3"/></text:p>
      <text:p text:style-name="P32"><text:span text:style-name="T9"><text:s/>7 <text:s/>| <text:s text:c="3"/></text:span><text:span text:style-name="T10">all: </text:span><text:span text:style-name="T11">$(</text:span><text:span text:style-name="T10">TARGET</text:span><text:span text:style-name="T11">)</text:span><text:span text:style-name="T10"> </text:span><text:span text:style-name="T11">$(</text:span><text:span text:style-name="T10">LIB</text:span><text:span text:style-name="T11">)</text:span></text:p>
      <text:p text:style-name="P33"><text:s/>8 <text:s/>| <text:s text:c="3"/></text:p>
      <text:p text:style-name="P32"><text:span text:style-name="T9"><text:s/>9 <text:s/>| <text:s text:c="3"/></text:span><text:span text:style-name="T10">$(TARGET): lab2vypN3250.c</text:span></text:p>
      <text:p text:style-name="P32"><text:span text:style-name="T9">10 <text:s/>| <text:s text:c="3"/></text:span><text:span text:style-name="T10"><text:tab/></text:span><text:span text:style-name="T11">$(</text:span><text:span text:style-name="T10">CC</text:span><text:span text:style-name="T11">)</text:span><text:span text:style-name="T10"> </text:span><text:span text:style-name="T11">$(</text:span><text:span text:style-name="T10">CFLAGS</text:span><text:span text:style-name="T11">)</text:span><text:span text:style-name="T10"> lab2vypN3250.c -o </text:span><text:span text:style-name="T11">$(</text:span><text:span text:style-name="T10">TARGET</text:span><text:span text:style-name="T11">)</text:span><text:span text:style-name="T10"> </text:span><text:span text:style-name="T11">$(</text:span><text:span text:style-name="T10">LDFLAGS</text:span><text:span text:style-name="T11">)</text:span></text:p>
      <text:p text:style-name="P33">11 <text:s/>| <text:s text:c="3"/></text:p>
      <text:p text:style-name="P32"><text:span text:style-name="T9">12 <text:s/>| <text:s text:c="3"/></text:span><text:span text:style-name="T10">$(LIB): libvypN3250.c</text:span></text:p>
      <text:p text:style-name="P32"><text:span text:style-name="T9">13 <text:s/>| <text:s text:c="3"/></text:span><text:span text:style-name="T10"><text:tab/></text:span><text:span text:style-name="T11">$(</text:span><text:span text:style-name="T10">CC</text:span><text:span text:style-name="T11">)</text:span><text:span text:style-name="T10"> </text:span><text:span text:style-name="T11">$(</text:span><text:span text:style-name="T10">CFLAGS</text:span><text:span text:style-name="T11">)</text:span><text:span text:style-name="T10"> -fPIC -shared libvypN3250.c -o </text:span><text:span text:style-name="T11">$(</text:span><text:span text:style-name="T10">LIB</text:span><text:span text:style-name="T11">)</text:span></text:p>
      <text:p text:style-name="P33">14 <text:s/>| <text:s text:c="3"/></text:p>
      <text:p text:style-name="P32"><text:span text:style-name="T9">15 <text:s/>| <text:s text:c="3"/></text:span><text:span text:style-name="T10">clean:</text:span></text:p>
      <text:p text:style-name="P32"><text:span text:style-name="T9">16 <text:s/>| <text:s text:c="3"/></text:span><text:span text:style-name="T10"><text:tab/>rm -f </text:span><text:span text:style-name="T11">$(</text:span><text:span text:style-name="T10">TARGET</text:span><text:span text:style-name="T11">)</text:span><text:span text:style-name="T10"> </text:span><text:span text:style-name="T11">$(</text:span><text:span text:style-name="T10">LIB</text:span><text:span text:style-name="T11">)</text:span><text:span text:style-name="T10"> *.o</text:span></text:p>
      <text:p text:style-name="P32"><text:span text:style-name="T9">17 <text:s/>| <text:s text:c="3"/></text:span><text:span text:style-name="T10"><text:tab/>rm -rf test</text:span></text:p>
      <text:p text:style-name="P33">18 <text:s/>| <text:s text:c="3"/></text:p>
      <text:p text:style-name="P33">19 <text:s/>| <text:s text:c="3"/></text:p>
      <text:p text:style-name="P32"><text:span text:style-name="T9">20 <text:s/>| <text:s text:c="3"/></text:span><text:span text:style-name="T10">EXE = ./lab2vypN3250</text:span></text:p>
      <text:p text:style-name="P32"><text:span text:style-name="T9">21 <text:s/>| <text:s text:c="3"/></text:span><text:span text:style-name="T10">TEST_DIR = test</text:span></text:p>
      <text:p text:style-name="P32"><text:span text:style-name="T9">22 <text:s/>| <text:s text:c="3"/></text:span><text:span text:style-name="T10">PLUGIN_PATH = .</text:span></text:p>
      <text:p text:style-name="P33">23 <text:s/>| <text:s text:c="3"/></text:p>
      <text:p text:style-name="P32"><text:span text:style-name="T9">24 <text:s/>| <text:s text:c="3"/></text:span><text:span text:style-name="T10">test: all</text:span></text:p>
      <text:p text:style-name="P32"><text:span text:style-name="T9">25 <text:s/>| <text:s text:c="3"/></text:span><text:span text:style-name="T10"><text:tab/>@echo </text:span><text:span text:style-name="T12">""</text:span></text:p>
      <text:p text:style-name="P32"><text:span text:style-name="T9">26 <text:s/>| <text:s text:c="3"/></text:span><text:span text:style-name="T10"><text:tab/>@echo </text:span><text:span text:style-name="T12">"--- Подготовка среды для тестирования опций -A -O -N ---"</text:span></text:p>
      <text:p text:style-name="P32"><text:span text:style-name="T9">27 <text:s/>| <text:s text:c="3"/></text:span><text:span text:style-name="T10"><text:tab/>rm -rf </text:span><text:span text:style-name="T11">$(</text:span><text:span text:style-name="T10">TEST_DIR</text:span><text:span text:style-name="T11">)</text:span></text:p>
      <text:p text:style-name="P32"><text:span text:style-name="T9">28 <text:s/>| <text:s text:c="3"/></text:span><text:span text:style-name="T10"><text:tab/>mkdir -p </text:span><text:span text:style-name="T11">$(</text:span><text:span text:style-name="T10">TEST_DIR</text:span><text:span text:style-name="T11">)</text:span></text:p>
      <text:p text:style-name="P33">29 <text:s/>| <text:s text:c="3"/><text:tab/># Файл 1: Содержит только IP 1.1.1.1</text:p>
      <text:p text:style-name="P32"><text:span text:style-name="T9">30 <text:s/>| <text:s text:c="3"/></text:span><text:span text:style-name="T10"><text:tab/>printf </text:span><text:span text:style-name="T12">"\x01\x01\x01\x01"</text:span><text:span text:style-name="T10"> &gt; </text:span><text:span text:style-name="T11">$(</text:span><text:span text:style-name="T10">TEST_DIR</text:span><text:span text:style-name="T11">)</text:span><text:span text:style-name="T10">/only_1.bin</text:span></text:p>
      <text:p text:style-name="P33">31 <text:s/>| <text:s text:c="3"/><text:tab/># Файл 2: Содержит только IP 2.2.2.2</text:p>
      <text:p text:style-name="P32"><text:span text:style-name="T9">32 <text:s/>| <text:s text:c="3"/></text:span><text:span text:style-name="T10"><text:tab/>printf </text:span><text:span text:style-name="T12">"\x02\x02\x02\x02"</text:span><text:span text:style-name="T10"> &gt; </text:span><text:span text:style-name="T11">$(</text:span><text:span text:style-name="T10">TEST_DIR</text:span><text:span text:style-name="T11">)</text:span><text:span text:style-name="T10">/only_2.bin</text:span></text:p>
      <text:p text:style-name="P33">33 <text:s/>| <text:s text:c="3"/><text:tab/># Файл 3: Содержит оба IP</text:p>
      <text:p text:style-name="P32"><text:span text:style-name="T9">34 <text:s/>| <text:s text:c="3"/></text:span><text:span text:style-name="T10"><text:tab/>printf </text:span><text:span text:style-name="T12">"\x01\x01\x01\x01\x00\x00\x02\x02\x02\x02"</text:span><text:span text:style-name="T10"> &gt; </text:span><text:span text:style-name="T11">$(</text:span><text:span text:style-name="T10">TEST_DIR</text:span><text:span text:style-name="T11">)</text:span><text:span text:style-name="T10">/both.bin</text:span></text:p>
      <text:p text:style-name="P33">35 <text:s/>| <text:s text:c="3"/><text:tab/># Файл 4: Пустой файл (не содержит ничего)</text:p>
      <text:p text:style-name="P32"><text:span text:style-name="T9">36 <text:s/>| <text:s text:c="3"/></text:span><text:span text:style-name="T10"><text:tab/>touch </text:span><text:span text:style-name="T11">$(</text:span><text:span text:style-name="T10">TEST_DIR</text:span><text:span text:style-name="T11">)</text:span><text:span text:style-name="T10">/empty.txt</text:span></text:p>
      <text:p text:style-name="P32"><text:span text:style-name="T9">37 <text:s/>| <text:s text:c="3"/></text:span><text:span text:style-name="T10"><text:tab/>@echo </text:span><text:span text:style-name="T12">""</text:span></text:p>
      <text:p text:style-name="P33">38 <text:s/>| <text:s text:c="3"/></text:p>
      <text:p text:style-name="P32"><text:span text:style-name="T9">39 <text:s/>| <text:s text:c="3"/></text:span><text:span text:style-name="T10"><text:tab/>@echo </text:span><text:span text:style-name="T12">"---- Тест -A ----"</text:span></text:p>
      <text:p text:style-name="P32"><text:span text:style-name="T9">40 <text:s/>| <text:s text:c="3"/></text:span><text:span text:style-name="T10"><text:tab/></text:span><text:span text:style-name="T11">$(</text:span><text:span text:style-name="T10">EXE</text:span><text:span text:style-name="T11">)</text:span><text:span text:style-name="T10"> -P </text:span><text:span text:style-name="T11">$(</text:span><text:span text:style-name="T10">PLUGIN_PATH</text:span><text:span text:style-name="T11">)</text:span><text:span text:style-name="T10"> -A --ipv4-addr-bin 1.1.1.1 --ipv4-addr-bin 2.2.2.2 </text:span><text:span text:style-name="T11">$(</text:span><text:span text:style-name="T10">TEST_DIR</text:span><text:span text:style-name="T11">)</text:span></text:p>
      <text:p text:style-name="P32"><text:span text:style-name="T9">41 <text:s/>| <text:s text:c="3"/></text:span><text:span text:style-name="T10"><text:tab/>@echo </text:span><text:span text:style-name="T12">""</text:span></text:p>
      <text:p text:style-name="P33">42 <text:s/>| <text:s text:c="3"/></text:p>
      <text:p text:style-name="P32"><text:span text:style-name="T9">43 <text:s/>| <text:s text:c="3"/></text:span><text:span text:style-name="T10"><text:tab/>@echo </text:span><text:span text:style-name="T12">"---- Тест -O ----"</text:span></text:p>
      <text:p text:style-name="P32"><text:span text:style-name="T9">44 <text:s/>| <text:s text:c="3"/></text:span><text:span text:style-name="T10"><text:tab/></text:span><text:span text:style-name="T11">$(</text:span><text:span text:style-name="T10">EXE</text:span><text:span text:style-name="T11">)</text:span><text:span text:style-name="T10"> -P </text:span><text:span text:style-name="T11">$(</text:span><text:span text:style-name="T10">PLUGIN_PATH</text:span><text:span text:style-name="T11">)</text:span><text:span text:style-name="T10"> -O --ipv4-addr-bin 1.1.1.1 --ipv4-addr-bin 2.2.2.2 </text:span><text:span text:style-name="T11">$(</text:span><text:span text:style-name="T10">TEST_DIR</text:span><text:span text:style-name="T11">)</text:span></text:p>
      <text:p text:style-name="P32"><text:span text:style-name="T9">45 <text:s/>| <text:s text:c="3"/></text:span><text:span text:style-name="T10"><text:tab/>@echo </text:span><text:span text:style-name="T12">""</text:span></text:p>
      <text:p text:style-name="P33">46 <text:s/>| <text:s text:c="3"/></text:p>
      <text:p text:style-name="P32"><text:span text:style-name="T9">47 <text:s/>| <text:s text:c="3"/></text:span><text:span text:style-name="T10"><text:tab/>@echo </text:span><text:span text:style-name="T12">"---- Тест -N ----"</text:span></text:p>
      <text:p text:style-name="P32"><text:span text:style-name="T9">48 <text:s/>| <text:s text:c="3"/></text:span><text:span text:style-name="T10"><text:tab/></text:span><text:span text:style-name="T11">$(</text:span><text:span text:style-name="T10">EXE</text:span><text:span text:style-name="T11">)</text:span><text:span text:style-name="T10"> -P </text:span><text:span text:style-name="T11">$(</text:span><text:span text:style-name="T10">PLUGIN_PATH</text:span><text:span text:style-name="T11">)</text:span><text:span text:style-name="T10"> -N --ipv4-addr-bin 1.1.1.1 </text:span><text:span text:style-name="T11">$(</text:span><text:span text:style-name="T10">TEST_DIR</text:span><text:span text:style-name="T11">)</text:span></text:p>
      <text:p text:style-name="P32"><text:span text:style-name="T9">49 <text:s/>| <text:s text:c="3"/></text:span><text:span text:style-name="T10"><text:tab/>@echo </text:span><text:span text:style-name="T12">""</text:span></text:p>
      <text:p text:style-name="P33">50 <text:s/>| <text:s text:c="3"/></text:p>
      <text:p text:style-name="P32"><text:span text:style-name="T9">51 <text:s/>| <text:s text:c="3"/></text:span><text:span text:style-name="T10"><text:tab/>@echo </text:span><text:span text:style-name="T12">"---- Тест -N -O ----"</text:span></text:p>
      <text:p text:style-name="P32"><text:span text:style-name="T9">52 <text:s/>| <text:s text:c="3"/></text:span><text:span text:style-name="T10"><text:tab/></text:span><text:span text:style-name="T11">$(</text:span><text:span text:style-name="T10">EXE</text:span><text:span text:style-name="T11">)</text:span><text:span text:style-name="T10"> -P </text:span><text:span text:style-name="T11">$(</text:span><text:span text:style-name="T10">PLUGIN_PATH</text:span><text:span text:style-name="T11">)</text:span><text:span text:style-name="T10"> -N -O --ipv4-addr-bin 1.1.1.1 --ipv4-addr-bin 2.2.2.2 </text:span><text:span text:style-name="T11">$(</text:span><text:span text:style-name="T10">TEST_DIR</text:span><text:span text:style-name="T11">)</text:span></text:p>
      <text:p text:style-name="P32"><text:span text:style-name="T9">53 <text:s/>| <text:s text:c="3"/></text:span><text:span text:style-name="T10"><text:tab/>@echo</text:span><text:span text:style-name="T12">""</text:span></text:p>
      <text:p text:style-name="P33">54 <text:s/>| <text:s text:c="3"/></text:p>
      <text:p text:style-name="P33">55 <text:s/>| <text:s text:c="3"/></text:p>
      <text:p text:style-name="P32"><text:span text:style-name="T9">56 <text:s/>| <text:s text:c="3"/></text:span><text:span text:style-name="T10">.PHONY: test</text:span></text:p>
      <text:p text:style-name="P34"/>
      <text:p text:style-name="P34"/>
      <text:p text:style-name="P35">Отчет valgrind со строчки HEAP SUMMARY:</text:p>
      <text:p text:style-name="P36">==35158== HEAP SUMMARY:</text:p>
      <text:p text:style-name="P36">==35158== <text:s text:c="4"/>in use at exit: 0 bytes in 0 blocks</text:p>
      <text:p text:style-name="P36">==35158== <text:s text:c="2"/>total heap usage: 25 allocs, 25 frees, 83,737 bytes allocated</text:p>
      <text:p text:style-name="P36">==35158== </text:p>
      <text:p text:style-name="P36">==35158== All heap blocks were freed -- no leaks are possible</text:p>
      <text:p text:style-name="P36">==35158== </text:p>
      <text:p text:style-name="P36">==35158== For lists of detected and suppressed errors, rerun with: -s</text:p>
      <text:p text:style-name="P36">==35158== ERROR SUMMARY: 0 errors from 0 contexts (suppressed: 0 from 0)</text:p>
      <text:p text:style-name="P34"/>
      <text:p text:style-name="P34"><draw:frame draw:style-name="fr2" draw:name="Frame1" text:anchor-type="char" svg:width="17.59cm" draw:z-index="1"><draw:text-box fo:min-height="14.545cm"><text:p text:style-name="P37"><draw:frame draw:style-name="fr3" draw:name="Image1" text:anchor-type="char" svg:width="17.485cm" svg:height="22.565cm" draw:z-index="3"><draw:image xlink:href="Pictures/1000000100000295000003555CAD7715.png" xlink:type="simple" xlink:show="embed" xlink:actuate="onLoad" draw:mime-type="image/png"/></draw:frame>Рисунок <text:sequence text:ref-name="refРисунок0" text:name="Рисунок" text:formula="ooow:Рисунок+1" style:num-format="1">1</text:sequence>: Пример работы программы</text:p></draw:text-box></draw:frame><text:soft-page-break/></text:p>
      <text:p text:style-name="P34"><text:soft-page-break/></text:p>
      <text:p text:style-name="P34"><draw:frame draw:style-name="fr2" draw:name="Frame2" text:anchor-type="char" svg:width="16.268cm" draw:z-index="2"><draw:text-box fo:min-height="14.392cm"><text:p text:style-name="P37"><draw:frame draw:style-name="fr4" draw:name="Image2" text:anchor-type="char" svg:width="16.268cm" svg:height="17.327cm" draw:z-index="4"><draw:image xlink:href="Pictures/1000000100000286000002B004628705.png" xlink:type="simple" xlink:show="embed" xlink:actuate="onLoad" draw:mime-type="image/png"/></draw:frame>Рисунок <text:sequence text:ref-name="refРисунок1" text:name="Рисунок" text:formula="ooow:Рисунок+1" style:num-format="1">2</text:sequence>: Результат работы тестов из Makefile</text:p></draw:text-box></draw:frame></text:p>
      <text:p text:style-name="P34"/>
      <text:p text:style-name="P34"/>
      <text:p text:style-name="P34"/>
      <text:p text:style-name="P38">Исходный код программы lab<text:span text:style-name="T13">2</text:span>vypN3250:</text:p>
      <text:p text:style-name="P39"><text:span text:style-name="T9"><text:s text:c="2"/>1 <text:s/>| <text:s text:c="3"/></text:span><text:span text:style-name="T11">#include</text:span><text:span text:style-name="T10"> </text:span><text:span text:style-name="T9">&lt;stdio.h&gt;</text:span></text:p>
      <text:p text:style-name="P39"><text:span text:style-name="T9"><text:s text:c="2"/>2 <text:s/>| <text:s text:c="3"/></text:span><text:span text:style-name="T11">#include</text:span><text:span text:style-name="T10"> </text:span><text:span text:style-name="T9">&lt;stdlib.h&gt;</text:span></text:p>
      <text:p text:style-name="P39"><text:span text:style-name="T9"><text:s text:c="2"/>3 <text:s/>| <text:s text:c="3"/></text:span><text:span text:style-name="T11">#include</text:span><text:span text:style-name="T10"> </text:span><text:span text:style-name="T9">&lt;string.h&gt;</text:span></text:p>
      <text:p text:style-name="P39"><text:span text:style-name="T9"><text:s text:c="2"/>4 <text:s/>| <text:s text:c="3"/></text:span><text:span text:style-name="T11">#include</text:span><text:span text:style-name="T10"> </text:span><text:span text:style-name="T9">&lt;dirent.h&gt;</text:span></text:p>
      <text:p text:style-name="P39"><text:span text:style-name="T9"><text:s text:c="2"/>5 <text:s/>| <text:s text:c="3"/></text:span><text:span text:style-name="T11">#include</text:span><text:span text:style-name="T10"> </text:span><text:span text:style-name="T9">&lt;dlfcn.h&gt;</text:span></text:p>
      <text:p text:style-name="P39"><text:span text:style-name="T9"><text:s text:c="2"/>6 <text:s/>| <text:s text:c="3"/></text:span><text:span text:style-name="T11">#include</text:span><text:span text:style-name="T10"> </text:span><text:span text:style-name="T9">&lt;errno.h&gt;</text:span></text:p>
      <text:p text:style-name="P39"><text:span text:style-name="T9"><text:s text:c="2"/>7 <text:s/>| <text:s text:c="3"/></text:span><text:span text:style-name="T11">#include</text:span><text:span text:style-name="T10"> </text:span><text:span text:style-name="T9">&lt;getopt.h&gt;</text:span></text:p>
      <text:p text:style-name="P39"><text:span text:style-name="T9"><text:s text:c="2"/>8 <text:s/>| <text:s text:c="3"/></text:span><text:span text:style-name="T11">#include</text:span><text:span text:style-name="T10"> </text:span><text:span text:style-name="T9">&lt;fcntl.h&gt;</text:span></text:p>
      <text:p text:style-name="P39"><text:span text:style-name="T9"><text:s text:c="2"/>9 <text:s/>| <text:s text:c="3"/></text:span><text:span text:style-name="T11">#include</text:span><text:span text:style-name="T10"> </text:span><text:span text:style-name="T9">&lt;unistd.h&gt;</text:span></text:p>
      <text:p text:style-name="P39"><text:span text:style-name="T9"><text:s/>10 <text:s/>| <text:s text:c="3"/></text:span><text:span text:style-name="T11">#include</text:span><text:span text:style-name="T10"> </text:span><text:span text:style-name="T9">&lt;sys/syscall.h&gt;</text:span></text:p>
      <text:p text:style-name="P39"><text:span text:style-name="T9"><text:s/>11 <text:s/>| <text:s text:c="3"/></text:span><text:span text:style-name="T11">#include</text:span><text:span text:style-name="T10"> </text:span><text:span text:style-name="T9">&lt;libgen.h&gt;</text:span></text:p>
      <text:p text:style-name="P39"><text:span text:style-name="T9"><text:s/>12 <text:s/>| <text:s text:c="3"/></text:span><text:span text:style-name="T11">#include</text:span><text:span text:style-name="T10"> </text:span><text:span text:style-name="T9">&lt;stdint.h&gt;</text:span></text:p>
      <text:p text:style-name="P39"><text:span text:style-name="T9"><text:s/>13 <text:s/>| <text:s text:c="3"/></text:span><text:span text:style-name="T11">#include</text:span><text:span text:style-name="T10"> </text:span><text:span text:style-name="T9">&lt;sys/stat.h&gt;</text:span></text:p>
      <text:p text:style-name="P39"><text:span text:style-name="T9"><text:s/>14 <text:s/>| <text:s text:c="3"/></text:span><text:span text:style-name="T11">#include</text:span><text:span text:style-name="T10"> </text:span><text:span text:style-name="T9">"plugin_api.h"</text:span></text:p>
      <text:p text:style-name="P40"><text:s/>15 <text:s/>| <text:s text:c="3"/></text:p>
      <text:p text:style-name="P41"><text:span text:style-name="T9"><text:s/>16 <text:s/>| <text:s text:c="3"/></text:span>#define INITIAL_BUFFER_SIZE 8192</text:p>
      <text:p text:style-name="P40"><text:s/>17 <text:s/>| <text:s text:c="3"/></text:p>
      <text:p text:style-name="P39"><text:span text:style-name="T9"><text:s/>18 <text:s/>| <text:s text:c="3"/></text:span><text:span text:style-name="T11">typedef</text:span><text:span text:style-name="T10"> </text:span><text:span text:style-name="T11">struct</text:span><text:span text:style-name="T10"> </text:span><text:span text:style-name="T14">option_group</text:span><text:span text:style-name="T10"> {</text:span></text:p>
      <text:p text:style-name="P39"><text:span text:style-name="T9"><text:s/>19 <text:s/>| <text:s text:c="3"/></text:span><text:span text:style-name="T10"><text:s text:c="4"/></text:span><text:span text:style-name="T11">struct</text:span><text:span text:style-name="T10"> </text:span><text:span text:style-name="T14">option</text:span><text:span text:style-name="T10"> *opts;</text:span></text:p>
      <text:p text:style-name="P39"><text:span text:style-name="T9"><text:s/>20 <text:s/>| <text:s text:c="3"/></text:span><text:span text:style-name="T10"><text:s text:c="4"/></text:span><text:span text:style-name="T14">size_t</text:span><text:span text:style-name="T10"> count;</text:span></text:p>
      <text:p text:style-name="P39"><text:span text:style-name="T9"><text:s/>21 <text:s/>| <text:s text:c="3"/></text:span><text:span text:style-name="T10">} option_group_t;</text:span></text:p>
      <text:p text:style-name="P40"><text:s/>22 <text:s/>| <text:s text:c="3"/></text:p>
      <text:p text:style-name="P39"><text:span text:style-name="T9"><text:s/>23 <text:s/>| <text:s text:c="3"/></text:span><text:span text:style-name="T11">typedef</text:span><text:span text:style-name="T10"> </text:span><text:span text:style-name="T11">struct</text:span><text:span text:style-name="T10"> </text:span><text:span text:style-name="T14">loaded_plugin</text:span><text:span text:style-name="T10"> {</text:span></text:p>
      <text:p text:style-name="P39"><text:span text:style-name="T9"><text:s/>24 <text:s/>| <text:s text:c="3"/></text:span><text:span text:style-name="T10"><text:s text:c="4"/></text:span><text:span text:style-name="T14">void</text:span><text:span text:style-name="T10"> *handle;</text:span></text:p>
      <text:p text:style-name="P39"><text:span text:style-name="T9"><text:s/>25 <text:s/>| <text:s text:c="3"/></text:span><text:span text:style-name="T10"><text:s text:c="4"/></text:span><text:span text:style-name="T11">struct</text:span><text:span text:style-name="T10"> </text:span><text:span text:style-name="T14">plugin_info</text:span><text:span text:style-name="T10"> info;</text:span></text:p>
      <text:p text:style-name="P39"><text:span text:style-name="T9"><text:s/>26 <text:s/>| <text:s text:c="3"/></text:span><text:span text:style-name="T10"><text:s text:c="4"/></text:span><text:span text:style-name="T14">int</text:span><text:span text:style-name="T10"> (*process_file)(</text:span><text:span text:style-name="T11">const</text:span><text:span text:style-name="T10"> </text:span><text:span text:style-name="T14">char</text:span><text:span text:style-name="T10"> *fname, </text:span><text:span text:style-name="T11">struct</text:span><text:span text:style-name="T10"> </text:span><text:span text:style-name="T14">option</text:span><text:span text:style-name="T10"> in_opts[], </text:span><text:span text:style-name="T14">size_t</text:span><text:span text:style-name="T10"> in_opts_len);</text:span></text:p>
      <text:p text:style-name="P42"><text:span text:style-name="T9"><text:s/>27 <text:s/>| <text:s text:c="3"/></text:span><text:s text:c="4"/></text:p>
      <text:p text:style-name="P39"><text:span text:style-name="T9"><text:s/>28 <text:s/>| <text:s text:c="3"/></text:span><text:span text:style-name="T10"><text:s text:c="4"/>option_group_t *groups;</text:span></text:p>
      <text:p text:style-name="P39"><text:span text:style-name="T9"><text:s/>29 <text:s/>| <text:s text:c="3"/></text:span><text:span text:style-name="T10"><text:s text:c="4"/></text:span><text:span text:style-name="T14">size_t</text:span><text:span text:style-name="T10"> groups_count;</text:span></text:p>
      <text:p text:style-name="P39"><text:span text:style-name="T9"><text:s/>30 <text:s/>| <text:s text:c="3"/></text:span><text:span text:style-name="T10">} loaded_plugin_t;</text:span></text:p>
      <text:p text:style-name="P40"><text:s/>31 <text:s/>| <text:s text:c="3"/></text:p>
      <text:p text:style-name="P39"><text:span text:style-name="T9"><text:s/>32 <text:s/>| <text:s text:c="3"/></text:span><text:span text:style-name="T11">typedef</text:span><text:span text:style-name="T10"> </text:span><text:span text:style-name="T11">struct</text:span><text:span text:style-name="T10"> </text:span><text:span text:style-name="T14">StackNode</text:span><text:span text:style-name="T10"> {</text:span></text:p>
      <text:p text:style-name="P39"><text:span text:style-name="T9"><text:s/>33 <text:s/>| <text:s text:c="3"/></text:span><text:span text:style-name="T10"><text:s text:c="4"/></text:span><text:span text:style-name="T14">char</text:span><text:span text:style-name="T10"> *path;</text:span></text:p>
      <text:p text:style-name="P39"><text:span text:style-name="T9"><text:s/>34 <text:s/>| <text:s text:c="3"/></text:span><text:span text:style-name="T10"><text:s text:c="4"/></text:span><text:span text:style-name="T11">struct</text:span><text:span text:style-name="T10"> </text:span><text:span text:style-name="T14">StackNode</text:span><text:span text:style-name="T10"> *next;</text:span></text:p>
      <text:p text:style-name="P39"><text:span text:style-name="T9"><text:s/>35 <text:s/>| <text:s text:c="3"/></text:span><text:span text:style-name="T10">} StackNode;</text:span></text:p>
      <text:p text:style-name="P40"><text:s/>36 <text:s/>| <text:s text:c="3"/></text:p>
      <text:p text:style-name="P39"><text:span text:style-name="T9"><text:s/>37 <text:s/>| <text:s text:c="3"/></text:span><text:span text:style-name="T14">void</text:span><text:span text:style-name="T10"> push(StackNode **top, </text:span><text:span text:style-name="T11">const</text:span><text:span text:style-name="T10"> </text:span><text:span text:style-name="T14">char</text:span><text:span text:style-name="T10"> *path) {</text:span></text:p>
      <text:p text:style-name="P39"><text:span text:style-name="T9"><text:s/>38 <text:s/>| <text:s text:c="3"/></text:span><text:span text:style-name="T10"><text:s text:c="4"/>StackNode *node = malloc(</text:span><text:span text:style-name="T11">sizeof</text:span><text:span text:style-name="T10">(StackNode));</text:span></text:p>
      <text:p text:style-name="P39"><text:span text:style-name="T9"><text:s/>39 <text:s/>| <text:s text:c="3"/></text:span><text:span text:style-name="T10"><text:s text:c="4"/></text:span><text:span text:style-name="T11">if</text:span><text:span text:style-name="T10"> (!node) exit(1);</text:span></text:p>
      <text:p text:style-name="P39"><text:span text:style-name="T9"><text:s/>40 <text:s/>| <text:s text:c="3"/></text:span><text:span text:style-name="T10"><text:s text:c="4"/>node-&gt;path = strdup(path);</text:span></text:p>
      <text:p text:style-name="P39"><text:span text:style-name="T9"><text:s/>41 <text:s/>| <text:s text:c="3"/></text:span><text:span text:style-name="T10"><text:s text:c="4"/>node-&gt;next = *top;</text:span></text:p>
      <text:p text:style-name="P39"><text:span text:style-name="T9"><text:s/>42 <text:s/>| <text:s text:c="3"/></text:span><text:span text:style-name="T10"><text:s text:c="4"/>*top = node;</text:span></text:p>
      <text:p text:style-name="P42"><text:span text:style-name="T9"><text:s/>43 <text:s/>| <text:s text:c="3"/></text:span>}</text:p>
      <text:p text:style-name="P40"><text:s/>44 <text:s/>| <text:s text:c="3"/></text:p>
      <text:p text:style-name="P39"><text:span text:style-name="T9"><text:s/>45 <text:s/>| <text:s text:c="3"/></text:span><text:span text:style-name="T14">char</text:span><text:span text:style-name="T10"> *pop(StackNode **top) {</text:span></text:p>
      <text:p text:style-name="P39"><text:span text:style-name="T9"><text:s/>46 <text:s/>| <text:s text:c="3"/></text:span><text:span text:style-name="T10"><text:s text:c="4"/></text:span><text:span text:style-name="T11">if</text:span><text:span text:style-name="T10"> (*top == NULL) </text:span><text:span text:style-name="T11">return</text:span><text:span text:style-name="T10"> NULL;</text:span></text:p>
      <text:p text:style-name="P39"><text:span text:style-name="T9"><text:s/>47 <text:s/>| <text:s text:c="3"/></text:span><text:span text:style-name="T10"><text:s text:c="4"/>StackNode *node = *top;</text:span></text:p>
      <text:p text:style-name="P39"><text:span text:style-name="T9"><text:s/>48 <text:s/>| <text:s text:c="3"/></text:span><text:span text:style-name="T10"><text:s text:c="4"/></text:span><text:span text:style-name="T14">char</text:span><text:span text:style-name="T10"> *path = node-&gt;path;</text:span></text:p>
      <text:p text:style-name="P39"><text:span text:style-name="T9"><text:s/>49 <text:s/>| <text:s text:c="3"/></text:span><text:span text:style-name="T10"><text:s text:c="4"/>*top = node-&gt;next;</text:span></text:p>
      <text:p text:style-name="P39"><text:span text:style-name="T9"><text:s/>50 <text:s/>| <text:s text:c="3"/></text:span><text:span text:style-name="T10"><text:s text:c="4"/>free(node);</text:span></text:p>
      <text:p text:style-name="P39"><text:span text:style-name="T9"><text:s/>51 <text:s/>| <text:s text:c="3"/></text:span><text:span text:style-name="T10"><text:s text:c="4"/></text:span><text:span text:style-name="T11">return</text:span><text:span text:style-name="T10"> path;</text:span></text:p>
      <text:p text:style-name="P42"><text:span text:style-name="T9"><text:s/>52 <text:s/>| <text:s text:c="3"/></text:span>}</text:p>
      <text:p text:style-name="P40"><text:s/>53 <text:s/>| <text:s text:c="3"/></text:p>
      <text:p text:style-name="P39"><text:span text:style-name="T9"><text:s/>54 <text:s/>| <text:s text:c="3"/></text:span><text:span text:style-name="T11">struct</text:span><text:span text:style-name="T10"> </text:span><text:span text:style-name="T14">linux_dirent64</text:span><text:span text:style-name="T10"> {</text:span></text:p>
      <text:p text:style-name="P39"><text:span text:style-name="T9"><text:s/>55 <text:s/>| <text:s text:c="3"/></text:span><text:span text:style-name="T10"><text:s text:c="4"/></text:span><text:span text:style-name="T14">unsigned</text:span><text:span text:style-name="T10"> </text:span><text:span text:style-name="T14">long</text:span><text:span text:style-name="T10"> </text:span><text:span text:style-name="T14">long</text:span><text:span text:style-name="T10"> d_ino;</text:span></text:p>
      <text:p text:style-name="P39"><text:span text:style-name="T9"><text:s/>56 <text:s/>| <text:s text:c="3"/></text:span><text:span text:style-name="T10"><text:s text:c="4"/></text:span><text:span text:style-name="T14">long</text:span><text:span text:style-name="T10"> </text:span><text:span text:style-name="T14">long</text:span><text:span text:style-name="T10"> <text:s text:c="9"/>d_off;</text:span></text:p>
      <text:p text:style-name="P39"><text:span text:style-name="T9"><text:s/>57 <text:s/>| <text:s text:c="3"/></text:span><text:span text:style-name="T10"><text:s text:c="4"/></text:span><text:span text:style-name="T14">unsigned</text:span><text:span text:style-name="T10"> </text:span><text:span text:style-name="T14">short</text:span><text:span text:style-name="T10"> <text:s text:c="4"/>d_reclen;</text:span></text:p>
      <text:p text:style-name="P39"><text:span text:style-name="T9"><text:s/>58 <text:s/>| <text:s text:c="3"/></text:span><text:span text:style-name="T10"><text:s text:c="4"/></text:span><text:span text:style-name="T14">unsigned</text:span><text:span text:style-name="T10"> </text:span><text:span text:style-name="T14">char</text:span><text:span text:style-name="T10"> <text:s text:c="5"/>d_type;</text:span></text:p>
      <text:p text:style-name="P39"><text:span text:style-name="T9"><text:s/>59 <text:s/>| <text:s text:c="3"/></text:span><text:span text:style-name="T10"><text:s text:c="4"/></text:span><text:span text:style-name="T14">char</text:span><text:span text:style-name="T10"> <text:s text:c="14"/>d_name[];</text:span></text:p>
      <text:p text:style-name="P42"><text:span text:style-name="T9"><text:s/>60 <text:s/>| <text:s text:c="3"/></text:span>};</text:p>
      <text:p text:style-name="P40"><text:s/>61 <text:s/>| <text:s text:c="3"/></text:p>
      <text:p text:style-name="P39"><text:span text:style-name="T9"><text:s/>62 <text:s/>| <text:s text:c="3"/></text:span><text:span text:style-name="T14">void</text:span><text:span text:style-name="T10"> deinit_all(loaded_plugin_t *plugins, </text:span><text:span text:style-name="T14">size_t</text:span><text:span text:style-name="T10"> count, </text:span><text:span text:style-name="T14">char</text:span><text:span text:style-name="T10"> *p_dir, </text:span><text:span text:style-name="T11">struct</text:span><text:span text:style-name="T10"> </text:span><text:span text:style-name="T14">option</text:span><text:span text:style-name="T10"> *l_opts) {</text:span></text:p>
      <text:p text:style-name="P39"><text:span text:style-name="T9"><text:s/>63 <text:s/>| <text:s text:c="3"/></text:span><text:span text:style-name="T10"><text:s text:c="4"/></text:span><text:span text:style-name="T11">for</text:span><text:span text:style-name="T10"> (</text:span><text:span text:style-name="T14">size_t</text:span><text:span text:style-name="T10"> i = 0; i &lt; count; i++) {</text:span></text:p>
      <text:p text:style-name="P39"><text:span text:style-name="T9"><text:s/>64 <text:s/>| <text:s text:c="3"/></text:span><text:span text:style-name="T10"><text:s text:c="8"/></text:span><text:span text:style-name="T11">for</text:span><text:span text:style-name="T10"> (</text:span><text:span text:style-name="T14">size_t</text:span><text:span text:style-name="T10"> g = 0; g &lt; plugins[i].groups_count; g++) {</text:span></text:p>
      <text:p text:style-name="P39"><text:span text:style-name="T9"><text:s/>65 <text:s/>| <text:s text:c="3"/></text:span><text:span text:style-name="T10"><text:s text:c="12"/></text:span><text:span text:style-name="T11">for</text:span><text:span text:style-name="T10"> (</text:span><text:span text:style-name="T14">size_t</text:span><text:span text:style-name="T10"> j = 0; j &lt; plugins[i].groups[g].count; j++) {</text:span></text:p>
      <text:p text:style-name="P39"><text:span text:style-name="T9"><text:s/>66 <text:s/>| <text:s text:c="3"/></text:span><text:span text:style-name="T10"><text:s text:c="16"/></text:span><text:span text:style-name="T11">if</text:span><text:span text:style-name="T10"> (plugins[i].groups[g].opts[j].flag) {</text:span></text:p>
      <text:p text:style-name="P39"><text:span text:style-name="T9"><text:s/>67 <text:s/>| <text:s text:c="3"/></text:span><text:span text:style-name="T10"><text:s text:c="20"/>free(plugins[i].groups[g].opts[j].flag);</text:span></text:p>
      <text:p text:style-name="P39"><text:span text:style-name="T9"><text:s/>68 <text:s/>| <text:s text:c="3"/></text:span><text:span text:style-name="T10"><text:s text:c="16"/>}</text:span></text:p>
      <text:p text:style-name="P39"><text:span text:style-name="T9"><text:s/>69 <text:s/>| <text:s text:c="3"/></text:span><text:span text:style-name="T10"><text:s text:c="12"/>}</text:span></text:p>
      <text:p text:style-name="P39"><text:span text:style-name="T9"><text:s/>70 <text:s/>| <text:s text:c="3"/></text:span><text:span text:style-name="T10"><text:s text:c="12"/>free(plugins[i].groups[g].opts);</text:span></text:p>
      <text:p text:style-name="P39"><text:span text:style-name="T9"><text:s/>71 <text:s/>| <text:s text:c="3"/></text:span><text:span text:style-name="T10"><text:s text:c="8"/>}</text:span></text:p>
      <text:p text:style-name="P39"><text:soft-page-break/><text:span text:style-name="T9"><text:s/>72 <text:s/>| <text:s text:c="3"/></text:span><text:span text:style-name="T10"><text:s text:c="8"/>free(plugins[i].groups);</text:span></text:p>
      <text:p text:style-name="P39"><text:span text:style-name="T9"><text:s/>73 <text:s/>| <text:s text:c="3"/></text:span><text:span text:style-name="T10"><text:s text:c="8"/>dlclose(plugins[i].handle);</text:span></text:p>
      <text:p text:style-name="P39"><text:span text:style-name="T9"><text:s/>74 <text:s/>| <text:s text:c="3"/></text:span><text:span text:style-name="T10"><text:s text:c="4"/>}</text:span></text:p>
      <text:p text:style-name="P39"><text:span text:style-name="T9"><text:s/>75 <text:s/>| <text:s text:c="3"/></text:span><text:span text:style-name="T10"><text:s text:c="4"/></text:span><text:span text:style-name="T11">if</text:span><text:span text:style-name="T10"> (plugins) free(plugins);</text:span></text:p>
      <text:p text:style-name="P39"><text:span text:style-name="T9"><text:s/>76 <text:s/>| <text:s text:c="3"/></text:span><text:span text:style-name="T10"><text:s text:c="4"/></text:span><text:span text:style-name="T11">if</text:span><text:span text:style-name="T10"> (p_dir) free(p_dir);</text:span></text:p>
      <text:p text:style-name="P39"><text:span text:style-name="T9"><text:s/>77 <text:s/>| <text:s text:c="3"/></text:span><text:span text:style-name="T10"><text:s text:c="4"/></text:span><text:span text:style-name="T11">if</text:span><text:span text:style-name="T10"> (l_opts) free(l_opts);</text:span></text:p>
      <text:p text:style-name="P42"><text:span text:style-name="T9"><text:s/>78 <text:s/>| <text:s text:c="3"/></text:span>}</text:p>
      <text:p text:style-name="P40"><text:s/>79 <text:s/>| <text:s text:c="3"/></text:p>
      <text:p text:style-name="P39"><text:span text:style-name="T9"><text:s/>80 <text:s/>| <text:s text:c="3"/></text:span><text:span text:style-name="T14">int</text:span><text:span text:style-name="T10"> main(</text:span><text:span text:style-name="T14">int</text:span><text:span text:style-name="T10"> argc, </text:span><text:span text:style-name="T14">char</text:span><text:span text:style-name="T10"> *argv[]) {</text:span></text:p>
      <text:p text:style-name="P39"><text:span text:style-name="T9"><text:s/>81 <text:s/>| <text:s text:c="3"/></text:span><text:span text:style-name="T10"><text:s text:c="4"/></text:span><text:span text:style-name="T14">int</text:span><text:span text:style-name="T10"> op_and = 1, op_not = 0;</text:span></text:p>
      <text:p text:style-name="P39"><text:span text:style-name="T9"><text:s/>82 <text:s/>| <text:s text:c="3"/></text:span><text:span text:style-name="T10"><text:s text:c="4"/></text:span><text:span text:style-name="T14">char</text:span><text:span text:style-name="T10"> *plugin_dir = NULL;</text:span></text:p>
      <text:p text:style-name="P42"><text:span text:style-name="T9"><text:s/>83 <text:s/>| <text:s text:c="3"/></text:span><text:s text:c="4"/></text:p>
      <text:p text:style-name="P39"><text:span text:style-name="T9"><text:s/>84 <text:s/>| <text:s text:c="3"/></text:span><text:span text:style-name="T10"><text:s text:c="4"/></text:span><text:span text:style-name="T14">char</text:span><text:span text:style-name="T10"> *exe_path = malloc(4096);</text:span></text:p>
      <text:p text:style-name="P39"><text:span text:style-name="T9"><text:s/>85 <text:s/>| <text:s text:c="3"/></text:span><text:span text:style-name="T10"><text:s text:c="4"/></text:span><text:span text:style-name="T14">ssize_t</text:span><text:span text:style-name="T10"> rlen = readlink(</text:span><text:span text:style-name="T12">"/proc/self/exe"</text:span><text:span text:style-name="T10">, exe_path, 4095);</text:span></text:p>
      <text:p text:style-name="P39"><text:span text:style-name="T9"><text:s/>86 <text:s/>| <text:s text:c="3"/></text:span><text:span text:style-name="T10"><text:s text:c="4"/></text:span><text:span text:style-name="T11">if</text:span><text:span text:style-name="T10"> (rlen != -1) {</text:span></text:p>
      <text:p text:style-name="P39"><text:span text:style-name="T9"><text:s/>87 <text:s/>| <text:s text:c="3"/></text:span><text:span text:style-name="T10"><text:s text:c="8"/>exe_path[rlen] = </text:span><text:span text:style-name="T12">'\0'</text:span><text:span text:style-name="T10">;</text:span></text:p>
      <text:p text:style-name="P39"><text:span text:style-name="T9"><text:s/>88 <text:s/>| <text:s text:c="3"/></text:span><text:span text:style-name="T10"><text:s text:c="8"/>plugin_dir = strdup(dirname(exe_path));</text:span></text:p>
      <text:p text:style-name="P39"><text:span text:style-name="T9"><text:s/>89 <text:s/>| <text:s text:c="3"/></text:span><text:span text:style-name="T10"><text:s text:c="4"/>} </text:span><text:span text:style-name="T11">else</text:span><text:span text:style-name="T10"> {</text:span></text:p>
      <text:p text:style-name="P39"><text:span text:style-name="T9"><text:s/>90 <text:s/>| <text:s text:c="3"/></text:span><text:span text:style-name="T10"><text:s text:c="8"/>plugin_dir = strdup(</text:span><text:span text:style-name="T12">"."</text:span><text:span text:style-name="T10">);</text:span></text:p>
      <text:p text:style-name="P39"><text:span text:style-name="T9"><text:s/>91 <text:s/>| <text:s text:c="3"/></text:span><text:span text:style-name="T10"><text:s text:c="4"/>}</text:span></text:p>
      <text:p text:style-name="P39"><text:span text:style-name="T9"><text:s/>92 <text:s/>| <text:s text:c="3"/></text:span><text:span text:style-name="T10"><text:s text:c="4"/>free(exe_path);</text:span></text:p>
      <text:p text:style-name="P40"><text:s/>93 <text:s/>| <text:s text:c="3"/></text:p>
      <text:p text:style-name="P39"><text:span text:style-name="T9"><text:s/>94 <text:s/>| <text:s text:c="3"/></text:span><text:span text:style-name="T10"><text:s text:c="4"/>loaded_plugin_t *plugins = NULL;</text:span></text:p>
      <text:p text:style-name="P39"><text:span text:style-name="T9"><text:s/>95 <text:s/>| <text:s text:c="3"/></text:span><text:span text:style-name="T10"><text:s text:c="4"/></text:span><text:span text:style-name="T14">size_t</text:span><text:span text:style-name="T10"> plugins_count = 0;</text:span></text:p>
      <text:p text:style-name="P40"><text:s/>96 <text:s/>| <text:s text:c="3"/></text:p>
      <text:p text:style-name="P39"><text:span text:style-name="T9"><text:s/>97 <text:s/>| <text:s text:c="3"/></text:span><text:span text:style-name="T10"><text:s text:c="4"/></text:span><text:span text:style-name="T11">for</text:span><text:span text:style-name="T10"> (</text:span><text:span text:style-name="T14">int</text:span><text:span text:style-name="T10"> i = 1; i &lt; argc; i++) {</text:span></text:p>
      <text:p text:style-name="P39"><text:span text:style-name="T9"><text:s/>98 <text:s/>| <text:s text:c="3"/></text:span><text:span text:style-name="T10"><text:s text:c="8"/></text:span><text:span text:style-name="T11">if</text:span><text:span text:style-name="T10"> (strcmp(argv[i], </text:span><text:span text:style-name="T12">"-P"</text:span><text:span text:style-name="T10">) == 0 &amp;&amp; i + 1 &lt; argc) {</text:span></text:p>
      <text:p text:style-name="P39"><text:span text:style-name="T9"><text:s/>99 <text:s/>| <text:s text:c="3"/></text:span><text:span text:style-name="T10"><text:s text:c="12"/>free(plugin_dir);</text:span></text:p>
      <text:p text:style-name="P39"><text:span text:style-name="T9">100 <text:s/>| <text:s text:c="3"/></text:span><text:span text:style-name="T10"><text:s text:c="12"/>plugin_dir = strdup(argv[i+1]);</text:span></text:p>
      <text:p text:style-name="P39"><text:span text:style-name="T9">101 <text:s/>| <text:s text:c="3"/></text:span><text:span text:style-name="T10"><text:s text:c="8"/>}</text:span></text:p>
      <text:p text:style-name="P39"><text:span text:style-name="T9">102 <text:s/>| <text:s text:c="3"/></text:span><text:span text:style-name="T10"><text:s text:c="4"/>}</text:span></text:p>
      <text:p text:style-name="P40">103 <text:s/>| <text:s text:c="3"/></text:p>
      <text:p text:style-name="P39"><text:span text:style-name="T9">104 <text:s/>| <text:s text:c="3"/></text:span><text:span text:style-name="T10"><text:s text:c="4"/></text:span><text:span text:style-name="T14">DIR</text:span><text:span text:style-name="T10"> *d = opendir(plugin_dir);</text:span></text:p>
      <text:p text:style-name="P39"><text:span text:style-name="T9">105 <text:s/>| <text:s text:c="3"/></text:span><text:span text:style-name="T10"><text:s text:c="4"/></text:span><text:span text:style-name="T11">if</text:span><text:span text:style-name="T10"> (d) {</text:span></text:p>
      <text:p text:style-name="P39"><text:span text:style-name="T9">106 <text:s/>| <text:s text:c="3"/></text:span><text:span text:style-name="T10"><text:s text:c="8"/></text:span><text:span text:style-name="T11">struct</text:span><text:span text:style-name="T10"> </text:span><text:span text:style-name="T14">dirent</text:span><text:span text:style-name="T10"> *dir;</text:span></text:p>
      <text:p text:style-name="P39"><text:span text:style-name="T9">107 <text:s/>| <text:s text:c="3"/></text:span><text:span text:style-name="T10"><text:s text:c="8"/></text:span><text:span text:style-name="T11">while</text:span><text:span text:style-name="T10"> ((dir = readdir(d)) != NULL) {</text:span></text:p>
      <text:p text:style-name="P39"><text:span text:style-name="T9">108 <text:s/>| <text:s text:c="3"/></text:span><text:span text:style-name="T10"><text:s text:c="12"/></text:span><text:span text:style-name="T11">if</text:span><text:span text:style-name="T10"> (strstr(dir-&gt;d_name, </text:span><text:span text:style-name="T12">".so"</text:span><text:span text:style-name="T10">)) {</text:span></text:p>
      <text:p text:style-name="P39"><text:span text:style-name="T9">109 <text:s/>| <text:s text:c="3"/></text:span><text:span text:style-name="T10"><text:s text:c="16"/></text:span><text:span text:style-name="T14">char</text:span><text:span text:style-name="T10"> *full_p = malloc(strlen(plugin_dir) + strlen(dir-&gt;d_name) + 2);</text:span></text:p>
      <text:p text:style-name="P39"><text:span text:style-name="T9">110 <text:s/>| <text:s text:c="3"/></text:span><text:span text:style-name="T10"><text:s text:c="16"/>sprintf(full_p, </text:span><text:span text:style-name="T12">"%s/%s"</text:span><text:span text:style-name="T10">, plugin_dir, dir-&gt;d_name);</text:span></text:p>
      <text:p text:style-name="P39"><text:span text:style-name="T9">111 <text:s/>| <text:s text:c="3"/></text:span><text:span text:style-name="T10"><text:s text:c="16"/></text:span><text:span text:style-name="T14">void</text:span><text:span text:style-name="T10"> *h = dlopen(full_p, RTLD_LAZY);</text:span></text:p>
      <text:p text:style-name="P39"><text:span text:style-name="T9">112 <text:s/>| <text:s text:c="3"/></text:span><text:span text:style-name="T10"><text:s text:c="16"/>free(full_p);</text:span></text:p>
      <text:p text:style-name="P39"><text:span text:style-name="T9">113 <text:s/>| <text:s text:c="3"/></text:span><text:span text:style-name="T10"><text:s text:c="16"/></text:span><text:span text:style-name="T11">if</text:span><text:span text:style-name="T10"> (h) {</text:span></text:p>
      <text:p text:style-name="P39"><text:span text:style-name="T9">114 <text:s/>| <text:s text:c="3"/></text:span><text:span text:style-name="T10"><text:s text:c="20"/></text:span><text:span text:style-name="T14">int</text:span><text:span text:style-name="T10"> (*gi)(</text:span><text:span text:style-name="T11">struct</text:span><text:span text:style-name="T10"> </text:span><text:span text:style-name="T14">plugin_info</text:span><text:span text:style-name="T10">*) = dlsym(h, </text:span><text:span text:style-name="T12">"plugin_get_info"</text:span><text:span text:style-name="T10">);</text:span></text:p>
      <text:p text:style-name="P39"><text:span text:style-name="T9">115 <text:s/>| <text:s text:c="3"/></text:span><text:span text:style-name="T10"><text:s text:c="20"/></text:span><text:span text:style-name="T14">int</text:span><text:span text:style-name="T10"> (*pf)(</text:span><text:span text:style-name="T11">const</text:span><text:span text:style-name="T10"> </text:span><text:span text:style-name="T14">char</text:span><text:span text:style-name="T10">*, </text:span><text:span text:style-name="T11">struct</text:span><text:span text:style-name="T10"> </text:span><text:span text:style-name="T14">option</text:span><text:span text:style-name="T10">[], </text:span><text:span text:style-name="T14">size_t</text:span><text:span text:style-name="T10">) = dlsym(h, </text:span><text:span text:style-name="T12">"plugin_process_file"</text:span><text:span text:style-name="T10">);</text:span></text:p>
      <text:p text:style-name="P39"><text:span text:style-name="T9">116 <text:s/>| <text:s text:c="3"/></text:span><text:span text:style-name="T10"><text:s text:c="20"/></text:span><text:span text:style-name="T11">if</text:span><text:span text:style-name="T10"> (gi &amp;&amp; pf) {</text:span></text:p>
      <text:p text:style-name="P39"><text:span text:style-name="T9">117 <text:s/>| <text:s text:c="3"/></text:span><text:span text:style-name="T10"><text:s text:c="24"/>plugins = realloc(plugins, </text:span><text:span text:style-name="T11">sizeof</text:span><text:span text:style-name="T10">(loaded_plugin_t) * (plugins_count + 1));</text:span></text:p>
      <text:p text:style-name="P39"><text:span text:style-name="T9">118 <text:s/>| <text:s text:c="3"/></text:span><text:span text:style-name="T10"><text:s text:c="24"/>plugins[plugins_count].handle = h;</text:span></text:p>
      <text:p text:style-name="P39"><text:span text:style-name="T9">119 <text:s/>| <text:s text:c="3"/></text:span><text:span text:style-name="T10"><text:s text:c="24"/>plugins[plugins_count].process_file = pf;</text:span></text:p>
      <text:p text:style-name="P39"><text:span text:style-name="T9">120 <text:s/>| <text:s text:c="3"/></text:span><text:span text:style-name="T10"><text:s text:c="24"/>plugins[plugins_count].groups = NULL;</text:span></text:p>
      <text:p text:style-name="P39"><text:span text:style-name="T9">121 <text:s/>| <text:s text:c="3"/></text:span><text:span text:style-name="T10"><text:s text:c="24"/>plugins[plugins_count].groups_count = 0;</text:span></text:p>
      <text:p text:style-name="P39"><text:span text:style-name="T9">122 <text:s/>| <text:s text:c="3"/></text:span><text:span text:style-name="T10"><text:s text:c="24"/>gi(&amp;plugins[plugins_count].info);</text:span></text:p>
      <text:p text:style-name="P39"><text:span text:style-name="T9">123 <text:s/>| <text:s text:c="3"/></text:span><text:span text:style-name="T10"><text:s text:c="24"/>plugins_count++;</text:span></text:p>
      <text:p text:style-name="P39"><text:span text:style-name="T9">124 <text:s/>| <text:s text:c="3"/></text:span><text:span text:style-name="T10"><text:s text:c="20"/>} </text:span><text:span text:style-name="T11">else</text:span><text:span text:style-name="T10"> { dlclose(h); }</text:span></text:p>
      <text:p text:style-name="P39"><text:span text:style-name="T9">125 <text:s/>| <text:s text:c="3"/></text:span><text:span text:style-name="T10"><text:s text:c="16"/>}</text:span></text:p>
      <text:p text:style-name="P39"><text:span text:style-name="T9">126 <text:s/>| <text:s text:c="3"/></text:span><text:span text:style-name="T10"><text:s text:c="12"/>}</text:span></text:p>
      <text:p text:style-name="P39"><text:span text:style-name="T9">127 <text:s/>| <text:s text:c="3"/></text:span><text:span text:style-name="T10"><text:s text:c="8"/>}</text:span></text:p>
      <text:p text:style-name="P39"><text:span text:style-name="T9">128 <text:s/>| <text:s text:c="3"/></text:span><text:span text:style-name="T10"><text:s text:c="8"/>closedir(d);</text:span></text:p>
      <text:p text:style-name="P39"><text:span text:style-name="T9">129 <text:s/>| <text:s text:c="3"/></text:span><text:span text:style-name="T10"><text:s text:c="4"/>}</text:span></text:p>
      <text:p text:style-name="P40">130 <text:s/>| <text:s text:c="3"/></text:p>
      <text:p text:style-name="P39"><text:span text:style-name="T9">131 <text:s/>| <text:s text:c="3"/></text:span><text:span text:style-name="T10"><text:s text:c="4"/></text:span><text:span text:style-name="T14">size_t</text:span><text:span text:style-name="T10"> total_opts = 3; </text:span></text:p>
      <text:p text:style-name="P39"><text:span text:style-name="T9">132 <text:s/>| <text:s text:c="3"/></text:span><text:span text:style-name="T10"><text:s text:c="4"/></text:span><text:span text:style-name="T11">for</text:span><text:span text:style-name="T10">(</text:span><text:span text:style-name="T14">size_t</text:span><text:span text:style-name="T10"> i=0; i&lt;plugins_count; i++) total_opts += plugins[i].info.sup_opts_len;</text:span></text:p>
      <text:p text:style-name="P39"><text:span text:style-name="T9">133 <text:s/>| <text:s text:c="3"/></text:span><text:span text:style-name="T10"><text:s text:c="4"/></text:span><text:span text:style-name="T11">struct</text:span><text:span text:style-name="T10"> </text:span><text:span text:style-name="T14">option</text:span><text:span text:style-name="T10"> *long_options = calloc(total_opts, </text:span><text:span text:style-name="T11">sizeof</text:span><text:span text:style-name="T10">(</text:span><text:span text:style-name="T11">struct</text:span><text:span text:style-name="T10"> </text:span><text:span text:style-name="T14">option</text:span><text:span text:style-name="T10">));</text:span></text:p>
      <text:p text:style-name="P40">134 <text:s/>| <text:s text:c="3"/></text:p>
      <text:p text:style-name="P39"><text:span text:style-name="T9">135 <text:s/>| <text:s text:c="3"/></text:span><text:span text:style-name="T10"><text:s text:c="4"/></text:span><text:span text:style-name="T14">int</text:span><text:span text:style-name="T10"> opt_idx = 0;</text:span></text:p>
      <text:p text:style-name="P39"><text:span text:style-name="T9">136 <text:s/>| <text:s text:c="3"/></text:span><text:span text:style-name="T10"><text:s text:c="4"/>long_options[opt_idx++] = (</text:span><text:span text:style-name="T11">struct</text:span><text:span text:style-name="T10"> </text:span><text:span text:style-name="T14">option</text:span><text:span text:style-name="T10">){</text:span><text:span text:style-name="T12">"version"</text:span><text:span text:style-name="T10">, no_argument, 0, </text:span><text:span text:style-name="T12">'v'</text:span><text:span text:style-name="T10">};</text:span></text:p>
      <text:p text:style-name="P39"><text:span text:style-name="T9">137 <text:s/>| <text:s text:c="3"/></text:span><text:span text:style-name="T10"><text:s text:c="4"/>long_options[opt_idx++] = (</text:span><text:span text:style-name="T11">struct</text:span><text:span text:style-name="T10"> </text:span><text:span text:style-name="T14">option</text:span><text:span text:style-name="T10">){</text:span><text:span text:style-name="T12">"help"</text:span><text:span text:style-name="T10">, no_argument, 0, </text:span><text:span text:style-name="T12">'h'</text:span><text:span text:style-name="T10">};</text:span></text:p>
      <text:p text:style-name="P39"><text:span text:style-name="T9">138 <text:s/>| <text:s text:c="3"/></text:span><text:span text:style-name="T10"><text:s text:c="4"/></text:span><text:span text:style-name="T11">for</text:span><text:span text:style-name="T10"> (</text:span><text:span text:style-name="T14">size_t</text:span><text:span text:style-name="T10"> i = 0; i &lt; plugins_count; i++) {</text:span></text:p>
      <text:p text:style-name="P39"><text:span text:style-name="T9">139 <text:s/>| <text:s text:c="3"/></text:span><text:span text:style-name="T10"><text:s text:c="8"/></text:span><text:span text:style-name="T11">for</text:span><text:span text:style-name="T10"> (</text:span><text:span text:style-name="T14">size_t</text:span><text:span text:style-name="T10"> j = 0; j &lt; plugins[i].info.sup_opts_len; j++)</text:span></text:p>
      <text:p text:style-name="P39"><text:span text:style-name="T9">140 <text:s/>| <text:s text:c="3"/></text:span><text:span text:style-name="T10"><text:s text:c="12"/>long_options[opt_idx++] = plugins[i].info.sup_opts[j].opt;</text:span></text:p>
      <text:p text:style-name="P39"><text:span text:style-name="T9">141 <text:s/>| <text:s text:c="3"/></text:span><text:span text:style-name="T10"><text:s text:c="4"/>}</text:span></text:p>
      <text:p text:style-name="P40">142 <text:s/>| <text:s text:c="3"/></text:p>
      <text:p text:style-name="P39"><text:span text:style-name="T9">143 <text:s/>| <text:s text:c="3"/></text:span><text:span text:style-name="T10"><text:s text:c="4"/></text:span><text:span text:style-name="T14">int</text:span><text:span text:style-name="T10"> opt, l_idx = 0;</text:span></text:p>
      <text:p text:style-name="P39"><text:soft-page-break/><text:span text:style-name="T9">144 <text:s/>| <text:s text:c="3"/></text:span><text:span text:style-name="T10"><text:s text:c="4"/></text:span><text:span text:style-name="T11">while</text:span><text:span text:style-name="T10"> ((opt = getopt_long(argc, argv, </text:span><text:span text:style-name="T12">"P:AONvh"</text:span><text:span text:style-name="T10">, long_options, &amp;l_idx)) != -1) {</text:span></text:p>
      <text:p text:style-name="P39"><text:span text:style-name="T9">145 <text:s/>| <text:s text:c="3"/></text:span><text:span text:style-name="T10"><text:s text:c="8"/></text:span><text:span text:style-name="T11">if</text:span><text:span text:style-name="T10"> (opt == </text:span><text:span text:style-name="T12">'v'</text:span><text:span text:style-name="T10">) {</text:span></text:p>
      <text:p text:style-name="P39"><text:span text:style-name="T9">146 <text:s/>| <text:s text:c="3"/></text:span><text:span text:style-name="T10"><text:s text:c="12"/>printf(</text:span><text:span text:style-name="T12">"Программа lab2vypN3250\n"</text:span><text:span text:style-name="T10">);</text:span></text:p>
      <text:p text:style-name="P39"><text:span text:style-name="T9">147 <text:s/>| <text:s text:c="3"/></text:span><text:span text:style-name="T10"><text:s text:c="12"/>printf(</text:span><text:span text:style-name="T12">"Пахомов Владимир Юрьевич, гр. N3250\nВариант: 19\n"</text:span><text:span text:style-name="T10">);</text:span></text:p>
      <text:p text:style-name="P39"><text:span text:style-name="T9">148 <text:s/>| <text:s text:c="3"/></text:span><text:span text:style-name="T10"><text:s text:c="12"/>deinit_all(plugins, plugins_count, plugin_dir, long_options); </text:span><text:span text:style-name="T11">return</text:span><text:span text:style-name="T10"> 0;</text:span></text:p>
      <text:p text:style-name="P39"><text:span text:style-name="T9">149 <text:s/>| <text:s text:c="3"/></text:span><text:span text:style-name="T10"><text:s text:c="8"/>}</text:span></text:p>
      <text:p text:style-name="P39"><text:span text:style-name="T9">150 <text:s/>| <text:s text:c="3"/></text:span><text:span text:style-name="T10"><text:s text:c="8"/></text:span><text:span text:style-name="T11">else</text:span><text:span text:style-name="T10"> </text:span><text:span text:style-name="T11">if</text:span><text:span text:style-name="T10"> (opt == </text:span><text:span text:style-name="T12">'h'</text:span><text:span text:style-name="T10">) {</text:span></text:p>
      <text:p text:style-name="P39"><text:span text:style-name="T9">151 <text:s/>| <text:s text:c="3"/></text:span><text:span text:style-name="T10"><text:s text:c="12"/>printf(</text:span><text:span text:style-name="T12">"Использование: lab2vypN3250 [опции] &lt;каталог&gt;\n"</text:span><text:span text:style-name="T10">);</text:span></text:p>
      <text:p text:style-name="P39"><text:span text:style-name="T9">152 <text:s/>| <text:s text:c="3"/></text:span><text:span text:style-name="T10"><text:s text:c="12"/>printf(</text:span><text:span text:style-name="T12">"Опции:\n <text:s/>-v, --version <text:s/>Вывод информации об авторе\n <text:s/>-h, --help <text:s text:c="4"/>Вывод этой справки\n"</text:span><text:span text:style-name="T10">);</text:span></text:p>
      <text:p text:style-name="P39"><text:span text:style-name="T9">153 <text:s/>| <text:s text:c="3"/></text:span><text:span text:style-name="T10"><text:s text:c="12"/>printf(</text:span><text:span text:style-name="T12">" <text:s/>-A <text:s text:c="12"/>Логическое И\n <text:s/>-O <text:s text:c="12"/>Логическое OR\n <text:s/>-N <text:s text:c="12"/>Логическое NOT\n <text:s/>-P &lt;каталог&gt; <text:s text:c="2"/>Указать каталог с плагинами\n"</text:span><text:span text:style-name="T10">);</text:span></text:p>
      <text:p text:style-name="P39"><text:span text:style-name="T9">154 <text:s/>| <text:s text:c="3"/></text:span><text:span text:style-name="T10"><text:s text:c="12"/>deinit_all(plugins, plugins_count, plugin_dir, long_options); </text:span><text:span text:style-name="T11">return</text:span><text:span text:style-name="T10"> 0;</text:span></text:p>
      <text:p text:style-name="P39"><text:span text:style-name="T9">155 <text:s/>| <text:s text:c="3"/></text:span><text:span text:style-name="T10"><text:s text:c="8"/>}</text:span></text:p>
      <text:p text:style-name="P39"><text:span text:style-name="T9">156 <text:s/>| <text:s text:c="3"/></text:span><text:span text:style-name="T10"><text:s text:c="8"/></text:span><text:span text:style-name="T11">else</text:span><text:span text:style-name="T10"> </text:span><text:span text:style-name="T11">if</text:span><text:span text:style-name="T10"> (opt == </text:span><text:span text:style-name="T12">'A'</text:span><text:span text:style-name="T10">) op_and = 1;</text:span></text:p>
      <text:p text:style-name="P39"><text:span text:style-name="T9">157 <text:s/>| <text:s text:c="3"/></text:span><text:span text:style-name="T10"><text:s text:c="8"/></text:span><text:span text:style-name="T11">else</text:span><text:span text:style-name="T10"> </text:span><text:span text:style-name="T11">if</text:span><text:span text:style-name="T10"> (opt == </text:span><text:span text:style-name="T12">'O'</text:span><text:span text:style-name="T10">) op_and = 0;</text:span></text:p>
      <text:p text:style-name="P39"><text:span text:style-name="T9">158 <text:s/>| <text:s text:c="3"/></text:span><text:span text:style-name="T10"><text:s text:c="8"/></text:span><text:span text:style-name="T11">else</text:span><text:span text:style-name="T10"> </text:span><text:span text:style-name="T11">if</text:span><text:span text:style-name="T10"> (opt == </text:span><text:span text:style-name="T12">'N'</text:span><text:span text:style-name="T10">) op_not = 1;</text:span></text:p>
      <text:p text:style-name="P39"><text:span text:style-name="T9">159 <text:s/>| <text:s text:c="3"/></text:span><text:span text:style-name="T10"><text:s text:c="8"/></text:span><text:span text:style-name="T11">else</text:span><text:span text:style-name="T10"> </text:span><text:span text:style-name="T11">if</text:span><text:span text:style-name="T10"> (opt == </text:span><text:span text:style-name="T12">'P'</text:span><text:span text:style-name="T10">) </text:span><text:span text:style-name="T11">continue</text:span><text:span text:style-name="T10">;</text:span></text:p>
      <text:p text:style-name="P39"><text:span text:style-name="T9">160 <text:s/>| <text:s text:c="3"/></text:span><text:span text:style-name="T10"><text:s text:c="8"/></text:span><text:span text:style-name="T11">else</text:span><text:span text:style-name="T10"> </text:span><text:span text:style-name="T11">if</text:span><text:span text:style-name="T10"> (opt == 0) {</text:span></text:p>
      <text:p text:style-name="P39"><text:span text:style-name="T9">161 <text:s/>| <text:s text:c="3"/></text:span><text:span text:style-name="T10"><text:s text:c="12"/></text:span><text:span text:style-name="T11">for</text:span><text:span text:style-name="T10"> (</text:span><text:span text:style-name="T14">size_t</text:span><text:span text:style-name="T10"> i = 0; i &lt; plugins_count; i++) {</text:span></text:p>
      <text:p text:style-name="P39"><text:span text:style-name="T9">162 <text:s/>| <text:s text:c="3"/></text:span><text:span text:style-name="T10"><text:s text:c="16"/></text:span><text:span text:style-name="T11">for</text:span><text:span text:style-name="T10"> (</text:span><text:span text:style-name="T14">size_t</text:span><text:span text:style-name="T10"> j = 0; j &lt; plugins[i].info.sup_opts_len; j++) {</text:span></text:p>
      <text:p text:style-name="P39"><text:span text:style-name="T9">163 <text:s/>| <text:s text:c="3"/></text:span><text:span text:style-name="T10"><text:s text:c="20"/></text:span><text:span text:style-name="T11">if</text:span><text:span text:style-name="T10"> (strcmp(long_options[l_idx].name, plugins[i].info.sup_opts[j].opt.name) == 0) {</text:span></text:p>
      <text:p text:style-name="P42"><text:span text:style-name="T9">164 <text:s/>| <text:s text:c="3"/></text:span><text:s text:c="24"/></text:p>
      <text:p text:style-name="P39"><text:span text:style-name="T9">165 <text:s/>| <text:s text:c="3"/></text:span><text:span text:style-name="T10"><text:s text:c="24"/></text:span><text:span text:style-name="T14">int</text:span><text:span text:style-name="T10"> need_new_group = 0;</text:span></text:p>
      <text:p text:style-name="P39"><text:span text:style-name="T9">166 <text:s/>| <text:s text:c="3"/></text:span><text:span text:style-name="T10"><text:s text:c="24"/></text:span><text:span text:style-name="T11">if</text:span><text:span text:style-name="T10"> (plugins[i].groups_count &gt; 0) {</text:span></text:p>
      <text:p text:style-name="P39"><text:span text:style-name="T9">167 <text:s/>| <text:s text:c="3"/></text:span><text:span text:style-name="T10"><text:s text:c="28"/></text:span><text:span text:style-name="T14">size_t</text:span><text:span text:style-name="T10"> last_g = plugins[i].groups_count - 1;</text:span></text:p>
      <text:p text:style-name="P39"><text:span text:style-name="T9">168 <text:s/>| <text:s text:c="3"/></text:span><text:span text:style-name="T10"><text:s text:c="28"/></text:span><text:span text:style-name="T11">for</text:span><text:span text:style-name="T10"> (</text:span><text:span text:style-name="T14">size_t</text:span><text:span text:style-name="T10"> k = 0; k &lt; plugins[i].groups[last_g].count; k++) {</text:span></text:p>
      <text:p text:style-name="P39"><text:span text:style-name="T9">169 <text:s/>| <text:s text:c="3"/></text:span><text:span text:style-name="T10"><text:s text:c="32"/></text:span><text:span text:style-name="T11">if</text:span><text:span text:style-name="T10"> (strcmp(plugins[i].groups[last_g].opts[k].name, long_options[l_idx].name) == 0) {</text:span></text:p>
      <text:p text:style-name="P39"><text:span text:style-name="T9">170 <text:s/>| <text:s text:c="3"/></text:span><text:span text:style-name="T10"><text:s text:c="36"/>need_new_group = 1;</text:span></text:p>
      <text:p text:style-name="P39"><text:span text:style-name="T9">171 <text:s/>| <text:s text:c="3"/></text:span><text:span text:style-name="T10"><text:s text:c="36"/></text:span><text:span text:style-name="T11">break</text:span><text:span text:style-name="T10">;</text:span></text:p>
      <text:p text:style-name="P39"><text:span text:style-name="T9">172 <text:s/>| <text:s text:c="3"/></text:span><text:span text:style-name="T10"><text:s text:c="32"/>}</text:span></text:p>
      <text:p text:style-name="P39"><text:span text:style-name="T9">173 <text:s/>| <text:s text:c="3"/></text:span><text:span text:style-name="T10"><text:s text:c="28"/>}</text:span></text:p>
      <text:p text:style-name="P39"><text:span text:style-name="T9">174 <text:s/>| <text:s text:c="3"/></text:span><text:span text:style-name="T10"><text:s text:c="24"/>} </text:span><text:span text:style-name="T11">else</text:span><text:span text:style-name="T10"> {</text:span></text:p>
      <text:p text:style-name="P39"><text:span text:style-name="T9">175 <text:s/>| <text:s text:c="3"/></text:span><text:span text:style-name="T10"><text:s text:c="28"/>need_new_group = 1;</text:span></text:p>
      <text:p text:style-name="P39"><text:span text:style-name="T9">176 <text:s/>| <text:s text:c="3"/></text:span><text:span text:style-name="T10"><text:s text:c="24"/>}</text:span></text:p>
      <text:p text:style-name="P40">177 <text:s/>| <text:s text:c="3"/></text:p>
      <text:p text:style-name="P39"><text:span text:style-name="T9">178 <text:s/>| <text:s text:c="3"/></text:span><text:span text:style-name="T10"><text:s text:c="24"/></text:span><text:span text:style-name="T11">if</text:span><text:span text:style-name="T10"> (need_new_group) {</text:span></text:p>
      <text:p text:style-name="P39"><text:span text:style-name="T9">179 <text:s/>| <text:s text:c="3"/></text:span><text:span text:style-name="T10"><text:s text:c="28"/>plugins[i].groups = realloc(plugins[i].groups, </text:span><text:span text:style-name="T11">sizeof</text:span><text:span text:style-name="T10">(option_group_t) * (plugins[i].groups_count + 1));</text:span></text:p>
      <text:p text:style-name="P39"><text:span text:style-name="T9">180 <text:s/>| <text:s text:c="3"/></text:span><text:span text:style-name="T10"><text:s text:c="28"/>plugins[i].groups[plugins[i].groups_count].opts = NULL;</text:span></text:p>
      <text:p text:style-name="P39"><text:span text:style-name="T9">181 <text:s/>| <text:s text:c="3"/></text:span><text:span text:style-name="T10"><text:s text:c="28"/>plugins[i].groups[plugins[i].groups_count].count = 0;</text:span></text:p>
      <text:p text:style-name="P39"><text:span text:style-name="T9">182 <text:s/>| <text:s text:c="3"/></text:span><text:span text:style-name="T10"><text:s text:c="28"/>plugins[i].groups_count++;</text:span></text:p>
      <text:p text:style-name="P39"><text:span text:style-name="T9">183 <text:s/>| <text:s text:c="3"/></text:span><text:span text:style-name="T10"><text:s text:c="24"/>}</text:span></text:p>
      <text:p text:style-name="P40">184 <text:s/>| <text:s text:c="3"/></text:p>
      <text:p text:style-name="P39"><text:span text:style-name="T9">185 <text:s/>| <text:s text:c="3"/></text:span><text:span text:style-name="T10"><text:s text:c="24"/></text:span><text:span text:style-name="T14">size_t</text:span><text:span text:style-name="T10"> cur_g = plugins[i].groups_count - 1;</text:span></text:p>
      <text:p text:style-name="P39"><text:span text:style-name="T9">186 <text:s/>| <text:s text:c="3"/></text:span><text:span text:style-name="T10"><text:s text:c="24"/>plugins[i].groups[cur_g].opts = realloc(plugins[i].groups[cur_g].opts, </text:span><text:span text:style-name="T11">sizeof</text:span><text:span text:style-name="T10">(</text:span><text:span text:style-name="T11">struct</text:span><text:span text:style-name="T10"> </text:span><text:span text:style-name="T14">option</text:span><text:span text:style-name="T10">) * (plugins[i].groups[cur_g].count + 1));</text:span></text:p>
      <text:p text:style-name="P42"><text:span text:style-name="T9">187 <text:s/>| <text:s text:c="3"/></text:span><text:s text:c="24"/></text:p>
      <text:p text:style-name="P39"><text:span text:style-name="T9">188 <text:s/>| <text:s text:c="3"/></text:span><text:span text:style-name="T10"><text:s text:c="24"/></text:span><text:span text:style-name="T11">struct</text:span><text:span text:style-name="T10"> </text:span><text:span text:style-name="T14">option</text:span><text:span text:style-name="T10"> new_opt = plugins[i].info.sup_opts[j].opt;</text:span></text:p>
      <text:p text:style-name="P39"><text:span text:style-name="T9">189 <text:s/>| <text:s text:c="3"/></text:span><text:span text:style-name="T10"><text:s text:c="24"/>new_opt.flag = optarg ? (</text:span><text:span text:style-name="T14">int</text:span><text:span text:style-name="T10">*)strdup(optarg) : NULL;</text:span></text:p>
      <text:p text:style-name="P42"><text:span text:style-name="T9">190 <text:s/>| <text:s text:c="3"/></text:span><text:s text:c="24"/></text:p>
      <text:p text:style-name="P39"><text:span text:style-name="T9">191 <text:s/>| <text:s text:c="3"/></text:span><text:span text:style-name="T10"><text:s text:c="24"/>plugins[i].groups[cur_g].opts[plugins[i].groups[cur_g].count] = new_opt;</text:span></text:p>
      <text:p text:style-name="P39"><text:span text:style-name="T9">192 <text:s/>| <text:s text:c="3"/></text:span><text:span text:style-name="T10"><text:s text:c="24"/>plugins[i].groups[cur_g].count++;</text:span></text:p>
      <text:p text:style-name="P39"><text:span text:style-name="T9">193 <text:s/>| <text:s text:c="3"/></text:span><text:span text:style-name="T10"><text:s text:c="20"/>}</text:span></text:p>
      <text:p text:style-name="P39"><text:span text:style-name="T9">194 <text:s/>| <text:s text:c="3"/></text:span><text:span text:style-name="T10"><text:s text:c="16"/>}</text:span></text:p>
      <text:p text:style-name="P39"><text:span text:style-name="T9">195 <text:s/>| <text:s text:c="3"/></text:span><text:span text:style-name="T10"><text:s text:c="12"/>}</text:span></text:p>
      <text:p text:style-name="P39"><text:span text:style-name="T9">196 <text:s/>| <text:s text:c="3"/></text:span><text:span text:style-name="T10"><text:s text:c="8"/>} </text:span><text:span text:style-name="T11">else</text:span><text:span text:style-name="T10"> {</text:span></text:p>
      <text:p text:style-name="P39"><text:span text:style-name="T9">197 <text:s/>| <text:s text:c="3"/></text:span><text:span text:style-name="T10"><text:s text:c="12"/>fprintf(stderr, </text:span><text:span text:style-name="T12">"Введены неизвестные опции. Используйте -h для справки\n"</text:span><text:span text:style-name="T10">);</text:span></text:p>
      <text:p text:style-name="P39"><text:span text:style-name="T9">198 <text:s/>| <text:s text:c="3"/></text:span><text:span text:style-name="T10"><text:s text:c="12"/>deinit_all(plugins, plugins_count, plugin_dir, long_options); </text:span><text:span text:style-name="T11">return</text:span><text:span text:style-name="T10"> 1;</text:span></text:p>
      <text:p text:style-name="P39"><text:span text:style-name="T9">199 <text:s/>| <text:s text:c="3"/></text:span><text:span text:style-name="T10"><text:s text:c="8"/>}</text:span></text:p>
      <text:p text:style-name="P39"><text:span text:style-name="T9">200 <text:s/>| <text:s text:c="3"/></text:span><text:span text:style-name="T10"><text:s text:c="4"/>}</text:span></text:p>
      <text:p text:style-name="P40">201 <text:s/>| <text:s text:c="3"/></text:p>
      <text:p text:style-name="P39"><text:span text:style-name="T9">202 <text:s/>| <text:s text:c="3"/></text:span><text:span text:style-name="T10"><text:s text:c="4"/></text:span><text:span text:style-name="T14">char</text:span><text:span text:style-name="T10"> *start_dir = (optind &lt; argc) ? argv[optind] : </text:span><text:span text:style-name="T12">"."</text:span><text:span text:style-name="T10">;</text:span></text:p>
      <text:p text:style-name="P39"><text:span text:style-name="T9">203 <text:s/>| <text:s text:c="3"/></text:span><text:span text:style-name="T10"><text:s text:c="4"/></text:span><text:span text:style-name="T14">DIR</text:span><text:span text:style-name="T10"> *check_d = opendir(start_dir);</text:span></text:p>
      <text:p text:style-name="P39"><text:span text:style-name="T9">204 <text:s/>| <text:s text:c="3"/></text:span><text:span text:style-name="T10"><text:s text:c="4"/></text:span><text:span text:style-name="T11">if</text:span><text:span text:style-name="T10"> (!check_d) {</text:span></text:p>
      <text:p text:style-name="P39"><text:span text:style-name="T9">205 <text:s/>| <text:s text:c="3"/></text:span><text:span text:style-name="T10"><text:s text:c="8"/>fprintf(stderr, </text:span><text:span text:style-name="T12">"Ошибка: '%s': %s\n"</text:span><text:span text:style-name="T10">, start_dir, strerror(errno));</text:span></text:p>
      <text:p text:style-name="P39"><text:span text:style-name="T9">206 <text:s/>| <text:s text:c="3"/></text:span><text:span text:style-name="T10"><text:s text:c="8"/>deinit_all(plugins, plugins_count, plugin_dir, long_options); </text:span><text:span text:style-name="T11">return</text:span><text:span text:style-name="T10"> 1;</text:span></text:p>
      <text:p text:style-name="P39"><text:span text:style-name="T9">207 <text:s/>| <text:s text:c="3"/></text:span><text:span text:style-name="T10"><text:s text:c="4"/>}</text:span></text:p>
      <text:p text:style-name="P39"><text:span text:style-name="T9">208 <text:s/>| <text:s text:c="3"/></text:span><text:span text:style-name="T10"><text:s text:c="4"/>closedir(check_d);</text:span></text:p>
      <text:p text:style-name="P40">209 <text:s/>| <text:s text:c="3"/></text:p>
      <text:p text:style-name="P39"><text:span text:style-name="T9">210 <text:s/>| <text:s text:c="3"/></text:span><text:span text:style-name="T10"><text:s text:c="4"/>StackNode *stack = NULL;</text:span></text:p>
      <text:p text:style-name="P39"><text:soft-page-break/><text:span text:style-name="T9">211 <text:s/>| <text:s text:c="3"/></text:span><text:span text:style-name="T10"><text:s text:c="4"/>push(&amp;stack, start_dir);</text:span></text:p>
      <text:p text:style-name="P40">212 <text:s/>| <text:s text:c="3"/></text:p>
      <text:p text:style-name="P39"><text:span text:style-name="T9">213 <text:s/>| <text:s text:c="3"/></text:span><text:span text:style-name="T10"><text:s text:c="4"/></text:span><text:span text:style-name="T11">while</text:span><text:span text:style-name="T10"> (stack) {</text:span></text:p>
      <text:p text:style-name="P39"><text:span text:style-name="T9">214 <text:s/>| <text:s text:c="3"/></text:span><text:span text:style-name="T10"><text:s text:c="8"/></text:span><text:span text:style-name="T14">char</text:span><text:span text:style-name="T10"> *curr = pop(&amp;stack);</text:span></text:p>
      <text:p text:style-name="P39"><text:span text:style-name="T9">215 <text:s/>| <text:s text:c="3"/></text:span><text:span text:style-name="T10"><text:s text:c="8"/></text:span><text:span text:style-name="T14">int</text:span><text:span text:style-name="T10"> fd = open(curr, O_RDONLY | O_DIRECTORY);</text:span></text:p>
      <text:p text:style-name="P39"><text:span text:style-name="T9">216 <text:s/>| <text:s text:c="3"/></text:span><text:span text:style-name="T10"><text:s text:c="8"/></text:span><text:span text:style-name="T11">if</text:span><text:span text:style-name="T10"> (fd == -1) { free(curr); </text:span><text:span text:style-name="T11">continue</text:span><text:span text:style-name="T10">; }</text:span></text:p>
      <text:p text:style-name="P40">217 <text:s/>| <text:s text:c="3"/></text:p>
      <text:p text:style-name="P39"><text:span text:style-name="T9">218 <text:s/>| <text:s text:c="3"/></text:span><text:span text:style-name="T10"><text:s text:c="8"/></text:span><text:span text:style-name="T14">char</text:span><text:span text:style-name="T10"> *buf = malloc(INITIAL_BUFFER_SIZE);</text:span></text:p>
      <text:p text:style-name="P39"><text:span text:style-name="T9">219 <text:s/>| <text:s text:c="3"/></text:span><text:span text:style-name="T10"><text:s text:c="8"/></text:span><text:span text:style-name="T14">long</text:span><text:span text:style-name="T10"> nread;</text:span></text:p>
      <text:p text:style-name="P39"><text:span text:style-name="T9">220 <text:s/>| <text:s text:c="3"/></text:span><text:span text:style-name="T10"><text:s text:c="8"/></text:span><text:span text:style-name="T11">while</text:span><text:span text:style-name="T10"> ((nread = syscall(SYS_getdents64, fd, buf, INITIAL_BUFFER_SIZE)) &gt; 0) {</text:span></text:p>
      <text:p text:style-name="P39"><text:span text:style-name="T9">221 <text:s/>| <text:s text:c="3"/></text:span><text:span text:style-name="T10"><text:s text:c="12"/></text:span><text:span text:style-name="T11">for</text:span><text:span text:style-name="T10"> (</text:span><text:span text:style-name="T14">long</text:span><text:span text:style-name="T10"> bpos = 0; bpos &lt; nread; ) {</text:span></text:p>
      <text:p text:style-name="P39"><text:span text:style-name="T9">222 <text:s/>| <text:s text:c="3"/></text:span><text:span text:style-name="T10"><text:s text:c="16"/></text:span><text:span text:style-name="T11">struct</text:span><text:span text:style-name="T10"> </text:span><text:span text:style-name="T14">linux_dirent64</text:span><text:span text:style-name="T10"> *de = (</text:span><text:span text:style-name="T11">struct</text:span><text:span text:style-name="T10"> </text:span><text:span text:style-name="T14">linux_dirent64</text:span><text:span text:style-name="T10"> *)(buf + bpos);</text:span></text:p>
      <text:p text:style-name="P39"><text:span text:style-name="T9">223 <text:s/>| <text:s text:c="3"/></text:span><text:span text:style-name="T10"><text:s text:c="16"/></text:span><text:span text:style-name="T11">if</text:span><text:span text:style-name="T10"> (strcmp(de-&gt;d_name, </text:span><text:span text:style-name="T12">"."</text:span><text:span text:style-name="T10">) == 0 || strcmp(de-&gt;d_name, </text:span><text:span text:style-name="T12">".."</text:span><text:span text:style-name="T10">) == 0) { </text:span></text:p>
      <text:p text:style-name="P39"><text:span text:style-name="T9">224 <text:s/>| <text:s text:c="3"/></text:span><text:span text:style-name="T10"><text:s text:c="20"/>bpos += de-&gt;d_reclen; </text:span><text:span text:style-name="T11">continue</text:span><text:span text:style-name="T10">; </text:span></text:p>
      <text:p text:style-name="P39"><text:span text:style-name="T9">225 <text:s/>| <text:s text:c="3"/></text:span><text:span text:style-name="T10"><text:s text:c="16"/>}</text:span></text:p>
      <text:p text:style-name="P42"><text:span text:style-name="T9">226 <text:s/>| <text:s text:c="3"/></text:span><text:s text:c="16"/></text:p>
      <text:p text:style-name="P39"><text:span text:style-name="T9">227 <text:s/>| <text:s text:c="3"/></text:span><text:span text:style-name="T10"><text:s text:c="16"/></text:span><text:span text:style-name="T14">char</text:span><text:span text:style-name="T10"> *fp = malloc(strlen(curr) + strlen(de-&gt;d_name) + 2);</text:span></text:p>
      <text:p text:style-name="P39"><text:span text:style-name="T9">228 <text:s/>| <text:s text:c="3"/></text:span><text:span text:style-name="T10"><text:s text:c="16"/>sprintf(fp, </text:span><text:span text:style-name="T12">"%s/%s"</text:span><text:span text:style-name="T10">, curr, de-&gt;d_name);</text:span></text:p>
      <text:p text:style-name="P40">229 <text:s/>| <text:s text:c="3"/></text:p>
      <text:p text:style-name="P39"><text:span text:style-name="T9">230 <text:s/>| <text:s text:c="3"/></text:span><text:span text:style-name="T10"><text:s text:c="16"/></text:span><text:span text:style-name="T11">if</text:span><text:span text:style-name="T10"> (de-&gt;d_type == DT_DIR) {</text:span></text:p>
      <text:p text:style-name="P39"><text:span text:style-name="T9">231 <text:s/>| <text:s text:c="3"/></text:span><text:span text:style-name="T10"><text:s text:c="20"/>push(&amp;stack, fp);</text:span></text:p>
      <text:p text:style-name="P39"><text:span text:style-name="T9">232 <text:s/>| <text:s text:c="3"/></text:span><text:span text:style-name="T10"><text:s text:c="20"/>free(fp);</text:span></text:p>
      <text:p text:style-name="P39"><text:span text:style-name="T9">233 <text:s/>| <text:s text:c="3"/></text:span><text:span text:style-name="T10"><text:s text:c="16"/>} </text:span><text:span text:style-name="T11">else</text:span><text:span text:style-name="T10"> </text:span><text:span text:style-name="T11">if</text:span><text:span text:style-name="T10"> (de-&gt;d_type == DT_REG) {</text:span></text:p>
      <text:p text:style-name="P39"><text:span text:style-name="T9">234 <text:s/>| <text:s text:c="3"/></text:span><text:span text:style-name="T10"><text:s text:c="20"/></text:span><text:span text:style-name="T14">int</text:span><text:span text:style-name="T10"> final = op_and;</text:span></text:p>
      <text:p text:style-name="P39"><text:span text:style-name="T9">235 <text:s/>| <text:s text:c="3"/></text:span><text:span text:style-name="T10"><text:s text:c="20"/></text:span><text:span text:style-name="T14">int</text:span><text:span text:style-name="T10"> run = 0;</text:span></text:p>
      <text:p text:style-name="P40">236 <text:s/>| <text:s text:c="3"/></text:p>
      <text:p text:style-name="P39"><text:span text:style-name="T9">237 <text:s/>| <text:s text:c="3"/></text:span><text:span text:style-name="T10"><text:s text:c="20"/></text:span><text:span text:style-name="T11">for</text:span><text:span text:style-name="T10"> (</text:span><text:span text:style-name="T14">size_t</text:span><text:span text:style-name="T10"> i = 0; i &lt; plugins_count; i++) {</text:span></text:p>
      <text:p text:style-name="P39"><text:span text:style-name="T9">238 <text:s/>| <text:s text:c="3"/></text:span><text:span text:style-name="T10"><text:s text:c="24"/></text:span><text:span text:style-name="T11">for</text:span><text:span text:style-name="T10"> (</text:span><text:span text:style-name="T14">size_t</text:span><text:span text:style-name="T10"> g = 0; g &lt; plugins[i].groups_count; g++) {</text:span></text:p>
      <text:p text:style-name="P39"><text:span text:style-name="T9">239 <text:s/>| <text:s text:c="3"/></text:span><text:span text:style-name="T10"><text:s text:c="28"/>run = 1;</text:span></text:p>
      <text:p text:style-name="P39"><text:span text:style-name="T9">240 <text:s/>| <text:s text:c="3"/></text:span><text:span text:style-name="T10"><text:s text:c="28"/></text:span><text:span text:style-name="T14">int</text:span><text:span text:style-name="T10"> res = (plugins[i].process_file(fp, plugins[i].groups[g].opts, plugins[i].groups[g].count) == 0);</text:span></text:p>
      <text:p text:style-name="P42"><text:span text:style-name="T9">241 <text:s/>| <text:s text:c="3"/></text:span><text:s text:c="28"/></text:p>
      <text:p text:style-name="P39"><text:span text:style-name="T9">242 <text:s/>| <text:s text:c="3"/></text:span><text:span text:style-name="T10"><text:s text:c="28"/></text:span><text:span text:style-name="T11">if</text:span><text:span text:style-name="T10"> (op_and) final &amp;= res;</text:span></text:p>
      <text:p text:style-name="P39"><text:span text:style-name="T9">243 <text:s/>| <text:s text:c="3"/></text:span><text:span text:style-name="T10"><text:s text:c="28"/></text:span><text:span text:style-name="T11">else</text:span><text:span text:style-name="T10"> final |= res;</text:span></text:p>
      <text:p text:style-name="P39"><text:span text:style-name="T9">244 <text:s/>| <text:s text:c="3"/></text:span><text:span text:style-name="T10"><text:s text:c="24"/>}</text:span></text:p>
      <text:p text:style-name="P39"><text:span text:style-name="T9">245 <text:s/>| <text:s text:c="3"/></text:span><text:span text:style-name="T10"><text:s text:c="20"/>}</text:span></text:p>
      <text:p text:style-name="P39"><text:span text:style-name="T9">246 <text:s/>| <text:s text:c="3"/></text:span><text:span text:style-name="T10"><text:s text:c="20"/></text:span><text:span text:style-name="T11">if</text:span><text:span text:style-name="T10"> (op_not) final = !final;</text:span></text:p>
      <text:p text:style-name="P39"><text:span text:style-name="T9">247 <text:s/>| <text:s text:c="3"/></text:span><text:span text:style-name="T10"><text:s text:c="20"/></text:span><text:span text:style-name="T11">if</text:span><text:span text:style-name="T10"> (final || !run) printf(</text:span><text:span text:style-name="T12">"%s\n"</text:span><text:span text:style-name="T10">, fp);</text:span></text:p>
      <text:p text:style-name="P39"><text:span text:style-name="T9">248 <text:s/>| <text:s text:c="3"/></text:span><text:span text:style-name="T10"><text:s text:c="20"/>free(fp);</text:span></text:p>
      <text:p text:style-name="P39"><text:span text:style-name="T9">249 <text:s/>| <text:s text:c="3"/></text:span><text:span text:style-name="T10"><text:s text:c="16"/>} </text:span><text:span text:style-name="T11">else</text:span><text:span text:style-name="T10"> {</text:span></text:p>
      <text:p text:style-name="P39"><text:span text:style-name="T9">250 <text:s/>| <text:s text:c="3"/></text:span><text:span text:style-name="T10"><text:s text:c="20"/>free(fp);</text:span></text:p>
      <text:p text:style-name="P39"><text:span text:style-name="T9">251 <text:s/>| <text:s text:c="3"/></text:span><text:span text:style-name="T10"><text:s text:c="16"/>}</text:span></text:p>
      <text:p text:style-name="P39"><text:span text:style-name="T9">252 <text:s/>| <text:s text:c="3"/></text:span><text:span text:style-name="T10"><text:s text:c="16"/>bpos += de-&gt;d_reclen;</text:span></text:p>
      <text:p text:style-name="P39"><text:span text:style-name="T9">253 <text:s/>| <text:s text:c="3"/></text:span><text:span text:style-name="T10"><text:s text:c="12"/>}</text:span></text:p>
      <text:p text:style-name="P39"><text:span text:style-name="T9">254 <text:s/>| <text:s text:c="3"/></text:span><text:span text:style-name="T10"><text:s text:c="8"/>}</text:span></text:p>
      <text:p text:style-name="P39"><text:span text:style-name="T9">255 <text:s/>| <text:s text:c="3"/></text:span><text:span text:style-name="T10"><text:s text:c="8"/>free(buf); </text:span></text:p>
      <text:p text:style-name="P39"><text:span text:style-name="T9">256 <text:s/>| <text:s text:c="3"/></text:span><text:span text:style-name="T10"><text:s text:c="8"/>close(fd); </text:span></text:p>
      <text:p text:style-name="P39"><text:span text:style-name="T9">257 <text:s/>| <text:s text:c="3"/></text:span><text:span text:style-name="T10"><text:s text:c="8"/>free(curr);</text:span></text:p>
      <text:p text:style-name="P39"><text:span text:style-name="T9">258 <text:s/>| <text:s text:c="3"/></text:span><text:span text:style-name="T10"><text:s text:c="4"/>}</text:span></text:p>
      <text:p text:style-name="P42"><text:span text:style-name="T9">259 <text:s/>| <text:s text:c="3"/></text:span><text:s text:c="4"/></text:p>
      <text:p text:style-name="P39"><text:span text:style-name="T9">260 <text:s/>| <text:s text:c="3"/></text:span><text:span text:style-name="T10"><text:s text:c="4"/>deinit_all(plugins, plugins_count, plugin_dir, long_options);</text:span></text:p>
      <text:p text:style-name="P39"><text:span text:style-name="T9">261 <text:s/>| <text:s text:c="3"/></text:span><text:span text:style-name="T10"><text:s text:c="4"/></text:span><text:span text:style-name="T11">return</text:span><text:span text:style-name="T10"> 0;</text:span></text:p>
      <text:p text:style-name="P42"><text:span text:style-name="T9">262 <text:s/>| <text:s text:c="3"/></text:span>}</text:p>
      <text:p text:style-name="P43"/>
      <text:p text:style-name="P44">Исходный код программы libvypN3250.c:</text:p>
      <text:p text:style-name="P45"><text:span text:style-name="T9"><text:s text:c="2"/>1 <text:s/>| <text:s text:c="3"/></text:span><text:span text:style-name="T11">#include</text:span><text:span text:style-name="T10"> </text:span><text:span text:style-name="T9">&lt;stdio.h&gt;</text:span></text:p>
      <text:p text:style-name="P45"><text:span text:style-name="T9"><text:s text:c="2"/>2 <text:s/>| <text:s text:c="3"/></text:span><text:span text:style-name="T11">#include</text:span><text:span text:style-name="T10"> </text:span><text:span text:style-name="T9">&lt;stdlib.h&gt;</text:span></text:p>
      <text:p text:style-name="P45"><text:span text:style-name="T9"><text:s text:c="2"/>3 <text:s/>| <text:s text:c="3"/></text:span><text:span text:style-name="T11">#include</text:span><text:span text:style-name="T10"> </text:span><text:span text:style-name="T9">&lt;string.h&gt;</text:span></text:p>
      <text:p text:style-name="P45"><text:span text:style-name="T9"><text:s text:c="2"/>4 <text:s/>| <text:s text:c="3"/></text:span><text:span text:style-name="T11">#include</text:span><text:span text:style-name="T10"> </text:span><text:span text:style-name="T9">&lt;fcntl.h&gt;</text:span></text:p>
      <text:p text:style-name="P45"><text:span text:style-name="T9"><text:s text:c="2"/>5 <text:s/>| <text:s text:c="3"/></text:span><text:span text:style-name="T11">#include</text:span><text:span text:style-name="T10"> </text:span><text:span text:style-name="T9">&lt;unistd.h&gt;</text:span></text:p>
      <text:p text:style-name="P45"><text:span text:style-name="T9"><text:s text:c="2"/>6 <text:s/>| <text:s text:c="3"/></text:span><text:span text:style-name="T11">#include</text:span><text:span text:style-name="T10"> </text:span><text:span text:style-name="T9">&lt;stdint.h&gt;</text:span></text:p>
      <text:p text:style-name="P45"><text:span text:style-name="T9"><text:s text:c="2"/>7 <text:s/>| <text:s text:c="3"/></text:span><text:span text:style-name="T11">#include</text:span><text:span text:style-name="T10"> </text:span><text:span text:style-name="T9">"plugin_api.h"</text:span></text:p>
      <text:p text:style-name="P46"><text:s text:c="2"/>8 <text:s/>| <text:s text:c="3"/></text:p>
      <text:p text:style-name="P45"><text:span text:style-name="T9"><text:s text:c="2"/>9 <text:s/>| <text:s text:c="3"/></text:span><text:span text:style-name="T11">static</text:span><text:span text:style-name="T10"> </text:span><text:span text:style-name="T14">uint32_t</text:span><text:span text:style-name="T10"> reverseIP(</text:span><text:span text:style-name="T14">uint32_t</text:span><text:span text:style-name="T10"> v) {</text:span></text:p>
      <text:p text:style-name="P45"><text:span text:style-name="T9"><text:s/>10 <text:s/>| <text:s text:c="3"/></text:span><text:span text:style-name="T10"><text:s text:c="4"/></text:span><text:span text:style-name="T11">return</text:span><text:span text:style-name="T10"> ((v &gt;&gt; 24) &amp; 0xFF) | ((v &gt;&gt; 8) &amp; 0xFF00) | </text:span></text:p>
      <text:p text:style-name="P45"><text:span text:style-name="T9"><text:s/>11 <text:s/>| <text:s text:c="3"/></text:span><text:span text:style-name="T10"><text:s text:c="11"/>((v &lt;&lt; 8) &amp; 0xFF0000) | ((v &lt;&lt; 24) &amp; 0xFF000000);</text:span></text:p>
      <text:p text:style-name="P47"><text:span text:style-name="T9"><text:s/>12 <text:s/>| <text:s text:c="3"/></text:span>}</text:p>
      <text:p text:style-name="P46"><text:s/>13 <text:s/>| <text:s text:c="3"/></text:p>
      <text:p text:style-name="P45"><text:span text:style-name="T9"><text:s/>14 <text:s/>| <text:s text:c="3"/></text:span><text:span text:style-name="T11">static</text:span><text:span text:style-name="T10"> </text:span><text:span text:style-name="T14">int</text:span><text:span text:style-name="T10"> parse_ipv4(</text:span><text:span text:style-name="T11">const</text:span><text:span text:style-name="T10"> </text:span><text:span text:style-name="T14">char</text:span><text:span text:style-name="T10"> *str, </text:span><text:span text:style-name="T14">uint32_t</text:span><text:span text:style-name="T10"> *out_be) {</text:span></text:p>
      <text:p text:style-name="P45"><text:span text:style-name="T9"><text:s/>15 <text:s/>| <text:s text:c="3"/></text:span><text:span text:style-name="T10"><text:s text:c="4"/></text:span><text:span text:style-name="T14">unsigned</text:span><text:span text:style-name="T10"> </text:span><text:span text:style-name="T14">int</text:span><text:span text:style-name="T10"> b[4];</text:span></text:p>
      <text:p text:style-name="P45"><text:soft-page-break/><text:span text:style-name="T9"><text:s/>16 <text:s/>| <text:s text:c="3"/></text:span><text:span text:style-name="T10"><text:s text:c="4"/></text:span><text:span text:style-name="T14">char</text:span><text:span text:style-name="T10"> tail[2];</text:span></text:p>
      <text:p text:style-name="P47"><text:span text:style-name="T9"><text:s/>17 <text:s/>| <text:s text:c="3"/></text:span><text:s text:c="4"/></text:p>
      <text:p text:style-name="P45"><text:span text:style-name="T9"><text:s/>18 <text:s/>| <text:s text:c="3"/></text:span><text:span text:style-name="T10"><text:s text:c="4"/></text:span><text:span text:style-name="T14">int</text:span><text:span text:style-name="T10"> dots = 0;</text:span></text:p>
      <text:p text:style-name="P45"><text:span text:style-name="T9"><text:s/>19 <text:s/>| <text:s text:c="3"/></text:span><text:span text:style-name="T10"><text:s text:c="4"/></text:span><text:span text:style-name="T11">for</text:span><text:span text:style-name="T10"> (</text:span><text:span text:style-name="T11">const</text:span><text:span text:style-name="T10"> </text:span><text:span text:style-name="T14">char</text:span><text:span text:style-name="T10"> *p = str; *p; p++) {</text:span></text:p>
      <text:p text:style-name="P45"><text:span text:style-name="T9"><text:s/>20 <text:s/>| <text:s text:c="3"/></text:span><text:span text:style-name="T10"><text:s text:c="8"/></text:span><text:span text:style-name="T11">if</text:span><text:span text:style-name="T10"> (*p == </text:span><text:span text:style-name="T12">'.'</text:span><text:span text:style-name="T10">) dots++;</text:span></text:p>
      <text:p text:style-name="P45"><text:span text:style-name="T9"><text:s/>21 <text:s/>| <text:s text:c="3"/></text:span><text:span text:style-name="T10"><text:s text:c="4"/>}</text:span></text:p>
      <text:p text:style-name="P45"><text:span text:style-name="T9"><text:s/>22 <text:s/>| <text:s text:c="3"/></text:span><text:span text:style-name="T10"><text:s text:c="4"/></text:span><text:span text:style-name="T11">if</text:span><text:span text:style-name="T10"> (dots != 3) </text:span><text:span text:style-name="T11">return</text:span><text:span text:style-name="T10"> 0;</text:span></text:p>
      <text:p text:style-name="P46"><text:s/>23 <text:s/>| <text:s text:c="3"/></text:p>
      <text:p text:style-name="P45"><text:span text:style-name="T9"><text:s/>24 <text:s/>| <text:s text:c="3"/></text:span><text:span text:style-name="T10"><text:s text:c="4"/></text:span><text:span text:style-name="T11">if</text:span><text:span text:style-name="T10"> (sscanf(str, </text:span><text:span text:style-name="T12">"%u.%u.%u.%u%1s"</text:span><text:span text:style-name="T10">, &amp;b[0], &amp;b[1], &amp;b[2], &amp;b[3], tail) != 4) {</text:span></text:p>
      <text:p text:style-name="P45"><text:span text:style-name="T9"><text:s/>25 <text:s/>| <text:s text:c="3"/></text:span><text:span text:style-name="T10"><text:s text:c="8"/></text:span><text:span text:style-name="T11">return</text:span><text:span text:style-name="T10"> 0;</text:span></text:p>
      <text:p text:style-name="P45"><text:span text:style-name="T9"><text:s/>26 <text:s/>| <text:s text:c="3"/></text:span><text:span text:style-name="T10"><text:s text:c="4"/>}</text:span></text:p>
      <text:p text:style-name="P46"><text:s/>27 <text:s/>| <text:s text:c="3"/></text:p>
      <text:p text:style-name="P45"><text:span text:style-name="T9"><text:s/>28 <text:s/>| <text:s text:c="3"/></text:span><text:span text:style-name="T10"><text:s text:c="4"/></text:span><text:span text:style-name="T11">for</text:span><text:span text:style-name="T10"> (</text:span><text:span text:style-name="T14">int</text:span><text:span text:style-name="T10"> i = 0; i &lt; 4; i++) {</text:span></text:p>
      <text:p text:style-name="P45"><text:span text:style-name="T9"><text:s/>29 <text:s/>| <text:s text:c="3"/></text:span><text:span text:style-name="T10"><text:s text:c="8"/></text:span><text:span text:style-name="T11">if</text:span><text:span text:style-name="T10"> (b[i] &gt; 255) </text:span><text:span text:style-name="T11">return</text:span><text:span text:style-name="T10"> 0;</text:span></text:p>
      <text:p text:style-name="P45"><text:span text:style-name="T9"><text:s/>30 <text:s/>| <text:s text:c="3"/></text:span><text:span text:style-name="T10"><text:s text:c="4"/>}</text:span></text:p>
      <text:p text:style-name="P46"><text:s/>31 <text:s/>| <text:s text:c="3"/></text:p>
      <text:p text:style-name="P45"><text:span text:style-name="T9"><text:s/>32 <text:s/>| <text:s text:c="3"/></text:span><text:span text:style-name="T10"><text:s text:c="4"/></text:span><text:span text:style-name="T14">unsigned</text:span><text:span text:style-name="T10"> </text:span><text:span text:style-name="T14">char</text:span><text:span text:style-name="T10"> *p = (</text:span><text:span text:style-name="T14">unsigned</text:span><text:span text:style-name="T10"> </text:span><text:span text:style-name="T14">char</text:span><text:span text:style-name="T10"> *)out_be;</text:span></text:p>
      <text:p text:style-name="P45"><text:span text:style-name="T9"><text:s/>33 <text:s/>| <text:s text:c="3"/></text:span><text:span text:style-name="T10"><text:s text:c="4"/>p[0] = (</text:span><text:span text:style-name="T14">unsigned</text:span><text:span text:style-name="T10"> </text:span><text:span text:style-name="T14">char</text:span><text:span text:style-name="T10">)b[0];</text:span></text:p>
      <text:p text:style-name="P45"><text:span text:style-name="T9"><text:s/>34 <text:s/>| <text:s text:c="3"/></text:span><text:span text:style-name="T10"><text:s text:c="4"/>p[1] = (</text:span><text:span text:style-name="T14">unsigned</text:span><text:span text:style-name="T10"> </text:span><text:span text:style-name="T14">char</text:span><text:span text:style-name="T10">)b[1];</text:span></text:p>
      <text:p text:style-name="P45"><text:span text:style-name="T9"><text:s/>35 <text:s/>| <text:s text:c="3"/></text:span><text:span text:style-name="T10"><text:s text:c="4"/>p[2] = (</text:span><text:span text:style-name="T14">unsigned</text:span><text:span text:style-name="T10"> </text:span><text:span text:style-name="T14">char</text:span><text:span text:style-name="T10">)b[2];</text:span></text:p>
      <text:p text:style-name="P45"><text:span text:style-name="T9"><text:s/>36 <text:s/>| <text:s text:c="3"/></text:span><text:span text:style-name="T10"><text:s text:c="4"/>p[3] = (</text:span><text:span text:style-name="T14">unsigned</text:span><text:span text:style-name="T10"> </text:span><text:span text:style-name="T14">char</text:span><text:span text:style-name="T10">)b[3];</text:span></text:p>
      <text:p text:style-name="P46"><text:s/>37 <text:s/>| <text:s text:c="3"/></text:p>
      <text:p text:style-name="P45"><text:span text:style-name="T9"><text:s/>38 <text:s/>| <text:s text:c="3"/></text:span><text:span text:style-name="T10"><text:s text:c="4"/></text:span><text:span text:style-name="T11">return</text:span><text:span text:style-name="T10"> 1;</text:span></text:p>
      <text:p text:style-name="P47"><text:span text:style-name="T9"><text:s/>39 <text:s/>| <text:s text:c="3"/></text:span>}</text:p>
      <text:p text:style-name="P46"><text:s/>40 <text:s/>| <text:s text:c="3"/></text:p>
      <text:p text:style-name="P45"><text:span text:style-name="T9"><text:s/>41 <text:s/>| <text:s text:c="3"/></text:span><text:span text:style-name="T11">static</text:span><text:span text:style-name="T10"> </text:span><text:span text:style-name="T11">struct</text:span><text:span text:style-name="T10"> </text:span><text:span text:style-name="T14">plugin_option</text:span><text:span text:style-name="T10"> my_options[] = {</text:span></text:p>
      <text:p text:style-name="P45"><text:span text:style-name="T9"><text:s/>42 <text:s/>| <text:s text:c="3"/></text:span><text:span text:style-name="T10"><text:s text:c="4"/>{</text:span></text:p>
      <text:p text:style-name="P45"><text:span text:style-name="T9"><text:s/>43 <text:s/>| <text:s text:c="3"/></text:span><text:span text:style-name="T10"><text:s text:c="8"/>{</text:span><text:span text:style-name="T12">"ipv4-addr-bin"</text:span><text:span text:style-name="T10">, required_argument, 0, 0},</text:span></text:p>
      <text:p text:style-name="P45"><text:span text:style-name="T9"><text:s/>44 <text:s/>| <text:s text:c="3"/></text:span><text:span text:style-name="T10"><text:s text:c="8"/></text:span><text:span text:style-name="T12">"Поиск IPv4 адреса в бинарном виде (BE/LE)"</text:span></text:p>
      <text:p text:style-name="P45"><text:span text:style-name="T9"><text:s/>45 <text:s/>| <text:s text:c="3"/></text:span><text:span text:style-name="T10"><text:s text:c="4"/>}</text:span></text:p>
      <text:p text:style-name="P47"><text:span text:style-name="T9"><text:s/>46 <text:s/>| <text:s text:c="3"/></text:span>};</text:p>
      <text:p text:style-name="P46"><text:s/>47 <text:s/>| <text:s text:c="3"/></text:p>
      <text:p text:style-name="P45"><text:span text:style-name="T9"><text:s/>48 <text:s/>| <text:s text:c="3"/></text:span><text:span text:style-name="T11">static</text:span><text:span text:style-name="T10"> </text:span><text:span text:style-name="T11">struct</text:span><text:span text:style-name="T10"> </text:span><text:span text:style-name="T14">plugin_info</text:span><text:span text:style-name="T10"> my_info = {</text:span></text:p>
      <text:p text:style-name="P45"><text:span text:style-name="T9"><text:s/>49 <text:s/>| <text:s text:c="3"/></text:span><text:span text:style-name="T10"><text:s text:c="4"/></text:span><text:span text:style-name="T12">"Плагин поиска бинарной IPv4 строки"</text:span><text:span text:style-name="T10">,</text:span></text:p>
      <text:p text:style-name="P45"><text:span text:style-name="T9"><text:s/>50 <text:s/>| <text:s text:c="3"/></text:span><text:span text:style-name="T10"><text:s text:c="4"/></text:span><text:span text:style-name="T12">"Пахомов Владимир Юрьевич, гр. N3250\nВариант: 19"</text:span><text:span text:style-name="T10">,</text:span></text:p>
      <text:p text:style-name="P45"><text:span text:style-name="T9"><text:s/>51 <text:s/>| <text:s text:c="3"/></text:span><text:span text:style-name="T10"><text:s text:c="4"/>1,</text:span></text:p>
      <text:p text:style-name="P45"><text:span text:style-name="T9"><text:s/>52 <text:s/>| <text:s text:c="3"/></text:span><text:span text:style-name="T10"><text:s text:c="4"/>my_options</text:span></text:p>
      <text:p text:style-name="P47"><text:span text:style-name="T9"><text:s/>53 <text:s/>| <text:s text:c="3"/></text:span>};</text:p>
      <text:p text:style-name="P46"><text:s/>54 <text:s/>| <text:s text:c="3"/></text:p>
      <text:p text:style-name="P45"><text:span text:style-name="T9"><text:s/>55 <text:s/>| <text:s text:c="3"/></text:span><text:span text:style-name="T14">int</text:span><text:span text:style-name="T10"> plugin_get_info(</text:span><text:span text:style-name="T11">struct</text:span><text:span text:style-name="T10"> </text:span><text:span text:style-name="T14">plugin_info</text:span><text:span text:style-name="T10">* ppi) {</text:span></text:p>
      <text:p text:style-name="P45"><text:span text:style-name="T9"><text:s/>56 <text:s/>| <text:s text:c="3"/></text:span><text:span text:style-name="T10"><text:s text:c="4"/></text:span><text:span text:style-name="T11">if</text:span><text:span text:style-name="T10"> (!ppi) </text:span><text:span text:style-name="T11">return</text:span><text:span text:style-name="T10"> -1;</text:span></text:p>
      <text:p text:style-name="P45"><text:span text:style-name="T9"><text:s/>57 <text:s/>| <text:s text:c="3"/></text:span><text:span text:style-name="T10"><text:s text:c="4"/>*ppi = my_info;</text:span></text:p>
      <text:p text:style-name="P45"><text:span text:style-name="T9"><text:s/>58 <text:s/>| <text:s text:c="3"/></text:span><text:span text:style-name="T10"><text:s text:c="4"/></text:span><text:span text:style-name="T11">return</text:span><text:span text:style-name="T10"> 0;</text:span></text:p>
      <text:p text:style-name="P47"><text:span text:style-name="T9"><text:s/>59 <text:s/>| <text:s text:c="3"/></text:span>}</text:p>
      <text:p text:style-name="P46"><text:s/>60 <text:s/>| <text:s text:c="3"/></text:p>
      <text:p text:style-name="P45"><text:span text:style-name="T9"><text:s/>61 <text:s/>| <text:s text:c="3"/></text:span><text:span text:style-name="T14">int</text:span><text:span text:style-name="T10"> plugin_process_file(</text:span><text:span text:style-name="T11">const</text:span><text:span text:style-name="T10"> </text:span><text:span text:style-name="T14">char</text:span><text:span text:style-name="T10"> *fname, </text:span><text:span text:style-name="T11">struct</text:span><text:span text:style-name="T10"> </text:span><text:span text:style-name="T14">option</text:span><text:span text:style-name="T10"> in_opts[], </text:span><text:span text:style-name="T14">size_t</text:span><text:span text:style-name="T10"> in_opts_len) {</text:span></text:p>
      <text:p text:style-name="P45"><text:span text:style-name="T9"><text:s/>62 <text:s/>| <text:s text:c="3"/></text:span><text:span text:style-name="T10"><text:s text:c="4"/></text:span><text:span text:style-name="T14">int</text:span><text:span text:style-name="T10"> debug = (getenv(</text:span><text:span text:style-name="T12">"LAB2DEBUG"</text:span><text:span text:style-name="T10">) != NULL);</text:span></text:p>
      <text:p text:style-name="P46"><text:s/>63 <text:s/>| <text:s text:c="3"/></text:p>
      <text:p text:style-name="P45"><text:span text:style-name="T9"><text:s/>64 <text:s/>| <text:s text:c="3"/></text:span><text:span text:style-name="T10"><text:s text:c="4"/></text:span><text:span text:style-name="T11">for</text:span><text:span text:style-name="T10"> (</text:span><text:span text:style-name="T14">size_t</text:span><text:span text:style-name="T10"> i = 0; i &lt; in_opts_len; i++) {</text:span></text:p>
      <text:p text:style-name="P45"><text:span text:style-name="T9"><text:s/>65 <text:s/>| <text:s text:c="3"/></text:span><text:span text:style-name="T10"><text:s text:c="8"/></text:span><text:span text:style-name="T11">if</text:span><text:span text:style-name="T10"> (strcmp(in_opts[i].name, </text:span><text:span text:style-name="T12">"ipv4-addr-bin"</text:span><text:span text:style-name="T10">) == 0) {</text:span></text:p>
      <text:p text:style-name="P45"><text:span text:style-name="T9"><text:s/>66 <text:s/>| <text:s text:c="3"/></text:span><text:span text:style-name="T10"><text:s text:c="12"/></text:span><text:span text:style-name="T11">const</text:span><text:span text:style-name="T10"> </text:span><text:span text:style-name="T14">char</text:span><text:span text:style-name="T10"> *ip_str = (</text:span><text:span text:style-name="T11">const</text:span><text:span text:style-name="T10"> </text:span><text:span text:style-name="T14">char</text:span><text:span text:style-name="T10"> *)in_opts[i].flag;</text:span></text:p>
      <text:p text:style-name="P45"><text:span text:style-name="T9"><text:s/>67 <text:s/>| <text:s text:c="3"/></text:span><text:span text:style-name="T10"><text:s text:c="12"/></text:span><text:span text:style-name="T14">uint32_t</text:span><text:span text:style-name="T10"> be_val = 0;</text:span></text:p>
      <text:p text:style-name="P46"><text:s/>68 <text:s/>| <text:s text:c="3"/></text:p>
      <text:p text:style-name="P45"><text:span text:style-name="T9"><text:s/>69 <text:s/>| <text:s text:c="3"/></text:span><text:span text:style-name="T10"><text:s text:c="12"/></text:span><text:span text:style-name="T11">if</text:span><text:span text:style-name="T10"> (!parse_ipv4(ip_str, &amp;be_val)) {</text:span></text:p>
      <text:p text:style-name="P45"><text:span text:style-name="T9"><text:s/>70 <text:s/>| <text:s text:c="3"/></text:span><text:span text:style-name="T10"><text:s text:c="16"/>fprintf(stderr, </text:span><text:span text:style-name="T12">"Ошибка: некорректный формат IPv4: %s\n"</text:span><text:span text:style-name="T10">, ip_str);</text:span></text:p>
      <text:p text:style-name="P45"><text:span text:style-name="T9"><text:s/>71 <text:s/>| <text:s text:c="3"/></text:span><text:span text:style-name="T10"><text:s text:c="16"/></text:span><text:span text:style-name="T11">return</text:span><text:span text:style-name="T10"> -1;</text:span></text:p>
      <text:p text:style-name="P45"><text:span text:style-name="T9"><text:s/>72 <text:s/>| <text:s text:c="3"/></text:span><text:span text:style-name="T10"><text:s text:c="12"/>}</text:span></text:p>
      <text:p text:style-name="P46"><text:s/>73 <text:s/>| <text:s text:c="3"/></text:p>
      <text:p text:style-name="P45"><text:span text:style-name="T9"><text:s/>74 <text:s/>| <text:s text:c="3"/></text:span><text:span text:style-name="T10"><text:s text:c="12"/></text:span><text:span text:style-name="T14">uint32_t</text:span><text:span text:style-name="T10"> le_val = reverseIP(be_val);</text:span></text:p>
      <text:p text:style-name="P45"><text:span text:style-name="T9"><text:s/>75 <text:s/>| <text:s text:c="3"/></text:span><text:span text:style-name="T10"><text:s text:c="12"/></text:span><text:span text:style-name="T14">int</text:span><text:span text:style-name="T10"> fd = open(fname, O_RDONLY);</text:span></text:p>
      <text:p text:style-name="P45"><text:span text:style-name="T9"><text:s/>76 <text:s/>| <text:s text:c="3"/></text:span><text:span text:style-name="T10"><text:s text:c="12"/></text:span><text:span text:style-name="T11">if</text:span><text:span text:style-name="T10"> (fd &lt; 0) </text:span><text:span text:style-name="T11">return</text:span><text:span text:style-name="T10"> 1;</text:span></text:p>
      <text:p text:style-name="P46"><text:s/>77 <text:s/>| <text:s text:c="3"/></text:p>
      <text:p text:style-name="P45"><text:span text:style-name="T9"><text:s/>78 <text:s/>| <text:s text:c="3"/></text:span><text:span text:style-name="T10"><text:s text:c="12"/></text:span><text:span text:style-name="T14">unsigned</text:span><text:span text:style-name="T10"> </text:span><text:span text:style-name="T14">char</text:span><text:span text:style-name="T10"> buf[4096];</text:span></text:p>
      <text:p text:style-name="P45"><text:span text:style-name="T9"><text:s/>79 <text:s/>| <text:s text:c="3"/></text:span><text:span text:style-name="T10"><text:s text:c="12"/></text:span><text:span text:style-name="T14">ssize_t</text:span><text:span text:style-name="T10"> n;</text:span></text:p>
      <text:p text:style-name="P45"><text:span text:style-name="T9"><text:s/>80 <text:s/>| <text:s text:c="3"/></text:span><text:span text:style-name="T10"><text:s text:c="12"/></text:span><text:span text:style-name="T14">off_t</text:span><text:span text:style-name="T10"> total_read = 0;</text:span></text:p>
      <text:p text:style-name="P45"><text:span text:style-name="T9"><text:s/>81 <text:s/>| <text:s text:c="3"/></text:span><text:span text:style-name="T10"><text:s text:c="12"/></text:span><text:span text:style-name="T14">int</text:span><text:span text:style-name="T10"> found = 0;</text:span></text:p>
      <text:p text:style-name="P46"><text:s/>82 <text:s/>| <text:s text:c="3"/></text:p>
      <text:p text:style-name="P45"><text:span text:style-name="T9"><text:s/>83 <text:s/>| <text:s text:c="3"/></text:span><text:span text:style-name="T10"><text:s text:c="12"/></text:span><text:span text:style-name="T11">while</text:span><text:span text:style-name="T10"> ((n = read(fd, buf, </text:span><text:span text:style-name="T11">sizeof</text:span><text:span text:style-name="T10">(buf))) &gt; 0) {</text:span></text:p>
      <text:p text:style-name="P45"><text:span text:style-name="T9"><text:s/>84 <text:s/>| <text:s text:c="3"/></text:span><text:span text:style-name="T10"><text:s text:c="16"/></text:span><text:span text:style-name="T11">for</text:span><text:span text:style-name="T10"> (</text:span><text:span text:style-name="T14">int</text:span><text:span text:style-name="T10"> j = 0; j &lt;= (</text:span><text:span text:style-name="T14">int</text:span><text:span text:style-name="T10">)n - 4; j++) {</text:span></text:p>
      <text:p text:style-name="P45"><text:span text:style-name="T9"><text:s/>85 <text:s/>| <text:s text:c="3"/></text:span><text:span text:style-name="T10"><text:s text:c="20"/></text:span><text:span text:style-name="T14">uint32_t</text:span><text:span text:style-name="T10"> chunk;</text:span></text:p>
      <text:p text:style-name="P45"><text:span text:style-name="T9"><text:s/>86 <text:s/>| <text:s text:c="3"/></text:span><text:span text:style-name="T10"><text:s text:c="20"/>memcpy(&amp;chunk, &amp;buf[j], 4);</text:span></text:p>
      <text:p text:style-name="P45"><text:span text:style-name="T9"><text:s/>87 <text:s/>| <text:s text:c="3"/></text:span><text:span text:style-name="T10"><text:s text:c="20"/></text:span><text:span text:style-name="T11">if</text:span><text:span text:style-name="T10"> (chunk == be_val || chunk == le_val) {</text:span></text:p>
      <text:p text:style-name="P45"><text:span text:style-name="T9"><text:s/>88 <text:s/>| <text:s text:c="3"/></text:span><text:span text:style-name="T10"><text:s text:c="24"/></text:span><text:span text:style-name="T11">if</text:span><text:span text:style-name="T10"> (debug) {</text:span></text:p>
      <text:p text:style-name="P45"><text:soft-page-break/><text:span text:style-name="T9"><text:s/>89 <text:s/>| <text:s text:c="3"/></text:span><text:span text:style-name="T10"><text:s text:c="28"/>fprintf(stderr, </text:span><text:span text:style-name="T12">"\n[DEBUG] Плагин libvypN3250: Найден IP %s (%s) по смещению %ld в файле %s\n"</text:span><text:span text:style-name="T10">, </text:span></text:p>
      <text:p text:style-name="P45"><text:span text:style-name="T9"><text:s/>90 <text:s/>| <text:s text:c="3"/></text:span><text:span text:style-name="T10"><text:s text:c="37"/>ip_str, chunk == be_val ? </text:span><text:span text:style-name="T12">"big-endian"</text:span><text:span text:style-name="T10"> : </text:span><text:span text:style-name="T12">"litte-endian"</text:span><text:span text:style-name="T10">, (</text:span><text:span text:style-name="T14">long</text:span><text:span text:style-name="T10">)(total_read + j), fname);</text:span></text:p>
      <text:p text:style-name="P45"><text:span text:style-name="T9"><text:s/>91 <text:s/>| <text:s text:c="3"/></text:span><text:span text:style-name="T10"><text:s text:c="24"/>}</text:span></text:p>
      <text:p text:style-name="P45"><text:span text:style-name="T9"><text:s/>92 <text:s/>| <text:s text:c="3"/></text:span><text:span text:style-name="T10"><text:s text:c="24"/>found = 1;</text:span></text:p>
      <text:p text:style-name="P45"><text:span text:style-name="T9"><text:s/>93 <text:s/>| <text:s text:c="3"/></text:span><text:span text:style-name="T10"><text:s text:c="24"/></text:span><text:span text:style-name="T11">break</text:span><text:span text:style-name="T10">;</text:span></text:p>
      <text:p text:style-name="P45"><text:span text:style-name="T9"><text:s/>94 <text:s/>| <text:s text:c="3"/></text:span><text:span text:style-name="T10"><text:s text:c="20"/>}</text:span></text:p>
      <text:p text:style-name="P45"><text:span text:style-name="T9"><text:s/>95 <text:s/>| <text:s text:c="3"/></text:span><text:span text:style-name="T10"><text:s text:c="16"/>}</text:span></text:p>
      <text:p text:style-name="P45"><text:span text:style-name="T9"><text:s/>96 <text:s/>| <text:s text:c="3"/></text:span><text:span text:style-name="T10"><text:s text:c="16"/></text:span><text:span text:style-name="T11">if</text:span><text:span text:style-name="T10"> (found) </text:span><text:span text:style-name="T11">break</text:span><text:span text:style-name="T10">;</text:span></text:p>
      <text:p text:style-name="P46"><text:s/>97 <text:s/>| <text:s text:c="3"/></text:p>
      <text:p text:style-name="P45"><text:span text:style-name="T9"><text:s/>98 <text:s/>| <text:s text:c="3"/></text:span><text:span text:style-name="T10"><text:s text:c="16"/></text:span><text:span text:style-name="T11">if</text:span><text:span text:style-name="T10"> (n == (</text:span><text:span text:style-name="T14">ssize_t</text:span><text:span text:style-name="T10">)</text:span><text:span text:style-name="T11">sizeof</text:span><text:span text:style-name="T10">(buf)) {</text:span></text:p>
      <text:p text:style-name="P45"><text:span text:style-name="T9"><text:s/>99 <text:s/>| <text:s text:c="3"/></text:span><text:span text:style-name="T10"><text:s text:c="20"/></text:span><text:span text:style-name="T14">off_t</text:span><text:span text:style-name="T10"> back_step = 3;</text:span></text:p>
      <text:p text:style-name="P45"><text:span text:style-name="T9">100 <text:s/>| <text:s text:c="3"/></text:span><text:span text:style-name="T10"><text:s text:c="20"/>lseek(fd, -back_step, SEEK_CUR);</text:span></text:p>
      <text:p text:style-name="P45"><text:span text:style-name="T9">101 <text:s/>| <text:s text:c="3"/></text:span><text:span text:style-name="T10"><text:s text:c="20"/>total_read += (n - back_step);</text:span></text:p>
      <text:p text:style-name="P45"><text:span text:style-name="T9">102 <text:s/>| <text:s text:c="3"/></text:span><text:span text:style-name="T10"><text:s text:c="16"/>} </text:span><text:span text:style-name="T11">else</text:span><text:span text:style-name="T10"> {</text:span></text:p>
      <text:p text:style-name="P45"><text:span text:style-name="T9">103 <text:s/>| <text:s text:c="3"/></text:span><text:span text:style-name="T10"><text:s text:c="20"/>total_read += n;</text:span></text:p>
      <text:p text:style-name="P45"><text:span text:style-name="T9">104 <text:s/>| <text:s text:c="3"/></text:span><text:span text:style-name="T10"><text:s text:c="16"/>}</text:span></text:p>
      <text:p text:style-name="P45"><text:span text:style-name="T9">105 <text:s/>| <text:s text:c="3"/></text:span><text:span text:style-name="T10"><text:s text:c="12"/>}</text:span></text:p>
      <text:p text:style-name="P45"><text:span text:style-name="T9">106 <text:s/>| <text:s text:c="3"/></text:span><text:span text:style-name="T10"><text:s text:c="12"/>close(fd);</text:span></text:p>
      <text:p text:style-name="P46">107 <text:s/>| <text:s text:c="3"/></text:p>
      <text:p text:style-name="P45"><text:span text:style-name="T9">108 <text:s/>| <text:s text:c="3"/></text:span><text:span text:style-name="T10"><text:s text:c="12"/></text:span><text:span text:style-name="T11">if</text:span><text:span text:style-name="T10"> (!found) </text:span><text:span text:style-name="T11">return</text:span><text:span text:style-name="T10"> 1;</text:span></text:p>
      <text:p text:style-name="P45"><text:span text:style-name="T9">109 <text:s/>| <text:s text:c="3"/></text:span><text:span text:style-name="T10"><text:s text:c="8"/>}</text:span></text:p>
      <text:p text:style-name="P45"><text:span text:style-name="T9">110 <text:s/>| <text:s text:c="3"/></text:span><text:span text:style-name="T10"><text:s text:c="4"/>}</text:span></text:p>
      <text:p text:style-name="P45"><text:span text:style-name="T9">111 <text:s/>| <text:s text:c="3"/></text:span><text:span text:style-name="T10"><text:s text:c="4"/></text:span><text:span text:style-name="T11">return</text:span><text:span text:style-name="T10"> 0;</text:span></text:p>
      <text:p text:style-name="P47"><text:span text:style-name="T9">112 <text:s/>| <text:s text:c="3"/></text:span>}</text:p>
      <text:p text:style-name="P44"/>
      <text:p text:style-name="P44"/>
      <text:p text:style-name="P48">Исходный код программы plugin_api.h:</text:p>
      <text:p text:style-name="P49"><text:span text:style-name="T15"><text:s/>1 <text:s/>| <text:s text:c="3"/></text:span><text:span text:style-name="T16">#ifndef _PLUGIN_API_H</text:span></text:p>
      <text:p text:style-name="P50"><text:span text:style-name="T9"><text:s/>2 <text:s/>| <text:s text:c="3"/></text:span>#define _PLUGIN_API_H</text:p>
      <text:p text:style-name="P46"><text:s/>3 <text:s/>| <text:s text:c="3"/></text:p>
      <text:p text:style-name="P45"><text:span text:style-name="T9"><text:s/>4 <text:s/>| <text:s text:c="3"/></text:span><text:span text:style-name="T11">#include</text:span><text:span text:style-name="T10"> </text:span><text:span text:style-name="T9">&lt;getopt.h&gt;</text:span></text:p>
      <text:p text:style-name="P45"><text:span text:style-name="T9"><text:s/>5 <text:s/>| <text:s text:c="3"/></text:span><text:span text:style-name="T11">#include</text:span><text:span text:style-name="T10"> </text:span><text:span text:style-name="T9">&lt;stddef.h&gt;</text:span></text:p>
      <text:p text:style-name="P46"><text:s/>6 <text:s/>| <text:s text:c="3"/></text:p>
      <text:p text:style-name="P50"><text:span text:style-name="T9"><text:s/>7 <text:s/>| <text:s text:c="3"/></text:span>#define PLUGIN_API_VERSION <text:s/>1</text:p>
      <text:p text:style-name="P46"><text:s/>8 <text:s/>| <text:s text:c="3"/></text:p>
      <text:p text:style-name="P46"><text:s/>9 <text:s/>| <text:s text:c="3"/>/*</text:p>
      <text:p text:style-name="P46">10 <text:s/>| <text:s text:c="7"/>Структура, описывающая опцию, поддерживаемую плагином.</text:p>
      <text:p text:style-name="P46">11 <text:s/>| <text:s text:c="3"/>*/<text:span text:style-name="T17"/></text:p>
      <text:p text:style-name="P45"><text:span text:style-name="T9">12 <text:s/>| <text:s text:c="3"/></text:span><text:span text:style-name="T11">struct</text:span><text:span text:style-name="T10"> </text:span><text:span text:style-name="T14">plugin_option</text:span><text:span text:style-name="T10"> {</text:span></text:p>
      <text:p text:style-name="P45"><text:span text:style-name="T9">13 <text:s/>| <text:s text:c="3"/></text:span><text:span text:style-name="T10"><text:s text:c="4"/></text:span><text:span text:style-name="T9">/* Опция в формате, поддерживаемом getopt_long (man 3 getopt_long). */</text:span></text:p>
      <text:p text:style-name="P45"><text:span text:style-name="T9">14 <text:s/>| <text:s text:c="3"/></text:span><text:span text:style-name="T10"><text:s text:c="4"/></text:span><text:span text:style-name="T11">struct</text:span><text:span text:style-name="T10"> </text:span><text:span text:style-name="T14">option</text:span><text:span text:style-name="T10"> opt;</text:span></text:p>
      <text:p text:style-name="P45"><text:span text:style-name="T9">15 <text:s/>| <text:s text:c="3"/></text:span><text:span text:style-name="T10"><text:s text:c="4"/></text:span><text:span text:style-name="T9">/* Описание опции, которое предоставляет плагин. */</text:span></text:p>
      <text:p text:style-name="P45"><text:span text:style-name="T9">16 <text:s/>| <text:s text:c="3"/></text:span><text:span text:style-name="T10"><text:s text:c="4"/></text:span><text:span text:style-name="T11">const</text:span><text:span text:style-name="T10"> </text:span><text:span text:style-name="T14">char</text:span><text:span text:style-name="T10"> *opt_descr;</text:span></text:p>
      <text:p text:style-name="P47"><text:span text:style-name="T9">17 <text:s/>| <text:s text:c="3"/></text:span>};</text:p>
      <text:p text:style-name="P46">18 <text:s/>| <text:s text:c="3"/></text:p>
      <text:p text:style-name="P46">19 <text:s/>| <text:s text:c="3"/>/*</text:p>
      <text:p text:style-name="P46">20 <text:s/>| <text:s text:c="7"/>Структура, содержащая информацию о плагине.</text:p>
      <text:p text:style-name="P46">21 <text:s/>| <text:s text:c="3"/>*/<text:span text:style-name="T17"/></text:p>
      <text:p text:style-name="P45"><text:span text:style-name="T9">22 <text:s/>| <text:s text:c="3"/></text:span><text:span text:style-name="T11">struct</text:span><text:span text:style-name="T10"> </text:span><text:span text:style-name="T14">plugin_info</text:span><text:span text:style-name="T10"> {</text:span></text:p>
      <text:p text:style-name="P45"><text:span text:style-name="T9">23 <text:s/>| <text:s text:c="3"/></text:span><text:span text:style-name="T10"><text:s text:c="4"/></text:span><text:span text:style-name="T9">/* Назначение плагина */</text:span></text:p>
      <text:p text:style-name="P45"><text:span text:style-name="T9">24 <text:s/>| <text:s text:c="3"/></text:span><text:span text:style-name="T10"><text:s text:c="4"/></text:span><text:span text:style-name="T11">const</text:span><text:span text:style-name="T10"> </text:span><text:span text:style-name="T14">char</text:span><text:span text:style-name="T10"> *plugin_purpose;</text:span></text:p>
      <text:p text:style-name="P45"><text:span text:style-name="T9">25 <text:s/>| <text:s text:c="3"/></text:span><text:span text:style-name="T10"><text:s text:c="4"/></text:span><text:span text:style-name="T9">/* Автор плагина, например "Иванов Иван Иванович, N32xx" */</text:span></text:p>
      <text:p text:style-name="P45"><text:span text:style-name="T9">26 <text:s/>| <text:s text:c="3"/></text:span><text:span text:style-name="T10"><text:s text:c="4"/></text:span><text:span text:style-name="T11">const</text:span><text:span text:style-name="T10"> </text:span><text:span text:style-name="T14">char</text:span><text:span text:style-name="T10"> *plugin_author;</text:span></text:p>
      <text:p text:style-name="P45"><text:span text:style-name="T9">27 <text:s/>| <text:s text:c="3"/></text:span><text:span text:style-name="T10"><text:s text:c="4"/></text:span><text:span text:style-name="T9">/* Длина списка опций */</text:span></text:p>
      <text:p text:style-name="P45"><text:span text:style-name="T9">28 <text:s/>| <text:s text:c="3"/></text:span><text:span text:style-name="T10"><text:s text:c="4"/></text:span><text:span text:style-name="T14">size_t</text:span><text:span text:style-name="T10"> sup_opts_len;</text:span></text:p>
      <text:p text:style-name="P45"><text:span text:style-name="T9">29 <text:s/>| <text:s text:c="3"/></text:span><text:span text:style-name="T10"><text:s text:c="4"/></text:span><text:span text:style-name="T9">/* Список опций, поддерживаемых плагином */</text:span></text:p>
      <text:p text:style-name="P45"><text:span text:style-name="T9">30 <text:s/>| <text:s text:c="3"/></text:span><text:span text:style-name="T10"><text:s text:c="4"/></text:span><text:span text:style-name="T11">struct</text:span><text:span text:style-name="T10"> </text:span><text:span text:style-name="T14">plugin_option</text:span><text:span text:style-name="T10"> *sup_opts;</text:span></text:p>
      <text:p text:style-name="P47"><text:span text:style-name="T9">31 <text:s/>| <text:s text:c="3"/></text:span>};</text:p>
      <text:p text:style-name="P46">32 <text:s/>| <text:s text:c="3"/></text:p>
      <text:p text:style-name="P46">33 <text:s/>| <text:s text:c="3"/></text:p>
      <text:p text:style-name="P45"><text:span text:style-name="T9">34 <text:s/>| <text:s text:c="3"/></text:span><text:span text:style-name="T14">int</text:span><text:span text:style-name="T10"> plugin_get_info(</text:span><text:span text:style-name="T11">struct</text:span><text:span text:style-name="T10"> </text:span><text:span text:style-name="T14">plugin_info</text:span><text:span text:style-name="T10">* ppi);</text:span></text:p>
      <text:p text:style-name="P46">35 <text:s/>| <text:s text:c="3"/>/*</text:p>
      <text:p text:style-name="P46">36 <text:s/>| <text:s text:c="7"/>plugin_get_info()</text:p>
      <text:p text:style-name="P46">37 <text:s/>| <text:s text:c="3"/></text:p>
      <text:p text:style-name="P46">38 <text:s/>| <text:s text:c="7"/>Функция, позволяющая получить информацию о плагине.</text:p>
      <text:p text:style-name="P46">39 <text:s/>| <text:s text:c="3"/></text:p>
      <text:p text:style-name="P46">40 <text:s/>| <text:s text:c="7"/>Аргументы:</text:p>
      <text:p text:style-name="P46">41 <text:s/>| <text:s text:c="11"/>ppi - адрес структуры, которую заполняет информацией плагин.</text:p>
      <text:p text:style-name="P46">42 <text:s/>| <text:s text:c="3"/></text:p>
      <text:p text:style-name="P46">43 <text:s/>| <text:s text:c="7"/>Возвращаемое значение:</text:p>
      <text:p text:style-name="P46">44 <text:s/>| <text:s text:c="13"/>0 - в случае успеха,</text:p>
      <text:p text:style-name="P46">45 <text:s/>| <text:s text:c="11"/>&lt; 0 - в случае неудачи (в этом случае продолжать работу с этим плагином нельзя).</text:p>
      <text:p text:style-name="P46">46 <text:s/>| <text:s text:c="3"/>*/<text:span text:style-name="T17"/></text:p>
      <text:p text:style-name="P46">47 <text:s/>| <text:s text:c="3"/></text:p>
      <text:p text:style-name="P46">48 <text:s/>| <text:s text:c="3"/></text:p>
      <text:p text:style-name="P46">49 <text:s/>| <text:s text:c="3"/></text:p>
      <text:p text:style-name="P45"><text:span text:style-name="T9">50 <text:s/>| <text:s text:c="3"/></text:span><text:span text:style-name="T14">int</text:span><text:span text:style-name="T10"> plugin_process_file(</text:span><text:span text:style-name="T11">const</text:span><text:span text:style-name="T10"> </text:span><text:span text:style-name="T14">char</text:span><text:span text:style-name="T10"> *fname,</text:span></text:p>
      <text:p text:style-name="P45"><text:span text:style-name="T9">51 <text:s/>| <text:s text:c="3"/></text:span><text:span text:style-name="T10"><text:s text:c="8"/></text:span><text:span text:style-name="T11">struct</text:span><text:span text:style-name="T10"> </text:span><text:span text:style-name="T14">option</text:span><text:span text:style-name="T10"> in_opts[],</text:span></text:p>
      <text:p text:style-name="P45"><text:span text:style-name="T9">52 <text:s/>| <text:s text:c="3"/></text:span><text:span text:style-name="T10"><text:s text:c="8"/></text:span><text:span text:style-name="T14">size_t</text:span><text:span text:style-name="T10"> in_opts_len);</text:span></text:p>
      <text:p text:style-name="P46">53 <text:s/>| <text:s text:c="3"/>/*</text:p>
      <text:p text:style-name="P46">54 <text:s/>| <text:s text:c="7"/>plugin_process_file()</text:p>
      <text:p text:style-name="P46">55 <text:s/>| <text:s text:c="3"/></text:p>
      <text:p text:style-name="P46">56 <text:s/>| <text:s text:c="7"/>Фунция, позволяющая выяснить, отвечает ли файл заданным критериям.</text:p>
      <text:p text:style-name="P46">57 <text:s/>| <text:s text:c="3"/></text:p>
      <text:p text:style-name="P46">58 <text:s/>| <text:s text:c="7"/>Аргументы:</text:p>
      <text:p text:style-name="P46">59 <text:s/>| <text:s text:c="11"/>fname - путь к файлу (полный или относительный), который проверяется на</text:p>
      <text:p text:style-name="P46">60 <text:s/>| <text:s text:c="15"/>соответствие критериям, заданным с помощью массива in_opts.</text:p>
      <text:p text:style-name="P46">61 <text:s/>| <text:s text:c="3"/></text:p>
      <text:p text:style-name="P46">62 <text:s/>| <text:s text:c="11"/>in_opts - список опций (критериев поиска), которые передаются плагину.</text:p>
      <text:p text:style-name="P46">63 <text:s/>| <text:s text:c="15"/>struct option {</text:p>
      <text:p text:style-name="P46">64 <text:s/>| <text:s text:c="18"/>const char *name;</text:p>
      <text:p text:style-name="P46">65 <text:s/>| <text:s text:c="18"/>int <text:s text:c="8"/>has_arg;</text:p>
      <text:p text:style-name="P46">66 <text:s/>| <text:s text:c="18"/>int <text:s text:c="7"/>*flag;</text:p>
      <text:p text:style-name="P46">67 <text:s/>| <text:s text:c="18"/>int <text:s text:c="8"/>val;</text:p>
      <text:p text:style-name="P46">68 <text:s/>| <text:s text:c="15"/>};</text:p>
      <text:p text:style-name="P46">69 <text:s/>| <text:s text:c="15"/>Поле name используется для передачи имени опции, поле flag - для передачи</text:p>
      <text:p text:style-name="P46">70 <text:s/>| <text:s text:c="15"/>значения опции (в виде строки). Если у опции есть аргумент, поле has_arg</text:p>
      <text:p text:style-name="P46">71 <text:s/>| <text:s text:c="15"/>устанавливается в ненулевое значение. Поле val не используется.</text:p>
      <text:p text:style-name="P46"><text:soft-page-break/>72 <text:s/>| <text:s text:c="3"/></text:p>
      <text:p text:style-name="P46">73 <text:s/>| <text:s text:c="11"/>in_opts_len - длина списка опций.</text:p>
      <text:p text:style-name="P46">74 <text:s/>| <text:s text:c="3"/></text:p>
      <text:p text:style-name="P46">75 <text:s/>| <text:s text:c="7"/>Возвращаемое значение:</text:p>
      <text:p text:style-name="P46">76 <text:s/>| <text:s text:c="13"/>0 - файл отвечает заданным критериям,</text:p>
      <text:p text:style-name="P46">77 <text:s/>| <text:s text:c="11"/>&gt; 0 - файл НЕ отвечает заданным критериям,</text:p>
      <text:p text:style-name="P46">78 <text:s/>| <text:s text:c="11"/>&lt; 0 - в процессе работы возникла ошибка</text:p>
      <text:p text:style-name="P46">79 <text:s/>| <text:s text:c="3"/></text:p>
      <text:p text:style-name="P46">80 <text:s/>| <text:s text:c="7"/>В случае, если произошла ошибка, переменная errno должна устанавливаться</text:p>
      <text:p text:style-name="P46">81 <text:s/>| <text:s text:c="7"/>в соответствующее значение.</text:p>
      <text:p text:style-name="P46">82 <text:s/>| <text:s text:c="3"/>*/<text:span text:style-name="T17"/></text:p>
      <text:p text:style-name="P46">83 <text:s/>| <text:s text:c="3"/></text:p>
      <text:p text:style-name="P50"><text:span text:style-name="T9">84 <text:s/>| <text:s text:c="3"/></text:span>#endif</text:p>
      <text:p text:style-name="P46">85 <text:s/>| <text:s text:c="3"/></text:p>
      <text:p text:style-name="P44"/>
      <text:p text:style-name="P43"/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5-18T14:26:36.690992380</dc:date>
    <meta:editing-duration>PT7H44M59S</meta:editing-duration>
    <meta:editing-cycles>24</meta:editing-cycles>
    <meta:generator>LibreOffice/26.2.3.2$Linux_X86_64 LibreOffice_project/620$Build-2</meta:generator>
    <meta:document-statistic meta:table-count="4" meta:image-count="3" meta:object-count="0" meta:page-count="15" meta:paragraph-count="591" meta:word-count="3121" meta:character-count="23738" meta:non-whitespace-character-count="14938"/>
  </office:meta>
</office:document-meta>
</file>