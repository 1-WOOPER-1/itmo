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0FCDA082FB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master-page-name="">
      <style:paragraph-properties fo:margin-top="0cm" fo:margin-bottom="0cm" style:contextual-spacing="false" fo:line-height="150%" fo:text-align="center" style:justify-single-word="false" style:page-number="auto"/>
      <style:text-properties fo:font-weight="bold" officeooo:paragraph-rsid="000d823a" style:font-weight-asian="bold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0d823a"/>
    </style:style>
    <style:style style:name="P3" style:family="paragraph" style:parent-style-name="Text_20_body">
      <style:paragraph-properties fo:margin-top="0cm" fo:margin-bottom="0cm" style:contextual-spacing="false" fo:line-height="150%"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137308"/>
    </style:style>
    <style:style style:name="P6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paragraph-rsid="000ca6c1"/>
    </style:style>
    <style:style style:name="P7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officeooo:rsid="000ca6c1" officeooo:paragraph-rsid="000d823a"/>
    </style:style>
    <style:style style:name="P8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fo:font-size="10pt" officeooo:paragraph-rsid="000d823a" style:font-size-asian="10pt" style:font-size-complex="10pt"/>
    </style:style>
    <style:style style:name="P9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rsid="000ca6c1" officeooo:paragraph-rsid="000ca6c1"/>
    </style:style>
    <style:style style:name="P10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officeooo:rsid="000ca6c1" officeooo:paragraph-rsid="000ca6c1"/>
    </style:style>
    <style:style style:name="P11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fo:font-size="10pt" officeooo:paragraph-rsid="000ca6c1" style:font-size-asian="10pt" style:font-size-complex="10pt"/>
    </style:style>
    <style:style style:name="P12" style:family="paragraph" style:parent-style-name="Text_20_body" style:list-style-name="" style:master-page-name="">
      <style:paragraph-properties fo:margin-top="0cm" fo:margin-bottom="0cm" style:contextual-spacing="false" fo:line-height="150%" fo:text-align="center" style:justify-single-word="false" style:page-number="auto" fo:break-before="page"/>
      <style:text-properties fo:font-weight="bold" officeooo:rsid="000f2314" officeooo:paragraph-rsid="000f2314" style:font-weight-asian="bold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50%" fo:text-align="left" style:justify-single-word="false"/>
      <style:text-properties officeooo:paragraph-rsid="000d823a"/>
    </style:style>
    <style:style style:name="P14" style:family="paragraph" style:parent-style-name="Contents_20_1">
      <style:paragraph-properties fo:line-height="150%">
        <style:tab-stops>
          <style:tab-stop style:position="17.588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 fo:line-height="150%">
        <style:tab-stops>
          <style:tab-stop style:position="17.089cm" style:type="right" style:leader-style="dotted" style:leader-text="."/>
        </style:tab-stops>
      </style:paragraph-properties>
    </style:style>
    <style:style style:name="P16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fo:font-weight="bold" officeooo:rsid="000f2314" officeooo:paragraph-rsid="000f2314" style:font-weight-asian="bold" style:font-weight-complex="bold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50%" fo:text-align="left" style:justify-single-word="false" fo:text-indent="1.3cm" style:auto-text-indent="false" style:page-number="auto" fo:background-color="transparent"/>
      <style:text-properties officeooo:rsid="000f2314" officeooo:paragraph-rsid="000f2314"/>
    </style:style>
    <style:style style:name="P18" style:family="paragraph" style:parent-style-name="Text_20_body">
      <style:paragraph-properties fo:margin-top="0cm" fo:margin-bottom="0.25cm" style:contextual-spacing="false" fo:line-height="150%" fo:text-align="left" style:justify-single-word="false"/>
      <style:text-properties officeooo:paragraph-rsid="000f2314"/>
    </style:style>
    <style:style style:name="P19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/>
      <style:text-properties fo:font-weight="bold" officeooo:rsid="000f2314" officeooo:paragraph-rsid="000f2314" style:font-weight-asian="bold" style:font-weight-complex="bold"/>
    </style:style>
    <style:style style:name="P20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style:page-number="auto" fo:background-color="transparent"/>
      <style:text-properties officeooo:rsid="00111865" officeooo:paragraph-rsid="00111865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0cm" style:auto-text-indent="false" fo:background-color="transparent"/>
      <style:text-properties fo:color="#000000" loext:opacity="100%" style:font-name="Liberation Mono" fo:font-size="10pt" fo:language="zxx" fo:country="none" officeooo:rsid="00111865" officeooo:paragraph-rsid="00111865" fo:background-color="#eeeeee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ext_20_body" style:master-page-name="">
      <loext:graphic-properties draw:fill="none"/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 fo:margin-left="0cm" fo:margin-right="0cm" fo:margin-top="0cm" fo:margin-bottom="0.25cm" style:contextual-spacing="false" fo:line-height="150%" fo:text-align="justify" style:justify-single-word="false" fo:text-indent="1.3cm" style:auto-text-indent="false" style:page-number="auto" fo:background-color="transparent"/>
      <style:text-properties fo:color="#000000" loext:opacity="100%" fo:language="zxx" fo:country="none" fo:font-style="normal" style:text-underline-style="none" fo:font-weight="normal" officeooo:paragraph-rsid="003aa9bd" fo:background-color="transparent"/>
    </style:style>
    <style:style style:name="P23" style:family="paragraph" style:parent-style-name="Text_20_body">
      <loext:graphic-properties draw:fill="none"/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fo:color="#000000" loext:opacity="100%" fo:language="zxx" fo:country="none" fo:font-style="normal" style:text-underline-style="none" fo:font-weight="normal" officeooo:paragraph-rsid="003aa9bd" fo:background-color="transparent"/>
    </style:style>
    <style:style style:name="P24" style:family="paragraph" style:parent-style-name="Text_20_body" style:list-style-name="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reak-before="page" fo:background-color="transparent"/>
      <style:text-properties fo:font-weight="bold" officeooo:rsid="003aa9bd" officeooo:paragraph-rsid="003aa9bd" style:font-weight-asian="bold" style:font-weight-complex="bold"/>
    </style:style>
    <style:style style:name="P25" style:family="paragraph" style:parent-style-name="Text_20_body">
      <loext:graphic-properties draw:fill="none"/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fo:color="#000000" loext:opacity="100%" fo:language="zxx" fo:country="none" fo:font-style="normal" style:text-underline-style="none" fo:font-weight="normal" officeooo:rsid="005a188d" officeooo:paragraph-rsid="005a188d" fo:background-color="transparent"/>
    </style:style>
    <style:style style:name="P26" style:family="paragraph" style:parent-style-name="Code"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27" style:family="paragraph" style:parent-style-name="Code"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/>
      <style:text-properties fo:color="#000000" loext:opacity="100%" fo:language="zxx" fo:country="none" fo:font-style="normal" style:text-underline-style="none" fo:font-weight="normal" fo:background-color="transparent"/>
    </style:style>
    <style:style style:name="P28" style:family="paragraph" style:parent-style-name="Text_20_body">
      <loext:graphic-properties draw:fill="none"/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fo:color="#000000" loext:opacity="100%" fo:language="zxx" fo:country="none" fo:font-style="normal" style:text-underline-style="none" fo:font-weight="normal" officeooo:rsid="0048bf45" officeooo:paragraph-rsid="003aa9bd" fo:background-color="transparent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5a188d" officeooo:paragraph-rsid="005a188d"/>
    </style:style>
    <style:style style:name="P30" style:family="paragraph" style:parent-style-name="Code">
      <style:paragraph-properties ch2_options="{'Style': 'vs', 'Language': 'Python', 'UseCharStyles': 0, 'LineNumberRatio': 100, 'LineNumberStart': 1, 'MasterCharStyle': '', 'ShowLineNumbers': 0, 'ColourizeBackground': 0, 'LineNumberSeparator': '  |    ', 'LineNumberPaddingSymbol': '', 'StoreOptionsWithSnippet': 1}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1" style:family="paragraph" style:parent-style-name="Code">
      <style:paragraph-properties ch2_options="{'Style': 'vs', 'Language': 'Python', 'UseCharStyles': 0, 'LineNumberRatio': 100, 'LineNumberStart': 1, 'MasterCharStyle': '', 'ShowLineNumbers': 0, 'ColourizeBackground': 0, 'LineNumberSeparator': '  |    ', 'LineNumberPaddingSymbol': '', 'StoreOptionsWithSnippet': 1}"/>
      <style:text-properties fo:color="#000000" loext:opacity="100%" fo:language="zxx" fo:country="none" fo:font-style="normal" style:text-underline-style="none" fo:font-weight="normal" fo:background-color="transparent"/>
    </style:style>
    <style:style style:name="P32" style:family="paragraph" style:parent-style-name="Code">
      <style:paragraph-properties ch2_options="{'Style': 'vs', 'Language': 'Python', 'UseCharStyles': 0, 'LineNumberRatio': 100, 'LineNumberStart': 1, 'MasterCharStyle': '', 'ShowLineNumbers': 0, 'ColourizeBackground': 0, 'LineNumberSeparator': '  |    ', 'LineNumberPaddingSymbol': '', 'StoreOptionsWithSnippet': 1}"/>
      <style:text-properties fo:color="#008000" loext:opacity="100%" fo:language="zxx" fo:country="none" fo:font-style="normal" style:text-underline-style="none" fo:font-weight="normal" fo:background-color="transparent"/>
    </style:style>
    <style:style style:name="P33" style:family="paragraph" style:parent-style-name="Code">
      <style:paragraph-properties ch2_options="{'Style': 'vs', 'Language': 'Python', 'UseCharStyles': 0, 'LineNumberRatio': 100, 'LineNumberStart': 1, 'MasterCharStyle': '', 'ShowLineNumbers': 0, 'ColourizeBackground': 0, 'LineNumberSeparator': '  |    ', 'LineNumberPaddingSymbol': '', 'StoreOptionsWithSnippet': 1}"/>
      <style:text-properties fo:color="#a31515" loext:opacity="100%" fo:language="zxx" fo:country="none" fo:font-style="normal" style:text-underline-style="none" fo:font-weight="normal" fo:background-color="transparent"/>
    </style:style>
    <style:style style:name="P34" style:family="paragraph" style:parent-style-name="Text_20_body" style:list-style-name=""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/>
      <style:text-properties officeooo:rsid="003aa9bd" officeooo:paragraph-rsid="003aa9bd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5a66c6" officeooo:paragraph-rsid="005a66c6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fo:font-weight="bold" officeooo:rsid="006111bf" officeooo:paragraph-rsid="005a66c6" style:font-weight-asian="bold" style:font-weight-complex="bold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5b7f01" officeooo:paragraph-rsid="005b7f01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5bc4be" officeooo:paragraph-rsid="005bc4be"/>
    </style:style>
    <style:style style:name="P39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4d744b" officeooo:paragraph-rsid="004bc867"/>
    </style:style>
    <style:style style:name="P40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fo:font-weight="bold" officeooo:rsid="001b0b15" officeooo:paragraph-rsid="001b0b15" style:font-weight-asian="bold" style:font-weight-complex="bold"/>
    </style:style>
    <style:style style:name="P41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14bf3e" officeooo:paragraph-rsid="0014bf3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37308"/>
    </style:style>
    <style:style style:name="T3" style:family="text">
      <style:text-properties officeooo:rsid="000ca6c1"/>
    </style:style>
    <style:style style:name="T4" style:family="text">
      <style:text-properties officeooo:rsid="0056d867"/>
    </style:style>
    <style:style style:name="T5" style:family="text">
      <style:text-properties officeooo:rsid="001450d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officeooo:rsid="00236fbb" style:font-weight-asian="normal" style:font-weight-complex="normal"/>
    </style:style>
    <style:style style:name="T8" style:family="text">
      <style:text-properties fo:font-weight="normal" officeooo:rsid="0056d867" style:font-weight-asian="normal" style:font-weight-complex="normal"/>
    </style:style>
    <style:style style:name="T9" style:family="text">
      <style:text-properties officeooo:rsid="00580ea2"/>
    </style:style>
    <style:style style:name="T10" style:family="text">
      <style:text-properties officeooo:rsid="001dc2e6"/>
    </style:style>
    <style:style style:name="T11" style:family="text">
      <style:text-properties officeooo:rsid="001ed64b"/>
    </style:style>
    <style:style style:name="T12" style:family="text">
      <style:text-properties fo:color="#0000ff" loext:opacity="100%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fo:font-style="normal" style:text-underline-style="none" fo:font-weight="normal"/>
    </style:style>
    <style:style style:name="T15" style:family="text">
      <style:text-properties officeooo:rsid="005a66c6"/>
    </style:style>
    <style:style style:name="T16" style:family="text">
      <style:text-properties fo:color="#a31515" loext:opacity="100%"/>
    </style:style>
    <style:style style:name="T17" style:family="text">
      <style:text-properties fo:font-weight="bold" officeooo:rsid="006111bf" style:font-weight-asian="bold" style:font-weight-complex="bold"/>
    </style:style>
    <style:style style:name="T18" style:family="text">
      <style:text-properties officeooo:rsid="006111bf"/>
    </style:style>
    <style:style style:name="T19" style:family="text">
      <style:text-properties officeooo:rsid="005f6f86"/>
    </style:style>
    <style:style style:name="T20" style:family="text">
      <style:text-properties officeooo:rsid="005d33d9"/>
    </style:style>
    <style:style style:name="T21" style:family="text">
      <style:text-properties officeooo:rsid="0062e43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2"><text:span text:style-name="T1">ФЕДЕРАЛЬНОЕ </text:span>ГОСУДАРСТВЕННОЕ АВТОНОМНОЕ ОБРАЗОВАТЕЛЬНОЕ</text:p>
      <text:p text:style-name="P3">УЧРЕЖДЕНИЕ ВЫСШЕГО ОБРАЗОВАНИЯ</text:p>
      <text:p text:style-name="P4">НАЦИОНАЛЬНЫЙ ИССЛЕДОВАТЕЛЬСКИЙ УНИВЕРСИТЕТ ИТМО</text:p>
      <text:p text:style-name="P4"/>
      <text:p text:style-name="P4"/>
      <text:p text:style-name="P3">Факультет безопасности информационных технологий</text:p>
      <text:p text:style-name="P3"/>
      <text:p text:style-name="P3">Дисциплина:</text:p>
      <text:p text:style-name="P3">«<text:span text:style-name="T2">Информационная безопасность баз данных</text:span>»</text:p>
      <text:p text:style-name="P3"/>
      <text:p text:style-name="P3"/>
      <text:p text:style-name="P3">ОТЧЕТ ПО ЛАБОРАТОРНОЙ РАБОТЕ <text:span text:style-name="T3">№</text:span><text:span text:style-name="T4">6</text:span></text:p>
      <text:p text:style-name="P5">«<text:span text:style-name="T4">SQL-инъекции</text:span>»</text:p>
      <text:p text:style-name="P3"/>
      <text:p text:style-name="P6">Выполнил:</text:p>
      <text:p text:style-name="P6">Пахомов Владимир Юрьевич, студент группы N3250</text:p>
      <text:p text:style-name="P7"><draw:frame draw:style-name="fr1" draw:name="Изображение1" text:anchor-type="char" svg:x="14.242cm" svg:y="0.746cm" svg:width="3.489cm" svg:height="1.707cm" draw:z-index="0"><draw:image xlink:href="Pictures/1000000100000203000000FCDA082FB6.png" xlink:type="simple" xlink:show="embed" xlink:actuate="onLoad" draw:mime-type="image/png"/></draw:frame></text:p>
      <text:p text:style-name="P7">________________</text:p>
      <text:p text:style-name="P8">(подпись) <text:s text:c="8"/></text:p>
      <text:p text:style-name="P6"/>
      <text:p text:style-name="P6">Проверил:</text:p>
      <text:p text:style-name="P9">Ярцева Наталия Андреевна, преподаватель ФБИТ</text:p>
      <text:p text:style-name="P9"/>
      <text:p text:style-name="P10">_____________________</text:p>
      <text:p text:style-name="P8">(отметка о выполнении) <text:s text:c="2"/></text:p>
      <text:p text:style-name="P10"/>
      <text:p text:style-name="P10"/>
      <text:p text:style-name="P10">________________</text:p>
      <text:p text:style-name="P11">(подпись) <text:s text:c="8"/></text:p>
      <text:p text:style-name="P2"/>
      <text:p text:style-name="P2">Санкт-Петербург</text:p>
      <text:p text:style-name="P2">202<text:span text:style-name="T5">6</text:span>г.</text:p>
      <text:h text:style-name="P12" text:outline-level="1"><text:bookmark-start text:name="__RefHeading___Toc80_2058273410"/>СОДЕРЖАНИЕ<text:bookmark-end text:name="__RefHeading___Toc80_2058273410"/></text:h>
      <text:p text:style-name="P13"/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_RefHeading___Toc80_2058273410" office:name="СОДЕРЖАНИЕ" text:style-name="Index_20_Link" text:visited-style-name="Index_20_Link">СОДЕРЖАНИЕ<text:tab/>2</text:a></text:p>
          <text:p text:style-name="P14"><text:a xlink:type="simple" xlink:href="#__RefHeading___Toc82_2058273410" office:name="ВВЕДЕНИЕ" text:style-name="Index_20_Link" text:visited-style-name="Index_20_Link">ВВЕДЕНИЕ<text:tab/>3</text:a></text:p>
          <text:p text:style-name="P14"><text:a xlink:type="simple" xlink:href="#__RefHeading___Toc143_2058273410" office:name="ХОД РАБОТЫ" text:style-name="Index_20_Link" text:visited-style-name="Index_20_Link">ХОД РАБОТЫ<text:tab/>3</text:a></text:p>
          <text:p text:style-name="P15"><text:a xlink:type="simple" xlink:href="#__RefHeading___Toc1996_3870135317" office:name="Задание 1" text:style-name="Index_20_Link" text:visited-style-name="Index_20_Link">Задание 1<text:tab/>4</text:a></text:p>
          <text:p text:style-name="P15"><text:a xlink:type="simple" xlink:href="#__RefHeading___Toc1998_3870135317" office:name="Задание 2" text:style-name="Index_20_Link" text:visited-style-name="Index_20_Link">Задание 2<text:tab/>5</text:a></text:p>
          <text:p text:style-name="P15"><text:a xlink:type="simple" xlink:href="#__RefHeading___Toc236_2211928240" office:name="Задание 3" text:style-name="Index_20_Link" text:visited-style-name="Index_20_Link">Задание 3<text:tab/>6</text:a></text:p>
          <text:p text:style-name="P15"><text:a xlink:type="simple" xlink:href="#__RefHeading___Toc238_2211928240" office:name="Задание 4" text:style-name="Index_20_Link" text:visited-style-name="Index_20_Link">Задание 4<text:tab/>7</text:a></text:p>
          <text:p text:style-name="P14"><text:a xlink:type="simple" xlink:href="#__RefHeading___Toc143_2058273410%20Copy%201" office:name="ЗАКЛЮЧЕНИЕ" text:style-name="Index_20_Link" text:visited-style-name="Index_20_Link">ЗАКЛЮЧЕНИЕ<text:tab/>9</text:a></text:p>
        </text:index-body>
      </text:table-of-content>
      <text:p text:style-name="P13"/>
      <text:h text:style-name="P16" text:outline-level="1"><text:bookmark-start text:name="__RefHeading___Toc82_2058273410"/>ВВЕДЕНИЕ<text:bookmark-end text:name="__RefHeading___Toc82_2058273410"/></text:h>
      <text:p text:style-name="P17"><text:span text:style-name="T6">Цель работы</text:span> —<text:span text:style-name="T7"> исследовать SQL-</text:span><text:span text:style-name="T8">инъекции</text:span><text:span text:style-name="T7"> и способы их предотвращения при</text:span><text:span text:style-name="T8"> </text:span><text:span text:style-name="T7">доступе приложений к базе данных.</text:span></text:p>
      <text:p text:style-name="P18"/>
      <text:p text:style-name="P18"/>
      <text:h text:style-name="P19" text:outline-level="1"><text:bookmark-start text:name="__RefHeading___Toc143_2058273410"/>ХОД РАБОТЫ<text:bookmark-end text:name="__RefHeading___Toc143_2058273410"/></text:h>
      <text:p text:style-name="P20">В данной лабораторной работе для взаимодействия с базой данных PostgreSQL будем использовать утилиту psql на ОС Linux. Для создания и подключения к локальной базе данных создадим файл lab<text:span text:style-name="T9">6</text:span>.sql и впишем в него все команды для создания базы данных <text:span text:style-name="T10">и отправки команд</text:span><text:span text:style-name="T11"> из</text:span> методическо<text:span text:style-name="T11">го </text:span>материал<text:span text:style-name="T11">а</text:span>. Для подключения к базе данных используем команду:</text:p>
      <text:p text:style-name="P21">psql -U postgres -f lab<text:span text:style-name="T9">6</text:span>.sql</text:p>
      <text:p text:style-name="P22"/>
      <text:p text:style-name="P23"/>
      <text:p text:style-name="P23"/>
      <text:h text:style-name="P24" text:outline-level="2"><text:bookmark-start text:name="__RefHeading___Toc1996_3870135317"/>Задание 1<text:bookmark-end text:name="__RefHeading___Toc1996_3870135317"/></text:h>
      <text:p text:style-name="P25">Для начала создадим три таблицы:</text:p>
      <text:p text:style-name="P26"><text:span text:style-name="T12">CREATE</text:span><text:span text:style-name="T13"> </text:span><text:span text:style-name="T12">TABLE</text:span><text:span text:style-name="T13"> users (</text:span></text:p>
      <text:p text:style-name="P26"><text:span text:style-name="T13"><text:s text:c="4"/>id SERIAL </text:span><text:span text:style-name="T12">PRIMARY</text:span><text:span text:style-name="T13"> </text:span><text:span text:style-name="T12">KEY</text:span><text:span text:style-name="T13">,</text:span></text:p>
      <text:p text:style-name="P26"><text:span text:style-name="T13"><text:s text:c="4"/>username VARCHAR(50) </text:span><text:span text:style-name="T12">NOT</text:span><text:span text:style-name="T13"> </text:span><text:span text:style-name="T12">NULL</text:span><text:span text:style-name="T13">,</text:span></text:p>
      <text:p text:style-name="P26"><text:span text:style-name="T13"><text:s text:c="4"/>password VARCHAR(50) </text:span><text:span text:style-name="T12">NOT</text:span><text:span text:style-name="T13"> </text:span><text:span text:style-name="T12">NULL</text:span></text:p>
      <text:p text:style-name="P27">);<text:span text:style-name="T14"/></text:p>
      <text:p text:style-name="P27"/>
      <text:p text:style-name="P26"><text:span text:style-name="T12">CREATE</text:span><text:span text:style-name="T13"> </text:span><text:span text:style-name="T12">TABLE</text:span><text:span text:style-name="T13"> students_info (</text:span></text:p>
      <text:p text:style-name="P26"><text:span text:style-name="T13"><text:s text:c="4"/>id SERIAL </text:span><text:span text:style-name="T12">PRIMARY</text:span><text:span text:style-name="T13"> </text:span><text:span text:style-name="T12">KEY</text:span><text:span text:style-name="T13">,</text:span></text:p>
      <text:p text:style-name="P26"><text:span text:style-name="T13"><text:s text:c="4"/>user_id INT </text:span><text:span text:style-name="T12">REFERENCES</text:span><text:span text:style-name="T13"> users(id),</text:span></text:p>
      <text:p text:style-name="P26"><text:span text:style-name="T13"><text:s text:c="4"/>full_name VARCHAR(100),</text:span><text:span text:style-name="T14"/></text:p>
      <text:p text:style-name="P26"><text:span text:style-name="T13"><text:s text:c="4"/>city VARCHAR(50),</text:span><text:span text:style-name="T14"/></text:p>
      <text:p text:style-name="P26"><text:span text:style-name="T13"><text:s text:c="4"/>university VARCHAR(50),</text:span><text:span text:style-name="T14"/></text:p>
      <text:p text:style-name="P26"><text:span text:style-name="T13"><text:s text:c="4"/>degree VARCHAR(50)</text:span><text:span text:style-name="T14"/></text:p>
      <text:p text:style-name="P27">);<text:span text:style-name="T14"/></text:p>
      <text:p text:style-name="P27"/>
      <text:p text:style-name="P26"><text:span text:style-name="T12">CREATE</text:span><text:span text:style-name="T13"> </text:span><text:span text:style-name="T12">TABLE</text:span><text:span text:style-name="T13"> finances (</text:span></text:p>
      <text:p text:style-name="P26"><text:span text:style-name="T13"><text:s text:c="4"/>id SERIAL </text:span><text:span text:style-name="T12">PRIMARY</text:span><text:span text:style-name="T13"> </text:span><text:span text:style-name="T12">KEY</text:span><text:span text:style-name="T13">,</text:span></text:p>
      <text:p text:style-name="P26"><text:span text:style-name="T13"><text:s text:c="4"/>user_id INT </text:span><text:span text:style-name="T12">REFERENCES</text:span><text:span text:style-name="T13"> users(id),</text:span></text:p>
      <text:p text:style-name="P26"><text:span text:style-name="T13"><text:s text:c="4"/>salary_amount INT</text:span><text:span text:style-name="T14"/></text:p>
      <text:p text:style-name="P27">);</text:p>
      <text:p text:style-name="P28"/>
      <text:p text:style-name="P25">Теперь создадим саму базу данных командами:</text:p>
      <text:p text:style-name="Output">sudo -u postgres psql</text:p>
      <text:p text:style-name="Output">CREATE DATABASE dbsecurity</text:p>
      <text:p text:style-name="P28"/>
      <text:p text:style-name="P28"/>
      <text:p text:style-name="P28"/>
      <text:h text:style-name="P24" text:outline-level="2"><text:bookmark-start text:name="__RefHeading___Toc1998_3870135317"/>Задание 2<text:bookmark-end text:name="__RefHeading___Toc1998_3870135317"/></text:h>
      <text:p text:style-name="P29">Для взаимодействия с базой данных напишем программу на языке программирования Python, которая будет отправлять запросы на <text:span text:style-name="T15">выборку</text:span>, вставку и удаление данных<text:span text:style-name="T15">, а также отправлять два сложных запроса:</text:span></text:p>
      <text:p text:style-name="P30"><text:span text:style-name="T13">DB_CONFIG = {</text:span><text:span text:style-name="T14"/></text:p>
      <text:p text:style-name="P30"><text:span text:style-name="T13"><text:s text:c="4"/></text:span><text:span text:style-name="T16">"dbname"</text:span><text:span text:style-name="T13">: </text:span><text:span text:style-name="T16">"dbsecurity"</text:span><text:span text:style-name="T13">, </text:span></text:p>
      <text:p text:style-name="P30"><text:span text:style-name="T13"><text:s text:c="4"/></text:span><text:span text:style-name="T16">"user"</text:span><text:span text:style-name="T13">: </text:span><text:span text:style-name="T16">"postgres"</text:span><text:span text:style-name="T13">,</text:span></text:p>
      <text:p text:style-name="P30"><text:span text:style-name="T13"><text:s text:c="4"/></text:span><text:span text:style-name="T16">"password"</text:span><text:span text:style-name="T13">: </text:span><text:span text:style-name="T16">"12345"</text:span><text:span text:style-name="T13">,</text:span></text:p>
      <text:p text:style-name="P30"><text:span text:style-name="T13"><text:s text:c="4"/></text:span><text:span text:style-name="T16">"host"</text:span><text:span text:style-name="T13">: </text:span><text:span text:style-name="T16">"localhost"</text:span><text:span text:style-name="T13">,</text:span></text:p>
      <text:p text:style-name="P30"><text:span text:style-name="T13"><text:s text:c="4"/></text:span><text:span text:style-name="T16">"port"</text:span><text:span text:style-name="T13">: </text:span><text:span text:style-name="T16">"5432"</text:span></text:p>
      <text:p text:style-name="P31">}<text:span text:style-name="T14"/></text:p>
      <text:p text:style-name="P31"/>
      <text:p text:style-name="P31"/>
      <text:p text:style-name="P30"><text:span text:style-name="T13">conn = psycopg2.connect(**DB_CONFIG)</text:span></text:p>
      <text:p text:style-name="P30"><text:span text:style-name="T13">cursor = conn.cursor()</text:span></text:p>
      <text:p text:style-name="P31"/>
      <text:p text:style-name="P30"><text:span text:style-name="T12">with</text:span><text:span text:style-name="T13"> open(</text:span><text:span text:style-name="T16">"lab6.sql"</text:span><text:span text:style-name="T13">) </text:span><text:span text:style-name="T12">as</text:span><text:span text:style-name="T13"> f:</text:span></text:p>
      <text:p text:style-name="P30"><text:span text:style-name="T13"><text:s text:c="4"/>sql_script = f.read()</text:span></text:p>
      <text:p text:style-name="P31"/>
      <text:p text:style-name="P30"><text:span text:style-name="T13"><text:s text:c="4"/>cursor.execute(sql_script)</text:span></text:p>
      <text:p text:style-name="P30"><text:span text:style-name="T13"><text:s text:c="4"/>conn.commit()</text:span></text:p>
      <text:p text:style-name="P31"/>
      <text:p text:style-name="P31"/>
      <text:p text:style-name="P31"/>
      <text:p text:style-name="P32"># ---------------------------------<text:span text:style-name="T14"/></text:p>
      <text:p text:style-name="P32"># <text:s text:c="12"/>Задание 2<text:span text:style-name="T14"/></text:p>
      <text:p text:style-name="P32"># ---------------------------------<text:span text:style-name="T14"/></text:p>
      <text:p text:style-name="P32"># ВЫБОРКА<text:span text:style-name="T14"/></text:p>
      <text:p text:style-name="P30"><text:span text:style-name="T13">cursor.execute(</text:span><text:span text:style-name="T16">"""SELECT full_name, university</text:span></text:p>
      <text:p text:style-name="P30"><text:span text:style-name="T16">FROM students_info WHERE university = 'ITMO';"""</text:span><text:span text:style-name="T13">)</text:span></text:p>
      <text:p text:style-name="P31"/>
      <text:p text:style-name="P32"># ВСТАВКА<text:span text:style-name="T14"/></text:p>
      <text:p text:style-name="P30"><text:span text:style-name="T13">cursor.execute(</text:span><text:span text:style-name="T16">"""INSERT INTO users (username, password)</text:span></text:p>
      <text:p text:style-name="P30"><text:span text:style-name="T16">VALUES ('psql_coder', 'psql_passwd') RETURNING id;"""</text:span><text:span text:style-name="T13">)</text:span></text:p>
      <text:p text:style-name="P30"><text:span text:style-name="T13">user_id = cursor.fetchall()[0][0]</text:span></text:p>
      <text:p text:style-name="P30"><text:span text:style-name="T13">cursor.execute(</text:span><text:span text:style-name="T16">"""INSERT INTO students_info (user_id, full_name, university)</text:span></text:p>
      <text:p text:style-name="P30"><text:span text:style-name="T16">VALUES (%s, 'Vladimir Pakhomov', 'ITMO');"""</text:span><text:span text:style-name="T13">, (user_id,))</text:span></text:p>
      <text:p text:style-name="P31"/>
      <text:p text:style-name="P32"># УДАЛЕНИЕ<text:span text:style-name="T14"/></text:p>
      <text:p text:style-name="P30"><text:span text:style-name="T13">cursor.execute(</text:span><text:span text:style-name="T16">"""DELETE FROM students_info</text:span></text:p>
      <text:p text:style-name="P30"><text:span text:style-name="T16">WHERE full_name = 'Ivan Ivanov';"""</text:span><text:span text:style-name="T13">)</text:span></text:p>
      <text:p text:style-name="P31"/>
      <text:p text:style-name="P31"/>
      <text:p text:style-name="P32"># СЛОЖНЫЕ ЗАПРОСЫ<text:span text:style-name="T14"/></text:p>
      <text:p text:style-name="P30"><text:span text:style-name="T13">cursor.execute(</text:span><text:span text:style-name="T16">"""SELECT u.username, s.full_name, f.salary_amount</text:span></text:p>
      <text:p text:style-name="P33">FROM users u JOIN students_info s ON u.id = s.user_id</text:p>
      <text:p text:style-name="P33">JOIN finances f ON u.id = f.user_id;</text:p>
      <text:p text:style-name="P30"><text:span text:style-name="T16">"""</text:span><text:span text:style-name="T13">)</text:span></text:p>
      <text:p text:style-name="P30"><text:span text:style-name="T13">cursor.execute(</text:span><text:span text:style-name="T16">"""SELECT full_name, university</text:span></text:p>
      <text:p text:style-name="P33">FROM students_info WHERE user_id IN</text:p>
      <text:p text:style-name="P33">(SELECT id FROM finances WHERE salary_amount &gt;=</text:p>
      <text:p text:style-name="P33">(SELECT AVG(salary_amount) FROM finances));</text:p>
      <text:p text:style-name="P30"><text:span text:style-name="T16">"""</text:span><text:span text:style-name="T13">)</text:span></text:p>
      <text:p text:style-name="P31"/>
      <text:p text:style-name="P30"><text:span text:style-name="T13">conn.commit()</text:span></text:p>
      <text:h text:style-name="P34" text:outline-level="2"><text:bookmark-start text:name="__RefHeading___Toc236_2211928240"/><text:soft-page-break/><text:span text:style-name="T6">Задание 3</text:span><text:bookmark-end text:name="__RefHeading___Toc236_2211928240"/></text:h>
      <text:p text:style-name="P35">Напишем программу, которая будет запрашивать у пользователя логин и пароль, вставлять этот запрос в SQL команду и выдавать соответствующее сообщение. Реализуем небезопасный (обычная конкатенация строк) и безопасный (подготовленные параметры) способы реализации:</text:p>
      <text:p text:style-name="P32"># ---------------------------------<text:span text:style-name="T14"/></text:p>
      <text:p text:style-name="P32"># <text:s text:c="12"/>Задание 3<text:span text:style-name="T14"/></text:p>
      <text:p text:style-name="P32"># ---------------------------------</text:p>
      <text:p text:style-name="P30"><text:span text:style-name="T13">username = input(</text:span><text:span text:style-name="T16">"Логин: "</text:span><text:span text:style-name="T13">)</text:span></text:p>
      <text:p text:style-name="P30"><text:span text:style-name="T13">password = input(</text:span><text:span text:style-name="T16">"Пароль: "</text:span><text:span text:style-name="T13">)</text:span></text:p>
      <text:p text:style-name="P30"><text:span text:style-name="T13">print(</text:span><text:span text:style-name="T16">"\n"</text:span><text:span text:style-name="T13">)</text:span></text:p>
      <text:p text:style-name="P31"/>
      <text:p text:style-name="P32"># НЕБЕЗОПАСНЫЙ СПОСОБ<text:span text:style-name="T14"/></text:p>
      <text:p text:style-name="P30"><text:span text:style-name="T13">cursor.execute(</text:span><text:span text:style-name="T16">f"SELECT * FROM users WHERE username = '{</text:span><text:span text:style-name="T13">username</text:span><text:span text:style-name="T16">}' AND password = '{</text:span><text:span text:style-name="T13">password</text:span><text:span text:style-name="T16">}';"</text:span><text:span text:style-name="T13">)</text:span></text:p>
      <text:p text:style-name="P30"><text:span text:style-name="T13">data = cursor.fetchall()</text:span></text:p>
      <text:p text:style-name="P30"><text:span text:style-name="T13">headers = [desc[0] </text:span><text:span text:style-name="T12">for</text:span><text:span text:style-name="T13"> desc </text:span><text:span text:style-name="T12">in</text:span><text:span text:style-name="T13"> cursor.description]</text:span></text:p>
      <text:p text:style-name="P30"><text:span text:style-name="T13">table = tabulate(data, headers, tablefmt=</text:span><text:span text:style-name="T16">"grid"</text:span><text:span text:style-name="T13">)</text:span></text:p>
      <text:p text:style-name="P30"><text:span text:style-name="T13">print(</text:span><text:span text:style-name="T16">"Небезопасный способ:"</text:span><text:span text:style-name="T13">)</text:span></text:p>
      <text:p text:style-name="P30"><text:span text:style-name="T12">if</text:span><text:span text:style-name="T13"> data:</text:span></text:p>
      <text:p text:style-name="P30"><text:span text:style-name="T13"><text:s text:c="4"/>print(</text:span><text:span text:style-name="T16">f"Авторизация прошла успешно"</text:span><text:span text:style-name="T13">)</text:span></text:p>
      <text:p text:style-name="P30"><text:span text:style-name="T13"><text:s text:c="4"/>print(table)</text:span></text:p>
      <text:p text:style-name="P30"><text:span text:style-name="T12">else</text:span><text:span text:style-name="T13">:</text:span></text:p>
      <text:p text:style-name="P30"><text:span text:style-name="T13"><text:s text:c="4"/>print(</text:span><text:span text:style-name="T16">"Неверные логин или пароль"</text:span><text:span text:style-name="T13">)</text:span></text:p>
      <text:p text:style-name="P31"/>
      <text:p text:style-name="P32"># БЕЗОПАСНЫЙ СПОСОБ<text:span text:style-name="T14"/></text:p>
      <text:p text:style-name="P30"><text:span text:style-name="T13">cursor.execute(</text:span><text:span text:style-name="T16">"SELECT * FROM users WHERE username = %s AND password = %s;"</text:span><text:span text:style-name="T13">, (username, password))</text:span></text:p>
      <text:p text:style-name="P30"><text:span text:style-name="T13">data = cursor.fetchall()</text:span></text:p>
      <text:p text:style-name="P30"><text:span text:style-name="T13">print(</text:span><text:span text:style-name="T16">"\nБезопасный способ:"</text:span><text:span text:style-name="T13">)</text:span></text:p>
      <text:p text:style-name="P30"><text:span text:style-name="T12">if</text:span><text:span text:style-name="T13"> data:</text:span></text:p>
      <text:p text:style-name="P30"><text:span text:style-name="T13"><text:s text:c="4"/>print(</text:span><text:span text:style-name="T16">"Авторизация прошла успешно"</text:span><text:span text:style-name="T13">)</text:span></text:p>
      <text:p text:style-name="P30"><text:span text:style-name="T13"><text:s text:c="4"/>print(table)</text:span></text:p>
      <text:p text:style-name="P30"><text:span text:style-name="T12">else</text:span><text:span text:style-name="T13">:</text:span></text:p>
      <text:p text:style-name="P30"><text:span text:style-name="T13"><text:s text:c="4"/>print(</text:span><text:span text:style-name="T16">"Неверные логин или пароль"</text:span><text:span text:style-name="T13">)</text:span></text:p>
      <text:p text:style-name="P35"/>
      <text:p text:style-name="P35">Теперь если злоумышленник знает логин пользователя, то он может войти в систему бузе пароля, написав логин, например admin'--. В итоге получаем такой результат:</text:p>
      <text:p text:style-name="Output">Логин: admin'--</text:p>
      <text:p text:style-name="Output">Пароль: </text:p>
      <text:p text:style-name="Output"/>
      <text:p text:style-name="Output"/>
      <text:p text:style-name="Output">Небезопасный способ:</text:p>
      <text:p text:style-name="Output">Авторизация прошла успешно</text:p>
      <text:p text:style-name="Output">+------+------------+------------+</text:p>
      <text:p text:style-name="Output">| <text:s text:c="2"/>id | username <text:s text:c="2"/>| password <text:s text:c="2"/>|</text:p>
      <text:p text:style-name="Output">+======+============+============+</text:p>
      <text:p text:style-name="Output">| <text:s text:c="3"/>1 | admin <text:s text:c="5"/>| admin123 <text:s text:c="2"/>|</text:p>
      <text:p text:style-name="Output">+------+------------+------------+</text:p>
      <text:p text:style-name="Output"/>
      <text:p text:style-name="Output">Безопасный способ:</text:p>
      <text:p text:style-name="Output">Неверные логин или пароль</text:p>
      <text:p text:style-name="P35"><text:soft-page-break/></text:p>
      <text:h text:style-name="P34" text:outline-level="2"><text:bookmark-start text:name="__RefHeading___Toc238_2211928240"/><text:span text:style-name="T6">Задание 4</text:span><text:bookmark-end text:name="__RefHeading___Toc238_2211928240"/></text:h>
      <text:p text:style-name="P35"><text:span text:style-name="T17">4.1</text:span><text:span text:style-name="T18"> </text:span>Чтобы определить количество столбцов нужно ввести следующую строку при вводе логина:</text:p>
      <text:p text:style-name="Code">' UNION SELECT NULL, NULL ... </text:p>
      <text:p text:style-name="P35"/>
      <text:p text:style-name="P35">Эта команд<text:span text:style-name="T19">а</text:span> будет выдавать ошибку, пока злоумышленник не подберёт то количество NULL, которое будет соответствовать количеству столбцов в базе данных. Например для текущей базы данных вывод будет таким:</text:p>
      <text:p text:style-name="Output">Логин: ' UNION SELECT NULL, NULL, NULL--</text:p>
      <text:p text:style-name="Output">Пароль: </text:p>
      <text:p text:style-name="Output"/>
      <text:p text:style-name="Output"/>
      <text:p text:style-name="Output">Небезопасный способ:</text:p>
      <text:p text:style-name="Output">Авторизация прошла успешно</text:p>
      <text:p text:style-name="Output">+------+------------+------------+</text:p>
      <text:p text:style-name="Output">| id <text:s text:c="2"/>| username <text:s text:c="2"/>| password <text:s text:c="2"/>|</text:p>
      <text:p text:style-name="Output">+======+============+============+</text:p>
      <text:p text:style-name="Output">| <text:s text:c="5"/>| <text:s text:c="11"/>| <text:s text:c="11"/>|</text:p>
      <text:p text:style-name="Output">+------+------------+------------+</text:p>
      <text:p text:style-name="Output"/>
      <text:p text:style-name="Output">Безопасный способ:</text:p>
      <text:p text:style-name="Output">Неверные логин или пароль</text:p>
      <text:p text:style-name="P35"/>
      <text:p text:style-name="P35">Как видим было введено три NULL и следовательно с базе данных три таблицы.</text:p>
      <text:p text:style-name="P36"/>
      <text:p text:style-name="P35"><text:span text:style-name="T17">4.2</text:span><text:span text:style-name="T18"> </text:span>Для определения структуры базы данных достаточно написать следующую строку при вводе логина:</text:p>
      <text:p text:style-name="Code">' UNION SELECT '1', table_name, 'table' FROM information_schema.tables WHERE table_schema = 'public'--</text:p>
      <text:p text:style-name="P35"/>
      <text:p text:style-name="P35">Эта строка выведет названия всех таблиц базы данных:</text:p>
      <text:p text:style-name="Output">Логин: ' UNION SELECT '1', table_name, 'table' FROM information_schema.tables WHERE table_schema = 'public'--</text:p>
      <text:p text:style-name="Output">Пароль: </text:p>
      <text:p text:style-name="Output"/>
      <text:p text:style-name="Output"/>
      <text:p text:style-name="Output">Небезопасный способ:</text:p>
      <text:p text:style-name="Output">Авторизация прошла успешно</text:p>
      <text:p text:style-name="Output">+------+---------------+------------+</text:p>
      <text:p text:style-name="Output">| <text:s text:c="2"/>id | username <text:s text:c="5"/>| password <text:s text:c="2"/>|</text:p>
      <text:p text:style-name="Output">+======+===============+============+</text:p>
      <text:p text:style-name="Output">| <text:s text:c="3"/>1 | finances <text:s text:c="5"/>| table <text:s text:c="5"/>|</text:p>
      <text:p text:style-name="Output"><text:soft-page-break/>+------+---------------+------------+</text:p>
      <text:p text:style-name="Output">| <text:s text:c="3"/>1 | students_info | table <text:s text:c="5"/>|</text:p>
      <text:p text:style-name="Output">+------+---------------+------------+</text:p>
      <text:p text:style-name="Output">| <text:s text:c="3"/>1 | users <text:s text:c="8"/>| table <text:s text:c="5"/>|</text:p>
      <text:p text:style-name="Output">+------+---------------+------------+</text:p>
      <text:p text:style-name="Output"/>
      <text:p text:style-name="Output">Безопасный способ:</text:p>
      <text:p text:style-name="Output">Неверные логин или пароль</text:p>
      <text:p text:style-name="P35"/>
      <text:p text:style-name="P35"><text:span text:style-name="T17">4.3</text:span><text:span text:style-name="T18"> </text:span>Чтобы совершить кражу конфиденциальных данных из другой таблицы достаточно написать следующую строку:</text:p>
      <text:p text:style-name="Code">' UNION SELECT user_id, 'Salary: ', CAST(salary_amount AS TEXT) FROM finances--</text:p>
      <text:p text:style-name="P35"/>
      <text:p text:style-name="P37">В итоге мы украдём данные из таблицы с зарплатами:</text:p>
      <text:p text:style-name="Output">Логин: ' UNION SELECT user_id, 'Salary: ', CAST(salary_amount AS TEXT) FROM finances--</text:p>
      <text:p text:style-name="Output">Пароль: </text:p>
      <text:p text:style-name="Output"/>
      <text:p text:style-name="Output"/>
      <text:p text:style-name="Output">Небезопасный способ:</text:p>
      <text:p text:style-name="Output">Авторизация прошла успешно</text:p>
      <text:p text:style-name="Output">+------+------------+------------+</text:p>
      <text:p text:style-name="Output">| <text:s text:c="2"/>id | username <text:s text:c="2"/>| <text:s text:c="2"/>password |</text:p>
      <text:p text:style-name="Output">+======+============+============+</text:p>
      <text:p text:style-name="Output">| <text:s text:c="3"/>6 | Salary: <text:s text:c="3"/>| <text:s text:c="5"/>40000 |</text:p>
      <text:p text:style-name="Output">+------+------------+------------+</text:p>
      <text:p text:style-name="Output">| <text:s text:c="3"/>2 | Salary: <text:s text:c="3"/>| <text:s text:c="5"/>45000 |</text:p>
      <text:p text:style-name="Output">+------+------------+------------+</text:p>
      <text:p text:style-name="Output">| <text:s text:c="3"/>5 | Salary: <text:s text:c="3"/>| <text:s text:c="5"/>32000 |</text:p>
      <text:p text:style-name="Output">+------+------------+------------+</text:p>
      <text:p text:style-name="Output">| <text:s text:c="3"/>4 | Salary: <text:s text:c="3"/>| <text:s text:c="5"/>35000 |</text:p>
      <text:p text:style-name="Output">+------+------------+------------+</text:p>
      <text:p text:style-name="Output">| <text:s text:c="3"/>1 | Salary: <text:s text:c="3"/>| <text:s text:c="5"/>70000 |</text:p>
      <text:p text:style-name="Output">+------+------------+------------+</text:p>
      <text:p text:style-name="Output">| <text:s text:c="3"/>3 | Salary: <text:s text:c="3"/>| <text:s text:c="5"/>30000 |</text:p>
      <text:p text:style-name="Output">+------+------------+------------+</text:p>
      <text:p text:style-name="Output"/>
      <text:p text:style-name="Output">Безопасный способ:</text:p>
      <text:p text:style-name="Output">Неверные логин или пароль</text:p>
      <text:p text:style-name="P29"/>
      <text:p text:style-name="P38">В режиме параметризации база данных воспринимает наш введённый логин как просто длинную строку, в то время как в конкатенации происходит несанкционированное внедрение команд.</text:p>
      <text:p text:style-name="P39"/>
      <text:h text:style-name="P40" text:outline-level="1"><text:bookmark-start text:name="__RefHeading___Toc143_2058273410 Copy 1"/>ЗАКЛЮЧЕНИЕ<text:bookmark-end text:name="__RefHeading___Toc143_2058273410 Copy 1"/></text:h>
      <text:p text:style-name="P41">В ходе лабораторной работы были изучены и реализованы методы защиты от SQL-инъ<text:span text:style-name="T20">е</text:span>кций, включая демонстрацию уязвимостей при использовании строковой<text:span text:style-name="T20"> </text:span>конкатенации и защиту с помощью подготовленных запросов. Также был выполнен анализ<text:span text:style-name="T20"> </text:span>уязвимостей на примере языка <text:span text:style-name="T20">Python</text:span> с использованием библиотек<text:span text:style-name="T20"> psycopg2</text:span> для взаимодействия с<text:span text:style-name="T20"> </text:span>PostgreSQL<text:span text:style-name="T20"> и библиотеки tabulate для красивого вывода таблиц.</text:span></text:p>
      <text:p text:style-name="P41">Работа позволила получить практические навыки работы с <text:span text:style-name="T21">SQL</text:span>-инъекциями и<text:span text:style-name="T20"> </text:span>прод<text:span text:style-name="T20">е</text:span>монстрировать важность правильного взаимод<text:span text:style-name="T20">е</text:span>йствия с базой данных <text:s/>для<text:span text:style-name="T20"> </text:span>предотвра<text:span text:style-name="T20">щ</text:span>ения у<text:span text:style-name="T20">г</text:span>роз безопасности.</text:p>
      <text:p text:style-name="P41"/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none" draw:fill-color="#729fcf"/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fo:color="#000000" loext:opacity="100%" style:font-name="Liberation Mono" fo:font-family="'Liberation Mono'" style:font-family-generic="modern" style:font-pitch="fixed" fo:font-size="10pt" fo:language="zxx" fo:country="none" fo:font-style="normal" style:text-underline-style="none" fo:font-weight="normal" officeooo:rsid="005a188d" fo:background-color="transparent" style:font-size-asian="10pt" style:language-asian="zxx" style:country-asian="none" style:font-size-complex="10pt" style:language-complex="zxx" style:country-complex="none"/>
    </style:style>
    <style:style style:name="Output" style:family="paragraph" style:parent-style-name="Code">
      <style:text-properties fo:font-size="9pt" style:font-size-asian="9pt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6T15:54:10.970395995</meta:creation-date>
    <dc:date>2026-03-10T23:48:12.471893478</dc:date>
    <meta:editing-duration>P1DT2H29M14S</meta:editing-duration>
    <meta:editing-cycles>76</meta:editing-cycles>
    <meta:generator>LibreOffice/26.2.1.2$Linux_X86_64 LibreOffice_project/620$Build-2</meta:generator>
    <meta:document-statistic meta:table-count="0" meta:image-count="1" meta:object-count="0" meta:page-count="9" meta:paragraph-count="201" meta:word-count="1000" meta:character-count="7840" meta:non-whitespace-character-count="6763"/>
  </office:meta>
</office:document-meta>
</file>