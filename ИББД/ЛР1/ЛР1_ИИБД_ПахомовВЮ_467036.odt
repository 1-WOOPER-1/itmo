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FCDA082F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top="0cm" fo:margin-bottom="0cm" style:contextual-spacing="false" fo:line-height="150%" fo:text-align="center" style:justify-single-word="false" style:page-number="auto"/>
      <style:text-properties fo:font-weight="bold" officeooo:paragraph-rsid="000d823a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0d823a"/>
    </style:style>
    <style:style style:name="P3" style:family="paragraph" style:parent-style-name="Text_20_body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paragraph-rsid="000ca6c1"/>
    </style:style>
    <style:style style:name="P6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d823a"/>
    </style:style>
    <style:style style:name="P7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fo:font-size="10pt" officeooo:paragraph-rsid="000d823a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0ca6c1" officeooo:paragraph-rsid="000ca6c1"/>
    </style:style>
    <style:style style:name="P9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ca6c1"/>
    </style:style>
    <style:style style:name="P10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fo:font-size="10pt" officeooo:paragraph-rsid="000ca6c1" style:font-size-asian="10pt" style:font-size-complex="10pt"/>
    </style:style>
    <style:style style:name="P11" style:family="paragraph" style:parent-style-name="Text_20_body" style:list-style-name="" style:master-page-name="">
      <style:paragraph-properties fo:margin-top="0cm" fo:margin-bottom="0cm" style:contextual-spacing="false" fo:line-height="150%" fo:text-align="center" style:justify-single-word="false" style:page-number="auto" fo:break-before="page"/>
      <style:text-properties fo:font-weight="bold" officeooo:rsid="000f2314" officeooo:paragraph-rsid="000f2314" style:font-weight-asian="bold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50%" fo:text-align="left" style:justify-single-word="false"/>
      <style:text-properties officeooo:paragraph-rsid="000d823a"/>
    </style:style>
    <style:style style:name="P13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4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0f2314" officeooo:paragraph-rsid="000f2314" style:font-weight-asian="bold" style:font-weight-complex="bold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left" style:justify-single-word="false" fo:text-indent="1.3cm" style:auto-text-indent="false" style:page-number="auto" fo:background-color="transparent"/>
      <style:text-properties officeooo:rsid="000f2314" officeooo:paragraph-rsid="000f2314"/>
    </style:style>
    <style:style style:name="P16" style:family="paragraph" style:parent-style-name="Text_20_body">
      <style:paragraph-properties fo:margin-top="0cm" fo:margin-bottom="0.25cm" style:contextual-spacing="false" fo:line-height="150%" fo:text-align="left" style:justify-single-word="false"/>
      <style:text-properties officeooo:paragraph-rsid="000f2314"/>
    </style:style>
    <style:style style:name="P17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/>
      <style:text-properties fo:font-weight="bold" officeooo:rsid="000f2314" officeooo:paragraph-rsid="000f2314" style:font-weight-asian="bold" style:font-weight-complex="bold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111865" officeooo:paragraph-rsid="00111865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fo:background-color="transparent"/>
      <style:text-properties fo:color="#000000" loext:opacity="100%" style:font-name="Liberation Mono" fo:font-size="10pt" officeooo:rsid="00111865" officeooo:paragraph-rsid="00111865" fo:background-color="#eeeeee" style:font-size-asian="10pt" style:font-size-complex="10pt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fo:background-color="transparent"/>
      <style:text-properties officeooo:rsid="00111865" officeooo:paragraph-rsid="00111865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fo:background-color="transparent"/>
      <style:text-properties officeooo:rsid="001232e6" officeooo:paragraph-rsid="001232e6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font-name="Liberation Mono" fo:font-size="10pt" officeooo:rsid="001232e6" officeooo:paragraph-rsid="001232e6" style:font-size-asian="10pt" style:font-size-complex="10pt"/>
    </style:style>
    <style:style style:name="P23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font-name="Liberation Mono" fo:font-size="10pt" officeooo:rsid="001232e6" officeooo:paragraph-rsid="001232e6" style:font-size-asian="10pt" style:font-size-complex="10pt"/>
    </style:style>
    <style:style style:name="P24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paragraph-rsid="0016a27d" style:font-size-asian="10pt" style:font-size-complex="10pt"/>
    </style:style>
    <style:style style:name="P25" style:family="paragraph" style:parent-style-name="Text_20_body">
      <style:paragraph-properties fo:margin-top="0cm" fo:margin-bottom="0cm" style:contextual-spacing="false" fo:line-height="100%"/>
    </style:style>
    <style:style style:name="P26" style:family="paragraph" style:parent-style-name="Text_20_body">
      <style:paragraph-properties fo:margin-top="0cm" fo:margin-bottom="0.499cm" style:contextual-spacing="false" fo:line-height="100%"/>
    </style:style>
    <style:style style:name="P27" style:family="paragraph" style:parent-style-name="Text_20_body">
      <style:paragraph-properties fo:margin-top="0cm" fo:margin-bottom="0cm" style:contextual-spacing="false" fo:line-height="150%"/>
      <style:text-properties fo:font-weight="bold" officeooo:rsid="001c1368" officeooo:paragraph-rsid="001c1368" style:font-weight-asian="bold" style:font-weight-complex="bold"/>
    </style:style>
    <style:style style:name="P28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rsid="001c1368" officeooo:paragraph-rsid="001c136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d823a"/>
    </style:style>
    <style:style style:name="T3" style:family="text">
      <style:text-properties officeooo:rsid="000ca6c1"/>
    </style:style>
    <style:style style:name="T4" style:family="text">
      <style:text-properties officeooo:rsid="0016960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97c49"/>
    </style:style>
    <style:style style:name="T7" style:family="text">
      <style:text-properties officeooo:rsid="001b013f"/>
    </style:style>
    <style:style style:name="T8" style:family="text">
      <style:text-properties officeooo:rsid="001d948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<text:span text:style-name="T1">ФЕДЕРАЛЬНОЕ </text:span>ГОСУДАРСТВЕННОЕ АВТОНОМНОЕ ОБРАЗОВАТЕЛЬНОЕ</text:p>
      <text:p text:style-name="P3">УЧРЕЖДЕНИЕ ВЫСШЕГО ОБРАЗОВАНИЯ</text:p>
      <text:p text:style-name="P4">НАЦИОНАЛЬНЫЙ ИССЛЕДОВАТЕЛЬСКИЙ УНИВЕРСИТЕТ ИТМО</text:p>
      <text:p text:style-name="P4"/>
      <text:p text:style-name="P4"/>
      <text:p text:style-name="P3">Факультет безопасности информационных технологий</text:p>
      <text:p text:style-name="P3"/>
      <text:p text:style-name="P3">Дисциплина:</text:p>
      <text:p text:style-name="P3">«<text:span text:style-name="T2">Информационная безопасность баз данных</text:span>»</text:p>
      <text:p text:style-name="P3"/>
      <text:p text:style-name="P3"/>
      <text:p text:style-name="P3">ОТЧЕТ ПО ЛАБОРАТОРНОЙ РАБОТЕ <text:span text:style-name="T3">№</text:span>1</text:p>
      <text:p text:style-name="P3">«<text:span text:style-name="T3">Создание базовых структур БД</text:span>»</text:p>
      <text:p text:style-name="P3"/>
      <text:p text:style-name="P5">Выполнил:</text:p>
      <text:p text:style-name="P5">Пахомов Владимир Юрьевич, студент группы N3250</text:p>
      <text:p text:style-name="P6"><draw:frame draw:style-name="fr1" draw:name="Изображение1" text:anchor-type="char" svg:x="14.242cm" svg:y="0.746cm" svg:width="3.489cm" svg:height="1.707cm" draw:z-index="0"><draw:image xlink:href="Pictures/1000000100000203000000FCDA082FB6.png" xlink:type="simple" xlink:show="embed" xlink:actuate="onLoad" draw:mime-type="image/png"/></draw:frame></text:p>
      <text:p text:style-name="P6">________________</text:p>
      <text:p text:style-name="P7">(подпись) <text:s text:c="8"/></text:p>
      <text:p text:style-name="P5"/>
      <text:p text:style-name="P5">Проверил:</text:p>
      <text:p text:style-name="P8">Ярцева Наталия Андреевна, преподаватель ФБИТ</text:p>
      <text:p text:style-name="P8"/>
      <text:p text:style-name="P9">_____________________</text:p>
      <text:p text:style-name="P7">(отметка о выполнении) <text:s text:c="2"/></text:p>
      <text:p text:style-name="P9"/>
      <text:p text:style-name="P9"/>
      <text:p text:style-name="P9">________________</text:p>
      <text:p text:style-name="P10">(подпись) <text:s text:c="8"/></text:p>
      <text:p text:style-name="P2"/>
      <text:p text:style-name="P2">Санкт-Петербург</text:p>
      <text:p text:style-name="P2">202<text:span text:style-name="T4">6</text:span>.</text:p>
      <text:h text:style-name="P11" text:outline-level="1"><text:bookmark-start text:name="__RefHeading___Toc80_2058273410"/>СОДЕРЖАНИЕ<text:bookmark-end text:name="__RefHeading___Toc80_2058273410"/></text:h>
      <text:p text:style-name="P12"/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_Toc80_2058273410" office:name="СОДЕРЖАНИЕ" text:style-name="Index_20_Link" text:visited-style-name="Index_20_Link">СОДЕРЖАНИЕ<text:tab/>2</text:a></text:p>
          <text:p text:style-name="P13"><text:a xlink:type="simple" xlink:href="#__RefHeading___Toc82_2058273410" office:name="ВВЕДЕНИЕ" text:style-name="Index_20_Link" text:visited-style-name="Index_20_Link">ВВЕДЕНИЕ<text:tab/>3</text:a></text:p>
          <text:p text:style-name="P13"><text:a xlink:type="simple" xlink:href="#__RefHeading___Toc143_2058273410" office:name="ХОД РАБОТЫ" text:style-name="Index_20_Link" text:visited-style-name="Index_20_Link">ХОД РАБОТЫ<text:tab/>3</text:a></text:p>
        </text:index-body>
      </text:table-of-content>
      <text:p text:style-name="P12"/>
      <text:h text:style-name="P14" text:outline-level="1"><text:bookmark-start text:name="__RefHeading___Toc82_2058273410"/>ВВЕДЕНИЕ<text:bookmark-end text:name="__RefHeading___Toc82_2058273410"/></text:h>
      <text:p text:style-name="P15"><text:span text:style-name="T5">Цель работы</text:span> — получить навыки создания базовых структурных элементов базы данных.</text:p>
      <text:p text:style-name="P16"/>
      <text:p text:style-name="P16"/>
      <text:h text:style-name="P17" text:outline-level="1"><text:bookmark-start text:name="__RefHeading___Toc143_2058273410"/>ХОД РАБОТЫ<text:bookmark-end text:name="__RefHeading___Toc143_2058273410"/></text:h>
      <text:p text:style-name="P18">В данной лабораторной работе для взаимодействия с базой данных PostgreSQL будем использовать утилиту psql на ОС Linux. Для создания и подключения к локальной базе данных создадим файл lab.sql и впишем в него все команды для создания базы данных и базовых <text:s/>структур, представленных в методическом материале. Для подключения к базе данных используем комманду:</text:p>
      <text:p text:style-name="P19">psql -U postgres -f lab1.sql</text:p>
      <text:p text:style-name="P18">После выполнения этой команды база данных со всеми структурами будет создана.</text:p>
      <text:p text:style-name="P20"/>
      <text:p text:style-name="P21">Исходный код lab1.sql:</text:p>
      <text:p text:style-name="P22">DROP DATABASE IF EXISTS n3250_467036;</text:p>
      <text:p text:style-name="P22"/>
      <text:p text:style-name="P22"/>
      <text:p text:style-name="P22">/* 2 <text:span text:style-name="T6">Создание базы данных</text:span>*/</text:p>
      <text:p text:style-name="P22">CREATE DATABASE n3250_467036;</text:p>
      <text:p text:style-name="P22"/>
      <text:p text:style-name="P22"/>
      <text:p text:style-name="P22">/* 3 <text:span text:style-name="T6">Выбор базы</text:span>*/</text:p>
      <text:p text:style-name="P22">\c n3250_467036</text:p>
      <text:p text:style-name="P22"/>
      <text:p text:style-name="P22"/>
      <text:p text:style-name="P22">/* 4 <text:span text:style-name="T6">Создание схемы </text:span>*/</text:p>
      <text:p text:style-name="P22">CREATE SCHEMA n3250_467036_schema_lab1;</text:p>
      <text:p text:style-name="P22"/>
      <text:p text:style-name="P22"/>
      <text:p text:style-name="P22">/* 5 <text:span text:style-name="T6">Создание таблиц </text:span>*/</text:p>
      <text:p text:style-name="P22">CREATE TABLE n3250_467036_tbl1 (</text:p>
      <text:p text:style-name="P22"><text:s text:c="4"/>id SERIAL PRIMARY KEY,</text:p>
      <text:p text:style-name="P22"><text:s text:c="4"/>name VARCHAR(100)</text:p>
      <text:p text:style-name="P22">);</text:p>
      <text:p text:style-name="P22"/>
      <text:p text:style-name="P22">CREATE TABLE n3250_467036_schema_lab1.n3250_467036_tbl2 (</text:p>
      <text:p text:style-name="P22"><text:s text:c="4"/>id SERIAL PRIMARY KEY,</text:p>
      <text:p text:style-name="P22"><text:s text:c="4"/>description TEXT</text:p>
      <text:p text:style-name="P22">);</text:p>
      <text:p text:style-name="P22"/>
      <text:p text:style-name="P22"><text:soft-page-break/></text:p>
      <text:p text:style-name="P22">/* 6 */</text:p>
      <text:p text:style-name="P22">CREATE TABLE n3250_467036_schema_lab1.n3250_467036_table_i5 (</text:p>
      <text:p text:style-name="P22"><text:s text:c="4"/>num INTEGER,</text:p>
      <text:p text:style-name="P22"><text:s text:c="4"/>name <text:s/>VARCHAR(30),</text:p>
      <text:p text:style-name="P22"><text:s text:c="4"/>code CHAR(5),</text:p>
      <text:p text:style-name="P22"><text:s text:c="4"/>create_date TIMESTAMP,</text:p>
      <text:p text:style-name="P22"><text:s text:c="4"/>birth_date DATE,</text:p>
      <text:p text:style-name="P22"><text:s text:c="4"/>file_data BYTEA</text:p>
      <text:p text:style-name="P22">);</text:p>
      <text:p text:style-name="P22"/>
      <text:p text:style-name="P22"/>
      <text:p text:style-name="P22">/* 7 <text:span text:style-name="T6">Создание таблицы со значением по умолчанию</text:span>*/</text:p>
      <text:p text:style-name="P22">CREATE TABLE n3250_467036_schema_lab1.n3250_467036_table_i6 (</text:p>
      <text:p text:style-name="P22"><text:s text:c="4"/>id SERIAL PRIMARY KEY,</text:p>
      <text:p text:style-name="P22"><text:s text:c="4"/>quantity INTEGER DEFAULT 0,</text:p>
      <text:p text:style-name="P22"><text:s text:c="4"/>timeinterval INTERVAL</text:p>
      <text:p text:style-name="P22">);</text:p>
      <text:p text:style-name="P22"/>
      <text:p text:style-name="P22"/>
      <text:p text:style-name="P22">/* 8 <text:span text:style-name="T6">Создание составного типа</text:span>*/</text:p>
      <text:p text:style-name="P22">CREATE TYPE n3250_467036_schema_lab1.n3250_467036_type AS (</text:p>
      <text:p text:style-name="P22"><text:s text:c="4"/>width REAL,</text:p>
      <text:p text:style-name="P22"><text:s text:c="4"/>height REAL,</text:p>
      <text:p text:style-name="P22"><text:s text:c="4"/>produced_date DATE,</text:p>
      <text:p text:style-name="P22"><text:s text:c="4"/>data BYTEA</text:p>
      <text:p text:style-name="P22">);</text:p>
      <text:p text:style-name="P22"/>
      <text:p text:style-name="P22"/>
      <text:p text:style-name="P22">/* 9 <text:span text:style-name="T6">Создание перечисления</text:span>*/</text:p>
      <text:p text:style-name="P22">CREATE TYPE n3250_467036_schema_lab1.n3250_467036_enum AS ENUM (</text:p>
      <text:p text:style-name="P22"><text:s text:c="4"/>'большой',</text:p>
      <text:p text:style-name="P22"><text:s text:c="4"/>'средний',</text:p>
      <text:p text:style-name="P22"><text:s text:c="4"/>'маленький'</text:p>
      <text:p text:style-name="P22">);</text:p>
      <text:p text:style-name="P22"/>
      <text:p text:style-name="P22"/>
      <text:p text:style-name="P22">/* 10 <text:span text:style-name="T6">Создание домена</text:span>*/</text:p>
      <text:p text:style-name="P22">CREATE DOMAIN n3250_467036_schema_lab1.n3250_467036_domain AS VARCHAR(3)</text:p>
      <text:p text:style-name="P22">CHECK (VALUE ~ '^[0-9]{3}$');</text:p>
      <text:p text:style-name="P22"/>
      <text:p text:style-name="P22"/>
      <text:p text:style-name="P22">/* 11 <text:span text:style-name="T6">Создание последовательности</text:span>*/</text:p>
      <text:p text:style-name="P22">CREATE SEQUENCE n3250_467036_schema_lab1.n3250_467036_seq</text:p>
      <text:p text:style-name="P22">START 1000</text:p>
      <text:p text:style-name="P22">INCREMENT -1</text:p>
      <text:p text:style-name="P22">MINVALUE 1</text:p>
      <text:p text:style-name="P22">MAXVALUE 1000;</text:p>
      <text:p text:style-name="P22"/>
      <text:p text:style-name="P22"/>
      <text:p text:style-name="P22">/* 12 <text:span text:style-name="T6">Создание индекса</text:span>*/</text:p>
      <text:p text:style-name="P22">CREATE INDEX n3250_467036_idx1</text:p>
      <text:p text:style-name="P22">ON n3250_467036_schema_lab1.n3250_467036_table_i5 (num);</text:p>
      <text:p text:style-name="P22"/>
      <text:p text:style-name="P22"/>
      <text:p text:style-name="P22">/* 13 <text:span text:style-name="T6">Создание составного индекса</text:span>*/</text:p>
      <text:p text:style-name="P22">CREATE INDEX n3250_467036_idx2</text:p>
      <text:p text:style-name="P22">ON n3250_467036_schema_lab1.n3250_467036_table_i5 (num, birth_date);</text:p>
      <text:p text:style-name="P22"/>
      <text:p text:style-name="P22"><text:soft-page-break/></text:p>
      <text:p text:style-name="P22">/* 14 <text:span text:style-name="T6">Создание индекса по выражению</text:span>*/</text:p>
      <text:p text:style-name="P22">CREATE INDEX n3250_467036_idx3</text:p>
      <text:p text:style-name="P22">ON n3250_467036_schema_lab1.n3250_467036_table_i5 ((num % 10));</text:p>
      <text:p text:style-name="P22"/>
      <text:p text:style-name="P22"/>
      <text:p text:style-name="P22">/* 15 <text:span text:style-name="T6">Создание частичного индекса</text:span>*/</text:p>
      <text:p text:style-name="P22">CREATE INDEX n3250_467036_idx4</text:p>
      <text:p text:style-name="P22">ON n3250_467036_schema_lab1.n3250_467036_table_i5 (num)</text:p>
      <text:p text:style-name="P22">WHERE 100 &lt;= num AND num &lt;= 1000;</text:p>
      <text:p text:style-name="P22"/>
      <text:p text:style-name="P22"/>
      <text:p text:style-name="P22">/* 16 <text:span text:style-name="T6">Создание таблицы с ограничением NOT NULL</text:span>*/</text:p>
      <text:p text:style-name="P22">CREATE TABLE n3250_467036_schema_lab1.n3250_467036_notnull (</text:p>
      <text:p text:style-name="P22"><text:s text:c="4"/>num INTEGER,</text:p>
      <text:p text:style-name="P22"><text:s text:c="4"/>name <text:s/>VARCHAR(30),</text:p>
      <text:p text:style-name="P22"><text:s text:c="4"/>code CHAR(5) NOT NULL,</text:p>
      <text:p text:style-name="P22"><text:s text:c="4"/>create_date TIMESTAMP,</text:p>
      <text:p text:style-name="P22"><text:s text:c="4"/>birth_date DATE,</text:p>
      <text:p text:style-name="P22"><text:s text:c="4"/>file_data BYTEA</text:p>
      <text:p text:style-name="P22">);</text:p>
      <text:p text:style-name="P22"/>
      <text:p text:style-name="P22"/>
      <text:p text:style-name="P22">/* 17 <text:span text:style-name="T6">Создание таблицы с ограничением UNIQUE</text:span>*/</text:p>
      <text:p text:style-name="P22">CREATE TABLE n3250_467036_schema_lab1.n3250_467036_unique (</text:p>
      <text:p text:style-name="P22"><text:s text:c="4"/>num INTEGER,</text:p>
      <text:p text:style-name="P22"><text:s text:c="4"/>name <text:s/>VARCHAR(30),</text:p>
      <text:p text:style-name="P22"><text:s text:c="4"/>code CHAR(5),</text:p>
      <text:p text:style-name="P22"><text:s text:c="4"/>create_date TIMESTAMP,</text:p>
      <text:p text:style-name="P22"><text:s text:c="4"/>birth_date DATE,</text:p>
      <text:p text:style-name="P22"><text:s text:c="4"/>file_data BYTEA,</text:p>
      <text:p text:style-name="P22"><text:s text:c="4"/>UNIQUE (num, code)</text:p>
      <text:p text:style-name="P22">);</text:p>
      <text:p text:style-name="P22"/>
      <text:p text:style-name="P22"/>
      <text:p text:style-name="P22">/* 18 <text:span text:style-name="T6">Создание таблицы с ограничением первичного ключа </text:span>*/</text:p>
      <text:p text:style-name="P22">CREATE TABLE n3250_467036_schema_lab1.n3250_467036_pk (</text:p>
      <text:p text:style-name="P22"><text:s text:c="4"/>num INTEGER PRIMARY KEY,</text:p>
      <text:p text:style-name="P22"><text:s text:c="4"/>name <text:s/>VARCHAR(30),</text:p>
      <text:p text:style-name="P22"><text:s text:c="4"/>code CHAR(5),</text:p>
      <text:p text:style-name="P22"><text:s text:c="4"/>create_date TIMESTAMP,</text:p>
      <text:p text:style-name="P22"><text:s text:c="4"/>birth_date DATE,</text:p>
      <text:p text:style-name="P22"><text:s text:c="4"/>file_data BYTEA</text:p>
      <text:p text:style-name="P22">);</text:p>
      <text:p text:style-name="P22"/>
      <text:p text:style-name="P22"/>
      <text:p text:style-name="P22">/* 19 <text:span text:style-name="T6">Создание таблицы с проверкой поля VARCHAR на наличие символа «a» </text:span>*/</text:p>
      <text:p text:style-name="P22">CREATE TABLE n3250_467036_schema_lab1.n3250_467036_check (</text:p>
      <text:p text:style-name="P22"><text:s text:c="4"/>num INTEGER PRIMARY KEY,</text:p>
      <text:p text:style-name="P22"><text:s text:c="4"/>name <text:s/>VARCHAR(30) CHECK (name LIKE '%a%'),</text:p>
      <text:p text:style-name="P22"><text:s text:c="4"/>code CHAR(5),</text:p>
      <text:p text:style-name="P22"><text:s text:c="4"/>create_date TIMESTAMP,</text:p>
      <text:p text:style-name="P22"><text:s text:c="4"/>birth_date DATE,</text:p>
      <text:p text:style-name="P22"><text:s text:c="4"/>file_data BYTEA</text:p>
      <text:p text:style-name="P22">);</text:p>
      <text:p text:style-name="P22"/>
      <text:p text:style-name="P22"/>
      <text:p text:style-name="P22">/* 20 <text:span text:style-name="T7">Создание представления </text:span>*/</text:p>
      <text:p text:style-name="P22">CREATE VIEW n3250_467036_schema_lab1.n3250_467036_view AS</text:p>
      <text:p text:style-name="P22"><text:soft-page-break/>SELECT name, birth_date FROM n3250_467036_schema_lab1.n3250_467036_table_i5;</text:p>
      <text:p text:style-name="P22"/>
      <text:h text:style-name="P23" text:outline-level="1"/>
      <text:p text:style-name="P24">\c n3250_467036</text:p>
      <text:p text:style-name="P24">\dn</text:p>
      <text:p text:style-name="P24">\dt n3250_467036_schema_lab1.*</text:p>
      <text:p text:style-name="P24">\dT n3250_467036_schema_lab1.*</text:p>
      <text:p text:style-name="P24">\dD n3250_467036_schema_lab1.*</text:p>
      <text:p text:style-name="P24">\di n3250_467036_schema_lab1.*</text:p>
      <text:p text:style-name="P24">\dv n3250_467036_schema_lab1.*</text:p>
      <text:p text:style-name="P25"/>
      <text:p text:style-name="P26"/>
      <text:p text:style-name="P27">Вывод</text:p>
      <text:p text:style-name="P28"><text:tab/>При выполнении лабораторной работы были изучены базовые структурные элементы баз данных. На практике были созданы схема, таблица, индексы, представление, с заданными полями и ограничениями <text:span text:style-name="T8">при помощи утилиты psq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5:54:10.970395995</meta:creation-date>
    <dc:date>2026-02-25T08:46:43.197956223</dc:date>
    <meta:editing-duration>PT45M18S</meta:editing-duration>
    <meta:editing-cycles>14</meta:editing-cycles>
    <meta:generator>LibreOffice/26.2.0.3$Linux_X86_64 LibreOffice_project/620$Build-3</meta:generator>
    <meta:document-statistic meta:table-count="0" meta:image-count="1" meta:object-count="0" meta:page-count="6" meta:paragraph-count="147" meta:word-count="538" meta:character-count="4660" meta:non-whitespace-character-count="4060"/>
  </office:meta>
</office:document-meta>
</file>