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FCDA082F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top="0cm" fo:margin-bottom="0cm" style:contextual-spacing="false" fo:line-height="150%" fo:text-align="center" style:justify-single-word="false" style:page-number="auto"/>
      <style:text-properties fo:font-weight="bold" officeooo:paragraph-rsid="000d823a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0d823a"/>
    </style:style>
    <style:style style:name="P3" style:family="paragraph" style:parent-style-name="Text_20_body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137308"/>
    </style:style>
    <style:style style:name="P6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paragraph-rsid="000ca6c1"/>
    </style:style>
    <style:style style:name="P7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d823a"/>
    </style:style>
    <style:style style:name="P8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fo:font-size="10pt" officeooo:paragraph-rsid="000d823a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0ca6c1" officeooo:paragraph-rsid="000ca6c1"/>
    </style:style>
    <style:style style:name="P10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ca6c1"/>
    </style:style>
    <style:style style:name="P11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fo:font-size="10pt" officeooo:paragraph-rsid="000ca6c1" style:font-size-asian="10pt" style:font-size-complex="10pt"/>
    </style:style>
    <style:style style:name="P12" style:family="paragraph" style:parent-style-name="Text_20_body" style:list-style-name="" style:master-page-name="">
      <style:paragraph-properties fo:margin-top="0cm" fo:margin-bottom="0cm" style:contextual-spacing="false" fo:line-height="150%" fo:text-align="center" style:justify-single-word="false" style:page-number="auto" fo:break-before="page"/>
      <style:text-properties fo:font-weight="bold" officeooo:rsid="000f2314" officeooo:paragraph-rsid="000f2314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50%" fo:text-align="left" style:justify-single-word="false"/>
      <style:text-properties officeooo:paragraph-rsid="000d823a"/>
    </style:style>
    <style:style style:name="P14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5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0f2314" officeooo:paragraph-rsid="000f2314" style:font-weight-asian="bold" style:font-weight-complex="bold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left" style:justify-single-word="false" fo:text-indent="1.3cm" style:auto-text-indent="false" style:page-number="auto" fo:background-color="transparent"/>
      <style:text-properties officeooo:rsid="000f2314" officeooo:paragraph-rsid="000f2314"/>
    </style:style>
    <style:style style:name="P17" style:family="paragraph" style:parent-style-name="Text_20_body">
      <style:paragraph-properties fo:margin-top="0cm" fo:margin-bottom="0.25cm" style:contextual-spacing="false" fo:line-height="150%" fo:text-align="left" style:justify-single-word="false"/>
      <style:text-properties officeooo:paragraph-rsid="000f2314"/>
    </style:style>
    <style:style style:name="P18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/>
      <style:text-properties fo:font-weight="bold" officeooo:rsid="000f2314" officeooo:paragraph-rsid="000f2314" style:font-weight-asian="bold" style:font-weight-complex="bold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111865" officeooo:paragraph-rsid="00111865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fo:background-color="transparent"/>
      <style:text-properties fo:color="#000000" loext:opacity="100%" style:font-name="Liberation Mono" fo:font-size="10pt" officeooo:rsid="00111865" officeooo:paragraph-rsid="00111865" fo:background-color="#eeeeee" style:font-size-asian="10pt" style:font-size-complex="10pt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1b0b15" officeooo:paragraph-rsid="001b0b15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14bf3e" officeooo:paragraph-rsid="0014bf3e"/>
    </style:style>
    <style:style style:name="P23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/>
      <style:text-properties style:use-window-font-color="true" loext:opacity="0%" style:font-name="Liberation Mono" fo:font-size="9pt" fo:language="zxx" fo:country="none" fo:font-style="normal" style:text-underline-style="none" fo:font-weight="normal" officeooo:rsid="0014bf3e" officeooo:paragraph-rsid="0014bf3e" fo:background-color="transparent" style:font-size-asian="9pt" style:font-size-complex="9pt"/>
    </style:style>
    <style:style style:name="P24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/>
      <style:text-properties fo:color="#000000" loext:opacity="100%" style:font-name="Liberation Mono" fo:font-size="9pt" fo:language="zxx" fo:country="none" fo:font-style="normal" style:text-underline-style="none" fo:font-weight="normal" officeooo:rsid="0014bf3e" officeooo:paragraph-rsid="0014bf3e" fo:background-color="transparent" style:font-size-asian="9pt" style:font-size-complex="9pt"/>
    </style:style>
    <style:style style:name="P25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/>
      <style:text-properties fo:color="#008000" loext:opacity="100%" style:font-name="Liberation Mono" fo:font-size="9pt" fo:language="zxx" fo:country="none" fo:font-style="normal" style:text-underline-style="none" fo:font-weight="normal" officeooo:rsid="0014bf3e" officeooo:paragraph-rsid="0014bf3e" fo:background-color="transparent" style:font-size-asian="9pt" style:font-size-complex="9pt"/>
    </style:style>
    <style:style style:name="P26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/>
      <style:text-properties style:use-window-font-color="true" loext:opacity="0%" style:font-name="Liberation Mono" fo:font-size="9pt" fo:language="zxx" fo:country="none" fo:font-style="normal" style:text-underline-style="none" fo:font-weight="normal" officeooo:rsid="0014bf3e" officeooo:paragraph-rsid="00174ca7" fo:background-color="transparent" style:font-size-asian="9pt" style:font-size-complex="9pt"/>
    </style:style>
    <style:style style:name="P27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/>
      <style:text-properties fo:color="#000000" loext:opacity="100%" style:font-name="Liberation Mono" fo:font-size="9pt" fo:language="zxx" fo:country="none" fo:font-style="normal" style:text-underline-style="none" fo:font-weight="normal" officeooo:rsid="00174ca7" officeooo:paragraph-rsid="00174ca7" fo:background-color="transparent" style:font-size-asian="9pt" style:font-size-complex="9pt"/>
    </style:style>
    <style:style style:name="P28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/>
      <style:text-properties fo:color="#000000" loext:opacity="100%" style:font-name="Liberation Mono" fo:font-size="9pt" fo:language="zxx" fo:country="none" fo:font-style="normal" style:text-underline-style="none" fo:font-weight="normal" officeooo:rsid="001ab7cf" officeooo:paragraph-rsid="001ab7cf" fo:background-color="transparent" style:font-size-asian="9pt" style:font-size-complex="9pt"/>
    </style:style>
    <style:style style:name="P29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use-window-font-color="true" loext:opacity="0%" style:font-name="Liberation Mono" fo:font-size="9pt" fo:language="zxx" fo:country="none" fo:font-style="normal" style:text-underline-style="none" fo:font-weight="normal" officeooo:rsid="0014bf3e" officeooo:paragraph-rsid="0014bf3e" fo:background-color="transparent" style:font-size-asian="9pt" style:font-size-complex="9pt"/>
    </style:style>
    <style:style style:name="P30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000000" loext:opacity="100%" style:font-name="Liberation Mono" fo:font-size="9pt" fo:language="zxx" fo:country="none" fo:font-style="normal" style:text-underline-style="none" fo:font-weight="normal" officeooo:rsid="001ab7cf" officeooo:paragraph-rsid="001ab7cf" fo:background-color="transparent" style:font-size-asian="9pt" style:font-size-complex="9pt"/>
    </style:style>
    <style:style style:name="P31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008000" loext:opacity="100%" style:font-name="Liberation Mono" fo:font-size="9pt" fo:language="zxx" fo:country="none" fo:font-style="normal" style:text-underline-style="none" fo:font-weight="normal" officeooo:rsid="0014bf3e" officeooo:paragraph-rsid="0014bf3e" fo:background-color="transparent" style:font-size-asian="9pt" style:font-size-complex="9pt"/>
    </style:style>
    <style:style style:name="P32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000000" loext:opacity="100%" style:font-name="Liberation Mono" fo:font-size="9pt" fo:language="zxx" fo:country="none" fo:font-style="normal" style:text-underline-style="none" fo:font-weight="normal" officeooo:rsid="0014bf3e" officeooo:paragraph-rsid="0014bf3e" fo:background-color="transparent" style:font-size-asian="9pt" style:font-size-complex="9pt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1b0b15" officeooo:paragraph-rsid="001b0b15"/>
    </style:style>
    <style:style style:name="P34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1b0b15" officeooo:paragraph-rsid="001b0b1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37308"/>
    </style:style>
    <style:style style:name="T3" style:family="text">
      <style:text-properties officeooo:rsid="000ca6c1"/>
    </style:style>
    <style:style style:name="T4" style:family="text">
      <style:text-properties officeooo:rsid="001450d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380ff"/>
    </style:style>
    <style:style style:name="T7" style:family="text">
      <style:text-properties officeooo:rsid="0014bf3e"/>
    </style:style>
    <style:style style:name="T8" style:family="text">
      <style:text-properties officeooo:rsid="001dc2e6"/>
    </style:style>
    <style:style style:name="T9" style:family="text">
      <style:text-properties officeooo:rsid="001ed64b"/>
    </style:style>
    <style:style style:name="T10" style:family="text">
      <style:text-properties officeooo:rsid="0020d572"/>
    </style:style>
    <style:style style:name="T11" style:family="text">
      <style:text-properties officeooo:rsid="002195c4"/>
    </style:style>
    <style:style style:name="T12" style:family="text">
      <style:text-properties fo:color="#0000ff" loext:opacity="100%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fo:font-style="normal" style:text-underline-style="none" fo:font-weight="normal"/>
    </style:style>
    <style:style style:name="T15" style:family="text">
      <style:text-properties fo:color="#a31515" loext:opacity="100%"/>
    </style:style>
    <style:style style:name="T16" style:family="text">
      <style:text-properties fo:color="#000000" loext:opacity="100%" officeooo:rsid="00174ca7"/>
    </style:style>
    <style:style style:name="T17" style:family="text">
      <style:text-properties fo:color="#000000" loext:opacity="100%" officeooo:rsid="0018cfda"/>
    </style:style>
    <style:style style:name="T18" style:family="text">
      <style:text-properties fo:color="#a31515" loext:opacity="100%" officeooo:rsid="001643e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<text:span text:style-name="T1">ФЕДЕРАЛЬНОЕ </text:span>ГОСУДАРСТВЕННОЕ АВТОНОМНОЕ ОБРАЗОВАТЕЛЬНОЕ</text:p>
      <text:p text:style-name="P3">УЧРЕЖДЕНИЕ ВЫСШЕГО ОБРАЗОВАНИЯ</text:p>
      <text:p text:style-name="P4">НАЦИОНАЛЬНЫЙ ИССЛЕДОВАТЕЛЬСКИЙ УНИВЕРСИТЕТ ИТМО</text:p>
      <text:p text:style-name="P4"/>
      <text:p text:style-name="P4"/>
      <text:p text:style-name="P3">Факультет безопасности информационных технологий</text:p>
      <text:p text:style-name="P3"/>
      <text:p text:style-name="P3">Дисциплина:</text:p>
      <text:p text:style-name="P3">«<text:span text:style-name="T2">Информационная безопасность баз данных</text:span>»</text:p>
      <text:p text:style-name="P3"/>
      <text:p text:style-name="P3"/>
      <text:p text:style-name="P3">ОТЧЕТ ПО ЛАБОРАТОРНОЙ РАБОТЕ <text:span text:style-name="T3">№</text:span><text:span text:style-name="T2">2</text:span></text:p>
      <text:p text:style-name="P5">«<text:span text:style-name="T2">Манипулирование данными в БД на языке SQL</text:span>»</text:p>
      <text:p text:style-name="P3"/>
      <text:p text:style-name="P6">Выполнил:</text:p>
      <text:p text:style-name="P6">Пахомов Владимир Юрьевич, студент группы N3250</text:p>
      <text:p text:style-name="P7"><draw:frame draw:style-name="fr1" draw:name="Изображение1" text:anchor-type="char" svg:x="14.242cm" svg:y="0.746cm" svg:width="3.489cm" svg:height="1.707cm" draw:z-index="0"><draw:image xlink:href="Pictures/1000000100000203000000FCDA082FB6.png" xlink:type="simple" xlink:show="embed" xlink:actuate="onLoad" draw:mime-type="image/png"/></draw:frame></text:p>
      <text:p text:style-name="P7">________________</text:p>
      <text:p text:style-name="P8">(подпись) <text:s text:c="8"/></text:p>
      <text:p text:style-name="P6"/>
      <text:p text:style-name="P6">Проверил:</text:p>
      <text:p text:style-name="P9">Ярцева Наталия Андреевна, преподаватель ФБИТ</text:p>
      <text:p text:style-name="P9"/>
      <text:p text:style-name="P10">_____________________</text:p>
      <text:p text:style-name="P8">(отметка о выполнении) <text:s text:c="2"/></text:p>
      <text:p text:style-name="P10"/>
      <text:p text:style-name="P10"/>
      <text:p text:style-name="P10">________________</text:p>
      <text:p text:style-name="P11">(подпись) <text:s text:c="8"/></text:p>
      <text:p text:style-name="P2"/>
      <text:p text:style-name="P2">Санкт-Петербург</text:p>
      <text:p text:style-name="P2">202<text:span text:style-name="T4">6</text:span>г.</text:p>
      <text:h text:style-name="P12" text:outline-level="1"><text:bookmark-start text:name="__RefHeading___Toc80_2058273410"/>СОДЕРЖАНИЕ<text:bookmark-end text:name="__RefHeading___Toc80_2058273410"/></text:h>
      <text:p text:style-name="P13"/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_Toc80_2058273410" office:name="СОДЕРЖАНИЕ" text:style-name="Index_20_Link" text:visited-style-name="Index_20_Link">СОДЕРЖАНИЕ<text:tab/>2</text:a></text:p>
          <text:p text:style-name="P14"><text:a xlink:type="simple" xlink:href="#__RefHeading___Toc82_2058273410" office:name="ВВЕДЕНИЕ" text:style-name="Index_20_Link" text:visited-style-name="Index_20_Link">ВВЕДЕНИЕ<text:tab/>3</text:a></text:p>
          <text:p text:style-name="P14"><text:a xlink:type="simple" xlink:href="#__RefHeading___Toc143_2058273410" office:name="ХОД РАБОТЫ" text:style-name="Index_20_Link" text:visited-style-name="Index_20_Link">ХОД РАБОТЫ<text:tab/>3</text:a></text:p>
          <text:p text:style-name="P14"><text:a xlink:type="simple" xlink:href="#__RefHeading___Toc143_2058273410%20Copy%201" office:name="ЗАКЛЮЧЕНИЕ" text:style-name="Index_20_Link" text:visited-style-name="Index_20_Link">ЗАКЛЮЧЕНИЕ<text:tab/>7</text:a></text:p>
        </text:index-body>
      </text:table-of-content>
      <text:p text:style-name="P13"/>
      <text:h text:style-name="P15" text:outline-level="1"><text:bookmark-start text:name="__RefHeading___Toc82_2058273410"/>ВВЕДЕНИЕ<text:bookmark-end text:name="__RefHeading___Toc82_2058273410"/></text:h>
      <text:p text:style-name="P16"><text:span text:style-name="T5">Цель работы</text:span> — получить навыки создания <text:span text:style-name="T6">манипулирования данными в БД при помощи опраторов SQL.</text:span></text:p>
      <text:p text:style-name="P17"/>
      <text:p text:style-name="P17"/>
      <text:h text:style-name="P18" text:outline-level="1"><text:bookmark-start text:name="__RefHeading___Toc143_2058273410"/>ХОД РАБОТЫ<text:bookmark-end text:name="__RefHeading___Toc143_2058273410"/></text:h>
      <text:p text:style-name="P19">В данной лабораторной работе для взаимодействия с базой данных PostgreSQL будем использовать утилиту psql на ОС Linux. Для создания и подключения к локальной базе данных создадим файл lab<text:span text:style-name="T7">2</text:span>.sql и впишем в него все команды для создания базы данных <text:span text:style-name="T8">и отправки команд</text:span><text:span text:style-name="T9"> из</text:span> методическо<text:span text:style-name="T9">го </text:span>материал<text:span text:style-name="T9">а</text:span>. Для подключения к базе данных используем команду:</text:p>
      <text:p text:style-name="P20">psql -U postgres -f lab<text:span text:style-name="T7">2</text:span>.sql</text:p>
      <text:p text:style-name="P21">Предметная область базы данных была выбрана "Комплектующие ПК". <text:span text:style-name="T10">Были с</text:span>озданы 3 таблицы, содержащие информацию о видеокартах, процессорах и сборках компьютеров с этими комплектующими. У каждой таблицы есть свои поля, между таблицами <text:span text:style-name="T11">"</text:span>видеокарты - компьютеры<text:span text:style-name="T11">"</text:span> и <text:span text:style-name="T11">"</text:span>процессоры - компьютеры<text:span text:style-name="T11">"</text:span> установлены связи по уникальному ключу.</text:p>
      <text:p text:style-name="P22">Исходный код lab2.sql:</text:p>
      <text:p text:style-name="P23"><text:span text:style-name="T12">DROP</text:span><text:span text:style-name="T13"> </text:span><text:span text:style-name="T12">TABLE</text:span><text:span text:style-name="T13"> </text:span><text:span text:style-name="T12">IF</text:span><text:span text:style-name="T13"> </text:span><text:span text:style-name="T12">EXISTS</text:span><text:span text:style-name="T13"> computers;</text:span></text:p>
      <text:p text:style-name="P23"><text:span text:style-name="T12">DROP</text:span><text:span text:style-name="T13"> </text:span><text:span text:style-name="T12">TABLE</text:span><text:span text:style-name="T13"> </text:span><text:span text:style-name="T12">IF</text:span><text:span text:style-name="T13"> </text:span><text:span text:style-name="T12">EXISTS</text:span><text:span text:style-name="T13"> graphics_cards;</text:span></text:p>
      <text:p text:style-name="P23"><text:span text:style-name="T12">DROP</text:span><text:span text:style-name="T13"> </text:span><text:span text:style-name="T12">TABLE</text:span><text:span text:style-name="T13"> </text:span><text:span text:style-name="T12">IF</text:span><text:span text:style-name="T13"> </text:span><text:span text:style-name="T12">EXISTS</text:span><text:span text:style-name="T13"> processors;</text:span></text:p>
      <text:p text:style-name="P24"/>
      <text:p text:style-name="P25">/* 1. СОЗДАЕМ ТАБЛИЦЫ С ПОЛЯМИ */<text:span text:style-name="T14"/></text:p>
      <text:p text:style-name="P23"><text:span text:style-name="T12">CREATE</text:span><text:span text:style-name="T13"> </text:span><text:span text:style-name="T12">TABLE</text:span><text:span text:style-name="T13"> </text:span><text:span text:style-name="T12">IF</text:span><text:span text:style-name="T13"> </text:span><text:span text:style-name="T12">NOT</text:span><text:span text:style-name="T13"> </text:span><text:span text:style-name="T12">EXISTS</text:span><text:span text:style-name="T13"> graphics_cards (</text:span></text:p>
      <text:p text:style-name="P23"><text:span text:style-name="T13"><text:s text:c="4"/>id SERIAL </text:span><text:span text:style-name="T12">PRIMARY</text:span><text:span text:style-name="T13"> </text:span><text:span text:style-name="T12">KEY</text:span><text:span text:style-name="T13">,</text:span></text:p>
      <text:p text:style-name="P23"><text:span text:style-name="T13"><text:s text:c="4"/>manufacturer VARCHAR(50),</text:span><text:span text:style-name="T14"/></text:p>
      <text:p text:style-name="P23"><text:span text:style-name="T13"><text:s text:c="4"/>vram INT,</text:span><text:span text:style-name="T14"/></text:p>
      <text:p text:style-name="P23"><text:span text:style-name="T13"><text:s text:c="4"/>cuda_cores INT</text:span><text:span text:style-name="T14"/></text:p>
      <text:p text:style-name="P24">);<text:span text:style-name="T14"/></text:p>
      <text:p text:style-name="P23"><text:span text:style-name="T12">CREATE</text:span><text:span text:style-name="T13"> </text:span><text:span text:style-name="T12">TABLE</text:span><text:span text:style-name="T13"> </text:span><text:span text:style-name="T12">IF</text:span><text:span text:style-name="T13"> </text:span><text:span text:style-name="T12">NOT</text:span><text:span text:style-name="T13"> </text:span><text:span text:style-name="T12">EXISTS</text:span><text:span text:style-name="T13"> processors (</text:span></text:p>
      <text:p text:style-name="P23"><text:span text:style-name="T13"><text:s text:c="4"/>id SERIAL </text:span><text:span text:style-name="T12">PRIMARY</text:span><text:span text:style-name="T13"> </text:span><text:span text:style-name="T12">KEY</text:span><text:span text:style-name="T13">,</text:span></text:p>
      <text:p text:style-name="P23"><text:span text:style-name="T13"><text:s text:c="4"/>manufacturer VARCHAR(50),</text:span><text:span text:style-name="T14"/></text:p>
      <text:p text:style-name="P23"><text:span text:style-name="T13"><text:s text:c="4"/>cores INT,</text:span><text:span text:style-name="T14"/></text:p>
      <text:p text:style-name="P23"><text:span text:style-name="T13"><text:s text:c="4"/>threads INT,</text:span><text:span text:style-name="T14"/></text:p>
      <text:p text:style-name="P23"><text:span text:style-name="T13"><text:s text:c="4"/>frequency FLOAT</text:span><text:span text:style-name="T14"/></text:p>
      <text:p text:style-name="P24">);<text:span text:style-name="T14"/></text:p>
      <text:p text:style-name="P23"><text:span text:style-name="T12">CREATE</text:span><text:span text:style-name="T13"> </text:span><text:span text:style-name="T12">TABLE</text:span><text:span text:style-name="T13"> </text:span><text:span text:style-name="T12">IF</text:span><text:span text:style-name="T13"> </text:span><text:span text:style-name="T12">NOT</text:span><text:span text:style-name="T13"> </text:span><text:span text:style-name="T12">EXISTS</text:span><text:span text:style-name="T13"> computers (</text:span></text:p>
      <text:p text:style-name="P23"><text:span text:style-name="T13"><text:s text:c="4"/>id SERIAL </text:span><text:span text:style-name="T12">PRIMARY</text:span><text:span text:style-name="T13"> </text:span><text:span text:style-name="T12">KEY</text:span><text:span text:style-name="T13">,</text:span></text:p>
      <text:p text:style-name="P23"><text:span text:style-name="T13"><text:s text:c="4"/>graphics_card_id INT </text:span><text:span text:style-name="T12">REFERENCES</text:span><text:span text:style-name="T13"> graphics_cards(id),</text:span></text:p>
      <text:p text:style-name="P23"><text:span text:style-name="T13"><text:s text:c="4"/>processor_id INT </text:span><text:span text:style-name="T12">REFERENCES</text:span><text:span text:style-name="T13"> processors(id),</text:span></text:p>
      <text:p text:style-name="P23"><text:span text:style-name="T13"><text:s text:c="4"/>description TEXT,</text:span><text:span text:style-name="T14"/></text:p>
      <text:p text:style-name="P23"><text:span text:style-name="T13"><text:s text:c="4"/>release_date DATE,</text:span><text:span text:style-name="T14"/></text:p>
      <text:p text:style-name="P23"><text:soft-page-break/><text:span text:style-name="T13"><text:s text:c="4"/>price DECIMAL(10, 2)</text:span><text:span text:style-name="T14"/></text:p>
      <text:p text:style-name="P24">);<text:span text:style-name="T14"/></text:p>
      <text:p text:style-name="P24"/>
      <text:p text:style-name="P25">/* 2. НАПОЛНЕНИЕ ТАБЛИЦ ДАННЫМИ */<text:span text:style-name="T14"/></text:p>
      <text:p text:style-name="P23"><text:span text:style-name="T12">INSERT</text:span><text:span text:style-name="T13"> </text:span><text:span text:style-name="T12">INTO</text:span><text:span text:style-name="T13"> graphics_cards (id, manufacturer, vram, cuda_cores) </text:span><text:span text:style-name="T12">VALUES</text:span><text:span text:style-name="T13"> </text:span></text:p>
      <text:p text:style-name="P23"><text:span text:style-name="T13">(1, </text:span><text:span text:style-name="T15">'Nvidia'</text:span><text:span text:style-name="T13">, 4, 1000),</text:span></text:p>
      <text:p text:style-name="P23"><text:span text:style-name="T13">(2, </text:span><text:span text:style-name="T15">'Nvidia'</text:span><text:span text:style-name="T13">, 6, 1280),</text:span></text:p>
      <text:p text:style-name="P23"><text:span text:style-name="T13">(3, </text:span><text:span text:style-name="T15">'AMD'</text:span><text:span text:style-name="T13">, 8, 2048),</text:span></text:p>
      <text:p text:style-name="P26"><text:span text:style-name="T13">(</text:span><text:span text:style-name="T16">4</text:span><text:span text:style-name="T13">, </text:span><text:span text:style-name="T15">'Intel'</text:span><text:span text:style-name="T13">, 8, 1024)</text:span><text:span text:style-name="T17">,</text:span></text:p>
      <text:p text:style-name="P23"><text:span text:style-name="T13">(</text:span><text:span text:style-name="T16">5</text:span><text:span text:style-name="T13">, </text:span><text:span text:style-name="T15">'AMD'</text:span><text:span text:style-name="T13">, 12, 2560)</text:span><text:span text:style-name="T17">;</text:span></text:p>
      <text:p text:style-name="P24"/>
      <text:p text:style-name="P23"><text:span text:style-name="T12">INSERT</text:span><text:span text:style-name="T13"> </text:span><text:span text:style-name="T12">INTO</text:span><text:span text:style-name="T13"> processors (id, manufacturer, cores, threads, frequency) </text:span><text:span text:style-name="T12">VALUES</text:span><text:span text:style-name="T13"> </text:span></text:p>
      <text:p text:style-name="P23"><text:span text:style-name="T13">(1, </text:span><text:span text:style-name="T15">'Intel'</text:span><text:span text:style-name="T13">, 4, 8, 3.2),</text:span></text:p>
      <text:p text:style-name="P23"><text:span text:style-name="T13">(2, </text:span><text:span text:style-name="T15">'Intel'</text:span><text:span text:style-name="T13">, 6, 12, 3.6),</text:span></text:p>
      <text:p text:style-name="P23"><text:span text:style-name="T13">(3, </text:span><text:span text:style-name="T15">'AMD'</text:span><text:span text:style-name="T13">, 8, 16, 4.0),</text:span></text:p>
      <text:p text:style-name="P23"><text:span text:style-name="T13">(4, </text:span><text:span text:style-name="T15">'AMD'</text:span><text:span text:style-name="T13">, 12, 24, 4.5),</text:span></text:p>
      <text:p text:style-name="P23"><text:span text:style-name="T13">(5, </text:span><text:span text:style-name="T15">'Apple'</text:span><text:span text:style-name="T13">, 8, 8, 3.1);</text:span></text:p>
      <text:p text:style-name="P24"/>
      <text:p text:style-name="P23"><text:span text:style-name="T12">INSERT</text:span><text:span text:style-name="T13"> </text:span><text:span text:style-name="T12">INTO</text:span><text:span text:style-name="T13"> computers (id, graphics_card_id, processor_id, description, release_date, price) </text:span><text:span text:style-name="T12">VALUES</text:span><text:span text:style-name="T13"> </text:span></text:p>
      <text:p text:style-name="P23"><text:span text:style-name="T13">(1, 2, 5, </text:span><text:span text:style-name="T15">'SSS Rank PC'</text:span><text:span text:style-name="T13">, </text:span><text:span text:style-name="T15">'2022-01-05'</text:span><text:span text:style-name="T13">, 2500.00),</text:span></text:p>
      <text:p text:style-name="P23"><text:span text:style-name="T13">(2, 5, 4, </text:span><text:span text:style-name="T15">'Excellent PC'</text:span><text:span text:style-name="T13">, </text:span><text:span text:style-name="T15">'2023-09-12'</text:span><text:span text:style-name="T13">, 1800.00),</text:span></text:p>
      <text:p text:style-name="P23"><text:span text:style-name="T13">(3, 3, 3, </text:span><text:span text:style-name="T15">'Good PC'</text:span><text:span text:style-name="T13">, </text:span><text:span text:style-name="T15">'2025-12-01'</text:span><text:span text:style-name="T13">, 1200.00),</text:span></text:p>
      <text:p text:style-name="P23"><text:span text:style-name="T13">(4, 1, 2, </text:span><text:span text:style-name="T15">'Not bad PC'</text:span><text:span text:style-name="T13">, </text:span><text:span text:style-name="T15">'2021-08-23'</text:span><text:span text:style-name="T13">, 800.00),</text:span></text:p>
      <text:p text:style-name="P23"><text:span text:style-name="T13">(5, 3, 1, </text:span><text:span text:style-name="T15">'Potato PC'</text:span><text:span text:style-name="T13">, </text:span><text:span text:style-name="T15">'2024-01-30'</text:span><text:span text:style-name="T13">, 500.00);</text:span></text:p>
      <text:p text:style-name="P27">ВЫВОД:</text:p>
      <text:p text:style-name="P27">DROP TABLE</text:p>
      <text:p text:style-name="P27">DROP TABLE</text:p>
      <text:p text:style-name="P27">DROP TABLE</text:p>
      <text:p text:style-name="P27">CREATE TABLE</text:p>
      <text:p text:style-name="P27">CREATE TABLE</text:p>
      <text:p text:style-name="P27">CREATE TABLE</text:p>
      <text:p text:style-name="P27">INSERT 0 5</text:p>
      <text:p text:style-name="P27">INSERT 0 5</text:p>
      <text:p text:style-name="P27">INSERT 0 5</text:p>
      <text:p text:style-name="P24"/>
      <text:p text:style-name="P24"/>
      <text:p text:style-name="P24"/>
      <text:p text:style-name="P25">/* 3. ОБНОВЛЕНИЕ ЗАПИСЕЙ ТАБЛИЦЫ НА ОСНОВЕ ДАННЫХ ИЗ ДРУГОЙ */<text:span text:style-name="T14"/></text:p>
      <text:p text:style-name="P23"><text:span text:style-name="T12">UPDATE</text:span><text:span text:style-name="T13"> computers </text:span><text:span text:style-name="T12">SET</text:span><text:span text:style-name="T13"> description = </text:span><text:span text:style-name="T18">'</text:span><text:span text:style-name="T15">High-End gaming PC</text:span><text:span text:style-name="T18">'</text:span></text:p>
      <text:p text:style-name="P23"><text:span text:style-name="T12">WHERE</text:span><text:span text:style-name="T13"> graphics_card_id </text:span><text:span text:style-name="T12">IN</text:span><text:span text:style-name="T13"> (</text:span><text:span text:style-name="T12">SELECT</text:span><text:span text:style-name="T13"> id </text:span><text:span text:style-name="T12">FROM</text:span><text:span text:style-name="T13"> graphics_cards </text:span><text:span text:style-name="T12">WHERE</text:span><text:span text:style-name="T13"> vram &gt; 10);</text:span></text:p>
      <text:p text:style-name="P28">ВЫВОД:</text:p>
      <text:p text:style-name="P28">UPDATE 1</text:p>
      <text:p text:style-name="P24"/>
      <text:p text:style-name="P24"/>
      <text:p text:style-name="P25">/* 4. УДАЛЕНИЕ ЗАПИСЕЙ ИЗ ТАБЛИЦЫ НА ОСНОВЕ ДАННЫХ ИЗ ДРУГОЙ */<text:span text:style-name="T14"/></text:p>
      <text:p text:style-name="P23"><text:span text:style-name="T12">DELETE</text:span><text:span text:style-name="T13"> </text:span><text:span text:style-name="T12">FROM</text:span><text:span text:style-name="T13"> computers</text:span></text:p>
      <text:p text:style-name="P23"><text:span text:style-name="T12">WHERE</text:span><text:span text:style-name="T13"> processor_id </text:span><text:span text:style-name="T12">IN</text:span><text:span text:style-name="T13"> (</text:span><text:span text:style-name="T12">SELECT</text:span><text:span text:style-name="T13"> id </text:span><text:span text:style-name="T12">FROM</text:span><text:span text:style-name="T13"> processors </text:span><text:span text:style-name="T12">WHERE</text:span><text:span text:style-name="T13"> manufacturer = </text:span><text:span text:style-name="T15">'Intel'</text:span><text:span text:style-name="T13">);</text:span></text:p>
      <text:p text:style-name="P28">ВЫВОД:</text:p>
      <text:p text:style-name="P28">DELETE 2</text:p>
      <text:p text:style-name="P24"/>
      <text:p text:style-name="P24"/>
      <text:p text:style-name="P25">/* 5. ВЫВОД ЧАСТИ СТОЛБЦОВ ИЗ ТАБЛИЦЫ */<text:span text:style-name="T14"/></text:p>
      <text:p text:style-name="P29"><text:span text:style-name="T12">SELECT</text:span><text:span text:style-name="T13"> manufacturer, vram </text:span><text:span text:style-name="T12">FROM</text:span><text:span text:style-name="T13"> graphics_cards;</text:span></text:p>
      <text:p text:style-name="P30">ВЫВОД:</text:p>
      <text:p text:style-name="P30"><text:s/>manufacturer | vram </text:p>
      <text:p text:style-name="P30">--------------+------</text:p>
      <text:p text:style-name="P30"><text:s/>Nvidia <text:s text:c="6"/>| <text:s text:c="3"/>4</text:p>
      <text:p text:style-name="P30"><text:soft-page-break/><text:s/>Nvidia <text:s text:c="6"/>| <text:s text:c="3"/>6</text:p>
      <text:p text:style-name="P30"><text:s/>AMD <text:s text:c="9"/>| <text:s text:c="3"/>8</text:p>
      <text:p text:style-name="P30"><text:s/>Intel <text:s text:c="7"/>| <text:s text:c="3"/>8</text:p>
      <text:p text:style-name="P30"><text:s/>AMD <text:s text:c="9"/>| <text:s text:c="2"/>12</text:p>
      <text:p text:style-name="P30">(5 rows)</text:p>
      <text:p text:style-name="P30"/>
      <text:p text:style-name="P31">/* 6. ВЫВОД НЕСКОЛЬКИХ ЗАПИСЕЙ С ОГРАНИЧЕНИЯМИ */<text:span text:style-name="T14"/></text:p>
      <text:p text:style-name="P29"><text:span text:style-name="T12">SELECT</text:span><text:span text:style-name="T13"> * </text:span><text:span text:style-name="T12">FROM</text:span><text:span text:style-name="T13"> processors </text:span><text:span text:style-name="T12">WHERE</text:span><text:span text:style-name="T13"> cores &gt;= 8;</text:span></text:p>
      <text:p text:style-name="P30">ВЫВОД:</text:p>
      <text:p text:style-name="P30"><text:s/>id | manufacturer | cores | threads | frequency </text:p>
      <text:p text:style-name="P30">----+--------------+-------+---------+-----------</text:p>
      <text:p text:style-name="P30"><text:s text:c="2"/>3 | AMD <text:s text:c="9"/>| <text:s text:c="4"/>8 | <text:s text:c="5"/>16 | <text:s text:c="8"/>4</text:p>
      <text:p text:style-name="P30"><text:s text:c="2"/>4 | AMD <text:s text:c="9"/>| <text:s text:c="3"/>12 | <text:s text:c="5"/>24 | <text:s text:c="6"/>4.5</text:p>
      <text:p text:style-name="P30"><text:s text:c="2"/>5 | Apple <text:s text:c="7"/>| <text:s text:c="4"/>8 | <text:s text:c="6"/>8 | <text:s text:c="6"/>3.1</text:p>
      <text:p text:style-name="P30">(3 rows)</text:p>
      <text:p text:style-name="P30"/>
      <text:p text:style-name="P30"/>
      <text:p text:style-name="P31">/* 7. ДЕКАРТОВО ПРОИЗВЕДЕНИЕ ТАБЛИЦ*/<text:span text:style-name="T14"/></text:p>
      <text:p text:style-name="P29"><text:span text:style-name="T12">SELECT</text:span><text:span text:style-name="T13"> gc.manufacturer, pr.manufacturer</text:span></text:p>
      <text:p text:style-name="P29"><text:span text:style-name="T12">FROM</text:span><text:span text:style-name="T13"> graphics_cards </text:span><text:span text:style-name="T12">AS</text:span><text:span text:style-name="T13"> gc, processors </text:span><text:span text:style-name="T12">AS</text:span><text:span text:style-name="T13"> pr;</text:span></text:p>
      <text:p text:style-name="P30">ВЫВОД:</text:p>
      <text:p text:style-name="P30"><text:s/>manufacturer | manufacturer </text:p>
      <text:p text:style-name="P30">--------------+--------------</text:p>
      <text:p text:style-name="P30"><text:s/>Nvidia <text:s text:c="6"/>| Intel</text:p>
      <text:p text:style-name="P30"><text:s/>Nvidia <text:s text:c="6"/>| Intel</text:p>
      <text:p text:style-name="P30"><text:s/>Nvidia <text:s text:c="6"/>| AMD</text:p>
      <text:p text:style-name="P30"><text:s/>Nvidia <text:s text:c="6"/>| AMD</text:p>
      <text:p text:style-name="P30"><text:s/>Nvidia <text:s text:c="6"/>| Apple</text:p>
      <text:p text:style-name="P30"><text:s/>Nvidia <text:s text:c="6"/>| Intel</text:p>
      <text:p text:style-name="P30"><text:s/>Nvidia <text:s text:c="6"/>| Intel</text:p>
      <text:p text:style-name="P30"><text:s/>Nvidia <text:s text:c="6"/>| AMD</text:p>
      <text:p text:style-name="P30"><text:s/>Nvidia <text:s text:c="6"/>| AMD</text:p>
      <text:p text:style-name="P30"><text:s/>Nvidia <text:s text:c="6"/>| Apple</text:p>
      <text:p text:style-name="P30"><text:s/>AMD <text:s text:c="9"/>| Intel</text:p>
      <text:p text:style-name="P30"><text:s/>AMD <text:s text:c="9"/>| Intel</text:p>
      <text:p text:style-name="P30"><text:s/>AMD <text:s text:c="9"/>| AMD</text:p>
      <text:p text:style-name="P30"><text:s/>AMD <text:s text:c="9"/>| AMD</text:p>
      <text:p text:style-name="P30"><text:s/>AMD <text:s text:c="9"/>| Apple</text:p>
      <text:p text:style-name="P30"><text:s/>Intel <text:s text:c="7"/>| Intel</text:p>
      <text:p text:style-name="P30"><text:s/>Intel <text:s text:c="7"/>| Intel</text:p>
      <text:p text:style-name="P30"><text:s/>Intel <text:s text:c="7"/>| AMD</text:p>
      <text:p text:style-name="P30"><text:s/>Intel <text:s text:c="7"/>| AMD</text:p>
      <text:p text:style-name="P30"><text:s/>Intel <text:s text:c="7"/>| Apple</text:p>
      <text:p text:style-name="P30"><text:s/>AMD <text:s text:c="9"/>| Intel</text:p>
      <text:p text:style-name="P30"><text:s/>AMD <text:s text:c="9"/>| Intel</text:p>
      <text:p text:style-name="P30"><text:s/>AMD <text:s text:c="9"/>| AMD</text:p>
      <text:p text:style-name="P30"><text:s/>AMD <text:s text:c="9"/>| AMD</text:p>
      <text:p text:style-name="P30"><text:s/>AMD <text:s text:c="9"/>| Apple</text:p>
      <text:p text:style-name="P30">(25 rows)</text:p>
      <text:p text:style-name="P32"/>
      <text:p text:style-name="P32"/>
      <text:p text:style-name="P31">/* 8. ВЫВОД ЗАПИСЕЙ НА ОСНОВАНИИ УСЛОВИЯ ИЗ ДРУГОЙ ТАБЛИЦЫ */<text:span text:style-name="T14"/></text:p>
      <text:p text:style-name="P23"><text:span text:style-name="T12">SELECT</text:span><text:span text:style-name="T13"> * </text:span><text:span text:style-name="T12">FROM</text:span><text:span text:style-name="T13"> graphics_cards</text:span></text:p>
      <text:p text:style-name="P23"><text:span text:style-name="T12">WHERE</text:span><text:span text:style-name="T13"> id </text:span><text:span text:style-name="T12">IN</text:span><text:span text:style-name="T13"> (</text:span><text:span text:style-name="T12">SELECT</text:span><text:span text:style-name="T13"> graphics_card_id </text:span><text:span text:style-name="T12">FROM</text:span><text:span text:style-name="T13"> computers </text:span><text:span text:style-name="T12">WHERE</text:span><text:span text:style-name="T13"> release_date &gt; </text:span><text:span text:style-name="T15">'2023-01-01'</text:span><text:span text:style-name="T13">);</text:span></text:p>
      <text:p text:style-name="P28">ВЫВОД:</text:p>
      <text:p text:style-name="P28"><text:s/>id | manufacturer | vram | cuda_cores </text:p>
      <text:p text:style-name="P28">----+--------------+------+------------</text:p>
      <text:p text:style-name="P28"><text:s text:c="2"/>3 | AMD <text:s text:c="9"/>| <text:s text:c="3"/>8 | <text:s text:c="6"/>2048</text:p>
      <text:p text:style-name="P28"><text:s text:c="2"/>5 | AMD <text:s text:c="9"/>| <text:s text:c="2"/>12 | <text:s text:c="6"/>2560</text:p>
      <text:p text:style-name="P28">(2 rows)</text:p>
      <text:p text:style-name="P28"/>
      <text:p text:style-name="P28"/>
      <text:p text:style-name="P25">/* 9. ПРИМЕНЕНИЕ ФУНКЦИЙ АГРЕГИРОВАНИЯ */<text:span text:style-name="T14"/></text:p>
      <text:p text:style-name="P23"><text:span text:style-name="T12">SELECT</text:span><text:span text:style-name="T13"> </text:span><text:span text:style-name="T12">SUM</text:span><text:span text:style-name="T13">(price), </text:span><text:span text:style-name="T12">AVG</text:span><text:span text:style-name="T13">(price), </text:span><text:span text:style-name="T12">MIN</text:span><text:span text:style-name="T13">(price), </text:span><text:span text:style-name="T12">MAX</text:span><text:span text:style-name="T13">(price) </text:span><text:span text:style-name="T12">FROM</text:span><text:span text:style-name="T13"> computers;</text:span></text:p>
      <text:p text:style-name="P28"><text:soft-page-break/>ВЫВОД:</text:p>
      <text:p text:style-name="P28"><text:s text:c="3"/>sum <text:s text:c="2"/>| <text:s text:c="9"/>avg <text:s text:c="9"/>| <text:s text:c="2"/>min <text:s text:c="2"/>| <text:s text:c="2"/>max <text:s text:c="2"/></text:p>
      <text:p text:style-name="P28">---------+-----------------------+---------+---------</text:p>
      <text:p text:style-name="P28"><text:s/>5500.00 | 1833.3333333333333333 | 1200.00 | 2500.00</text:p>
      <text:p text:style-name="P28">(1 row)</text:p>
      <text:p text:style-name="P24"/>
      <text:p text:style-name="P24"/>
      <text:p text:style-name="P25">/* 10. ВЫВОД ЗАПИСЕЙ С СОРТИРОВКОЙ ПО УБЫВАНИЮ */<text:span text:style-name="T14"/></text:p>
      <text:p text:style-name="P23"><text:span text:style-name="T12">SELECT</text:span><text:span text:style-name="T13"> * </text:span><text:span text:style-name="T12">FROM</text:span><text:span text:style-name="T13"> processors </text:span><text:span text:style-name="T12">ORDER</text:span><text:span text:style-name="T13"> </text:span><text:span text:style-name="T12">BY</text:span><text:span text:style-name="T13"> frequency </text:span><text:span text:style-name="T12">DESC</text:span><text:span text:style-name="T13">;</text:span></text:p>
      <text:p text:style-name="P28">ВЫВОД:</text:p>
      <text:p text:style-name="P28"><text:s/>id | manufacturer | cores | threads | frequency </text:p>
      <text:p text:style-name="P28">----+--------------+-------+---------+-----------</text:p>
      <text:p text:style-name="P28"><text:s text:c="2"/>4 | AMD <text:s text:c="9"/>| <text:s text:c="3"/>12 | <text:s text:c="5"/>24 | <text:s text:c="6"/>4.5</text:p>
      <text:p text:style-name="P28"><text:s text:c="2"/>3 | AMD <text:s text:c="9"/>| <text:s text:c="4"/>8 | <text:s text:c="5"/>16 | <text:s text:c="8"/>4</text:p>
      <text:p text:style-name="P28"><text:s text:c="2"/>2 | Intel <text:s text:c="7"/>| <text:s text:c="4"/>6 | <text:s text:c="5"/>12 | <text:s text:c="6"/>3.6</text:p>
      <text:p text:style-name="P28"><text:s text:c="2"/>1 | Intel <text:s text:c="7"/>| <text:s text:c="4"/>4 | <text:s text:c="6"/>8 | <text:s text:c="6"/>3.2</text:p>
      <text:p text:style-name="P28"><text:s text:c="2"/>5 | Apple <text:s text:c="7"/>| <text:s text:c="4"/>8 | <text:s text:c="6"/>8 | <text:s text:c="6"/>3.1</text:p>
      <text:p text:style-name="P28">(5 rows)</text:p>
      <text:p text:style-name="P32"/>
      <text:p text:style-name="P32"/>
      <text:p text:style-name="P31">/* 11. ВЫВОД ЗАПИСЕЙ ВО ВОЗРАСТАНИЮ С ОГРАНИЧЕНИЕМ НА КОЛИЧЕСтВО СТРОК */<text:span text:style-name="T14"/></text:p>
      <text:p text:style-name="P29"><text:span text:style-name="T12">SELECT</text:span><text:span text:style-name="T13"> * </text:span><text:span text:style-name="T12">FROM</text:span><text:span text:style-name="T13"> graphics_cards </text:span><text:span text:style-name="T12">ORDER</text:span><text:span text:style-name="T13"> </text:span><text:span text:style-name="T12">BY</text:span><text:span text:style-name="T13"> vram </text:span><text:span text:style-name="T12">ASC</text:span><text:span text:style-name="T13"> </text:span><text:span text:style-name="T12">LIMIT</text:span><text:span text:style-name="T13"> 3;</text:span></text:p>
      <text:p text:style-name="P30">ВЫВОД:</text:p>
      <text:p text:style-name="P30"><text:s/>id | manufacturer | vram | cuda_cores </text:p>
      <text:p text:style-name="P30">----+--------------+------+------------</text:p>
      <text:p text:style-name="P30"><text:s text:c="2"/>1 | Nvidia <text:s text:c="6"/>| <text:s text:c="3"/>4 | <text:s text:c="6"/>1000</text:p>
      <text:p text:style-name="P30"><text:s text:c="2"/>2 | Nvidia <text:s text:c="6"/>| <text:s text:c="3"/>6 | <text:s text:c="6"/>1280</text:p>
      <text:p text:style-name="P30"><text:s text:c="2"/>3 | AMD <text:s text:c="9"/>| <text:s text:c="3"/>8 | <text:s text:c="6"/>2048</text:p>
      <text:p text:style-name="P30">(3 rows)</text:p>
      <text:p text:style-name="P32"/>
      <text:p text:style-name="P32"/>
      <text:p text:style-name="P25">/* 12. АГРЕГИРОВАНИЕ ВЫВОДИМЫХ ЗАПИСЕЙ */<text:span text:style-name="T14"/></text:p>
      <text:p text:style-name="P23"><text:span text:style-name="T12">SELECT</text:span><text:span text:style-name="T13"> manufacturer, </text:span><text:span text:style-name="T12">COUNT</text:span><text:span text:style-name="T13">(*) </text:span><text:span text:style-name="T12">FROM</text:span><text:span text:style-name="T13"> graphics_cards </text:span><text:span text:style-name="T12">GROUP</text:span><text:span text:style-name="T13"> </text:span><text:span text:style-name="T12">BY</text:span><text:span text:style-name="T13"> manufacturer;</text:span></text:p>
      <text:p text:style-name="P28">ВЫВОД:</text:p>
      <text:p text:style-name="P28"><text:s/>manufacturer | count </text:p>
      <text:p text:style-name="P28">--------------+-------</text:p>
      <text:p text:style-name="P28"><text:s/>Intel <text:s text:c="7"/>| <text:s text:c="4"/>1</text:p>
      <text:p text:style-name="P28"><text:s/>Nvidia <text:s text:c="6"/>| <text:s text:c="4"/>2</text:p>
      <text:p text:style-name="P28"><text:s/>AMD <text:s text:c="9"/>| <text:s text:c="4"/>2</text:p>
      <text:p text:style-name="P28">(3 rows)</text:p>
      <text:p text:style-name="P24"/>
      <text:p text:style-name="P24"/>
      <text:p text:style-name="P25">/* 13. ЗАПРОС, ГДЕ ТАБЛИЧНОЕ ВЫРАЖЕНИЕ - ДРУГОЙ ЗАПРОС */<text:span text:style-name="T14"/></text:p>
      <text:p text:style-name="P23"><text:span text:style-name="T12">SELECT</text:span><text:span text:style-name="T13"> sub.manufacturer, sub.cores </text:span><text:span text:style-name="T12">FROM</text:span><text:span text:style-name="T13"> (</text:span><text:span text:style-name="T12">SELECT</text:span><text:span text:style-name="T13"> * </text:span><text:span text:style-name="T12">FROM</text:span><text:span text:style-name="T13"> processors </text:span><text:span text:style-name="T12">WHERE</text:span><text:span text:style-name="T13"> cores &gt; 4) </text:span><text:span text:style-name="T12">AS</text:span><text:span text:style-name="T13"> sub </text:span><text:span text:style-name="T12">WHERE</text:span><text:span text:style-name="T13"> sub.manufacturer = </text:span><text:span text:style-name="T15">'AMD'</text:span><text:span text:style-name="T13">;</text:span></text:p>
      <text:p text:style-name="P28">ВЫВОД:</text:p>
      <text:p text:style-name="P28"><text:s/>manufacturer | cores </text:p>
      <text:p text:style-name="P28">--------------+-------</text:p>
      <text:p text:style-name="P28"><text:s/>AMD <text:s text:c="9"/>| <text:s text:c="4"/>8</text:p>
      <text:p text:style-name="P28"><text:s/>AMD <text:s text:c="9"/>| <text:s text:c="3"/>12</text:p>
      <text:p text:style-name="P28">(2 rows)</text:p>
      <text:p text:style-name="P22"/>
      <text:p text:style-name="P33"/>
      <text:h text:style-name="P34" text:outline-level="1"><text:bookmark-start text:name="__RefHeading___Toc143_2058273410 Copy 1"/>ЗАКЛЮЧЕНИЕ<text:bookmark-end text:name="__RefHeading___Toc143_2058273410 Copy 1"/></text:h>
      <text:p text:style-name="P22">В результате проделанной работы были изучены основы языка SQL и принципы управления реляционными базами данных. На примере предметной области «Комплектующие ПК» были успешно реализованы все этапы работы с данными: от создания структуры таблиц с соблюдением связей до выполнения сложных аналитических запросов и вложенных подзапросов. Работа подтвердила эффективность использования SQL для управления структурированной информацией и извлечения производных данных (агрегирования и группировки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5:54:10.970395995</meta:creation-date>
    <dc:date>2026-03-02T16:23:15.098260537</dc:date>
    <meta:editing-duration>PT3H18M52S</meta:editing-duration>
    <meta:editing-cycles>22</meta:editing-cycles>
    <meta:generator>LibreOffice/26.2.1.2$Linux_X86_64 LibreOffice_project/620$Build-2</meta:generator>
    <meta:document-statistic meta:table-count="0" meta:image-count="1" meta:object-count="0" meta:page-count="7" meta:paragraph-count="204" meta:word-count="1028" meta:character-count="7070" meta:non-whitespace-character-count="5505"/>
  </office:meta>
</office:document-meta>
</file>