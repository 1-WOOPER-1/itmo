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FCDA082F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master-page-name="">
      <style:paragraph-properties fo:margin-top="0cm" fo:margin-bottom="0cm" style:contextual-spacing="false" fo:line-height="150%" fo:text-align="center" style:justify-single-word="false" style:page-number="auto"/>
      <style:text-properties fo:font-weight="bold" officeooo:paragraph-rsid="000d823a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0d823a"/>
    </style:style>
    <style:style style:name="P3" style:family="paragraph" style:parent-style-name="Text_20_body">
      <style:paragraph-properties fo:margin-top="0cm" fo:margin-bottom="0cm" style:contextual-spacing="false" fo:line-height="150%"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137308"/>
    </style:style>
    <style:style style:name="P6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paragraph-rsid="000ca6c1"/>
    </style:style>
    <style:style style:name="P7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d823a"/>
    </style:style>
    <style:style style:name="P8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fo:font-size="10pt" officeooo:paragraph-rsid="000d823a" style:font-size-asian="10pt" style:font-size-complex="10pt"/>
    </style:style>
    <style:style style:name="P9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0ca6c1" officeooo:paragraph-rsid="000ca6c1"/>
    </style:style>
    <style:style style:name="P10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ca6c1"/>
    </style:style>
    <style:style style:name="P11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fo:font-size="10pt" officeooo:paragraph-rsid="000ca6c1" style:font-size-asian="10pt" style:font-size-complex="10pt"/>
    </style:style>
    <style:style style:name="P12" style:family="paragraph" style:parent-style-name="Text_20_body" style:list-style-name="" style:master-page-name="">
      <style:paragraph-properties fo:margin-top="0cm" fo:margin-bottom="0cm" style:contextual-spacing="false" fo:line-height="150%" fo:text-align="center" style:justify-single-word="false" style:page-number="auto" fo:break-before="page"/>
      <style:text-properties fo:font-weight="bold" officeooo:rsid="000f2314" officeooo:paragraph-rsid="000f2314" style:font-weight-asian="bold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50%" fo:text-align="left" style:justify-single-word="false"/>
      <style:text-properties officeooo:paragraph-rsid="000d823a"/>
    </style:style>
    <style:style style:name="P14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16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0f2314" officeooo:paragraph-rsid="000f2314" style:font-weight-asian="bold" style:font-weight-complex="bold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left" style:justify-single-word="false" fo:text-indent="1.3cm" style:auto-text-indent="false" style:page-number="auto" fo:background-color="transparent"/>
      <style:text-properties officeooo:rsid="000f2314" officeooo:paragraph-rsid="000f2314"/>
    </style:style>
    <style:style style:name="P18" style:family="paragraph" style:parent-style-name="Text_20_body">
      <style:paragraph-properties fo:margin-top="0cm" fo:margin-bottom="0.25cm" style:contextual-spacing="false" fo:line-height="150%" fo:text-align="left" style:justify-single-word="false"/>
      <style:text-properties officeooo:paragraph-rsid="000f2314"/>
    </style:style>
    <style:style style:name="P19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/>
      <style:text-properties fo:font-weight="bold" officeooo:rsid="000f2314" officeooo:paragraph-rsid="000f2314" style:font-weight-asian="bold" style:font-weight-complex="bold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style:page-number="auto" fo:background-color="transparent"/>
      <style:text-properties officeooo:rsid="00111865" officeooo:paragraph-rsid="00111865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0cm" style:auto-text-indent="false" fo:background-color="transparent"/>
      <style:text-properties fo:color="#000000" loext:opacity="100%" style:font-name="Liberation Mono" fo:font-size="10pt" fo:language="zxx" fo:country="none" officeooo:rsid="00111865" officeooo:paragraph-rsid="00111865" fo:background-color="#eeeeee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style:page-number="auto" fo:background-color="transparent"/>
      <style:text-properties officeooo:rsid="0025b463" officeooo:paragraph-rsid="0025b463"/>
    </style:style>
    <style:style style:name="P23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color="#008000" loext:opacity="100%" style:font-name="Liberation Mono" fo:font-size="10pt" fo:language="zxx" fo:country="none" fo:font-style="normal" style:text-underline-style="none" fo:font-weight="normal" officeooo:rsid="0025b463" officeooo:paragraph-rsid="0025b463" fo:background-color="transparent" style:font-size-asian="10pt" style:font-size-complex="10pt"/>
    </style:style>
    <style:style style:name="P24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use-window-font-color="true" loext:opacity="0%" style:font-name="Liberation Mono" fo:font-size="10pt" fo:language="zxx" fo:country="none" fo:font-style="normal" style:text-underline-style="none" fo:font-weight="normal" officeooo:rsid="0025b463" officeooo:paragraph-rsid="0025b463" fo:background-color="transparent" style:font-size-asian="10pt" style:font-size-complex="10pt"/>
    </style:style>
    <style:style style:name="P25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color="#000000" loext:opacity="100%" style:font-name="Liberation Mono" fo:font-size="10pt" fo:language="zxx" fo:country="none" fo:font-style="normal" style:text-underline-style="none" fo:font-weight="normal" officeooo:rsid="0025b463" officeooo:paragraph-rsid="0025b463" fo:background-color="transparent" style:font-size-asian="10pt" style:font-size-complex="10pt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25b463" officeooo:paragraph-rsid="0025b463"/>
    </style:style>
    <style:style style:name="P27" style:family="paragraph" style:parent-style-name="Text_20_body" style:list-style-name="" style:master-page-name=""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style:page-number="auto" fo:break-before="page"/>
      <style:text-properties fo:font-weight="bold" officeooo:rsid="002a209c" officeooo:paragraph-rsid="002a209c" style:font-weight-asian="bold" style:font-weight-complex="bold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paragraph-rsid="0025b463"/>
    </style:style>
    <style:style style:name="P29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1.3cm" style:auto-text-indent="false" fo:background-color="transparent"/>
      <style:text-properties style:use-window-font-color="true" loext:opacity="0%" style:font-name="Liberation Mono" fo:font-size="10pt" fo:language="zxx" fo:country="none" fo:font-style="normal" style:text-underline-style="none" fo:font-weight="normal" officeooo:rsid="0025b463" officeooo:paragraph-rsid="0025b463" fo:background-color="transparent" style:font-size-asian="10pt" style:font-size-complex="10pt"/>
    </style:style>
    <style:style style:name="P30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1.3cm" style:auto-text-indent="false" fo:background-color="transparent"/>
      <style:text-properties fo:color="#0000ff" loext:opacity="100%" style:font-name="Liberation Mono" fo:font-size="10pt" fo:language="zxx" fo:country="none" fo:font-style="normal" style:text-underline-style="none" fo:font-weight="normal" officeooo:rsid="0025b463" officeooo:paragraph-rsid="0025b463" fo:background-color="transparent" style:font-size-asian="10pt" style:font-size-complex="10pt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266f51" officeooo:paragraph-rsid="00266f51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3cm" style:auto-text-indent="false" fo:background-color="transparent"/>
      <style:text-properties style:font-name="Liberation Mono" fo:font-size="10pt" fo:language="zxx" fo:country="none" officeooo:rsid="00266f51" officeooo:paragraph-rsid="00266f51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1.3cm" style:auto-text-indent="false" fo:background-color="transparent"/>
      <style:text-properties fo:color="#000000" loext:opacity="100%" style:font-name="Liberation Mono" fo:font-size="10pt" fo:language="zxx" fo:country="none" fo:font-style="normal" style:text-underline-style="none" fo:font-weight="normal" officeooo:rsid="0025b463" officeooo:paragraph-rsid="0025b463" fo:background-color="transparent" style:font-size-asian="10pt" style:font-size-complex="10pt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26f2d9" officeooo:paragraph-rsid="0026f2d9"/>
    </style:style>
    <style:style style:name="P35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1.3cm" style:auto-text-indent="false" fo:background-color="transparent"/>
      <style:text-properties style:use-window-font-color="true" loext:opacity="0%" style:font-name="Liberation Mono" fo:font-size="10pt" fo:language="zxx" fo:country="none" fo:font-style="normal" style:text-underline-style="none" fo:font-weight="normal" officeooo:rsid="0026f2d9" officeooo:paragraph-rsid="0026f2d9" fo:background-color="transparent" style:font-size-asian="10pt" style:font-size-complex="10pt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28ec86" officeooo:paragraph-rsid="0028ec86"/>
    </style:style>
    <style:style style:name="P37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use-window-font-color="true" loext:opacity="0%" style:font-name="Liberation Mono" fo:font-size="10pt" fo:language="zxx" fo:country="none" fo:font-style="normal" style:text-underline-style="none" fo:font-weight="normal" officeooo:rsid="0028ec86" officeooo:paragraph-rsid="0028ec86" fo:background-color="transparent" style:font-size-asian="10pt" style:font-size-complex="10pt"/>
    </style:style>
    <style:style style:name="P38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color="#000000" loext:opacity="100%" style:font-name="Liberation Mono" fo:font-size="10pt" fo:language="zxx" fo:country="none" fo:font-style="normal" style:text-underline-style="none" fo:font-weight="normal" officeooo:rsid="0028ec86" officeooo:paragraph-rsid="0028ec86" fo:background-color="transparent" style:font-size-asian="10pt" style:font-size-complex="10pt"/>
    </style:style>
    <style:style style:name="P39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color="#0000ff" loext:opacity="100%" style:font-name="Liberation Mono" fo:font-size="10pt" fo:language="zxx" fo:country="none" fo:font-style="normal" style:text-underline-style="none" fo:font-weight="normal" officeooo:rsid="0028ec86" officeooo:paragraph-rsid="0028ec86" fo:background-color="transparent" style:font-size-asian="10pt" style:font-size-complex="10pt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font-name="Liberation Mono" fo:font-size="10pt" fo:language="zxx" fo:country="none" officeooo:rsid="0028ec86" officeooo:paragraph-rsid="0028ec86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2a209c" officeooo:paragraph-rsid="002a209c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font-name="Liberation Mono" fo:font-size="10pt" fo:language="zxx" fo:country="none" officeooo:rsid="002a209c" officeooo:paragraph-rsid="002a209c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ext_20_body" style:list-style-name="" style:master-page-name="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style:page-number="auto" fo:break-before="page" fo:background-color="transparent"/>
      <style:text-properties fo:font-weight="bold" officeooo:rsid="002a209c" officeooo:paragraph-rsid="002a209c" style:font-weight-asian="bold" style:font-weight-complex="bold"/>
    </style:style>
    <style:style style:name="P44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use-window-font-color="true" loext:opacity="0%" style:font-name="Liberation Mono" fo:font-size="10pt" fo:language="zxx" fo:country="none" fo:font-style="normal" style:text-underline-style="none" fo:font-weight="normal" officeooo:rsid="002a209c" officeooo:paragraph-rsid="002a209c" fo:background-color="transparent" style:font-size-asian="10pt" style:font-size-complex="10pt"/>
    </style:style>
    <style:style style:name="P45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color="#000000" loext:opacity="100%" style:font-name="Liberation Mono" fo:font-size="10pt" fo:language="zxx" fo:country="none" fo:font-style="normal" style:text-underline-style="none" fo:font-weight="normal" officeooo:rsid="002a209c" officeooo:paragraph-rsid="002a209c" fo:background-color="transparent" style:font-size-asian="10pt" style:font-size-complex="10pt"/>
    </style:style>
    <style:style style:name="P46" style:family="paragraph" style:parent-style-name="Text_20_body">
      <loext:graphic-properties draw:fill="none"/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color="#0000ff" loext:opacity="100%" style:font-name="Liberation Mono" fo:font-size="10pt" fo:language="zxx" fo:country="none" fo:font-style="normal" style:text-underline-style="none" fo:font-weight="normal" officeooo:rsid="002a209c" officeooo:paragraph-rsid="002a209c" fo:background-color="transparent" style:font-size-asian="10pt" style:font-size-complex="10pt"/>
    </style:style>
    <style:style style:name="P47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2a5f83" officeooo:paragraph-rsid="002a5f83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 fo:background-color="transparent"/>
      <style:text-properties style:font-name="Liberation Mono" fo:font-size="5.90000009536743pt" fo:language="zxx" fo:country="none" officeooo:rsid="002a5f83" officeooo:paragraph-rsid="002a5f83" style:font-size-asian="5.90000009536743pt" style:language-asian="zxx" style:country-asian="none" style:font-size-complex="5.90000009536743pt" style:language-complex="zxx" style:country-complex="none"/>
    </style:style>
    <style:style style:name="P49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1b0b15" officeooo:paragraph-rsid="001b0b15" style:font-weight-asian="bold" style:font-weight-complex="bold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14bf3e" officeooo:paragraph-rsid="0014bf3e"/>
    </style:style>
    <style:style style:name="P51" style:family="paragraph" style:parent-style-name="Text_20_body" style:list-style-name="L1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14bf3e" officeooo:paragraph-rsid="0014bf3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37308"/>
    </style:style>
    <style:style style:name="T3" style:family="text">
      <style:text-properties officeooo:rsid="000ca6c1"/>
    </style:style>
    <style:style style:name="T4" style:family="text">
      <style:text-properties officeooo:rsid="00236fbb"/>
    </style:style>
    <style:style style:name="T5" style:family="text">
      <style:text-properties officeooo:rsid="001450d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785e2"/>
    </style:style>
    <style:style style:name="T8" style:family="text">
      <style:text-properties officeooo:rsid="001dc2e6"/>
    </style:style>
    <style:style style:name="T9" style:family="text">
      <style:text-properties officeooo:rsid="001ed64b"/>
    </style:style>
    <style:style style:name="T10" style:family="text">
      <style:text-properties officeooo:rsid="0025a01a"/>
    </style:style>
    <style:style style:name="T11" style:family="text">
      <style:text-properties officeooo:rsid="0032258b"/>
    </style:style>
    <style:style style:name="T12" style:family="text">
      <style:text-properties fo:color="#0000ff" loext:opacity="100%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fo:font-style="normal" style:text-underline-style="none" fo:font-weight="normal"/>
    </style:style>
    <style:style style:name="T15" style:family="text">
      <style:text-properties officeooo:rsid="0025b463"/>
    </style:style>
    <style:style style:name="T16" style:family="text">
      <style:text-properties officeooo:rsid="00266f51"/>
    </style:style>
    <style:style style:name="T17" style:family="text">
      <style:text-properties fo:font-style="normal" style:text-underline-style="none" fo:font-weight="normal"/>
    </style:style>
    <style:style style:name="T18" style:family="text">
      <style:text-properties fo:color="#a31515" loext:opacity="100%"/>
    </style:style>
    <style:style style:name="T19" style:family="text">
      <style:text-properties officeooo:rsid="00297b9b"/>
    </style:style>
    <style:style style:name="T20" style:family="text">
      <style:text-properties officeooo:rsid="002f526e"/>
    </style:style>
    <style:style style:name="T21" style:family="text">
      <style:text-properties officeooo:rsid="00300602"/>
    </style:style>
    <style:style style:name="T22" style:family="text">
      <style:text-properties fo:language="zxx" fo:country="none" style:language-asian="zxx" style:country-asian="none" style:language-complex="zxx" style:country-complex="none"/>
    </style:style>
    <style:style style:name="T23" style:family="text">
      <style:text-properties officeooo:rsid="0034999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<text:span text:style-name="T1">ФЕДЕРАЛЬНОЕ </text:span>ГОСУДАРСТВЕННОЕ АВТОНОМНОЕ ОБРАЗОВАТЕЛЬНОЕ</text:p>
      <text:p text:style-name="P3">УЧРЕЖДЕНИЕ ВЫСШЕГО ОБРАЗОВАНИЯ</text:p>
      <text:p text:style-name="P4">НАЦИОНАЛЬНЫЙ ИССЛЕДОВАТЕЛЬСКИЙ УНИВЕРСИТЕТ ИТМО</text:p>
      <text:p text:style-name="P4"/>
      <text:p text:style-name="P4"/>
      <text:p text:style-name="P3">Факультет безопасности информационных технологий</text:p>
      <text:p text:style-name="P3"/>
      <text:p text:style-name="P3">Дисциплина:</text:p>
      <text:p text:style-name="P3">«<text:span text:style-name="T2">Информационная безопасность баз данных</text:span>»</text:p>
      <text:p text:style-name="P3"/>
      <text:p text:style-name="P3"/>
      <text:p text:style-name="P3">ОТЧЕТ ПО ЛАБОРАТОРНОЙ РАБОТЕ <text:span text:style-name="T3">№</text:span><text:span text:style-name="T4">3</text:span></text:p>
      <text:p text:style-name="P5">«<text:span text:style-name="T4">Функции и триггеры в БД</text:span>»</text:p>
      <text:p text:style-name="P3"/>
      <text:p text:style-name="P6">Выполнил:</text:p>
      <text:p text:style-name="P6">Пахомов Владимир Юрьевич, студент группы N3250</text:p>
      <text:p text:style-name="P7"><draw:frame draw:style-name="fr1" draw:name="Изображение1" text:anchor-type="char" svg:x="14.242cm" svg:y="0.746cm" svg:width="3.489cm" svg:height="1.707cm" draw:z-index="0"><draw:image xlink:href="Pictures/1000000100000203000000FCDA082FB6.png" xlink:type="simple" xlink:show="embed" xlink:actuate="onLoad" draw:mime-type="image/png"/></draw:frame></text:p>
      <text:p text:style-name="P7">________________</text:p>
      <text:p text:style-name="P8">(подпись) <text:s text:c="8"/></text:p>
      <text:p text:style-name="P6"/>
      <text:p text:style-name="P6">Проверил:</text:p>
      <text:p text:style-name="P9">Ярцева Наталия Андреевна, преподаватель ФБИТ</text:p>
      <text:p text:style-name="P9"/>
      <text:p text:style-name="P10">_____________________</text:p>
      <text:p text:style-name="P8">(отметка о выполнении) <text:s text:c="2"/></text:p>
      <text:p text:style-name="P10"/>
      <text:p text:style-name="P10"/>
      <text:p text:style-name="P10">________________</text:p>
      <text:p text:style-name="P11">(подпись) <text:s text:c="8"/></text:p>
      <text:p text:style-name="P2"/>
      <text:p text:style-name="P2">Санкт-Петербург</text:p>
      <text:p text:style-name="P2">202<text:span text:style-name="T5">6</text:span>г.</text:p>
      <text:h text:style-name="P12" text:outline-level="1"><text:bookmark-start text:name="__RefHeading___Toc80_2058273410"/>СОДЕРЖАНИЕ<text:bookmark-end text:name="__RefHeading___Toc80_2058273410"/></text:h>
      <text:p text:style-name="P13"/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_Toc80_2058273410" office:name="СОДЕРЖАНИЕ" text:style-name="Index_20_Link" text:visited-style-name="Index_20_Link">СОДЕРЖАНИЕ<text:tab/>2</text:a></text:p>
          <text:p text:style-name="P14"><text:a xlink:type="simple" xlink:href="#__RefHeading___Toc82_2058273410" office:name="ВВЕДЕНИЕ" text:style-name="Index_20_Link" text:visited-style-name="Index_20_Link">ВВЕДЕНИЕ<text:tab/>3</text:a></text:p>
          <text:p text:style-name="P14"><text:a xlink:type="simple" xlink:href="#__RefHeading___Toc143_2058273410" office:name="ХОД РАБОТЫ" text:style-name="Index_20_Link" text:visited-style-name="Index_20_Link">ХОД РАБОТЫ<text:tab/>3</text:a></text:p>
          <text:p text:style-name="P15"><text:a xlink:type="simple" xlink:href="#__RefHeading___Toc2640_2311437734" office:name="Задание 1" text:style-name="Index_20_Link" text:visited-style-name="Index_20_Link">Задание 1<text:tab/>4</text:a></text:p>
          <text:p text:style-name="P15"><text:a xlink:type="simple" xlink:href="#__RefHeading___Toc2642_2311437734" office:name="Задание 2" text:style-name="Index_20_Link" text:visited-style-name="Index_20_Link">Задание 2<text:tab/>5</text:a></text:p>
          <text:p text:style-name="P15"><text:a xlink:type="simple" xlink:href="#__RefHeading___Toc2644_2311437734" office:name="Задание 3" text:style-name="Index_20_Link" text:visited-style-name="Index_20_Link">Задание 3<text:tab/>6</text:a></text:p>
          <text:p text:style-name="P15"><text:a xlink:type="simple" xlink:href="#__RefHeading___Toc2646_2311437734" office:name="Задание 4" text:style-name="Index_20_Link" text:visited-style-name="Index_20_Link">Задание 4<text:tab/>8</text:a></text:p>
          <text:p text:style-name="P15"><text:a xlink:type="simple" xlink:href="#__RefHeading___Toc2648_2311437734" office:name="Задание 5" text:style-name="Index_20_Link" text:visited-style-name="Index_20_Link">Задание 5<text:tab/>9</text:a></text:p>
          <text:p text:style-name="P14"><text:a xlink:type="simple" xlink:href="#__RefHeading___Toc143_2058273410%20Copy%201" office:name="ЗАКЛЮЧЕНИЕ" text:style-name="Index_20_Link" text:visited-style-name="Index_20_Link">ЗАКЛЮЧЕНИЕ<text:tab/>10</text:a></text:p>
        </text:index-body>
      </text:table-of-content>
      <text:p text:style-name="P13"/>
      <text:h text:style-name="P16" text:outline-level="1"><text:bookmark-start text:name="__RefHeading___Toc82_2058273410"/>ВВЕДЕНИЕ<text:bookmark-end text:name="__RefHeading___Toc82_2058273410"/></text:h>
      <text:p text:style-name="P17"><text:span text:style-name="T6">Цель работы</text:span> — <text:span text:style-name="T4">п</text:span>олучение навыков написание процедур, функций и триггеров в БД<text:span text:style-name="T4">.</text:span></text:p>
      <text:p text:style-name="P18"/>
      <text:p text:style-name="P18"/>
      <text:h text:style-name="P19" text:outline-level="1"><text:bookmark-start text:name="__RefHeading___Toc143_2058273410"/>ХОД РАБОТЫ<text:bookmark-end text:name="__RefHeading___Toc143_2058273410"/></text:h>
      <text:p text:style-name="P20">В данной лабораторной работе для взаимодействия с базой данных PostgreSQL будем использовать утилиту psql на ОС Linux. Для создания и подключения к локальной базе данных создадим файл lab<text:span text:style-name="T7">3</text:span>.sql и впишем в него все команды для создания базы данных <text:span text:style-name="T8">и отправки команд</text:span><text:span text:style-name="T9"> из</text:span> методическо<text:span text:style-name="T9">го </text:span>материал<text:span text:style-name="T9">а</text:span>. Для подключения к базе данных используем команду:</text:p>
      <text:p text:style-name="P21">psql -U postgres -f lab<text:span text:style-name="T10">3</text:span>.sql</text:p>
      <text:p text:style-name="P22">Для решения задач была создана база данных с информацией об оперативной памяти и е<text:span text:style-name="T11">ё</text:span> продажах:</text:p>
      <text:p text:style-name="P23">-- Таблица товаров</text:p>
      <text:p text:style-name="P24"><text:span text:style-name="T12">CREATE</text:span><text:span text:style-name="T13"> </text:span><text:span text:style-name="T12">TABLE</text:span><text:span text:style-name="T13"> rams (</text:span></text:p>
      <text:p text:style-name="P24"><text:span text:style-name="T13"><text:s text:c="2"/>id SERIAL </text:span><text:span text:style-name="T12">PRIMARY</text:span><text:span text:style-name="T13"> </text:span><text:span text:style-name="T12">KEY</text:span><text:span text:style-name="T13">,</text:span></text:p>
      <text:p text:style-name="P24"><text:span text:style-name="T13"><text:s text:c="2"/>name TEXT,</text:span><text:span text:style-name="T14"/></text:p>
      <text:p text:style-name="P24"><text:span text:style-name="T13"><text:s text:c="2"/>standard VARCHAR(10),</text:span><text:span text:style-name="T14"/></text:p>
      <text:p text:style-name="P24"><text:span text:style-name="T13"><text:s text:c="2"/>price NUMERIC,</text:span><text:span text:style-name="T14"/></text:p>
      <text:p text:style-name="P24"><text:span text:style-name="T13"><text:s text:c="2"/>total_sales_sum NUMERIC </text:span><text:span text:style-name="T12">DEFAULT</text:span><text:span text:style-name="T13"> 0</text:span></text:p>
      <text:p text:style-name="P25">);<text:span text:style-name="T14"/></text:p>
      <text:p text:style-name="P25"/>
      <text:p text:style-name="P23">-- Таблица продаж</text:p>
      <text:p text:style-name="P24"><text:span text:style-name="T12">CREATE</text:span><text:span text:style-name="T13"> </text:span><text:span text:style-name="T12">TABLE</text:span><text:span text:style-name="T13"> sales (</text:span></text:p>
      <text:p text:style-name="P24"><text:span text:style-name="T13"><text:s text:c="2"/>id SERIAL </text:span><text:span text:style-name="T12">PRIMARY</text:span><text:span text:style-name="T13"> </text:span><text:span text:style-name="T12">KEY</text:span><text:span text:style-name="T13">,</text:span></text:p>
      <text:p text:style-name="P24"><text:span text:style-name="T13"><text:s text:c="2"/>ram_id INT </text:span><text:span text:style-name="T12">REFERENCES</text:span><text:span text:style-name="T13"> rams(id),</text:span></text:p>
      <text:p text:style-name="P24"><text:span text:style-name="T13"><text:s text:c="2"/>amount NUMERIC,</text:span><text:span text:style-name="T14"/></text:p>
      <text:p text:style-name="P24"><text:span text:style-name="T13"><text:s text:c="2"/>sale_date </text:span><text:span text:style-name="T12">TIMESTAMP</text:span><text:span text:style-name="T13"> </text:span><text:span text:style-name="T12">DEFAULT</text:span><text:span text:style-name="T13"> </text:span><text:span text:style-name="T12">CURRENT_TIMESTAMP</text:span></text:p>
      <text:p text:style-name="P25">);</text:p>
      <text:p text:style-name="P26"/>
      <text:h text:style-name="P27" text:outline-level="2"><text:bookmark-start text:name="__RefHeading___Toc2640_2311437734"/>Задание 1<text:bookmark-end text:name="__RefHeading___Toc2640_2311437734"/></text:h>
      <text:p text:style-name="P28"><text:span text:style-name="T15">Создадим функцию, которая будет пересчитывать сумму продаж для всех лотов оперативной памяти и будет обновлять поле </text:span>total_sales_sum<text:span text:style-name="T15"> в таблице products:</text:span></text:p>
      <text:p text:style-name="P29"><text:span text:style-name="T12">CREATE</text:span><text:span text:style-name="T13"> </text:span><text:span text:style-name="T12">OR</text:span><text:span text:style-name="T13"> </text:span><text:span text:style-name="T12">REPLACE</text:span><text:span text:style-name="T13"> </text:span><text:span text:style-name="T12">FUNCTION</text:span><text:span text:style-name="T13"> refresh_total_sales() </text:span><text:span text:style-name="T12">RETURNS</text:span><text:span text:style-name="T13"> void </text:span><text:span text:style-name="T12">AS</text:span><text:span text:style-name="T13"> $$</text:span></text:p>
      <text:p text:style-name="P30">BEGIN<text:span text:style-name="T14"/></text:p>
      <text:p text:style-name="P29"><text:span text:style-name="T13"><text:s text:c="2"/></text:span><text:span text:style-name="T12">UPDATE</text:span><text:span text:style-name="T13"> rams </text:span><text:span text:style-name="T12">AS</text:span><text:span text:style-name="T13"> p</text:span></text:p>
      <text:p text:style-name="P29"><text:span text:style-name="T13"><text:s text:c="2"/></text:span><text:span text:style-name="T12">SET</text:span><text:span text:style-name="T13"> total_sales_sum = (</text:span></text:p>
      <text:p text:style-name="P29"><text:span text:style-name="T13"><text:s text:c="4"/></text:span><text:span text:style-name="T12">SELECT</text:span><text:span text:style-name="T13"> </text:span><text:span text:style-name="T12">SUM</text:span><text:span text:style-name="T13">(amount)</text:span></text:p>
      <text:p text:style-name="P29"><text:span text:style-name="T13"><text:s text:c="4"/></text:span><text:span text:style-name="T12">FROM</text:span><text:span text:style-name="T13"> sales </text:span><text:span text:style-name="T12">AS</text:span><text:span text:style-name="T13"> s </text:span><text:span text:style-name="T12">WHERE</text:span><text:span text:style-name="T13"> p.id = s.ram_id</text:span></text:p>
      <text:p text:style-name="P29"><text:span text:style-name="T13"><text:s text:c="2"/>);</text:span><text:span text:style-name="T14"/></text:p>
      <text:p text:style-name="P29"><text:span text:style-name="T12">END</text:span><text:span text:style-name="T13">;</text:span></text:p>
      <text:p text:style-name="P29"><text:span text:style-name="T13">$$ </text:span><text:span text:style-name="T12">LANGUAGE</text:span><text:span text:style-name="T13"> plpgsql;</text:span></text:p>
      <text:p text:style-name="P31"/>
      <text:p text:style-name="P31">Для примера вот вывод таблицы с данными таблицы rams до и после вызова функции refresh_total_sales:</text:p>
      <text:p text:style-name="P32"><text:s/>id | <text:s/>name <text:s text:c="2"/>| standard | price | total_sales_sum </text:p>
      <text:p text:style-name="P32">----+---------+----------+-------+-----------------</text:p>
      <text:p text:style-name="P32"><text:s text:c="2"/>1 | ADATA <text:s text:c="2"/>| ddr3 <text:s text:c="4"/>| 22000 | <text:s text:c="14"/>0</text:p>
      <text:p text:style-name="P32"><text:s text:c="2"/>2 | HYPERX <text:s/>| ddr4 <text:s text:c="4"/>| 45000 | <text:s text:c="14"/>0</text:p>
      <text:p text:style-name="P32"><text:s text:c="2"/>3 | CRUCIAL | ddr5 <text:s text:c="4"/>| 70000 | <text:s text:c="14"/>0</text:p>
      <text:p text:style-name="P32">(3 rows)</text:p>
      <text:p text:style-name="P32"/>
      <text:p text:style-name="P32"><text:s/>refresh_total_sales </text:p>
      <text:p text:style-name="P32">---------------------</text:p>
      <text:p text:style-name="P32"><text:s/></text:p>
      <text:p text:style-name="P32">(1 row)</text:p>
      <text:p text:style-name="P32"/>
      <text:p text:style-name="P32"><text:s/>id | <text:s/>name <text:s text:c="2"/>| standard | price | total_sales_sum </text:p>
      <text:p text:style-name="P32">----+---------+----------+-------+-----------------</text:p>
      <text:p text:style-name="P32"><text:s text:c="2"/>1 | ADATA <text:s text:c="2"/>| ddr3 <text:s text:c="4"/>| 22000 | <text:s text:c="10"/>32000</text:p>
      <text:p text:style-name="P32"><text:s text:c="2"/>2 | HYPERX <text:s/>| ddr4 <text:s text:c="4"/>| 45000 | <text:s text:c="11"/>1000</text:p>
      <text:p text:style-name="P32"><text:s text:c="2"/>3 | CRUCIAL | ddr5 <text:s text:c="4"/>| 70000 | <text:s text:c="11"/>7000</text:p>
      <text:p text:style-name="P32">(3 rows)</text:p>
      <text:p text:style-name="P31"/>
      <text:h text:style-name="P27" text:outline-level="2"><text:bookmark-start text:name="__RefHeading___Toc2642_2311437734"/>Задание 2<text:bookmark-end text:name="__RefHeading___Toc2642_2311437734"/></text:h>
      <text:p text:style-name="P26">Создадим триггер, который будет реагировать на вставку новых строк в таблицу sales и будет выполнять <text:span text:style-name="T16">то же действие, что в задании 1</text:span>:</text:p>
      <text:p text:style-name="P29"><text:span text:style-name="T12">CREATE</text:span><text:span text:style-name="T13"> </text:span><text:span text:style-name="T12">OR</text:span><text:span text:style-name="T13"> </text:span><text:span text:style-name="T12">REPLACE</text:span><text:span text:style-name="T13"> </text:span><text:span text:style-name="T12">FUNCTION</text:span><text:span text:style-name="T13"> trigger_update_stock() </text:span><text:span text:style-name="T12">RETURNS</text:span><text:span text:style-name="T13"> </text:span><text:span text:style-name="T12">trigger</text:span><text:span text:style-name="T13"> </text:span><text:span text:style-name="T12">AS</text:span><text:span text:style-name="T13"> $$</text:span></text:p>
      <text:p text:style-name="P30">BEGIN<text:span text:style-name="T14"/></text:p>
      <text:p text:style-name="P29"><text:span text:style-name="T13"><text:s text:c="2"/></text:span><text:span text:style-name="T12">UPDATE</text:span><text:span text:style-name="T13"> rams </text:span><text:span text:style-name="T12">SET</text:span><text:span text:style-name="T13"> total_sales_sum = total_sales_sum + </text:span><text:span text:style-name="T12">NEW</text:span><text:span text:style-name="T13">.amount</text:span></text:p>
      <text:p text:style-name="P29"><text:span text:style-name="T13"><text:s text:c="2"/></text:span><text:span text:style-name="T12">WHERE</text:span><text:span text:style-name="T13"> id = </text:span><text:span text:style-name="T12">NEW</text:span><text:span text:style-name="T13">.ram_id;</text:span></text:p>
      <text:p text:style-name="P29"><text:span text:style-name="T13"><text:s text:c="2"/></text:span><text:span text:style-name="T12">RETURN</text:span><text:span text:style-name="T13"> </text:span><text:span text:style-name="T12">NEW</text:span><text:span text:style-name="T13">;</text:span></text:p>
      <text:p text:style-name="P29"><text:span text:style-name="T12">END</text:span><text:span text:style-name="T13">;</text:span></text:p>
      <text:p text:style-name="P29"><text:span text:style-name="T13">$$ </text:span><text:span text:style-name="T12">LANGUAGE</text:span><text:span text:style-name="T13"> plpgsql;</text:span></text:p>
      <text:p text:style-name="P33"/>
      <text:p text:style-name="P29"><text:span text:style-name="T12">CREATE</text:span><text:span text:style-name="T13"> </text:span><text:span text:style-name="T12">TRIGGER</text:span><text:span text:style-name="T13"> trigger_after_insert_sale </text:span><text:span text:style-name="T12">AFTER</text:span><text:span text:style-name="T13"> </text:span><text:span text:style-name="T12">INSERT</text:span></text:p>
      <text:p text:style-name="P29"><text:span text:style-name="T12">ON</text:span><text:span text:style-name="T13"> sales </text:span><text:span text:style-name="T12">FOR</text:span><text:span text:style-name="T13"> </text:span><text:span text:style-name="T12">EACH</text:span><text:span text:style-name="T13"> </text:span><text:span text:style-name="T12">ROW</text:span><text:span text:style-name="T13"> </text:span><text:span text:style-name="T12">EXECUTE</text:span><text:span text:style-name="T13"> </text:span><text:span text:style-name="T12">PROCEDURE</text:span><text:span text:style-name="T13"> trigger_update_stock();</text:span></text:p>
      <text:p text:style-name="P34"/>
      <text:p text:style-name="P34">Пример работы триггера при вставке новой продажи в таблицу sales:</text:p>
      <text:p text:style-name="P35"><text:s/>id | <text:s/>name <text:s text:c="2"/>| standard | price | total_sales_sum </text:p>
      <text:p text:style-name="P35">----+---------+----------+-------+-----------------</text:p>
      <text:p text:style-name="P35"><text:s text:c="2"/>1 | ADATA <text:s text:c="2"/>| ddr3 <text:s text:c="4"/>| 22000 | <text:s text:c="10"/>32000</text:p>
      <text:p text:style-name="P35"><text:s text:c="2"/>2 | HYPERX <text:s/>| ddr4 <text:s text:c="4"/>| 45000 | <text:s text:c="11"/>1000<text:span text:style-name="T17"/></text:p>
      <text:p text:style-name="P35"><text:s text:c="2"/>3 | CRUCIAL | ddr5 <text:s text:c="4"/>| 70000 | <text:s text:c="11"/>4000<text:span text:style-name="T17"/></text:p>
      <text:p text:style-name="P35">(3 rows)</text:p>
      <text:p text:style-name="P35"/>
      <text:p text:style-name="P35">INSERT 0 1</text:p>
      <text:p text:style-name="P35"><text:s/>id | <text:s/>name <text:s text:c="2"/>| standard | price | total_sales_sum </text:p>
      <text:p text:style-name="P35">----+---------+----------+-------+-----------------</text:p>
      <text:p text:style-name="P35"><text:s text:c="2"/>1 | ADATA <text:s text:c="2"/>| ddr3 <text:s text:c="4"/>| 22000 | <text:s text:c="10"/>32000</text:p>
      <text:p text:style-name="P35"><text:s text:c="2"/>2 | HYPERX <text:s/>| ddr4 <text:s text:c="4"/>| 45000 | <text:s text:c="11"/>1000<text:span text:style-name="T17"/></text:p>
      <text:p text:style-name="P35"><text:s text:c="2"/>3 | CRUCIAL | ddr5 <text:s text:c="4"/>| 70000 | <text:s text:c="11"/>7000<text:span text:style-name="T17"/></text:p>
      <text:p text:style-name="P35">(3 rows)</text:p>
      <text:p text:style-name="P31"/>
      <text:p text:style-name="P31"/>
      <text:h text:style-name="P27" text:outline-level="2"><text:bookmark-start text:name="__RefHeading___Toc2644_2311437734"/>Задание 3<text:bookmark-end text:name="__RefHeading___Toc2644_2311437734"/></text:h>
      <text:p text:style-name="P36">Создадим триггер, который будет будет добавлять данные с продажей в зависимости от года. Продажи 2024 и 2025 года будут отправляться в разные таблицы (sales_2024 и sales_2025), которые будут наследовать родительскую sales:</text:p>
      <text:p text:style-name="P37"><text:span text:style-name="T12">CREATE</text:span><text:span text:style-name="T13"> </text:span><text:span text:style-name="T12">TABLE</text:span><text:span text:style-name="T13"> sales_2024 (</text:span><text:span text:style-name="T12">CHECK</text:span><text:span text:style-name="T13"> (sale_date &gt;= </text:span><text:span text:style-name="T18">'2024-01-01'</text:span><text:span text:style-name="T13"> </text:span><text:span text:style-name="T12">AND</text:span><text:span text:style-name="T13"> sale_date &lt; </text:span><text:span text:style-name="T18">'2025-01-01'</text:span><text:span text:style-name="T13">)) </text:span><text:span text:style-name="T12">INHERITS</text:span><text:span text:style-name="T13"> (sales);</text:span></text:p>
      <text:p text:style-name="P37"><text:span text:style-name="T12">CREATE</text:span><text:span text:style-name="T13"> </text:span><text:span text:style-name="T12">TABLE</text:span><text:span text:style-name="T13"> sales_2025 (</text:span><text:span text:style-name="T12">CHECK</text:span><text:span text:style-name="T13"> (sale_date &gt;= </text:span><text:span text:style-name="T18">'2025-01-01'</text:span><text:span text:style-name="T13"> </text:span><text:span text:style-name="T12">AND</text:span><text:span text:style-name="T13"> sale_date &lt; </text:span><text:span text:style-name="T18">'2026-01-01'</text:span><text:span text:style-name="T13">)) </text:span><text:span text:style-name="T12">INHERITS</text:span><text:span text:style-name="T13"> (sales);</text:span></text:p>
      <text:p text:style-name="P38"/>
      <text:p text:style-name="P37"><text:span text:style-name="T12">CREATE</text:span><text:span text:style-name="T13"> </text:span><text:span text:style-name="T12">OR</text:span><text:span text:style-name="T13"> </text:span><text:span text:style-name="T12">REPLACE</text:span><text:span text:style-name="T13"> </text:span><text:span text:style-name="T12">FUNCTION</text:span><text:span text:style-name="T13"> trigger_route_by_year() </text:span><text:span text:style-name="T12">RETURNS</text:span><text:span text:style-name="T13"> </text:span><text:span text:style-name="T12">trigger</text:span><text:span text:style-name="T13"> </text:span><text:span text:style-name="T12">AS</text:span><text:span text:style-name="T13"> $$</text:span></text:p>
      <text:p text:style-name="P39">BEGIN<text:span text:style-name="T14"/></text:p>
      <text:p text:style-name="P37"><text:span text:style-name="T13"><text:s text:c="2"/></text:span><text:span text:style-name="T12">IF</text:span><text:span text:style-name="T13"> (</text:span><text:span text:style-name="T12">NEW</text:span><text:span text:style-name="T13">.sale_date &gt;= </text:span><text:span text:style-name="T18">'2024-01-01'</text:span><text:span text:style-name="T13"> </text:span><text:span text:style-name="T12">AND</text:span><text:span text:style-name="T13"> </text:span><text:span text:style-name="T12">NEW</text:span><text:span text:style-name="T13">.sale_date &lt; </text:span><text:span text:style-name="T18">'2025-01-01'</text:span><text:span text:style-name="T13">) </text:span><text:span text:style-name="T12">THEN</text:span></text:p>
      <text:p text:style-name="P37"><text:span text:style-name="T13"><text:s text:c="4"/></text:span><text:span text:style-name="T12">INSERT</text:span><text:span text:style-name="T13"> </text:span><text:span text:style-name="T12">INTO</text:span><text:span text:style-name="T13"> sales_2024 </text:span><text:span text:style-name="T12">VALUES</text:span><text:span text:style-name="T13"> (</text:span><text:span text:style-name="T12">NEW</text:span><text:span text:style-name="T13">.*);</text:span></text:p>
      <text:p text:style-name="P37"><text:span text:style-name="T13"><text:s text:c="2"/></text:span><text:span text:style-name="T12">ELSIF</text:span><text:span text:style-name="T13"> (</text:span><text:span text:style-name="T12">NEW</text:span><text:span text:style-name="T13">.sale_date &gt;= </text:span><text:span text:style-name="T18">'2025-01-01'</text:span><text:span text:style-name="T13"> </text:span><text:span text:style-name="T12">AND</text:span><text:span text:style-name="T13"> </text:span><text:span text:style-name="T12">NEW</text:span><text:span text:style-name="T13">.sale_date &lt; </text:span><text:span text:style-name="T18">'2026-01-01'</text:span><text:span text:style-name="T13">) </text:span><text:span text:style-name="T12">THEN</text:span></text:p>
      <text:p text:style-name="P37"><text:span text:style-name="T13"><text:s text:c="4"/></text:span><text:span text:style-name="T12">INSERT</text:span><text:span text:style-name="T13"> </text:span><text:span text:style-name="T12">INTO</text:span><text:span text:style-name="T13"> sales_2025 </text:span><text:span text:style-name="T12">VALUES</text:span><text:span text:style-name="T13"> (</text:span><text:span text:style-name="T12">NEW</text:span><text:span text:style-name="T13">.*);</text:span></text:p>
      <text:p text:style-name="P37"><text:span text:style-name="T13"><text:s text:c="2"/></text:span><text:span text:style-name="T12">ELSE</text:span></text:p>
      <text:p text:style-name="P37"><text:span text:style-name="T13"><text:s text:c="4"/>RAISE </text:span><text:span text:style-name="T12">EXCEPTION</text:span><text:span text:style-name="T13"> </text:span><text:span text:style-name="T18">'Дата вне поддерживаемого диапазона'</text:span><text:span text:style-name="T13">;</text:span></text:p>
      <text:p text:style-name="P37"><text:span text:style-name="T13"><text:s text:c="2"/></text:span><text:span text:style-name="T12">END</text:span><text:span text:style-name="T13"> </text:span><text:span text:style-name="T12">IF</text:span><text:span text:style-name="T13">;</text:span></text:p>
      <text:p text:style-name="P37"><text:span text:style-name="T13"><text:s text:c="2"/></text:span><text:span text:style-name="T12">RETURN</text:span><text:span text:style-name="T13"> </text:span><text:span text:style-name="T12">NULL</text:span><text:span text:style-name="T13">;</text:span></text:p>
      <text:p text:style-name="P37"><text:span text:style-name="T12">END</text:span><text:span text:style-name="T13">;</text:span></text:p>
      <text:p text:style-name="P37"><text:span text:style-name="T13">$$ </text:span><text:span text:style-name="T12">LANGUAGE</text:span><text:span text:style-name="T13"> plpgsql;</text:span></text:p>
      <text:p text:style-name="P38"/>
      <text:p text:style-name="P37"><text:span text:style-name="T12">CREATE</text:span><text:span text:style-name="T13"> </text:span><text:span text:style-name="T12">TRIGGER</text:span><text:span text:style-name="T13"> trigger_sales_partitioning</text:span></text:p>
      <text:p text:style-name="P37"><text:span text:style-name="T12">BEFORE</text:span><text:span text:style-name="T13"> </text:span><text:span text:style-name="T12">INSERT</text:span><text:span text:style-name="T13"> </text:span><text:span text:style-name="T12">ON</text:span><text:span text:style-name="T13"> sales</text:span></text:p>
      <text:p text:style-name="P37"><text:span text:style-name="T12">FOR</text:span><text:span text:style-name="T13"> </text:span><text:span text:style-name="T12">EACH</text:span><text:span text:style-name="T13"> </text:span><text:span text:style-name="T12">ROW</text:span><text:span text:style-name="T13"> </text:span><text:span text:style-name="T12">EXECUTE</text:span><text:span text:style-name="T13"> </text:span><text:span text:style-name="T12">PROCEDURE</text:span><text:span text:style-name="T13"> trigger_route_by_year();</text:span></text:p>
      <text:p text:style-name="P36"/>
      <text:p text:style-name="P36">Пример работы триггера при добавлении продажи 2025 года:</text:p>
      <text:p text:style-name="P40">sales</text:p>
      <text:p text:style-name="P40"><text:s/>id | ram_id | amount | <text:s text:c="5"/>sale_date <text:s text:c="5"/></text:p>
      <text:p text:style-name="P40">----+--------+--------+---------------------</text:p>
      <text:p text:style-name="P40"><text:s text:c="2"/>1 | <text:s text:c="5"/>1 | <text:s/>22000 | 2024-10-10 10:00:00</text:p>
      <text:p text:style-name="P40"><text:s text:c="2"/>2 | <text:s text:c="5"/>1 | <text:s/>10000 | 2024-11-12 12:00:00</text:p>
      <text:p text:style-name="P40"><text:s text:c="2"/>3 | <text:s text:c="5"/>2 | <text:s text:c="2"/>1000 | 2024-11-12 12:00:00</text:p>
      <text:p text:style-name="P40"><text:s text:c="2"/>4 | <text:s text:c="5"/>3 | <text:s text:c="2"/>4000 | 2024-11-12 12:00:00</text:p>
      <text:p text:style-name="P40">(4 rows)</text:p>
      <text:p text:style-name="P40"/>
      <text:p text:style-name="P40">INSERT 0 0</text:p>
      <text:p text:style-name="P40"/>
      <text:p text:style-name="P40">sales</text:p>
      <text:p text:style-name="P40"><text:s/>id | ram_id | amount | <text:s text:c="5"/>sale_date <text:s text:c="5"/></text:p>
      <text:p text:style-name="P40">----+--------+--------+---------------------</text:p>
      <text:p text:style-name="P40"><text:s text:c="2"/>1 | <text:s text:c="5"/>1 | <text:s/>22000 | 2024-10-10 10:00:00</text:p>
      <text:p text:style-name="P40"><text:s text:c="2"/>2 | <text:s text:c="5"/>1 | <text:s/>10000 | 2024-11-12 12:00:00</text:p>
      <text:p text:style-name="P40"><text:s text:c="2"/>3 | <text:s text:c="5"/>2 | <text:s text:c="2"/>1000 | 2024-11-12 12:00:00</text:p>
      <text:p text:style-name="P40"><text:s text:c="2"/>4 | <text:s text:c="5"/>3 | <text:s text:c="2"/>4000 | 2024-11-12 12:00:00</text:p>
      <text:p text:style-name="P40">(4 rows)</text:p>
      <text:p text:style-name="P40"/>
      <text:p text:style-name="P40">sales_2024</text:p>
      <text:p text:style-name="P40"><text:s/>id | ram_id | amount | sale_date </text:p>
      <text:p text:style-name="P40">----+--------+--------+-----------</text:p>
      <text:p text:style-name="P40">(0 rows)</text:p>
      <text:p text:style-name="P40"/>
      <text:p text:style-name="P40"><text:soft-page-break/>sales_2025</text:p>
      <text:p text:style-name="P40"><text:s/>id | ram_id | amount | <text:s text:c="5"/>sale_date <text:s text:c="5"/></text:p>
      <text:p text:style-name="P40">----+--------+--------+---------------------</text:p>
      <text:p text:style-name="P40"><text:s text:c="2"/>5 | <text:s text:c="5"/>3 | <text:s text:c="2"/>3000 | 2025-02-02 00:00:00</text:p>
      <text:p text:style-name="P40">(1 row)</text:p>
      <text:p text:style-name="P36"/>
      <text:p text:style-name="P36"/>
      <text:h text:style-name="P27" text:outline-level="2"><text:bookmark-start text:name="__RefHeading___Toc2646_2311437734"/>Задание 4<text:bookmark-end text:name="__RefHeading___Toc2646_2311437734"/></text:h>
      <text:p text:style-name="P36">Создадим триггер, <text:span text:style-name="T19">который будет реагировать на вставку данных в таблицу rams и проверять стандарт памяти. Если добавляемого стандарта нет в таблице ram_standards, то значение standard у нового поля будет подменяться на 'undefined':</text:span></text:p>
      <text:p text:style-name="P37"><text:span text:style-name="T12">CREATE</text:span><text:span text:style-name="T13"> </text:span><text:span text:style-name="T12">TABLE</text:span><text:span text:style-name="T13"> ram_standards (</text:span></text:p>
      <text:p text:style-name="P37"><text:span text:style-name="T13"><text:s text:c="2"/>id SERIAL </text:span><text:span text:style-name="T12">PRIMARY</text:span><text:span text:style-name="T13"> </text:span><text:span text:style-name="T12">KEY</text:span><text:span text:style-name="T13">,</text:span></text:p>
      <text:p text:style-name="P37"><text:span text:style-name="T13"><text:s text:c="2"/>name VARCHAR(5)</text:span><text:span text:style-name="T14"/></text:p>
      <text:p text:style-name="P38">);<text:span text:style-name="T14"/></text:p>
      <text:p text:style-name="P37"><text:span text:style-name="T12">INSERT</text:span><text:span text:style-name="T13"> </text:span><text:span text:style-name="T12">INTO</text:span><text:span text:style-name="T13"> ram_standards (name) </text:span><text:span text:style-name="T12">VALUES</text:span></text:p>
      <text:p text:style-name="P37"><text:span text:style-name="T13">(</text:span><text:span text:style-name="T18">'ddr3'</text:span><text:span text:style-name="T13">),</text:span></text:p>
      <text:p text:style-name="P37"><text:span text:style-name="T13">(</text:span><text:span text:style-name="T18">'ddr4'</text:span><text:span text:style-name="T13">),</text:span></text:p>
      <text:p text:style-name="P37"><text:span text:style-name="T13">(</text:span><text:span text:style-name="T18">'ddr5'</text:span><text:span text:style-name="T13">);</text:span></text:p>
      <text:p text:style-name="P38"/>
      <text:p text:style-name="P37"><text:span text:style-name="T12">CREATE</text:span><text:span text:style-name="T13"> </text:span><text:span text:style-name="T12">OR</text:span><text:span text:style-name="T13"> </text:span><text:span text:style-name="T12">REPLACE</text:span><text:span text:style-name="T13"> </text:span><text:span text:style-name="T12">FUNCTION</text:span><text:span text:style-name="T13"> trigger_check_standard() </text:span><text:span text:style-name="T12">RETURNS</text:span><text:span text:style-name="T13"> </text:span><text:span text:style-name="T12">trigger</text:span><text:span text:style-name="T13"> </text:span><text:span text:style-name="T12">AS</text:span><text:span text:style-name="T13"> $$</text:span></text:p>
      <text:p text:style-name="P39">BEGIN<text:span text:style-name="T14"/></text:p>
      <text:p text:style-name="P37"><text:span text:style-name="T13"><text:s text:c="2"/></text:span><text:span text:style-name="T12">IF</text:span><text:span text:style-name="T13"> </text:span><text:span text:style-name="T12">NEW</text:span><text:span text:style-name="T13">.standard </text:span><text:span text:style-name="T12">NOT</text:span><text:span text:style-name="T13"> </text:span><text:span text:style-name="T12">IN</text:span><text:span text:style-name="T13"> (</text:span><text:span text:style-name="T12">SELECT</text:span><text:span text:style-name="T13"> name </text:span><text:span text:style-name="T12">FROM</text:span><text:span text:style-name="T13"> ram_standards) </text:span><text:span text:style-name="T12">THEN</text:span></text:p>
      <text:p text:style-name="P37"><text:span text:style-name="T13"><text:s text:c="4"/></text:span><text:span text:style-name="T12">NEW</text:span><text:span text:style-name="T13">.standard := </text:span><text:span text:style-name="T18">'undefined'</text:span><text:span text:style-name="T13">;</text:span></text:p>
      <text:p text:style-name="P37"><text:span text:style-name="T13"><text:s text:c="2"/></text:span><text:span text:style-name="T12">END</text:span><text:span text:style-name="T13"> </text:span><text:span text:style-name="T12">IF</text:span><text:span text:style-name="T13">;</text:span></text:p>
      <text:p text:style-name="P37"><text:span text:style-name="T13"><text:s text:c="2"/></text:span><text:span text:style-name="T12">RETURN</text:span><text:span text:style-name="T13"> </text:span><text:span text:style-name="T12">NEW</text:span><text:span text:style-name="T13">;</text:span></text:p>
      <text:p text:style-name="P37"><text:span text:style-name="T12">END</text:span><text:span text:style-name="T13">;</text:span></text:p>
      <text:p text:style-name="P37"><text:span text:style-name="T13">$$ </text:span><text:span text:style-name="T12">LANGUAGE</text:span><text:span text:style-name="T13"> plpgsql;</text:span></text:p>
      <text:p text:style-name="P38"/>
      <text:p text:style-name="P37"><text:span text:style-name="T12">CREATE</text:span><text:span text:style-name="T13"> </text:span><text:span text:style-name="T12">TRIGGER</text:span><text:span text:style-name="T13"> <text:s/>trigger_standard</text:span></text:p>
      <text:p text:style-name="P37"><text:span text:style-name="T12">BEFORE</text:span><text:span text:style-name="T13"> </text:span><text:span text:style-name="T12">INSERT</text:span><text:span text:style-name="T13"> </text:span><text:span text:style-name="T12">ON</text:span><text:span text:style-name="T13"> rams</text:span></text:p>
      <text:p text:style-name="P37"><text:span text:style-name="T12">FOR</text:span><text:span text:style-name="T13"> </text:span><text:span text:style-name="T12">EACH</text:span><text:span text:style-name="T13"> </text:span><text:span text:style-name="T12">ROW</text:span><text:span text:style-name="T13"> </text:span><text:span text:style-name="T12">EXECUTE</text:span><text:span text:style-name="T13"> </text:span><text:span text:style-name="T12">PROCEDURE</text:span><text:span text:style-name="T13"> trigger_check_standard();</text:span></text:p>
      <text:p text:style-name="P36"/>
      <text:p text:style-name="P41">Пример работы триггера при добавлении несуществующего стандарта памяти:</text:p>
      <text:p text:style-name="P42">INSERT 0 1</text:p>
      <text:p text:style-name="P42"><text:s/>id | <text:s text:c="2"/>name <text:s text:c="3"/>| standard <text:s/>| price | total_sales_sum </text:p>
      <text:p text:style-name="P42">----+-----------+-----------+-------+-----------------</text:p>
      <text:p text:style-name="P42"><text:s text:c="2"/>1 | ADATA <text:s text:c="4"/>| ddr3 <text:s text:c="5"/>| 22000 | <text:s text:c="14"/>0</text:p>
      <text:p text:style-name="P42"><text:s text:c="2"/>2 | HYPERX <text:s text:c="3"/>| ddr4 <text:s text:c="5"/>| 45000 | <text:s text:c="14"/>0</text:p>
      <text:p text:style-name="P42"><text:s text:c="2"/>3 | CRUCIAL <text:s text:c="2"/>| ddr5 <text:s text:c="5"/>| 70000 | <text:s text:c="14"/>0</text:p>
      <text:p text:style-name="P42"><text:s text:c="2"/>4 | ATERMITER | undefined | <text:s/>1000 | <text:s text:c="14"/>0</text:p>
      <text:p text:style-name="P42">(4 rows)</text:p>
      <text:p text:style-name="P36"/>
      <text:p text:style-name="P36"/>
      <text:h text:style-name="P43" text:outline-level="2"><text:bookmark-start text:name="__RefHeading___Toc2648_2311437734"/>Задание 5<text:bookmark-end text:name="__RefHeading___Toc2648_2311437734"/></text:h>
      <text:p text:style-name="P41">Создадим триггер, который будет реагировать на события INSERT, UPDATE и DELETE с таблицей <text:span text:style-name="T20">ram</text:span><text:span text:style-name="T21">s</text:span> и в зависимости от события будет записывать в таблицу audit_log разные логи, соответствующие своему событию:</text:p>
      <text:p text:style-name="P44"><text:span text:style-name="T12">CREATE</text:span><text:span text:style-name="T13"> </text:span><text:span text:style-name="T12">TABLE</text:span><text:span text:style-name="T13"> audit_log (</text:span></text:p>
      <text:p text:style-name="P44"><text:span text:style-name="T13"><text:s text:c="4"/>id SERIAL </text:span><text:span text:style-name="T12">PRIMARY</text:span><text:span text:style-name="T13"> </text:span><text:span text:style-name="T12">KEY</text:span><text:span text:style-name="T13">,</text:span></text:p>
      <text:p text:style-name="P44"><text:span text:style-name="T13"><text:s text:c="4"/></text:span><text:span text:style-name="T12">table_name</text:span><text:span text:style-name="T13"> TEXT,</text:span></text:p>
      <text:p text:style-name="P44"><text:span text:style-name="T13"><text:s text:c="4"/></text:span><text:span text:style-name="T12">operation</text:span><text:span text:style-name="T13"> TEXT,</text:span></text:p>
      <text:p text:style-name="P44"><text:span text:style-name="T13"><text:s text:c="4"/>old_data JSONB,</text:span><text:span text:style-name="T14"/></text:p>
      <text:p text:style-name="P44"><text:span text:style-name="T13"><text:s text:c="4"/>new_data JSONB,</text:span><text:span text:style-name="T14"/></text:p>
      <text:p text:style-name="P44"><text:span text:style-name="T13"><text:s text:c="4"/>changed_at </text:span><text:span text:style-name="T12">TIMESTAMP</text:span><text:span text:style-name="T13"> </text:span><text:span text:style-name="T12">DEFAULT</text:span><text:span text:style-name="T13"> </text:span><text:span text:style-name="T12">CURRENT_TIMESTAMP</text:span></text:p>
      <text:p text:style-name="P45">);<text:span text:style-name="T14"/></text:p>
      <text:p text:style-name="P45"/>
      <text:p text:style-name="P44"><text:span text:style-name="T12">CREATE</text:span><text:span text:style-name="T13"> </text:span><text:span text:style-name="T12">OR</text:span><text:span text:style-name="T13"> </text:span><text:span text:style-name="T12">REPLACE</text:span><text:span text:style-name="T13"> </text:span><text:span text:style-name="T12">FUNCTION</text:span><text:span text:style-name="T13"> trigger_audit_log() </text:span><text:span text:style-name="T12">RETURNS</text:span><text:span text:style-name="T13"> </text:span><text:span text:style-name="T12">trigger</text:span><text:span text:style-name="T13"> </text:span><text:span text:style-name="T12">AS</text:span><text:span text:style-name="T13"> $$</text:span></text:p>
      <text:p text:style-name="P46">BEGIN<text:span text:style-name="T14"/></text:p>
      <text:p text:style-name="P44"><text:span text:style-name="T13"><text:s text:c="2"/></text:span><text:span text:style-name="T12">IF</text:span><text:span text:style-name="T13"> TG_OP = </text:span><text:span text:style-name="T18">'DELETE'</text:span><text:span text:style-name="T13"> </text:span><text:span text:style-name="T12">THEN</text:span></text:p>
      <text:p text:style-name="P44"><text:span text:style-name="T13"><text:s text:c="4"/></text:span><text:span text:style-name="T12">INSERT</text:span><text:span text:style-name="T13"> </text:span><text:span text:style-name="T12">INTO</text:span><text:span text:style-name="T13"> audit_log (</text:span><text:span text:style-name="T12">table_name</text:span><text:span text:style-name="T13">, </text:span><text:span text:style-name="T12">operation</text:span><text:span text:style-name="T13">, old_data)</text:span></text:p>
      <text:p text:style-name="P44"><text:span text:style-name="T13"><text:s text:c="4"/></text:span><text:span text:style-name="T12">VALUES</text:span><text:span text:style-name="T13"> (TG_TABLE_NAME, TG_OP, to_jsonb(</text:span><text:span text:style-name="T12">OLD</text:span><text:span text:style-name="T13">));</text:span></text:p>
      <text:p text:style-name="P44"><text:span text:style-name="T13"><text:s text:c="4"/></text:span><text:span text:style-name="T12">RETURN</text:span><text:span text:style-name="T13"> </text:span><text:span text:style-name="T12">OLD</text:span><text:span text:style-name="T13">;</text:span></text:p>
      <text:p text:style-name="P44"><text:span text:style-name="T13"><text:s text:c="2"/></text:span><text:span text:style-name="T12">ELSIF</text:span><text:span text:style-name="T13"> TG_OP = </text:span><text:span text:style-name="T18">'UPDATE'</text:span><text:span text:style-name="T13"> </text:span><text:span text:style-name="T12">THEN</text:span></text:p>
      <text:p text:style-name="P44"><text:span text:style-name="T13"><text:s text:c="4"/></text:span><text:span text:style-name="T12">INSERT</text:span><text:span text:style-name="T13"> </text:span><text:span text:style-name="T12">INTO</text:span><text:span text:style-name="T13"> audit_log (</text:span><text:span text:style-name="T12">table_name</text:span><text:span text:style-name="T13">, </text:span><text:span text:style-name="T12">operation</text:span><text:span text:style-name="T13">, old_data, new_data)</text:span></text:p>
      <text:p text:style-name="P44"><text:span text:style-name="T13"><text:s text:c="4"/></text:span><text:span text:style-name="T12">VALUES</text:span><text:span text:style-name="T13"> (TG_TABLE_NAME, TG_OP, to_jsonb(</text:span><text:span text:style-name="T12">OLD</text:span><text:span text:style-name="T13">), to_jsonb(</text:span><text:span text:style-name="T12">NEW</text:span><text:span text:style-name="T13">));</text:span></text:p>
      <text:p text:style-name="P44"><text:span text:style-name="T13"><text:s text:c="4"/></text:span><text:span text:style-name="T12">RETURN</text:span><text:span text:style-name="T13"> </text:span><text:span text:style-name="T12">NEW</text:span><text:span text:style-name="T13">;</text:span></text:p>
      <text:p text:style-name="P44"><text:span text:style-name="T13"><text:s text:c="2"/></text:span><text:span text:style-name="T12">ELSIF</text:span><text:span text:style-name="T13"> TG_OP = </text:span><text:span text:style-name="T18">'INSERT'</text:span><text:span text:style-name="T13"> </text:span><text:span text:style-name="T12">THEN</text:span></text:p>
      <text:p text:style-name="P44"><text:span text:style-name="T13"><text:s text:c="2"/></text:span><text:span text:style-name="T12">INSERT</text:span><text:span text:style-name="T13"> </text:span><text:span text:style-name="T12">INTO</text:span><text:span text:style-name="T13"> audit_log (</text:span><text:span text:style-name="T12">table_name</text:span><text:span text:style-name="T13">, </text:span><text:span text:style-name="T12">operation</text:span><text:span text:style-name="T13">, new_data)</text:span></text:p>
      <text:p text:style-name="P44"><text:span text:style-name="T13"><text:s text:c="2"/></text:span><text:span text:style-name="T12">VALUES</text:span><text:span text:style-name="T13"> (TG_TABLE_NAME, TG_OP, to_jsonb(</text:span><text:span text:style-name="T12">NEW</text:span><text:span text:style-name="T13">));</text:span></text:p>
      <text:p text:style-name="P44"><text:span text:style-name="T13"><text:s text:c="2"/></text:span><text:span text:style-name="T12">RETURN</text:span><text:span text:style-name="T13"> </text:span><text:span text:style-name="T12">NEW</text:span><text:span text:style-name="T13">;</text:span></text:p>
      <text:p text:style-name="P44"><text:span text:style-name="T13"><text:s text:c="2"/></text:span><text:span text:style-name="T12">END</text:span><text:span text:style-name="T13"> </text:span><text:span text:style-name="T12">IF</text:span><text:span text:style-name="T13">;</text:span></text:p>
      <text:p text:style-name="P44"><text:span text:style-name="T13"><text:s text:c="2"/></text:span><text:span text:style-name="T12">RETURN</text:span><text:span text:style-name="T13"> </text:span><text:span text:style-name="T12">NULL</text:span><text:span text:style-name="T13">;</text:span></text:p>
      <text:p text:style-name="P44"><text:span text:style-name="T12">END</text:span><text:span text:style-name="T13">;</text:span></text:p>
      <text:p text:style-name="P44"><text:span text:style-name="T13">$$ </text:span><text:span text:style-name="T12">LANGUAGE</text:span><text:span text:style-name="T13"> plpgsql;</text:span></text:p>
      <text:p text:style-name="P45"/>
      <text:p text:style-name="P44"><text:span text:style-name="T12">CREATE</text:span><text:span text:style-name="T13"> </text:span><text:span text:style-name="T12">TRIGGER</text:span><text:span text:style-name="T13"> trigger_audit_rams</text:span></text:p>
      <text:p text:style-name="P44"><text:span text:style-name="T12">AFTER</text:span><text:span text:style-name="T13"> </text:span><text:span text:style-name="T12">INSERT</text:span><text:span text:style-name="T13"> </text:span><text:span text:style-name="T12">OR</text:span><text:span text:style-name="T13"> </text:span><text:span text:style-name="T12">UPDATE</text:span><text:span text:style-name="T13"> </text:span><text:span text:style-name="T12">OR</text:span><text:span text:style-name="T13"> </text:span><text:span text:style-name="T12">DELETE</text:span><text:span text:style-name="T13"> </text:span><text:span text:style-name="T12">ON</text:span><text:span text:style-name="T13"> rams</text:span></text:p>
      <text:p text:style-name="P44"><text:span text:style-name="T12">FOR</text:span><text:span text:style-name="T13"> </text:span><text:span text:style-name="T12">EACH</text:span><text:span text:style-name="T13"> </text:span><text:span text:style-name="T12">ROW</text:span><text:span text:style-name="T13"> </text:span><text:span text:style-name="T12">EXECUTE</text:span><text:span text:style-name="T13"> </text:span><text:span text:style-name="T12">PROCEDURE</text:span><text:span text:style-name="T13"> trigger_audit_log();</text:span></text:p>
      <text:p text:style-name="P41"/>
      <text:p text:style-name="P47">Пример работы триггера при событиях <text:span text:style-name="T22">DELETE, UPDATE и INSERT:</text:span></text:p>
      <text:p text:style-name="P48"><text:s/>id | table_name | operation | <text:s text:c="18"/>old_data <text:s text:c="18"/>| <text:s text:c="16"/>new_data <text:s text:c="20"/>| <text:s text:c="3"/>changed_at</text:p>
      <text:p text:style-name="P48">----+------------+-----------+----------------------------------------------+----------------------------------------------+-----------------</text:p>
      <text:p text:style-name="P48"><text:s text:c="2"/>1 | rams <text:s text:c="6"/>| UPDATE <text:s text:c="3"/>| {"id": 3, "name": "CRUCIAL", "price": 70000, | {"id": 3, "name": "CRUCIAL", "price": 1000, <text:s/>| 2026-03-03</text:p>
      <text:p text:style-name="P48"><text:s text:c="4"/>| <text:s text:c="11"/>| <text:s text:c="10"/>| <text:s/>"standard": "ddr5", "total_sales_sum": 0} <text:s text:c="2"/>| <text:s/>"standard": "ddr5", "total_sales_sum": 0} <text:s text:c="2"/>| 22:56:45.211027</text:p>
      <text:p text:style-name="P48"><text:s text:c="4"/>| <text:s text:c="11"/>| <text:s text:c="10"/>| <text:s text:c="45"/>| <text:s text:c="45"/>|</text:p>
      <text:p text:style-name="P48"><text:s text:c="2"/>2 | rams <text:s text:c="6"/>| INSERT <text:s text:c="3"/>| <text:s text:c="45"/>| {"id": 4, "name": "ATERMITER", "price": 1000,| 2026-03-03</text:p>
      <text:p text:style-name="P48"><text:s text:c="4"/>| <text:s text:c="11"/>| <text:s text:c="57"/>| <text:s/>"standard": "ddr1", "total_sales_sum": 0} <text:s text:c="2"/>| 22:56:45.212355</text:p>
      <text:p text:style-name="P48"><text:s text:c="4"/>| <text:s text:c="11"/>| <text:s text:c="10"/>| <text:s text:c="45"/>| <text:s text:c="45"/>| </text:p>
      <text:p text:style-name="P48"><text:s text:c="2"/>3 | rams <text:s text:c="6"/>| DELETE <text:s text:c="3"/>| {"id": 1, "name": "ADATA", "price": 22000, <text:s text:c="2"/>| <text:s text:c="45"/>| 2026-03-03 </text:p>
      <text:p text:style-name="P48"><text:s text:c="32"/>"standard": "ddr3", "total_sales_sum": 0} <text:s text:c="2"/>| <text:s text:c="45"/>| 22:56:45.213725</text:p>
      <text:p text:style-name="P48">(3 rows)</text:p>
      <text:p text:style-name="P41"/>
      <text:h text:style-name="P49" text:outline-level="1"><text:bookmark-start text:name="__RefHeading___Toc143_2058273410 Copy 1"/>ЗАКЛЮЧЕНИЕ<text:bookmark-end text:name="__RefHeading___Toc143_2058273410 Copy 1"/></text:h>
      <text:p text:style-name="P50">В ходе лабораторной работы <text:span text:style-name="T23">были </text:span>изучены механизмы PL/pgSQL для создания функций и триггеров в СУБД PostgreSQL<text:span text:style-name="T23">. </text:span>Основны<text:span text:style-name="T23">ми</text:span> результат<text:span text:style-name="T23">ами можно выделить:</text:span></text:p>
      <text:list text:style-name="L1">
        <text:list-item>
          <text:p text:style-name="P51">Автоматизаци<text:span text:style-name="T23">ю</text:span>: Реализована процедура и триггер для автоматической агрегации данных, что гарантирует их согласованность без участия пользователя.</text:p>
        </text:list-item>
        <text:list-item>
          <text:p text:style-name="P51">Управление данными: Настроен триггер для распределения записей по таблицам <text:s/>на основе дат, что оптимизирует хранение информации.</text:p>
        </text:list-item>
        <text:list-item>
          <text:p text:style-name="P51">Валидаци<text:span text:style-name="T23">ю</text:span> и нормализаци<text:span text:style-name="T23">ю</text:span>: С помощью триггеров типа BEFORE реализована автоматическая подмена значений по словарю, минимизирующая ошибки ручного ввода.</text:p>
        </text:list-item>
        <text:list-item>
          <text:p text:style-name="P51">Безопасность и аудит: На базе специальных переменных (NEW, OLD, TG_OP) создана система логирования изменений. Это обеспечивает прослеживаемость действи<text:span text:style-name="T23">й</text:span>, необходимую для защиты информации.</text:p>
        </text:list-item>
      </text:list>
      <text:p text:style-name="P50"><text:span text:style-name="T23">По итогу можно выделить, что и</text:span>спользование триггеров позволяет перенести критическую бизнес-логику и контроль целостности на уровень СУБД, обеспечивая надёжность данных независимо от внешних приложени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5:54:10.970395995</meta:creation-date>
    <dc:date>2026-03-03T23:22:53.598984450</dc:date>
    <meta:editing-duration>PT8H27M</meta:editing-duration>
    <meta:editing-cycles>40</meta:editing-cycles>
    <meta:generator>LibreOffice/26.2.1.2$Linux_X86_64 LibreOffice_project/620$Build-2</meta:generator>
    <meta:document-statistic meta:table-count="0" meta:image-count="1" meta:object-count="0" meta:page-count="10" meta:paragraph-count="231" meta:word-count="1340" meta:character-count="10103" meta:non-whitespace-character-count="7796"/>
  </office:meta>
</office:document-meta>
</file>